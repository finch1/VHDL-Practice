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670000136F89351AFB.svm"/>
  <manifest:file-entry manifest:media-type="" manifest:full-path="Pictures/200000070000290900004C97CE0EAF90.svm"/>
  <manifest:file-entry manifest:media-type="" manifest:full-path="Pictures/2000000700005AA500001CA2BC484F0D.svm"/>
  <manifest:file-entry manifest:media-type="" manifest:full-path="Pictures/2000000700005B290000140E10E515CB.svm"/>
  <manifest:file-entry manifest:media-type="" manifest:full-path="Pictures/20000007000040CE000037EBFE2C78B8.svm"/>
  <manifest:file-entry manifest:media-type="" manifest:full-path="Pictures/2000000700005967000033FE0A570DF2.svm"/>
  <manifest:file-entry manifest:media-type="image/png" manifest:full-path="Pictures/1000000000000780000004381CFB1986.png"/>
  <manifest:file-entry manifest:media-type="" manifest:full-path="Pictures/200000070000705800004E580D8BDC9E.svm"/>
  <manifest:file-entry manifest:media-type="" manifest:full-path="Pictures/2000000700005E4300004D35581985FE.svm"/>
  <manifest:file-entry manifest:media-type="" manifest:full-path="Pictures/20000007000059D100002D7BA50E6EC0.svm"/>
  <manifest:file-entry manifest:media-type="" manifest:full-path="Pictures/2000000700004DD300001EB3B52EAC63.svm"/>
  <manifest:file-entry manifest:media-type="" manifest:full-path="Pictures/200000070000599C00001D4134C3C9B0.svm"/>
  <manifest:file-entry manifest:media-type="" manifest:full-path="Pictures/2000000700001FBC000025EF621A59E7.svm"/>
  <manifest:file-entry manifest:media-type="" manifest:full-path="Pictures/2000000700006C5000003B89C94DCD76.svm"/>
  <manifest:file-entry manifest:media-type="" manifest:full-path="Pictures/200000070000569D0000388A7B4B27AB.svm"/>
  <manifest:file-entry manifest:media-type="" manifest:full-path="Pictures/20000007000041A100003D30C47D9AC9.svm"/>
  <manifest:file-entry manifest:media-type="" manifest:full-path="Pictures/2000000700006141000050D3C1AA93A7.svm"/>
  <manifest:file-entry manifest:media-type="" manifest:full-path="Pictures/200000070000513C000020C40AB18B9C.svm"/>
  <manifest:file-entry manifest:media-type="" manifest:full-path="Pictures/2000000700006F01000049971E8DB3B4.svm"/>
  <manifest:file-entry manifest:media-type="" manifest:full-path="Pictures/20000007000057710000168994FFACB5.svm"/>
  <manifest:file-entry manifest:media-type="" manifest:full-path="Pictures/20000007000042DE000044A1F2942BE9.svm"/>
  <manifest:file-entry manifest:media-type="" manifest:full-path="Pictures/20000007000044F10000184BE20D2AC3.svm"/>
  <manifest:file-entry manifest:media-type="" manifest:full-path="Pictures/2000000700005ABF00002E3421997CB4.svm"/>
  <manifest:file-entry manifest:media-type="" manifest:full-path="Pictures/20000007000045AA000053B806CF3B39.svm"/>
  <manifest:file-entry manifest:media-type="image/png" manifest:full-path="Pictures/100000000000078000000438C988E3A4.png"/>
  <manifest:file-entry manifest:media-type="" manifest:full-path="Pictures/200000070000453F00001E49573F52C2.svm"/>
  <manifest:file-entry manifest:media-type="" manifest:full-path="Pictures/2000000700004BDD00004EF77055E908.svm"/>
  <manifest:file-entry manifest:media-type="" manifest:full-path="Pictures/200000070000462E00004B3FC24F8695.svm"/>
  <manifest:file-entry manifest:media-type="" manifest:full-path="Pictures/200000070000566800001830234CCE08.svm"/>
  <manifest:file-entry manifest:media-type="" manifest:full-path="Pictures/2000000700003F90000047A1E3CA0EA8.svm"/>
  <manifest:file-entry manifest:media-type="" manifest:full-path="Pictures/20000007000040B300002D11D420E9B7.svm"/>
  <manifest:file-entry manifest:media-type="" manifest:full-path="Pictures/2000000700007E9C00004CCC2E50BAF0.svm"/>
  <manifest:file-entry manifest:media-type="" manifest:full-path="Pictures/2000000700005560000034B74121FC10.svm"/>
  <manifest:file-entry manifest:media-type="" manifest:full-path="Pictures/2000000700007496000074E4312EB0F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fo:color="#ff33ff"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00%" style:text-autospace="none"/>
      <style:text-properties fo:color="#ff33ff" style:text-underline-style="solid" style:text-underline-width="auto" style:text-underline-color="font-color" fo:font-weight="bold" style:font-weight-asian="bold" style:font-weight-complex="bold"/>
    </style:style>
    <style:style style:name="P4" style:family="paragraph" style:parent-style-name="Standard">
      <style:paragraph-properties style:text-autospace="none"/>
      <style:text-properties fo:color="#ff33ff" style:text-underline-style="solid" style:text-underline-width="auto" style:text-underline-color="font-color" fo:font-weight="bold" style:font-weight-asian="bold" style:font-weight-complex="bold"/>
    </style:style>
    <style:style style:name="P5" style:family="paragraph" style:parent-style-name="Standard">
      <style:paragraph-properties fo:line-height="100%"/>
      <style:text-properties fo:color="#ff33ff"/>
    </style:style>
    <style:style style:name="P6" style:family="paragraph" style:parent-style-name="Standard">
      <style:paragraph-properties fo:line-height="100%" style:text-autospace="none"/>
      <style:text-properties fo:color="#ff33ff"/>
    </style:style>
    <style:style style:name="P7" style:family="paragraph" style:parent-style-name="Standard">
      <style:paragraph-properties style:text-autospace="none"/>
      <style:text-properties fo:color="#ff33ff"/>
    </style:style>
    <style:style style:name="P8" style:family="paragraph" style:parent-style-name="Standard">
      <style:paragraph-properties fo:line-height="100%" style:text-autospace="none"/>
      <style:text-properties fo:color="#ff33ff" style:text-underline-style="none"/>
    </style:style>
    <style:style style:name="P9" style:family="paragraph" style:parent-style-name="Standard">
      <style:paragraph-properties fo:line-height="100%" style:text-autospace="none"/>
      <style:text-properties fo:color="#ff33ff" style:text-underline-style="none" fo:font-weight="bold" style:font-weight-asian="bold" style:font-weight-complex="bold"/>
    </style:style>
    <style:style style:name="P10" style:family="paragraph" style:parent-style-name="Standard">
      <style:paragraph-properties fo:line-height="100%"/>
      <style:text-properties fo:color="#ff33ff" style:font-name="Times New Roman" fo:font-size="12pt" fo:font-weight="bold" style:font-name-asian="Consolas" style:font-size-asian="12pt" style:font-weight-asian="bold" style:font-name-complex="Consolas" style:font-size-complex="12pt" style:font-weight-complex="bold"/>
    </style:style>
    <style:style style:name="P11" style:family="paragraph" style:parent-style-name="Standard">
      <style:paragraph-properties fo:line-height="100%"/>
      <style:text-properties fo:color="#ff33ff"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line-height="100%"/>
      <style:text-properties style:use-window-font-color="true" style:text-underline-style="none" fo:font-weight="normal" style:font-weight-asian="normal" style:font-weight-complex="normal"/>
    </style:style>
    <style:style style:name="P13" style:family="paragraph" style:parent-style-name="Standard">
      <style:paragraph-properties fo:line-height="100%" style:text-autospace="none"/>
      <style:text-properties style:use-window-font-color="true" style:text-underline-style="none" fo:font-weight="normal" style:font-weight-asian="normal" style:font-weight-complex="normal"/>
    </style:style>
    <style:style style:name="P14" style:family="paragraph" style:parent-style-name="Standard">
      <style:paragraph-properties fo:line-height="100%"/>
      <style:text-properties style:use-window-font-color="true"/>
    </style:style>
    <style:style style:name="P15" style:family="paragraph" style:parent-style-name="Standard">
      <style:paragraph-properties style:text-autospace="none"/>
    </style:style>
    <style:style style:name="P16" style:family="paragraph" style:parent-style-name="Standard">
      <style:paragraph-properties style:text-autospace="non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17" style:family="paragraph" style:parent-style-name="Standard">
      <style:paragraph-properties fo:line-height="100%"/>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1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9" style:family="paragraph" style:parent-style-name="Standard">
      <style:paragraph-properties fo:line-height="100%"/>
      <style:text-properties fo:color="#000000" style:font-name="Consolas" fo:font-size="9.5pt" style:font-name-asian="Consolas" style:font-size-asian="9.5pt" style:font-name-complex="Consolas" style:font-size-complex="9.5pt"/>
    </style:style>
    <style:style style:name="P20" style:family="paragraph" style:parent-style-name="Standard">
      <style:paragraph-properties style:text-autospace="none"/>
      <style:text-properties fo:color="#000000" style:font-name="Consolas" fo:font-size="9.5pt" style:text-underline-style="none" fo:font-weight="normal" style:font-name-asian="Consolas" style:font-size-asian="9.5pt" style:font-weight-asian="normal" style:font-name-complex="Consolas" style:font-size-complex="9.5pt" style:font-weight-complex="normal"/>
    </style:style>
    <style:style style:name="P21" style:family="paragraph" style:parent-style-name="Standard">
      <style:paragraph-properties fo:line-height="100%"/>
      <style:text-properties fo:color="#000000" style:font-name="Consolas" fo:font-size="9.5pt" fo:font-style="normal" style:text-underline-style="solid" style:text-underline-width="auto" style:text-underline-color="font-color" fo:font-weight="bold" style:font-name-asian="Consolas" style:font-size-asian="9.5pt" style:font-style-asian="normal" style:font-weight-asian="bold" style:font-name-complex="Consolas" style:font-size-complex="9.5pt" style:font-style-complex="normal" style:font-weight-complex="bold"/>
    </style:style>
    <style:style style:name="P22" style:family="paragraph" style:parent-style-name="Standard">
      <style:paragraph-properties fo:line-height="100%"/>
      <style:text-properties fo:color="#000000"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23" style:family="paragraph" style:parent-style-name="Standard">
      <style:paragraph-properties style:text-autospace="none"/>
      <style:text-properties fo:color="#0000ff" style:font-name="Consolas" fo:font-size="9.5pt" fo:font-weight="bold" style:font-name-asian="Consolas" style:font-size-asian="9.5pt" style:font-weight-asian="bold" style:font-name-complex="Consolas" style:font-size-complex="9.5pt" style:font-weight-complex="bold"/>
    </style:style>
    <style:style style:name="P24" style:family="paragraph" style:parent-style-name="Standard">
      <style:paragraph-properties style:text-autospace="none"/>
      <style:text-properties fo:color="#007900" style:font-name="Consolas" fo:font-size="9.5pt" fo:font-weight="normal" style:font-name-asian="Consolas" style:font-size-asian="9.5pt" style:font-weight-asian="normal" style:font-name-complex="Consolas" style:font-size-complex="9.5pt" style:font-weight-complex="normal"/>
    </style:style>
    <style:style style:name="P25" style:family="paragraph" style:parent-style-name="Standard">
      <style:paragraph-properties fo:line-height="100%" style:text-autospace="none"/>
      <style:text-properties fo:color="#007900" style:font-name="Consolas" fo:font-size="9.5pt" fo:font-weight="normal" style:font-name-asian="Consolas" style:font-size-asian="9.5pt" style:font-weight-asian="normal" style:font-name-complex="Consolas" style:font-size-complex="9.5pt" style:font-weight-complex="normal"/>
    </style:style>
    <style:style style:name="P26" style:family="paragraph" style:parent-style-name="Standard">
      <style:paragraph-properties style:text-autospace="none"/>
      <style:text-properties fo:color="#0079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style:text-underline-style="none"/>
    </style:style>
    <style:style style:name="P28" style:family="paragraph" style:parent-style-name="Standard">
      <style:paragraph-properties style:text-autospace="none"/>
      <style:text-properties fo:font-size="9.5pt" style:font-size-asian="9.5pt" style:font-size-complex="9.5pt"/>
    </style:style>
    <style:style style:name="P29" style:family="paragraph" style:parent-style-name="Standard">
      <style:paragraph-properties style:text-autospace="none"/>
      <style:text-properties style:font-name="NimbusRomNo9L-Regu" fo:font-size="10pt" style:font-name-asian="NimbusRomNo9L-Regu" style:font-size-asian="10pt" style:font-name-complex="NimbusRomNo9L-Regu" style:font-size-complex="10pt"/>
    </style:style>
    <style:style style:name="P30" style:family="paragraph" style:parent-style-name="Preformatted_20_Text">
      <style:paragraph-properties fo:margin-top="0in" fo:margin-bottom="0.1965in"/>
    </style:style>
    <style:style style:name="P31" style:family="paragraph" style:parent-style-name="Preformatted_20_Text">
      <style:paragraph-properties fo:margin-top="0in" fo:margin-bottom="0.1965in"/>
      <style:text-properties style:text-underline-style="none"/>
    </style:style>
    <style:style style:name="P32" style:family="paragraph" style:parent-style-name="Preformatted_20_Text">
      <style:paragraph-properties fo:margin-top="0in" fo:margin-bottom="0.1965in"/>
      <style:text-properties fo:color="#ff33ff" style:font-name="Times New Roman" style:text-underline-style="solid" style:text-underline-width="auto" style:text-underline-color="font-color" fo:font-weight="bold" style:font-weight-asian="bold" style:font-weight-complex="bold"/>
    </style:style>
    <style:style style:name="P33" style:family="paragraph" style:parent-style-name="Preformatted_20_Text">
      <style:paragraph-properties fo:margin-top="0in" fo:margin-bottom="0.1965in"/>
      <style:text-properties fo:color="#ff33ff" style:font-name="Times New Roman" fo:font-size="10pt" style:text-underline-style="solid" style:text-underline-width="auto" style:text-underline-color="font-color" fo:font-weight="bold" style:font-name-asian="NimbusRomNo9L-Regu" style:font-size-asian="10pt" style:font-weight-asian="bold" style:font-name-complex="NimbusRomNo9L-Regu" style:font-size-complex="10pt" style:font-weight-complex="bold"/>
    </style:style>
    <style:style style:name="P34" style:family="paragraph" style:parent-style-name="Preformatted_20_Text">
      <style:paragraph-properties fo:margin-top="0in" fo:margin-bottom="0.1965in"/>
      <style:text-properties fo:color="#ff33ff" style:font-name="Times New Roman"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35" style:family="paragraph" style:parent-style-name="Preformatted_20_Text">
      <style:paragraph-properties fo:margin-top="0in" fo:margin-bottom="0.1965in"/>
      <style:text-properties fo:font-weight="bold" style:font-weight-asian="bold" style:font-weight-complex="bold"/>
    </style:style>
    <style:style style:name="P36" style:family="paragraph" style:parent-style-name="Heading_20_1">
      <style:paragraph-properties fo:margin-top="0in" fo:margin-bottom="0.1965in"/>
    </style:style>
    <style:style style:name="P37" style:family="paragraph" style:parent-style-name="Standard">
      <style:paragraph-properties fo:margin-top="0in" fo:margin-bottom="0.1965in"/>
    </style:style>
    <style:style style:name="P38" style:family="paragraph" style:parent-style-name="Standard">
      <style:paragraph-properties fo:margin-top="0in" fo:margin-bottom="0.1965in"/>
      <style:text-properties style:font-name="NimbusRomNo9L-Regu" fo:font-size="9.5pt" style:text-underline-style="none" style:font-name-asian="NimbusRomNo9L-Regu" style:font-size-asian="9.5pt" style:font-name-complex="NimbusRomNo9L-Regu" style:font-size-complex="9.5pt"/>
    </style:style>
    <style:style style:name="P39" style:family="paragraph" style:parent-style-name="Standard">
      <style:paragraph-properties fo:margin-top="0in" fo:margin-bottom="0.1965in"/>
      <style:text-properties fo:color="#0000ff" style:font-name="Consolas" fo:font-size="9.5pt" fo:font-weight="bold" style:font-name-asian="Consolas" style:font-size-asian="9.5pt" style:font-weight-asian="bold" style:font-name-complex="Consolas" style:font-size-complex="9.5pt" style:font-weight-complex="bold"/>
    </style:style>
    <style:style style:name="P40" style:family="paragraph" style:parent-style-name="Standard">
      <style:paragraph-properties style:text-autospace="none"/>
      <style:text-properties fo:color="#007900" style:font-name="Consolas" fo:font-size="9.5pt" fo:font-weight="normal" style:font-name-asian="Consolas" style:font-size-asian="9.5pt" style:font-weight-asian="normal" style:font-name-complex="Consolas" style:font-size-complex="9.5pt" style:font-weight-complex="normal"/>
    </style:style>
    <style:style style:name="P41" style:family="paragraph" style:parent-style-name="Standard">
      <style:paragraph-properties style:text-autospace="none"/>
      <style:text-properties fo:color="#007900" style:font-name="Consolas" fo:font-size="9.5pt" style:font-name-asian="Consolas" style:font-size-asian="9.5pt" style:font-name-complex="Consolas" style:font-size-complex="9.5pt"/>
    </style:style>
    <style:style style:name="P42" style:family="paragraph" style:parent-style-name="Standard">
      <style:paragraph-properties style:text-autospace="non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4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4" style:family="paragraph" style:parent-style-name="Standard">
      <style:paragraph-properties style:text-autospace="none"/>
    </style:style>
    <style:style style:name="P45" style:family="paragraph" style:parent-style-name="Standard">
      <style:paragraph-properties fo:line-height="100%"/>
    </style:style>
    <style:style style:name="P46" style:family="paragraph" style:parent-style-name="Standard">
      <style:paragraph-properties fo:line-height="100%"/>
      <style:text-properties style:use-window-font-color="true" style:text-underline-style="none" fo:font-weight="normal" style:font-weight-asian="normal" style:font-weight-complex="normal"/>
    </style:style>
    <style:style style:name="P47" style:family="paragraph" style:parent-style-name="Standard">
      <style:paragraph-properties style:text-autospace="none"/>
      <style:text-properties fo:color="#0000ff" style:font-name="Consolas" fo:font-size="9.5pt" fo:font-weight="bold" style:font-name-asian="Consolas" style:font-size-asian="9.5pt" style:font-weight-asian="bold" style:font-name-complex="Consolas" style:font-size-complex="9.5pt" style:font-weight-complex="bold"/>
    </style:style>
    <style:style style:name="P48" style:family="paragraph" style:parent-style-name="Standard">
      <style:paragraph-properties fo:line-height="100%"/>
      <style:text-properties fo:color="#ff33ff" style:text-underline-style="solid" style:text-underline-width="auto" style:text-underline-color="font-color" fo:font-weight="bold" style:font-weight-asian="bold" style:font-weight-complex="bold"/>
    </style:style>
    <style:style style:name="P49" style:family="paragraph" style:parent-style-name="Standard">
      <style:paragraph-properties fo:margin-top="0in" fo:margin-bottom="0.1965in"/>
      <style:text-properties fo:color="#0000ff" style:font-name="Consolas" fo:font-size="9.5pt" fo:font-weight="bold" style:font-name-asian="Consolas" style:font-size-asian="9.5pt" style:font-weight-asian="bold" style:font-name-complex="Consolas" style:font-size-complex="9.5pt" style:font-weight-complex="bold"/>
    </style:style>
    <style:style style:name="P50" style:family="paragraph" style:parent-style-name="Standard">
      <style:paragraph-properties fo:margin-left="0.4925in" fo:margin-right="0in" fo:text-indent="0in" style:auto-text-indent="false" style:text-autospace="none"/>
    </style:style>
    <style:style style:name="P51" style:family="paragraph" style:parent-style-name="Preformatted_20_Text">
      <style:paragraph-properties fo:margin-top="0in" fo:margin-bottom="0.1965in"/>
    </style:style>
    <style:style style:name="P52" style:family="paragraph" style:parent-style-name="Preformatted_20_Text">
      <style:paragraph-properties fo:margin-top="0in" fo:margin-bottom="0.1965in"/>
      <style:text-properties fo:color="#ff33ff" style:font-name="Times New Roman" style:text-underline-style="solid" style:text-underline-width="auto" style:text-underline-color="font-color" fo:font-weight="bold" style:font-weight-asian="bold" style:font-weight-complex="bold"/>
    </style:style>
    <style:style style:name="P53" style:family="paragraph" style:parent-style-name="Preformatted_20_Text">
      <style:paragraph-properties fo:margin-top="0in" fo:margin-bottom="0.1965in"/>
      <style:text-properties fo:color="#0000ff" style:font-name="Consolas" fo:font-size="9.5pt" fo:font-weight="bold" style:font-name-asian="Consolas" style:font-size-asian="9.5pt" style:font-weight-asian="bold" style:font-name-complex="Consolas" style:font-size-complex="9.5pt" style:font-weight-complex="bold"/>
    </style:style>
    <style:style style:name="T1" style:family="text">
      <style:text-properties fo:color="#ff33ff" style:text-underline-style="solid" style:text-underline-width="auto" style:text-underline-color="font-color" fo:font-weight="bold" style:font-weight-asian="bold" style:font-weight-complex="bold"/>
    </style:style>
    <style:style style:name="T2" style:family="text">
      <style:text-properties fo:color="#ff33ff" style:font-name="Times New Roman" style:text-underline-style="solid" style:text-underline-width="auto" style:text-underline-color="font-color" fo:font-weight="bold" style:font-weight-asian="bold" style:font-weight-complex="bold"/>
    </style:style>
    <style:style style:name="T3" style:family="text">
      <style:text-properties fo:color="#ff33ff" style:font-name="Times New Roman" fo:font-size="10pt" style:text-underline-style="solid" style:text-underline-width="auto" style:text-underline-color="font-color" fo:font-weight="bold" style:font-name-asian="NimbusRomNo9L-Regu" style:font-size-asian="10pt" style:font-weight-asian="bold" style:font-name-complex="NimbusRomNo9L-Regu" style:font-size-complex="10pt" style:font-weight-complex="bold"/>
    </style:style>
    <style:style style:name="T4" style:family="text">
      <style:text-properties fo:color="#ff33ff" style:font-name="Times New Roman" fo:font-size="10pt" style:text-underline-style="solid" style:text-underline-width="auto" style:text-underline-color="font-color" style:font-name-asian="NimbusRomNo9L-Regu" style:font-size-asian="10pt" style:font-name-complex="NimbusRomNo9L-Regu" style:font-size-complex="10pt"/>
    </style:style>
    <style:style style:name="T5" style:family="text">
      <style:text-properties fo:color="#ff33ff" style:font-name="Times New Roman" fo:font-size="10pt" fo:language="en" fo:country="US" style:text-underline-style="solid" style:text-underline-width="auto" style:text-underline-color="font-color" fo:font-weight="bold" style:font-name-asian="NimbusRomNo9L-Regu" style:font-size-asian="10pt" style:font-weight-asian="bold" style:font-name-complex="NimbusRomNo9L-Regu" style:font-size-complex="10pt" style:font-weight-complex="bold"/>
    </style:style>
    <style:style style:name="T6"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7" style:family="text">
      <style:text-properties fo:color="#0000ff" style:font-name="Consolas" fo:font-size="9.5pt" fo:font-weight="normal" style:font-name-asian="Consolas" style:font-size-asian="9.5pt" style:font-weight-asian="normal" style:font-name-complex="Consolas" style:font-size-complex="9.5pt" style:font-weight-complex="normal"/>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style:font-name="Consolas" fo:font-size="9.5pt" fo:language="en" fo:country="US" fo:font-weight="bold" style:font-name-asian="Consolas" style:font-size-asian="9.5pt" style:font-weight-asian="bold" style:font-name-complex="Consolas" style:font-size-complex="9.5pt" style:font-weight-complex="bold"/>
    </style:style>
    <style:style style:name="T10" style:family="text">
      <style:text-properties fo:color="#0000ff" style:font-name="Consolas" fo:font-weight="bold" style:font-name-asian="Consolas" style:font-weight-asian="bold" style:font-name-complex="Consolas" style:font-weight-complex="bold"/>
    </style:style>
    <style:style style:name="T11" style:family="text">
      <style:text-properties fo:color="#0000ff" fo:font-weight="bold" style:font-weight-asian="bold" style:font-weight-complex="bold"/>
    </style:style>
    <style:style style:name="T12" style:family="text">
      <style:text-properties fo:color="#000000"/>
    </style:style>
    <style:style style:name="T13"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14"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15" style:family="text">
      <style:text-properties fo:color="#000000" style:font-name="Consolas" fo:font-size="9.5pt" style:font-name-asian="Consolas" style:font-size-asian="9.5pt" style:font-name-complex="Consolas" style:font-size-complex="9.5pt"/>
    </style:style>
    <style:style style:name="T16" style:family="text">
      <style:text-properties fo:color="#000000" style:font-name="Consolas" fo:font-size="9.5pt" fo:language="en" fo:country="US" fo:font-weight="normal" style:font-name-asian="Consolas" style:font-size-asian="9.5pt" style:font-weight-asian="normal" style:font-name-complex="Consolas" style:font-size-complex="9.5pt" style:font-weight-complex="normal"/>
    </style:style>
    <style:style style:name="T17" style:family="text">
      <style:text-properties fo:color="#000000" style:font-name="Consolas" fo:font-weight="normal" style:font-name-asian="Consolas" style:font-weight-asian="normal" style:font-name-complex="Consolas" style:font-weight-complex="normal"/>
    </style:style>
    <style:style style:name="T18" style:family="text">
      <style:text-properties fo:color="#000000" style:font-name="Consolas" fo:font-weight="bold" style:font-name-asian="Consolas" style:font-weight-asian="bold" style:font-name-complex="Consolas" style:font-weight-complex="bold"/>
    </style:style>
    <style:style style:name="T19" style:family="text">
      <style:text-properties fo:color="#000000" fo:font-weight="normal" style:font-weight-asian="normal" style:font-weight-complex="normal"/>
    </style:style>
    <style:style style:name="T20" style:family="text">
      <style:text-properties fo:color="#000000" style:font-name="Arial" fo:font-size="10pt" fo:language="en" fo:country="US" fo:font-weight="normal" style:font-size-asian="10pt" style:font-weight-asian="normal" style:font-size-complex="10pt" style:font-weight-complex="normal"/>
    </style:style>
    <style:style style:name="T21" style:family="text">
      <style:text-properties fo:color="#816641"/>
    </style:style>
    <style:style style:name="T22" style:family="text">
      <style:text-properties fo:color="#816641" style:font-name="Consolas" fo:font-size="9.5pt" fo:font-weight="normal" style:font-name-asian="Consolas" style:font-size-asian="9.5pt" style:font-weight-asian="normal" style:font-name-complex="Consolas" style:font-size-complex="9.5pt" style:font-weight-complex="normal"/>
    </style:style>
    <style:style style:name="T23" style:family="text">
      <style:text-properties fo:color="#816641" style:font-name="Consolas" fo:font-size="9.5pt" style:font-name-asian="Consolas" style:font-size-asian="9.5pt" style:font-name-complex="Consolas" style:font-size-complex="9.5pt"/>
    </style:style>
    <style:style style:name="T24" style:family="text">
      <style:text-properties fo:color="#816641" style:font-name="Consolas" fo:font-size="9.5pt" fo:language="en" fo:country="US" fo:font-weight="normal" style:font-name-asian="Consolas" style:font-size-asian="9.5pt" style:font-weight-asian="normal" style:font-name-complex="Consolas" style:font-size-complex="9.5pt" style:font-weight-complex="normal"/>
    </style:style>
    <style:style style:name="T25" style:family="text">
      <style:text-properties fo:color="#816641" style:font-name="Consolas" fo:font-weight="normal" style:font-name-asian="Consolas" style:font-weight-asian="normal" style:font-name-complex="Consolas" style:font-weight-complex="normal"/>
    </style:style>
    <style:style style:name="T26" style:family="text">
      <style:text-properties fo:color="#1580bf" style:font-name="Consolas" fo:font-size="9.5pt" fo:font-weight="normal" style:font-name-asian="Consolas" style:font-size-asian="9.5pt" style:font-weight-asian="normal" style:font-name-complex="Consolas" style:font-size-complex="9.5pt" style:font-weight-complex="normal"/>
    </style:style>
    <style:style style:name="T27" style:family="text">
      <style:text-properties fo:color="#1580bf" style:font-name="Consolas" fo:font-weight="normal" style:font-name-asian="Consolas" style:font-weight-asian="normal" style:font-name-complex="Consolas" style:font-weight-complex="normal"/>
    </style:style>
    <style:style style:name="T28" style:family="text">
      <style:text-properties fo:color="#2f4e80" style:font-name="Consolas" fo:font-size="9.5pt" fo:font-weight="normal" style:font-name-asian="Consolas" style:font-size-asian="9.5pt" style:font-weight-asian="normal" style:font-name-complex="Consolas" style:font-size-complex="9.5pt" style:font-weight-complex="normal"/>
    </style:style>
    <style:style style:name="T29" style:family="text">
      <style:text-properties fo:color="#2f4e80" style:font-name="Consolas" fo:font-weight="normal" style:font-name-asian="Consolas" style:font-weight-asian="normal" style:font-name-complex="Consolas" style:font-weight-complex="normal"/>
    </style:style>
    <style:style style:name="T30" style:family="text">
      <style:text-properties fo:color="#400080" style:font-name="Consolas" fo:font-size="9.5pt" fo:font-weight="normal" style:font-name-asian="Consolas" style:font-size-asian="9.5pt" style:font-weight-asian="normal" style:font-name-complex="Consolas" style:font-size-complex="9.5pt" style:font-weight-complex="normal"/>
    </style:style>
    <style:style style:name="T31" style:family="text">
      <style:text-properties fo:color="#ff00ff" style:font-name="Consolas" fo:font-size="9.5pt" fo:font-weight="normal" style:font-name-asian="Consolas" style:font-size-asian="9.5pt" style:font-weight-asian="normal" style:font-name-complex="Consolas" style:font-size-complex="9.5pt" style:font-weight-complex="normal"/>
    </style:style>
    <style:style style:name="T32" style:family="text">
      <style:text-properties fo:color="#ff00ff" style:font-name="Consolas" fo:font-weight="normal" style:font-name-asian="Consolas" style:font-weight-asian="normal" style:font-name-complex="Consolas" style:font-weight-complex="normal"/>
    </style:style>
    <style:style style:name="T33" style:family="text">
      <style:text-properties fo:color="#d50000" style:font-name="Consolas" fo:font-size="9.5pt" fo:font-weight="normal" style:font-name-asian="Consolas" style:font-size-asian="9.5pt" style:font-weight-asian="normal" style:font-name-complex="Consolas" style:font-size-complex="9.5pt" style:font-weight-complex="normal"/>
    </style:style>
    <style:style style:name="T34" style:family="text">
      <style:text-properties fo:color="#800000" style:font-name="Consolas" fo:font-size="9.5pt" fo:font-weight="normal" style:font-name-asian="Consolas" style:font-size-asian="9.5pt" style:font-weight-asian="normal" style:font-name-complex="Consolas" style:font-size-complex="9.5pt" style:font-weight-complex="normal"/>
    </style:style>
    <style:style style:name="T35" style:family="text">
      <style:text-properties fo:color="#800000" style:font-name="Consolas" fo:font-weight="normal" style:font-name-asian="Consolas" style:font-weight-asian="normal" style:font-name-complex="Consolas" style:font-weight-complex="normal"/>
    </style:style>
    <style:style style:name="T36" style:family="text">
      <style:text-properties fo:color="#007900" style:font-name="Consolas" fo:font-size="9.5pt" fo:font-weight="normal" style:font-name-asian="Consolas" style:font-size-asian="9.5pt" style:font-weight-asian="normal" style:font-name-complex="Consolas" style:font-size-complex="9.5pt" style:font-weight-complex="normal"/>
    </style:style>
    <style:style style:name="T37" style:family="text">
      <style:text-properties fo:color="#007900" style:font-name="Consolas" fo:font-weight="normal" style:font-name-asian="Consolas" style:font-weight-asian="normal" style:font-name-complex="Consolas" style:font-weight-complex="normal"/>
    </style:style>
    <style:style style:name="T38" style:family="text">
      <style:text-properties fo:color="#919191" style:font-name="Consolas" fo:font-size="9.5pt" fo:font-weight="normal" style:font-name-asian="Consolas" style:font-size-asian="9.5pt" style:font-weight-asian="normal" style:font-name-complex="Consolas" style:font-size-complex="9.5pt" style:font-weight-complex="normal"/>
    </style:style>
    <style:style style:name="T39" style:family="text">
      <style:text-properties fo:color="#8000ff" style:font-name="Consolas" fo:font-size="9.5pt" fo:font-weight="normal" style:font-name-asian="Consolas" style:font-size-asian="9.5pt" style:font-weight-asian="normal" style:font-name-complex="Consolas" style:font-size-complex="9.5pt" style:font-weight-complex="normal"/>
    </style:style>
    <style:style style:name="T40" style:family="text">
      <style:text-properties fo:color="#8000ff" style:font-name="Consolas" fo:font-weight="normal" style:font-name-asian="Consolas" style:font-weight-asian="normal" style:font-name-complex="Consolas" style:font-weight-complex="normal"/>
    </style:style>
    <style:style style:name="T41" style:family="text">
      <style:text-properties style:text-underline-style="none" fo:font-weight="normal" style:font-weight-asian="normal" style:font-weight-complex="normal"/>
    </style:style>
    <style:style style:name="T4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2" fo:column-gap="0in">
          <style:column style:rel-width="7632*" fo:start-indent="0in" fo:end-indent="0in"/>
          <style:column style:rel-width="7632*"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 BY 1D ARRAY WITH DIRECT OUTPUT</text:p>
      <text:p text:style-name="P2"/>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row</text:span><text:span text:style-name="T13">: </text:span><text:span text:style-name="T6">in</text:span><text:span text:style-name="T13"> </text:span><text:span text:style-name="T28">integer</text:span><text:span text:style-name="T13"> </text:span><text:span text:style-name="T6">range</text:span><text:span text:style-name="T13"> </text:span><text:span text:style-name="T31">1</text:span><text:span text:style-name="T13"> </text:span><text:span text:style-name="T6">to</text:span><text:span text:style-name="T13"> </text:span><text:span text:style-name="T31">3</text:span><text:span text:style-name="T13">;</text:span></text:p>
      <text:p text:style-name="P15"><text:span text:style-name="T13"><text:s text:c="4"/></text:span><text:span text:style-name="T26">column</text:span><text:span text:style-name="T13">: </text:span><text:span text:style-name="T6">in</text:span><text:span text:style-name="T13"> </text:span><text:span text:style-name="T28">integer</text:span><text:span text:style-name="T13"> </text:span><text:span text:style-name="T6">range</text:span><text:span text:style-name="T13"> </text:span><text:span text:style-name="T31">0</text:span><text:span text:style-name="T13"> </text:span><text:span text:style-name="T6">to</text:span><text:span text:style-name="T13"> </text:span><text:span text:style-name="T31">4</text:span><text:span text:style-name="T13">; </text:span><text:span text:style-name="T36">--3 bits</text:span></text:p>
      <text:p text:style-name="P15"><text:span text:style-name="T13"><text:s text:c="4"/></text:span><text:span text:style-name="T26">slice1</text:span><text:span text:style-name="T13">: </text:span><text:span text:style-name="T6">out</text:span><text:span text:style-name="T13"> </text:span><text:span text:style-name="T28">bit</text:span><text:span text:style-name="T13">;</text:span></text:p>
      <text:p text:style-name="P15"><text:span text:style-name="T13"><text:s text:c="4"/></text:span><text:span text:style-name="T26">slice2</text:span><text:span text:style-name="T13">: </text:span><text:span text:style-name="T6">out</text:span><text:span text:style-name="T13"> </text:span><text:span text:style-name="T28">bit_vector</text:span><text:span text:style-name="T13">(</text:span><text:span text:style-name="T31">1</text:span><text:span text:style-name="T13"> </text:span><text:span text:style-name="T6">to</text:span><text:span text:style-name="T13"> </text:span><text:span text:style-name="T31">2</text:span><text:span text:style-name="T13">);</text:span></text:p>
      <text:p text:style-name="P15"><text:span text:style-name="T13"><text:s text:c="4"/></text:span><text:span text:style-name="T26">slice3</text:span><text:span text:style-name="T13">: </text:span><text:span text:style-name="T6">out</text:span><text:span text:style-name="T13"> </text:span><text:span text:style-name="T28">bit_vector</text:span><text:span text:style-name="T13">(</text:span><text:span text:style-name="T31">1</text:span><text:span text:style-name="T13"> </text:span><text:span text:style-name="T6">to</text:span><text:span text:style-name="T13"> </text:span><text:span text:style-name="T31">4</text:span><text:span text:style-name="T13">);</text:span></text:p>
      <text:p text:style-name="P15"><text:span text:style-name="T13"><text:s text:c="4"/></text:span><text:span text:style-name="T26">slice4</text:span><text:span text:style-name="T13">: </text:span><text:span text:style-name="T6">out</text:span><text:span text:style-name="T13"> </text:span><text:span text:style-name="T28">bit_vector</text:span><text:span text:style-name="T13">(</text:span><text:span text:style-name="T31">1</text:span><text:span text:style-name="T13"> </text:span><text:span text:style-name="T6">to</text:span><text:span text:style-name="T13"> </text:span><text:span text:style-name="T31">3</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ray_slice</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type</text:span><text:span text:style-name="T13"> </text:span><text:span text:style-name="T28">onedoned</text:span><text:span text:style-name="T13"> </text:span><text:span text:style-name="T6">is</text:span><text:span text:style-name="T13"> </text:span><text:span text:style-name="T6">array</text:span><text:span text:style-name="T13"> (</text:span><text:span text:style-name="T31">1</text:span><text:span text:style-name="T13"> </text:span><text:span text:style-name="T6">to</text:span><text:span text:style-name="T13"> </text:span><text:span text:style-name="T31">3</text:span><text:span text:style-name="T13">) </text:span><text:span text:style-name="T6">of</text:span><text:span text:style-name="T13"> </text:span><text:span text:style-name="T28">bit_vector</text:span><text:span text:style-name="T13"> (</text:span><text:span text:style-name="T31">1</text:span><text:span text:style-name="T13"> </text:span><text:span text:style-name="T6">to</text:span><text:span text:style-name="T13"> </text:span><text:span text:style-name="T31">4</text:span><text:span text:style-name="T13">);</text:span></text:p>
      <text:p text:style-name="P15"><text:span text:style-name="T13"><text:s text:c="4"/></text:span><text:span text:style-name="T6">constant</text:span><text:span text:style-name="T13"> </text:span><text:span text:style-name="T7">table</text:span><text:span text:style-name="T13">: </text:span><text:span text:style-name="T28">onedoned</text:span><text:span text:style-name="T13"> :=(<text:tab/>(</text:span><text:span text:style-name="T34">"0001"</text:span><text:span text:style-name="T13">), <text:s text:c="7"/></text:span><text:span text:style-name="T36">--1</text:span></text:p>
      <text:p text:style-name="P15"><text:span text:style-name="T13"><text:s text:c="4"/><text:tab/><text:tab/><text:tab/><text:tab/><text:tab/>(</text:span><text:span text:style-name="T34">'1'</text:span><text:span text:style-name="T13">,</text:span><text:span text:style-name="T34">'0'</text:span><text:span text:style-name="T13">,</text:span><text:span text:style-name="T34">'0'</text:span><text:span text:style-name="T13">,</text:span><text:span text:style-name="T34">'1'</text:span><text:span text:style-name="T13">), <text:s text:c="7"/></text:span><text:span text:style-name="T36">--9</text:span></text:p>
      <text:p text:style-name="P15"><text:span text:style-name="T13"><text:tab/><text:tab/><text:tab/><text:tab/><text:tab/>(</text:span><text:span text:style-name="T34">'1'</text:span><text:span text:style-name="T13">,</text:span><text:span text:style-name="T34">'1'</text:span><text:span text:style-name="T13">,</text:span><text:span text:style-name="T34">'0'</text:span><text:span text:style-name="T13">,</text:span><text:span text:style-name="T34">'1'</text:span><text:span text:style-name="T13">)); <text:s text:c="6"/></text:span><text:span text:style-name="T36">--13</text:span></text:p>
      <text:p text:style-name="P23">begin</text:p>
      <text:p text:style-name="P15"><text:span text:style-name="T13"><text:s text:c="4"/></text:span><text:span text:style-name="T26">slice1</text:span><text:span text:style-name="T13"> &lt;= </text:span><text:span text:style-name="T7">table</text:span><text:span text:style-name="T13">(</text:span><text:span text:style-name="T26">row</text:span><text:span text:style-name="T13">)(</text:span><text:span text:style-name="T26">column</text:span><text:span text:style-name="T13">);</text:span></text:p>
      <text:p text:style-name="P15"><text:span text:style-name="T13"><text:s text:c="4"/></text:span><text:span text:style-name="T26">slice2</text:span><text:span text:style-name="T13"> &lt;= </text:span><text:span text:style-name="T7">table</text:span><text:span text:style-name="T13">(</text:span><text:span text:style-name="T26">row</text:span><text:span text:style-name="T13">)(</text:span><text:span text:style-name="T31">1</text:span><text:span text:style-name="T13"> </text:span><text:span text:style-name="T6">to</text:span><text:span text:style-name="T13"> </text:span><text:span text:style-name="T31">2</text:span><text:span text:style-name="T13">);</text:span></text:p>
      <text:p text:style-name="P15"><text:span text:style-name="T13"><text:s text:c="4"/></text:span><text:span text:style-name="T26">slice3</text:span><text:span text:style-name="T13"> &lt;= </text:span><text:span text:style-name="T7">table</text:span><text:span text:style-name="T13">(</text:span><text:span text:style-name="T26">row</text:span><text:span text:style-name="T13">)(</text:span><text:span text:style-name="T31">1</text:span><text:span text:style-name="T13"> </text:span><text:span text:style-name="T6">to</text:span><text:span text:style-name="T13"> </text:span><text:span text:style-name="T31">4</text:span><text:span text:style-name="T13">);</text:span></text:p>
      <text:p text:style-name="P15"><text:span text:style-name="T13"><text:s text:c="4"/></text:span><text:span text:style-name="T38">gen</text:span><text:span text:style-name="T13">: </text:span><text:span text:style-name="T6">for</text:span><text:span text:style-name="T13"> </text:span><text:span text:style-name="T30">i</text:span><text:span text:style-name="T13"> </text:span><text:span text:style-name="T6">in</text:span><text:span text:style-name="T13"> </text:span><text:span text:style-name="T31">1</text:span><text:span text:style-name="T13"> </text:span><text:span text:style-name="T6">to</text:span><text:span text:style-name="T13"> </text:span><text:span text:style-name="T31">3</text:span><text:span text:style-name="T13"> </text:span><text:span text:style-name="T6">generate</text:span></text:p>
      <text:p text:style-name="P15"><text:span text:style-name="T13"><text:s text:c="8"/></text:span><text:span text:style-name="T26">slice4</text:span><text:span text:style-name="T13">(</text:span><text:span text:style-name="T30">i</text:span><text:span text:style-name="T13">) &lt;= </text:span><text:span text:style-name="T7">table</text:span><text:span text:style-name="T13">(</text:span><text:span text:style-name="T30">i</text:span><text:span text:style-name="T13">)(</text:span><text:span text:style-name="T26">column</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5"><draw:frame draw:style-name="fr1" draw:name="graphics11" text:anchor-type="paragraph" svg:x="3.702in" svg:y="0.2138in" svg:width="6.8047in" svg:height="3.572in" draw:z-index="33"><draw:image xlink:href="Pictures/2000000700005ABF00002E3421997CB4.svm" xlink:type="simple" xlink:show="embed" xlink:actuate="onLoad"/></draw:frame><text:span text:style-name="T6">end</text:span><text:span text:style-name="T13"> </text:span><text:span text:style-name="T22">array_slice</text:span><text:span text:style-name="T13">;</text:span></text:p>
      <text:p text:style-name="P2"><text:soft-page-break/>2D ARRAY WITH DIRECT OUTPUT</text:p>
      <text:p text:style-name="P2"/>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row</text:span><text:span text:style-name="T13">: </text:span><text:span text:style-name="T6">in</text:span><text:span text:style-name="T13"> </text:span><text:span text:style-name="T28">integer</text:span><text:span text:style-name="T13"> </text:span><text:span text:style-name="T6">range</text:span><text:span text:style-name="T13"> </text:span><text:span text:style-name="T31">0</text:span><text:span text:style-name="T13"> </text:span><text:span text:style-name="T6">to</text:span><text:span text:style-name="T13"> </text:span><text:span text:style-name="T31">3</text:span><text:span text:style-name="T13">;</text:span></text:p>
      <text:p text:style-name="P15"><text:span text:style-name="T13"><text:s text:c="4"/></text:span><text:span text:style-name="T26">column</text:span><text:span text:style-name="T13">: </text:span><text:span text:style-name="T6">in</text:span><text:span text:style-name="T13"> </text:span><text:span text:style-name="T28">integer</text:span><text:span text:style-name="T13"> </text:span><text:span text:style-name="T6">range</text:span><text:span text:style-name="T13"> </text:span><text:span text:style-name="T31">0</text:span><text:span text:style-name="T13"> </text:span><text:span text:style-name="T6">to</text:span><text:span text:style-name="T13"> </text:span><text:span text:style-name="T31">4</text:span><text:span text:style-name="T13">; </text:span><text:span text:style-name="T36">--3 bits</text:span></text:p>
      <text:p text:style-name="P15"><text:span text:style-name="T13"><text:s text:c="4"/></text:span><text:span text:style-name="T26">slice1</text:span><text:span text:style-name="T13">: </text:span><text:span text:style-name="T6">out</text:span><text:span text:style-name="T13"> </text:span><text:span text:style-name="T28">bit</text:span><text:span text:style-name="T13">;</text:span></text:p>
      <text:p text:style-name="P15"><text:span text:style-name="T13"><text:s text:c="4"/></text:span><text:span text:style-name="T26">slice4</text:span><text:span text:style-name="T13">: </text:span><text:span text:style-name="T6">out</text:span><text:span text:style-name="T13"> </text:span><text:span text:style-name="T28">bit_vector</text:span><text:span text:style-name="T13">(</text:span><text:span text:style-name="T31">1</text:span><text:span text:style-name="T13"> </text:span><text:span text:style-name="T6">to</text:span><text:span text:style-name="T13"> </text:span><text:span text:style-name="T31">4</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ray_slice</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type</text:span><text:span text:style-name="T13"> </text:span><text:span text:style-name="T28">twod</text:span><text:span text:style-name="T13"> </text:span><text:span text:style-name="T6">is</text:span><text:span text:style-name="T13"> </text:span><text:span text:style-name="T6">array</text:span><text:span text:style-name="T13"> (</text:span><text:span text:style-name="T31">1</text:span><text:span text:style-name="T13"> </text:span><text:span text:style-name="T6">to</text:span><text:span text:style-name="T13"> </text:span><text:span text:style-name="T31">3</text:span><text:span text:style-name="T13">, </text:span><text:span text:style-name="T31">1</text:span><text:span text:style-name="T13"> </text:span><text:span text:style-name="T6">to</text:span><text:span text:style-name="T13"> </text:span><text:span text:style-name="T31">4</text:span><text:span text:style-name="T13">) </text:span><text:span text:style-name="T6">of</text:span><text:span text:style-name="T13"> </text:span><text:span text:style-name="T28">bit</text:span><text:span text:style-name="T13">;</text:span></text:p>
      <text:p text:style-name="P15"><text:span text:style-name="T13"><text:s text:c="4"/></text:span><text:span text:style-name="T6">constant</text:span><text:span text:style-name="T13"> </text:span><text:span text:style-name="T7">table</text:span><text:span text:style-name="T13">: </text:span><text:span text:style-name="T28">twod</text:span><text:span text:style-name="T13"> :=((</text:span><text:span text:style-name="T34">'0'</text:span><text:span text:style-name="T13">,</text:span><text:span text:style-name="T34">'0'</text:span><text:span text:style-name="T13">,</text:span><text:span text:style-name="T34">'0'</text:span><text:span text:style-name="T13">,</text:span><text:span text:style-name="T34">'1'</text:span><text:span text:style-name="T13">), <text:s text:c="7"/></text:span><text:span text:style-name="T36">--1</text:span></text:p>
      <text:p text:style-name="P15"><text:span text:style-name="T13"><text:s text:c="4"/><text:tab/><text:tab/><text:tab/><text:tab/> (</text:span><text:span text:style-name="T34">'1'</text:span><text:span text:style-name="T13">,</text:span><text:span text:style-name="T34">'0'</text:span><text:span text:style-name="T13">,</text:span><text:span text:style-name="T34">'0'</text:span><text:span text:style-name="T13">,</text:span><text:span text:style-name="T34">'1'</text:span><text:span text:style-name="T13">), <text:s text:c="7"/></text:span><text:span text:style-name="T36">--9</text:span></text:p>
      <text:p text:style-name="P15"><text:span text:style-name="T13"><text:tab/><text:tab/><text:tab/><text:tab/> (</text:span><text:span text:style-name="T34">'1'</text:span><text:span text:style-name="T13">,</text:span><text:span text:style-name="T34">'1'</text:span><text:span text:style-name="T13">,</text:span><text:span text:style-name="T34">'0'</text:span><text:span text:style-name="T13">,</text:span><text:span text:style-name="T34">'1'</text:span><text:span text:style-name="T13">)); <text:s text:c="6"/></text:span><text:span text:style-name="T36">--13</text:span></text:p>
      <text:p text:style-name="P23">begin</text:p>
      <text:p text:style-name="P15"><text:span text:style-name="T13"><text:s text:c="4"/></text:span><text:span text:style-name="T26">slice1</text:span><text:span text:style-name="T13"> &lt;= </text:span><text:span text:style-name="T7">table</text:span><text:span text:style-name="T13">(</text:span><text:span text:style-name="T26">row</text:span><text:span text:style-name="T13">,</text:span><text:span text:style-name="T26">column</text:span><text:span text:style-name="T13">);</text:span></text:p>
      <text:p text:style-name="P15"><text:span text:style-name="T13"><text:s text:c="4"/></text:span><text:span text:style-name="T38">gen</text:span><text:span text:style-name="T13">: </text:span><text:span text:style-name="T6">for</text:span><text:span text:style-name="T13"> </text:span><text:span text:style-name="T30">i</text:span><text:span text:style-name="T13"> </text:span><text:span text:style-name="T6">in</text:span><text:span text:style-name="T13"> </text:span><text:span text:style-name="T31">1</text:span><text:span text:style-name="T13"> </text:span><text:span text:style-name="T6">to</text:span><text:span text:style-name="T13"> </text:span><text:span text:style-name="T31">4</text:span><text:span text:style-name="T13"> </text:span><text:span text:style-name="T6">generate</text:span></text:p>
      <text:p text:style-name="P15"><text:span text:style-name="T13"><text:s text:c="8"/></text:span><text:span text:style-name="T26">slice4</text:span><text:span text:style-name="T13">(</text:span><text:span text:style-name="T30">i</text:span><text:span text:style-name="T13">) &lt;= </text:span><text:span text:style-name="T7">table</text:span><text:span text:style-name="T13">(</text:span><text:span text:style-name="T26">row</text:span><text:span text:style-name="T13">,</text:span><text:span text:style-name="T30">i</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5"><text:span text:style-name="T6">end</text:span><text:span text:style-name="T13"> </text:span><text:span text:style-name="T22">array_slice</text:span><text:span text:style-name="T13">;</text:span></text:p>
      <text:p text:style-name="P1"/>
      <text:p text:style-name="P1"/>
      <text:p text:style-name="P1"><draw:frame draw:style-name="fr1" draw:name="graphics12" text:anchor-type="paragraph" svg:x="3.6756in" svg:y="1.0728in" svg:width="6.5311in" svg:height="2.1in" draw:z-index="32"><draw:image xlink:href="Pictures/2000000700005AA500001CA2BC484F0D.svm" xlink:type="simple" xlink:show="embed" xlink:actuate="onLoad"/></draw:frame></text:p>
      <text:p text:style-name="P1"/>
      <text:p text:style-name="P1"/>
      <text:p text:style-name="P1"/>
      <text:p text:style-name="P1"/>
      <text:p text:style-name="P1"/>
      <text:p text:style-name="P1"/>
      <text:p text:style-name="P1"/>
      <text:p text:style-name="P2"><text:soft-page-break/>PREDEFINED SCALAR ATTRIBUTES</text:p>
      <text:p text:style-name="P1"/>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 (</text:span></text:p>
      <text:p text:style-name="P15"><text:span text:style-name="T13"><text:s text:c="4"/></text:span><text:span text:style-name="T26">x</text:span><text:span text:style-name="T13">: </text:span><text:span text:style-name="T6">in</text:span><text:span text:style-name="T13"> </text:span><text:span text:style-name="T28">integer</text:span><text:span text:style-name="T13"> </text:span><text:span text:style-name="T6">range</text:span><text:span text:style-name="T13"> </text:span><text:span text:style-name="T31">0</text:span><text:span text:style-name="T13"> </text:span><text:span text:style-name="T6">to</text:span><text:span text:style-name="T13"> </text:span><text:span text:style-name="T31">3</text:span><text:span text:style-name="T13">;</text:span></text:p>
      <text:p text:style-name="P15"><text:span text:style-name="T13"><text:s text:c="4"/></text:span><text:span text:style-name="T26">y1</text:span><text:span text:style-name="T13">, </text:span><text:span text:style-name="T26">y2</text:span><text:span text:style-name="T13">, </text:span><text:span text:style-name="T26">y3</text:span><text:span text:style-name="T13">, </text:span><text:span text:style-name="T26">y4</text:span><text:span text:style-name="T13">, </text:span><text:span text:style-name="T26">y5</text:span><text:span text:style-name="T13">: </text:span><text:span text:style-name="T6">out</text:span><text:span text:style-name="T13"> </text:span><text:span text:style-name="T28">bit</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type</text:span><text:span text:style-name="T13"> </text:span><text:span text:style-name="T28">color</text:span><text:span text:style-name="T13"> </text:span><text:span text:style-name="T6">is</text:span><text:span text:style-name="T13"> (</text:span><text:span text:style-name="T7">red</text:span><text:span text:style-name="T13">, </text:span><text:span text:style-name="T7">green</text:span><text:span text:style-name="T13">, </text:span><text:span text:style-name="T7">blue</text:span><text:span text:style-name="T13">);</text:span></text:p>
      <text:p text:style-name="P15"><text:span text:style-name="T13"><text:s text:c="4"/></text:span><text:span text:style-name="T6">signal</text:span><text:span text:style-name="T13"> </text:span><text:span text:style-name="T39">z</text:span><text:span text:style-name="T13">: </text:span><text:span text:style-name="T28">color</text:span><text:span text:style-name="T13">;</text:span></text:p>
      <text:p text:style-name="P23">begin</text:p>
      <text:p text:style-name="P15"><text:span text:style-name="T13"><text:s text:c="4"/></text:span><text:span text:style-name="T39">z</text:span><text:span text:style-name="T13"> &lt;= </text:span><text:span text:style-name="T7">red</text:span><text:span text:style-name="T13"> </text:span><text:span text:style-name="T6">when</text:span><text:span text:style-name="T13"> </text:span><text:span text:style-name="T26">x</text:span><text:span text:style-name="T13"> = </text:span><text:span text:style-name="T31">0</text:span><text:span text:style-name="T13"> </text:span><text:span text:style-name="T6">else</text:span><text:span text:style-name="T13"> </text:span><text:span text:style-name="T7">green</text:span><text:span text:style-name="T13"> </text:span><text:span text:style-name="T6">when</text:span><text:span text:style-name="T13"> </text:span><text:span text:style-name="T26">x</text:span><text:span text:style-name="T13"> = </text:span><text:span text:style-name="T31">1</text:span><text:span text:style-name="T13"> </text:span><text:span text:style-name="T6">else</text:span><text:span text:style-name="T13"> </text:span><text:span text:style-name="T7">blue</text:span><text:span text:style-name="T13">;</text:span></text:p>
      <text:p text:style-name="P15"><text:span text:style-name="T13"><text:s text:c="4"/></text:span><text:span text:style-name="T26">y1</text:span><text:span text:style-name="T13"> &lt;= </text:span><text:span text:style-name="T34">'1'</text:span><text:span text:style-name="T13"> </text:span><text:span text:style-name="T6">when</text:span><text:span text:style-name="T13"> </text:span><text:span text:style-name="T28">color</text:span><text:span text:style-name="T33">'val</text:span><text:span text:style-name="T13">(</text:span><text:span text:style-name="T26">x</text:span><text:span text:style-name="T13">)= </text:span><text:span text:style-name="T7">blue</text:span><text:span text:style-name="T13"> </text:span><text:span text:style-name="T6">else</text:span><text:span text:style-name="T13"> </text:span><text:span text:style-name="T34">'0'</text:span><text:span text:style-name="T13">; <text:tab/></text:span><text:span text:style-name="T36">-- T'Val(s) Base type of T value at position x in T (x is integer)</text:span></text:p>
      <text:p text:style-name="P15"><text:span text:style-name="T13"><text:s text:c="4"/></text:span><text:span text:style-name="T26">y2</text:span><text:span text:style-name="T13"> &lt;= </text:span><text:span text:style-name="T34">'1'</text:span><text:span text:style-name="T13"> </text:span><text:span text:style-name="T6">when</text:span><text:span text:style-name="T13"> </text:span><text:span text:style-name="T28">color</text:span><text:span text:style-name="T33">'pos</text:span><text:span text:style-name="T13">(</text:span><text:span text:style-name="T7">blue</text:span><text:span text:style-name="T13">)=</text:span><text:span text:style-name="T26">x</text:span><text:span text:style-name="T13"> </text:span><text:span text:style-name="T6">else</text:span><text:span text:style-name="T13"> </text:span><text:span text:style-name="T34">'0'</text:span><text:span text:style-name="T13">; <text:tab/><text:tab/></text:span><text:span text:style-name="T36">-- T'Pos(s) Universal integer Position number of s in T</text:span></text:p>
      <text:p text:style-name="P15"><text:span text:style-name="T13"><text:s text:c="4"/></text:span><text:span text:style-name="T26">y3</text:span><text:span text:style-name="T13"> &lt;= </text:span><text:span text:style-name="T34">'1'</text:span><text:span text:style-name="T13"> </text:span><text:span text:style-name="T6">when</text:span><text:span text:style-name="T13"> </text:span><text:span text:style-name="T28">color</text:span><text:span text:style-name="T33">'rightof</text:span><text:span text:style-name="T13">(</text:span><text:span text:style-name="T39">z</text:span><text:span text:style-name="T13">)= </text:span><text:span text:style-name="T7">blue</text:span><text:span text:style-name="T13"> </text:span><text:span text:style-name="T6">else</text:span><text:span text:style-name="T13"> </text:span><text:span text:style-name="T34">'0'</text:span><text:span text:style-name="T13">;<text:tab/></text:span><text:span text:style-name="T36">-- T'Rightof(s) Base type of T Value at position one to the right of s in T</text:span></text:p>
      <text:p text:style-name="P15"><text:span text:style-name="T13"><text:s text:c="4"/></text:span><text:span text:style-name="T26">y4</text:span><text:span text:style-name="T13"> &lt;= </text:span><text:span text:style-name="T34">'1'</text:span><text:span text:style-name="T13"> </text:span><text:span text:style-name="T6">when</text:span><text:span text:style-name="T13"> </text:span><text:span text:style-name="T28">color</text:span><text:span text:style-name="T33">'pred</text:span><text:span text:style-name="T13">(</text:span><text:span text:style-name="T39">z</text:span><text:span text:style-name="T13">)=</text:span><text:span text:style-name="T7">green</text:span><text:span text:style-name="T13"> </text:span><text:span text:style-name="T6">else</text:span><text:span text:style-name="T13"> </text:span><text:span text:style-name="T34">'0'</text:span><text:span text:style-name="T13">;<text:tab/></text:span><text:span text:style-name="T36">-- T'Pred(s) Base type of T Value at position one less than s in T</text:span></text:p>
      <text:p text:style-name="P15"><text:span text:style-name="T13"><text:s text:c="4"/></text:span><text:span text:style-name="T26">y5</text:span><text:span text:style-name="T13"> &lt;= </text:span><text:span text:style-name="T34">'1'</text:span><text:span text:style-name="T13"> </text:span><text:span text:style-name="T6">when</text:span><text:span text:style-name="T13"> </text:span><text:span text:style-name="T28">color</text:span><text:span text:style-name="T33">'pred</text:span><text:span text:style-name="T13">(</text:span><text:span text:style-name="T7">green</text:span><text:span text:style-name="T13">)=</text:span><text:span text:style-name="T39">z</text:span><text:span text:style-name="T13"> </text:span><text:span text:style-name="T6">else</text:span><text:span text:style-name="T13"> </text:span><text:span text:style-name="T34">'0'</text:span><text:span text:style-name="T13">;</text:span></text:p>
      <text:p text:style-name="P15"><text:span text:style-name="T6">end</text:span><text:span text:style-name="T13"> </text:span><text:span text:style-name="T22">arch</text:span><text:span text:style-name="T13">;</text:span></text:p>
      <text:p text:style-name="P1"/>
      <text:p text:style-name="P1"/>
      <text:p text:style-name="P1"/>
      <text:p text:style-name="P1"><draw:frame draw:style-name="fr1" draw:name="graphics16" text:anchor-type="paragraph" svg:x="3.6866in" svg:y="0.1429in" svg:width="6.0098in" svg:height="3.3575in" draw:z-index="0"><draw:image xlink:href="Pictures/2000000700005967000033FE0A570DF2.svm" xlink:type="simple" xlink:show="embed" xlink:actuate="onLoad"/></draw:frame></text:p>
      <text:p text:style-name="P1"/>
      <text:p text:style-name="P1"><text:soft-page-break/><text:span text:style-name="T1">COMBINATIONAL WHEN</text:span></text:p>
      <text:p text:style-name="P2"/>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 (</text:span></text:p>
      <text:p text:style-name="P15"><text:span text:style-name="T13"><text:s text:c="4"/></text:span><text:span text:style-name="T26">control</text:span><text:span text:style-name="T13"> : </text:span><text:span text:style-name="T6">in</text:span><text:span text:style-name="T13"> </text:span><text:span text:style-name="T28">integer</text:span><text:span text:style-name="T13"> </text:span><text:span text:style-name="T6">range</text:span><text:span text:style-name="T13"> </text:span><text:span text:style-name="T31">0</text:span><text:span text:style-name="T13"> </text:span><text:span text:style-name="T6">to</text:span><text:span text:style-name="T13"> </text:span><text:span text:style-name="T31">6</text:span><text:span text:style-name="T13">;</text:span></text:p>
      <text:p text:style-name="P15"><text:span text:style-name="T13"><text:s text:c="4"/></text:span><text:span text:style-name="T26">z</text:span><text:span text:style-name="T13"> <text:s text:c="9"/>: </text:span><text:span text:style-name="T6">out</text:span><text:span text:style-name="T13"> </text:span><text:span text:style-name="T28">std_logic_vector</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examples</text:span><text:span text:style-name="T13">;</text:span></text:p>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23">begin</text:p>
      <text:p text:style-name="P15"><text:span text:style-name="T13"><text:s text:c="4"/>--</text:span><text:span text:style-name="T36">x &lt;= <text:s/>'0' when rst = '0' else</text:span></text:p>
      <text:p text:style-name="P15"><text:span text:style-name="T13"><text:s text:c="4"/></text:span><text:span text:style-name="T36">-- <text:s text:c="5"/>'1' when a = '0' or b = '1' else</text:span></text:p>
      <text:p text:style-name="P15"><text:span text:style-name="T13"><text:s text:c="4"/></text:span><text:span text:style-name="T36">-- <text:s text:c="5"/>'-'; -- dont care</text:span></text:p>
      <text:p text:style-name="P15"><text:span text:style-name="T13"><text:s text:c="4"/></text:span><text:span text:style-name="T6">with</text:span><text:span text:style-name="T13"> </text:span><text:span text:style-name="T26">control</text:span><text:span text:style-name="T13"> </text:span><text:span text:style-name="T6">select</text:span></text:p>
      <text:p text:style-name="P15"><text:span text:style-name="T13"><text:s text:c="4"/></text:span><text:span text:style-name="T26">z</text:span><text:span text:style-name="T13"> &lt;=</text:span><text:span text:style-name="T34">"000"</text:span><text:span text:style-name="T13"> </text:span><text:span text:style-name="T6">when</text:span><text:span text:style-name="T13"> </text:span><text:span text:style-name="T31">0</text:span><text:span text:style-name="T13"> | <text:s/></text:span><text:span text:style-name="T31">1</text:span><text:span text:style-name="T13">,</text:span></text:p>
      <text:p text:style-name="P15"><text:span text:style-name="T13"><text:s text:c="8"/></text:span><text:span text:style-name="T34">"100"</text:span><text:span text:style-name="T13"> </text:span><text:span text:style-name="T6">when</text:span><text:span text:style-name="T13"> </text:span><text:span text:style-name="T31">2</text:span><text:span text:style-name="T13"> </text:span><text:span text:style-name="T6">to</text:span><text:span text:style-name="T13"> </text:span><text:span text:style-name="T31">5</text:span><text:span text:style-name="T13">,</text:span></text:p>
      <text:p text:style-name="P15"><text:span text:style-name="T13"><text:s text:c="8"/></text:span><text:span text:style-name="T34">"Z--"</text:span><text:span text:style-name="T13"> </text:span><text:span text:style-name="T6">when</text:span><text:span text:style-name="T13"> </text:span><text:span text:style-name="T6">others</text:span><text:span text:style-name="T13">;</text:span></text:p>
      <text:p text:style-name="P15"><text:span text:style-name="T6">end</text:span><text:span text:style-name="T13"> </text:span><text:span text:style-name="T22">arch</text:span><text:span text:style-name="T13">;</text:span></text:p>
      <text:p text:style-name="P1"/>
      <text:p text:style-name="P1"><draw:frame draw:style-name="fr1" draw:name="graphics19" text:anchor-type="paragraph" svg:x="1.5134in" svg:y="0.161in" svg:width="8.839in" svg:height="1.9035in" draw:z-index="1"><draw:image xlink:href="Pictures/2000000700005B290000140E10E515CB.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FOR GENERATE EXAMPLE</text:span></text:p>
      <text:p text:style-name="P1"/>
      <text:p text:style-name="P1"><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a</text:span><text:span text:style-name="T13">,</text:span><text:span text:style-name="T26">b</text:span><text:span text:style-name="T13"> : </text:span><text:span text:style-name="T28">bit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x</text:span><text:span text:style-name="T13">,</text:span><text:span text:style-name="T26">y</text:span><text:span text:style-name="T13">: </text:span><text:span text:style-name="T6">out</text:span><text:span text:style-name="T13"> </text:span><text:span text:style-name="T28">bit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23">begin</text:p>
      <text:p text:style-name="P15"><text:span text:style-name="T13"><text:s text:c="4"/></text:span><text:span text:style-name="T38">gen</text:span><text:span text:style-name="T13">: </text:span><text:span text:style-name="T6">for</text:span><text:span text:style-name="T13"> </text:span><text:span text:style-name="T30">i</text:span><text:span text:style-name="T13"> </text:span><text:span text:style-name="T6">in</text:span><text:span text:style-name="T13"> </text:span><text:span text:style-name="T26">a</text:span><text:span text:style-name="T33">'reverse_range</text:span><text:span text:style-name="T13"> </text:span><text:span text:style-name="T6">generate</text:span></text:p>
      <text:p text:style-name="P15"><text:span text:style-name="T13"><text:s text:c="8"/></text:span><text:span text:style-name="T26">x</text:span><text:span text:style-name="T13">(</text:span><text:span text:style-name="T30">i</text:span><text:span text:style-name="T13">) &lt;= </text:span><text:span text:style-name="T26">a</text:span><text:span text:style-name="T13">(</text:span><text:span text:style-name="T30">i</text:span><text:span text:style-name="T13">) </text:span><text:span text:style-name="T6">xor</text:span><text:span text:style-name="T13"> </text:span><text:span text:style-name="T26">b</text:span><text:span text:style-name="T13">(</text:span><text:span text:style-name="T31">3</text:span><text:span text:style-name="T14">-</text:span><text:span text:style-name="T30">i</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6"/>
      <text:p text:style-name="P15"><text:span text:style-name="T13"><text:s text:c="4"/></text:span><text:span text:style-name="T36">-- <text:s text:c="3"/>notok: for i in x'range generate</text:span></text:p>
      <text:p text:style-name="P15"><text:span text:style-name="T13"><text:s text:c="4"/></text:span><text:span text:style-name="T36">-- <text:s text:c="9"/>x(i) &lt;= "1111" when (a(i) and b(i)) = '1' else "0000";</text:span></text:p>
      <text:p text:style-name="P15"><text:span text:style-name="T13"><text:s text:c="4"/></text:span><text:span text:style-name="T36">-- <text:s text:c="8"/>end generate;</text:span></text:p>
      <text:p text:style-name="P15"><text:span text:style-name="T6">end</text:span><text:span text:style-name="T13"> </text:span><text:span text:style-name="T22">arch</text:span><text:span text:style-name="T13">;</text:span></text:p>
      <text:p text:style-name="P1"><draw:frame draw:style-name="fr1" draw:name="graphics22" text:anchor-type="paragraph" svg:x="3.6598in" svg:y="0.7102in" svg:width="6.6728in" svg:height="4.1465in" draw:z-index="2"><draw:image xlink:href="Pictures/2000000700005560000034B74121FC10.svm" xlink:type="simple" xlink:show="embed" xlink:actuate="onLoad"/></draw:frame></text:p>
      <text:p text:style-name="P1"/>
      <text:p text:style-name="P1"/>
      <text:p text:style-name="P1"/>
      <text:p text:style-name="P2"><text:soft-page-break/>MUX COMPONENT GENERATE</text:p>
      <text:p text:style-name="P2"><draw:frame draw:style-name="fr2" draw:name="graphics23" text:anchor-type="paragraph" svg:x="4.3681in" svg:y="0.0972in" svg:width="5.9283in" svg:height="6.2335in" draw:z-index="3"><draw:image xlink:href="Pictures/2000000700004BDD00004EF77055E908.svm" xlink:type="simple" xlink:show="embed" xlink:actuate="onLoad"/></draw:frame></text:p>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mux2x1 </text:span><text:span text:style-name="T6">is</text:span><text:span text:style-name="T13"> </text:span><text:span text:style-name="T6">port</text:span><text:span text:style-name="T13"> (</text:span></text:p>
      <text:p text:style-name="P15"><text:span text:style-name="T13"><text:s text:c="4"/>a,b,sel : </text:span><text:span text:style-name="T6">in</text:span><text:span text:style-name="T13"> std_logic;</text:span></text:p>
      <text:p text:style-name="P15"><text:span text:style-name="T13"><text:s text:c="4"/></text:span><text:span text:style-name="T26">x</text:span><text:span text:style-name="T13">: <text:s text:c="12"/></text:span><text:span text:style-name="T6">out</text:span><text:span text:style-name="T13"> std_logic);</text:span></text:p>
      <text:p text:style-name="P15"><text:span text:style-name="T6">end</text:span><text:span text:style-name="T13"> mux2x1;</text:span></text:p>
      <text:p text:style-name="P16"/>
      <text:p text:style-name="P15"><text:span text:style-name="T6">architecture</text:span><text:span text:style-name="T13"> mux2x1 <text:s/></text:span><text:span text:style-name="T6">of</text:span><text:span text:style-name="T13"> mux2x1 </text:span><text:span text:style-name="T6">is</text:span></text:p>
      <text:p text:style-name="P23">begin</text:p>
      <text:p text:style-name="P15"><text:span text:style-name="T13"><text:s text:c="4"/></text:span><text:span text:style-name="T26">x</text:span><text:span text:style-name="T13"> &lt;= </text:span><text:span text:style-name="T26">a</text:span><text:span text:style-name="T13"> </text:span><text:span text:style-name="T6">when</text:span><text:span text:style-name="T13"> sel = </text:span><text:span text:style-name="T34">'0'</text:span><text:span text:style-name="T13"> </text:span><text:span text:style-name="T6">else</text:span><text:span text:style-name="T13"> </text:span><text:span text:style-name="T26">b</text:span><text:span text:style-name="T13">;</text:span></text:p>
      <text:p text:style-name="P15"><text:span text:style-name="T6">end</text:span><text:span text:style-name="T13"> mux2x1;</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std_logic_1164.</text:span><text:span text:style-name="T6">all</text:span><text:span text:style-name="T13">;</text:span></text:p>
      <text:p text:style-name="P16"/>
      <text:p text:style-name="P15"><text:span text:style-name="T6">entity</text:span><text:span text:style-name="T13"> examples </text:span><text:span text:style-name="T6">is</text:span><text:span text:style-name="T13"> </text:span><text:span text:style-name="T6">port</text:span><text:span text:style-name="T13"> (</text:span></text:p>
      <text:p text:style-name="P15"><text:span text:style-name="T13"><text:s text:c="4"/>a,b: </text:span><text:span text:style-name="T6">in</text:span><text:span text:style-name="T13"> std_logic_vector(</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sel: </text:span><text:span text:style-name="T6">in</text:span><text:span text:style-name="T13"> std_logic;</text:span></text:p>
      <text:p text:style-name="P15"><text:span text:style-name="T13"><text:s text:c="4"/>x: </text:span><text:span text:style-name="T6">out</text:span><text:span text:style-name="T13"> std_logic_vector(</text:span><text:span text:style-name="T31">2</text:span><text:span text:style-name="T13"> </text:span><text:span text:style-name="T6">downto</text:span><text:span text:style-name="T13"> </text:span><text:span text:style-name="T31">0</text:span><text:span text:style-name="T13">));</text:span></text:p>
      <text:p text:style-name="P15"><text:span text:style-name="T6">end</text:span><text:span text:style-name="T13"> examples;</text:span></text:p>
      <text:p text:style-name="P16"/>
      <text:p text:style-name="P15"><text:span text:style-name="T6">architecture</text:span><text:span text:style-name="T13"> mux2x3 </text:span><text:span text:style-name="T6">of</text:span><text:span text:style-name="T13"> examples </text:span><text:span text:style-name="T6">is</text:span></text:p>
      <text:p text:style-name="P15"><text:span text:style-name="T13"><text:s text:c="4"/></text:span><text:span text:style-name="T36">--component declaration</text:span></text:p>
      <text:p text:style-name="P15"><text:span text:style-name="T13"><text:s text:c="4"/></text:span><text:span text:style-name="T6">component</text:span><text:span text:style-name="T13"> mux2x1 </text:span><text:span text:style-name="T6">is</text:span></text:p>
      <text:p text:style-name="P15"><text:span text:style-name="T13"><text:s text:c="8"/></text:span><text:span text:style-name="T6">port</text:span><text:span text:style-name="T13">(a,b,sel: </text:span><text:span text:style-name="T6">in</text:span><text:span text:style-name="T13"> std_logic; x: </text:span><text:span text:style-name="T6">out</text:span><text:span text:style-name="T13"> std_logic);</text:span></text:p>
      <text:p text:style-name="P15"><text:span text:style-name="T13"><text:s text:c="4"/></text:span><text:span text:style-name="T6">end</text:span><text:span text:style-name="T13"> </text:span><text:span text:style-name="T6">component</text:span><text:span text:style-name="T13">;</text:span></text:p>
      <text:p text:style-name="P16"/>
      <text:p text:style-name="P23">begin</text:p>
      <text:p text:style-name="P15"><text:span text:style-name="T13"><text:s text:c="4"/></text:span><text:span text:style-name="T36">----component instatiation</text:span></text:p>
      <text:p text:style-name="P15"><text:span text:style-name="T13"><text:s text:c="4"/>generate_mux2x3: </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31">2</text:span><text:span text:style-name="T13"> </text:span><text:span text:style-name="T6">generate</text:span></text:p>
      <text:p text:style-name="P15"><text:span text:style-name="T13"><text:s text:c="8"/>comp: mux2x1 </text:span><text:span text:style-name="T6">port</text:span><text:span text:style-name="T13"> </text:span><text:span text:style-name="T6">map</text:span><text:span text:style-name="T13">(a(i),b(i),sel,x(i));</text:span></text:p>
      <text:p text:style-name="P15"><text:span text:style-name="T13"><text:s text:c="4"/></text:span><text:span text:style-name="T6">end</text:span><text:span text:style-name="T13"> </text:span><text:span text:style-name="T6">generate</text:span><text:span text:style-name="T13"> generate_mux2x3;</text:span></text:p>
      <text:p text:style-name="P16"/>
      <text:p text:style-name="P15"><text:span text:style-name="T6">end</text:span><text:span text:style-name="T13"> mux2x3;</text:span></text:p>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TWO'S COMPLIMENT </text:span></text:p>
      <text:p text:style-name="P1"/>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p>
      <text:p text:style-name="P15"><text:span text:style-name="T13"><text:s text:c="4"/></text:span><text:span text:style-name="T6">generic</text:span><text:span text:style-name="T13">( nbits : </text:span><text:span text:style-name="T28">positive</text:span><text:span text:style-name="T13"> := </text:span><text:span text:style-name="T31">7</text:span><text:span text:style-name="T13"> );</text:span></text:p>
      <text:p text:style-name="P15"><text:span text:style-name="T13"><text:s text:c="4"/></text:span><text:span text:style-name="T6">port</text:span><text:span text:style-name="T13"> (<text:tab/></text:span><text:span text:style-name="T36">--inputs</text:span></text:p>
      <text:p text:style-name="P15"><text:span text:style-name="T13"><text:s text:c="8"/><text:tab/>a : </text:span><text:span text:style-name="T6">in</text:span><text:span text:style-name="T13"> unsigned(nbits </text:span><text:span text:style-name="T6">downto</text:span><text:span text:style-name="T13"> </text:span><text:span text:style-name="T31">0</text:span><text:span text:style-name="T13">);</text:span></text:p>
      <text:p text:style-name="P15"><text:span text:style-name="T13"><text:tab/> <text:s text:c="6"/></text:span><text:span text:style-name="T36">--outputs</text:span></text:p>
      <text:p text:style-name="P15"><text:span text:style-name="T13"><text:s text:c="8"/><text:tab/>y : </text:span><text:span text:style-name="T6">out</text:span><text:span text:style-name="T13"> signed(nbits </text:span><text:span text:style-name="T6">downto</text:span><text:span text:style-name="T13"> </text:span><text:span text:style-name="T31">0</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woscompliment_v1 </text:span><text:span text:style-name="T6">of</text:span><text:span text:style-name="T13"> </text:span><text:span text:style-name="T22">examples</text:span><text:span text:style-name="T13"> </text:span><text:span text:style-name="T6">is</text:span></text:p>
      <text:p text:style-name="P23">begin</text:p>
      <text:p text:style-name="P15"><text:span text:style-name="T13"><text:s text:c="4"/>y &lt;= signed((</text:span><text:span text:style-name="T6">not</text:span><text:span text:style-name="T13"> a)) </text:span><text:span text:style-name="T14">+</text:span><text:span text:style-name="T13"> </text:span><text:span text:style-name="T34">"00000001"</text:span><text:span text:style-name="T13">;</text:span></text:p>
      <text:p text:style-name="P15"><text:span text:style-name="T6">end</text:span><text:span text:style-name="T13"> twoscompliment_v1;</text:span></text:p>
      <text:p text:style-name="P1"/>
      <text:p text:style-name="P1"><draw:frame draw:style-name="fr1" draw:name="graphics30" text:anchor-type="paragraph" svg:x="3.8083in" svg:y="0.2835in" svg:width="6.4228in" svg:height="1in" draw:z-index="4"><draw:image xlink:href="Pictures/2000000700004DD300001EB3B52EAC63.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RESIZE EXAMPLE </text:p>
      <text:p text:style-name="P1"/>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p>
      <text:p text:style-name="P15"><text:span text:style-name="T13"><text:s text:c="4"/></text:span><text:span text:style-name="T6">generic</text:span><text:span text:style-name="T13">(</text:span><text:span text:style-name="T7">n</text:span><text:span text:style-name="T13"> : </text:span><text:span text:style-name="T28">integer</text:span><text:span text:style-name="T13"> := </text:span><text:span text:style-name="T31">4</text:span><text:span text:style-name="T13">); </text:span><text:span text:style-name="T36">-- number of input bits</text:span></text:p>
      <text:p text:style-name="P15"><text:span text:style-name="T13"><text:s text:c="4"/></text:span><text:span text:style-name="T6">port</text:span><text:span text:style-name="T13">( <text:s/></text:span><text:span text:style-name="T26">a</text:span><text:span text:style-name="T13">, </text:span><text:span text:style-name="T26">b</text:span><text:span text:style-name="T13">: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tab/> <text:s text:c="3"/></text:span><text:span text:style-name="T26">sum</text:span><text:span text:style-name="T13">: </text:span><text:span text:style-name="T6">out</text:span><text:span text:style-name="T13"> </text:span><text:span text:style-name="T28">std_logic_vector</text:span><text:span text:style-name="T13">(</text:span><text:span text:style-name="T7">n</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dd_sub</text:span><text:span text:style-name="T13"> </text:span><text:span text:style-name="T6">of</text:span><text:span text:style-name="T13"> </text:span><text:span text:style-name="T22">examples</text:span><text:span text:style-name="T13"> </text:span><text:span text:style-name="T6">is</text:span></text:p>
      <text:p text:style-name="P23">begin</text:p>
      <text:p text:style-name="P15"><text:span text:style-name="T13"><text:s text:c="4"/></text:span><text:span text:style-name="T26">sum</text:span><text:span text:style-name="T13"> &lt;= </text:span><text:span text:style-name="T28">std_logic_vector</text:span><text:span text:style-name="T13">(</text:span><text:span text:style-name="T14">resize</text:span><text:span text:style-name="T13">(</text:span><text:span text:style-name="T28">signed</text:span><text:span text:style-name="T13">(</text:span><text:span text:style-name="T26">a</text:span><text:span text:style-name="T13">),</text:span><text:span text:style-name="T31">5</text:span><text:span text:style-name="T13">) </text:span><text:span text:style-name="T14">+</text:span><text:span text:style-name="T13"> </text:span><text:span text:style-name="T14">resize</text:span><text:span text:style-name="T13">(</text:span><text:span text:style-name="T28">signed</text:span><text:span text:style-name="T13">(</text:span><text:span text:style-name="T26">b</text:span><text:span text:style-name="T13">),</text:span><text:span text:style-name="T31">5</text:span><text:span text:style-name="T13">));</text:span></text:p>
      <text:p text:style-name="P15"><text:span text:style-name="T6">end</text:span><text:span text:style-name="T13"> </text:span><text:span text:style-name="T22">add_sub</text:span><text:span text:style-name="T13">;</text:span></text:p>
      <text:p text:style-name="P1"/>
      <text:p text:style-name="P1"><draw:frame draw:style-name="fr3" draw:name="graphics31" text:anchor-type="paragraph" svg:x="5.2209in" svg:y="0.1201in" svg:width="4.9335in" svg:height="0.928in" draw:z-index="5"><draw:image xlink:href="Pictures/200000070000513C000020C40AB18B9C.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SHIFT LEFT – SHIFT RIGHT – PARALLEL IN - PARALLEL OUT</text:p>
      <text:p text:style-name="P2"/>
      <text:p text:style-name="P1"><text:span text:style-name="T6">package</text:span><text:span text:style-name="T13"> </text:span><text:span text:style-name="T28">instructions</text:span><text:span text:style-name="T13"> </text:span><text:span text:style-name="T6">is</text:span></text:p>
      <text:p text:style-name="P15"><text:span text:style-name="T13"><text:s text:c="4"/></text:span><text:span text:style-name="T6">type</text:span><text:span text:style-name="T13"> </text:span><text:span text:style-name="T28">instructions</text:span><text:span text:style-name="T13"> </text:span><text:span text:style-name="T6">is</text:span><text:span text:style-name="T13">(</text:span><text:span text:style-name="T7">load</text:span><text:span text:style-name="T13">, </text:span><text:span text:style-name="T7">s_right</text:span><text:span text:style-name="T13">, </text:span><text:span text:style-name="T7">s_left</text:span><text:span text:style-name="T13">);</text:span></text:p>
      <text:p text:style-name="P15"><text:span text:style-name="T6">end</text:span><text:span text:style-name="T13"> </text:span><text:span text:style-name="T28">instructions</text:span><text:span text:style-name="T13">;</text:span></text:p>
      <text:p text:style-name="P16"/>
      <text:p text:style-name="P15"><text:span text:style-name="T6">library</text:span><text:span text:style-name="T13"> </text:span><text:span text:style-name="T22">ieee</text:span><text:span text:style-name="T13">;</text:span></text:p>
      <text:p text:style-name="P15"><draw:frame draw:style-name="fr2" draw:name="graphics2" text:anchor-type="paragraph" svg:x="5.6638in" svg:y="0.1484in" svg:width="4.8453in" svg:height="6.3799in" draw:z-index="27"><draw:image xlink:href="Pictures/20000007000045AA000053B806CF3B39.svm" xlink:type="simple" xlink:show="embed" xlink:actuate="onLoad"/></draw:frame><text:span text:style-name="T13"> <text:s text:c="3"/></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instructions</text:span><text:span text:style-name="T13">.</text:span><text:span text:style-name="T6">all</text:span><text:span text:style-name="T13">;</text:span></text:p>
      <text:p text:style-name="P16"/>
      <text:p text:style-name="P15"><text:span text:style-name="T6">entity</text:span><text:span text:style-name="T13"> </text:span><text:span text:style-name="T22">shifty</text:span><text:span text:style-name="T13"> </text:span><text:span text:style-name="T6">is</text:span><text:span text:style-name="T13"> </text:span><text:span text:style-name="T6">port</text:span><text:span text:style-name="T13">(</text:span></text:p>
      <text:p text:style-name="P15"><text:span text:style-name="T13"><text:s text:c="4"/></text:span><text:span text:style-name="T26">clock</text:span><text:span text:style-name="T13"> <text:s text:c="7"/>: </text:span><text:span text:style-name="T6">in</text:span><text:span text:style-name="T13"> </text:span><text:span text:style-name="T28">std_logic</text:span><text:span text:style-name="T13">;</text:span></text:p>
      <text:p text:style-name="P15"><text:span text:style-name="T13"><text:s text:c="4"/></text:span><text:span text:style-name="T26">shsel</text:span><text:span text:style-name="T13"> : </text:span><text:span text:style-name="T6">in</text:span><text:span text:style-name="T13"> </text:span><text:span text:style-name="T22">instructions</text:span><text:span text:style-name="T13">;</text:span></text:p>
      <text:p text:style-name="P15"><text:span text:style-name="T13"><text:s text:c="4"/></text:span><text:span text:style-name="T26">serial_in</text:span><text:span text:style-name="T13"> <text:s text:c="3"/>: </text:span><text:span text:style-name="T6">in</text:span><text:span text:style-name="T13"> </text:span><text:span text:style-name="T28">std_logic</text:span><text:span text:style-name="T13">;</text:span></text:p>
      <text:p text:style-name="P15"><text:span text:style-name="T13"><text:s text:c="4"/></text:span><text:span text:style-name="T26">d</text:span><text:span text:style-name="T13"> <text:s text:c="7"/>: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erial_out</text:span><text:span text:style-name="T13"> <text:s text:c="3"/>: </text:span><text:span text:style-name="T6">out</text:span><text:span text:style-name="T13"> </text:span><text:span text:style-name="T28">std_logic</text:span><text:span text:style-name="T13">;</text:span></text:p>
      <text:p text:style-name="P15"><text:span text:style-name="T13"><text:s text:c="4"/></text:span><text:span text:style-name="T26">q</text:span><text:span text:style-name="T13"> <text:s text:c="7"/>: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shifty</text:span><text:span text:style-name="T13"> </text:span><text:span text:style-name="T6">is</text:span></text:p>
      <text:p text:style-name="P15"><text:span text:style-name="T13"><text:s text:c="4"/></text:span><text:span text:style-name="T6">signal</text:span><text:span text:style-name="T13"> </text:span><text:span text:style-name="T39">conten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6">process</text:span><text:span text:style-name="T13">(</text:span><text:span text:style-name="T26">cloc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text:span><text:span text:style-name="T14">rising_edge</text:span><text:span text:style-name="T13">(</text:span><text:span text:style-name="T26">clock</text:span><text:span text:style-name="T13">))</text:span><text:span text:style-name="T6">then</text:span></text:p>
      <text:p text:style-name="P15"><text:span text:style-name="T13"><text:s text:c="12"/></text:span><text:span text:style-name="T6">case</text:span><text:span text:style-name="T13"> </text:span><text:span text:style-name="T26">shsel</text:span><text:span text:style-name="T13"> </text:span><text:span text:style-name="T6">is</text:span></text:p>
      <text:p text:style-name="P15"><text:span text:style-name="T13"><text:s text:c="16"/></text:span><text:span text:style-name="T6">when</text:span><text:span text:style-name="T13"> </text:span><text:span text:style-name="T7">load</text:span><text:span text:style-name="T13"> =&gt; </text:span><text:span text:style-name="T39">content</text:span><text:span text:style-name="T13"> &lt;= </text:span><text:span text:style-name="T26">d</text:span><text:span text:style-name="T13">; </text:span><text:span text:style-name="T36">--load</text:span></text:p>
      <text:p text:style-name="P24"><text:tab/><text:tab/> <text:s/>--shift right, pad with bit from serial_in</text:p>
      <text:p text:style-name="P15"><text:span text:style-name="T13"><text:s text:c="16"/></text:span><text:span text:style-name="T6">when</text:span><text:span text:style-name="T13"> </text:span><text:span text:style-name="T7">s_right</text:span><text:span text:style-name="T13"> =&gt; </text:span><text:span text:style-name="T39">content</text:span><text:span text:style-name="T13"> &lt;= </text:span><text:span text:style-name="T26">serial_in</text:span><text:span text:style-name="T13"> </text:span><text:span text:style-name="T14">&amp;</text:span><text:span text:style-name="T13"> </text:span><text:span text:style-name="T39">content</text:span><text:span text:style-name="T13">(</text:span><text:span text:style-name="T31">7</text:span><text:span text:style-name="T13"> </text:span><text:span text:style-name="T6">downto</text:span><text:span text:style-name="T13"> </text:span><text:span text:style-name="T31">1</text:span><text:span text:style-name="T13">); </text:span></text:p>
      <text:p text:style-name="P24"><text:tab/><text:tab/> <text:s/>--shift left, pad with bit from serial_in</text:p>
      <text:p text:style-name="P15"><text:span text:style-name="T13"><text:s text:c="16"/></text:span><text:span text:style-name="T6">when</text:span><text:span text:style-name="T13"> </text:span><text:span text:style-name="T7">s_left</text:span><text:span text:style-name="T13"> =&gt; </text:span><text:span text:style-name="T39">content</text:span><text:span text:style-name="T13"> &lt;= </text:span><text:span text:style-name="T39">content</text:span><text:span text:style-name="T13">(</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26">serial_in</text:span><text:span text:style-name="T13">; <text:s/></text:span></text:p>
      <text:p text:style-name="P15"><text:span text:style-name="T13"><text:s text:c="16"/></text:span><text:span text:style-name="T6">when</text:span><text:span text:style-name="T13"> </text:span><text:span text:style-name="T6">others</text:span><text:span text:style-name="T13"> =&gt; </text:span><text:span text:style-name="T6">null</text:span><text:span text:style-name="T13">;</text:span></text:p>
      <text:p text:style-name="P15"><text:span text:style-name="T13"><text:s text:c="12"/></text:span><text:span text:style-name="T6">end</text:span><text:span text:style-name="T13"> </text:span><text:span text:style-name="T6">case</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q</text:span><text:span text:style-name="T13"> &lt;= </text:span><text:span text:style-name="T39">content</text:span><text:span text:style-name="T13">; </text:span><text:span text:style-name="T36">-- parallel out data extraction when shift reg is full</text:span></text:p>
      <text:p text:style-name="P16"/>
      <text:p text:style-name="P16"/>
      <text:p text:style-name="P15"><text:span text:style-name="T13"><text:s text:c="4"/></text:span><text:span text:style-name="T26">serial_out</text:span><text:span text:style-name="T13"> &lt;= </text:span><text:span text:style-name="T39">content</text:span><text:span text:style-name="T13">(</text:span><text:span text:style-name="T31">0</text:span><text:span text:style-name="T13">) </text:span><text:span text:style-name="T6">when</text:span><text:span text:style-name="T13"> </text:span><text:span text:style-name="T26">shsel</text:span><text:span text:style-name="T13"> = </text:span><text:span text:style-name="T7">s_right</text:span><text:span text:style-name="T13"> </text:span><text:span text:style-name="T6">else</text:span></text:p>
      <text:p text:style-name="P15"><text:span text:style-name="T13"><text:s text:c="8"/></text:span><text:span text:style-name="T39">content</text:span><text:span text:style-name="T13">(</text:span><text:span text:style-name="T31">7</text:span><text:span text:style-name="T13">) </text:span><text:span text:style-name="T6">when</text:span><text:span text:style-name="T13"> </text:span><text:span text:style-name="T26">shsel</text:span><text:span text:style-name="T13"> = </text:span><text:span text:style-name="T7">s_left</text:span><text:span text:style-name="T13"> </text:span><text:span text:style-name="T6">else</text:span><text:span text:style-name="T13"> </text:span><text:span text:style-name="T34">'Z'</text:span><text:span text:style-name="T13">;</text:span></text:p>
      <text:p text:style-name="P16"/>
      <text:p text:style-name="P15"><text:span text:style-name="T6">end</text:span><text:span text:style-name="T13"> </text:span><text:span text:style-name="T22">arch</text:span><text:span text:style-name="T13">;</text:span></text:p>
      <text:p text:style-name="P1"/>
      <text:p text:style-name="P1"/>
      <text:p text:style-name="P1"/>
      <text:p text:style-name="P1"/>
      <text:p text:style-name="P1"/>
      <text:p text:style-name="P2"><text:soft-page-break/>COUNTER AND BLINK LED</text:p>
      <text:p text:style-name="P2"/>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bit</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clk : </text:span><text:span text:style-name="T28">bit</text:span><text:span text:style-name="T13">;</text:span></text:p>
      <text:p text:style-name="P15"><text:span text:style-name="T13"><text:s text:c="4"/>count: </text:span><text:span text:style-name="T6">out</text:span><text:span text:style-name="T13"> </text:span><text:span text:style-name="T28">bit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arch </text:span><text:span text:style-name="T6">of</text:span><text:span text:style-name="T13"> </text:span><text:span text:style-name="T22">examples</text:span><text:span text:style-name="T13"> </text:span><text:span text:style-name="T6">is</text:span></text:p>
      <text:p text:style-name="P23">begin</text:p>
      <text:p text:style-name="P15"><text:span text:style-name="T13"><text:s text:c="4"/></text:span><text:span text:style-name="T6">process</text:span><text:span text:style-name="T13">(clk)</text:span></text:p>
      <text:p text:style-name="P15"><text:span text:style-name="T13"><text:s text:c="8"/></text:span><text:span text:style-name="T6">variable</text:span><text:span text:style-name="T13"> temp : </text:span><text:span text:style-name="T28">natural</text:span><text:span text:style-name="T13"> </text:span><text:span text:style-name="T6">range</text:span><text:span text:style-name="T13"> </text:span><text:span text:style-name="T31">0</text:span><text:span text:style-name="T13"> </text:span><text:span text:style-name="T6">to</text:span><text:span text:style-name="T13"> </text:span><text:span text:style-name="T31">10</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clk = </text:span><text:span text:style-name="T34">'1'</text:span><text:span text:style-name="T13"> </text:span><text:span text:style-name="T6">then</text:span></text:p>
      <text:p text:style-name="P15"><text:span text:style-name="T13"><text:s text:c="12"/>temp := temp </text:span><text:span text:style-name="T14">+</text:span><text:span text:style-name="T13"> </text:span><text:span text:style-name="T31">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text:span><text:span text:style-name="T6">if</text:span><text:span text:style-name="T13"> temp = </text:span><text:span text:style-name="T31">10</text:span><text:span text:style-name="T13"> </text:span><text:span text:style-name="T6">then</text:span></text:p>
      <text:p text:style-name="P15"><text:span text:style-name="T13"><text:s text:c="12"/>temp := </text:span><text:span text:style-name="T31">0</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count &lt;= bit_vector(to_unsigned(temp, </text:span><text:span text:style-name="T31">4</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arch;</text:span></text:p>
      <text:p text:style-name="P1"/>
      <text:p text:style-name="P1"/>
      <text:p text:style-name="P1"/>
      <text:p text:style-name="P1"><draw:frame draw:style-name="fr1" draw:name="graphics34" text:anchor-type="paragraph" svg:x="3.5717in" svg:y="0.0972in" svg:width="6.402in" svg:height="2.0335in" draw:z-index="6"><draw:image xlink:href="Pictures/200000070000599C00001D4134C3C9B0.svm" xlink:type="simple" xlink:show="embed" xlink:actuate="onLoad"/></draw:frame></text:p>
      <text:p text:style-name="P1"/>
      <text:p text:style-name="P1"/>
      <text:p text:style-name="P1"/>
      <text:p text:style-name="P1"/>
      <text:p text:style-name="P1"/>
      <text:p text:style-name="P2"><text:soft-page-break/>FOR LOOP EXAMPLE – PRIMITIVE RIPPLE CARRY ADDER</text:p>
      <text:p text:style-name="P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bit</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p>
      <text:p text:style-name="P15"><text:span text:style-name="T13"><text:s text:c="4"/></text:span><text:span text:style-name="T6">generic</text:span><text:span text:style-name="T13">(</text:span><text:span text:style-name="T7">n</text:span><text:span text:style-name="T13"> : </text:span><text:span text:style-name="T28">integer</text:span><text:span text:style-name="T13"> := </text:span><text:span text:style-name="T31">4</text:span><text:span text:style-name="T13">);</text:span></text:p>
      <text:p text:style-name="P15"><text:span text:style-name="T13"><text:s text:c="4"/></text:span><text:span text:style-name="T6">port</text:span><text:span text:style-name="T13">( </text:span><text:span text:style-name="T26">a</text:span><text:span text:style-name="T13">,</text:span><text:span text:style-name="T26">b</text:span><text:span text:style-name="T13"> : </text:span><text:span text:style-name="T6">in</text:span><text:span text:style-name="T13"> </text:span><text:span text:style-name="T28">bit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tab/> <text:s text:c="2"/></text:span><text:span text:style-name="T26">cin</text:span><text:span text:style-name="T13"> : </text:span><text:span text:style-name="T6">in</text:span><text:span text:style-name="T13"> </text:span><text:span text:style-name="T28">bit</text:span><text:span text:style-name="T13">;</text:span></text:p>
      <text:p text:style-name="P15"><text:span text:style-name="T13"><text:s text:c="9"/></text:span><text:span text:style-name="T26">cout</text:span><text:span text:style-name="T13"> : </text:span><text:span text:style-name="T6">out</text:span><text:span text:style-name="T13"> </text:span><text:span text:style-name="T28">bit</text:span><text:span text:style-name="T13">;</text:span></text:p>
      <text:p text:style-name="P15"><text:span text:style-name="T13"><text:s text:c="12"/></text:span><text:span text:style-name="T26">s</text:span><text:span text:style-name="T13"> : </text:span><text:span text:style-name="T6">out</text:span><text:span text:style-name="T13"> </text:span><text:span text:style-name="T28">bit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23">begin</text:p>
      <text:p text:style-name="P16"/>
      <text:p text:style-name="P15"><text:span text:style-name="T13"><text:s text:c="4"/></text:span><text:span text:style-name="T6">process</text:span><text:span text:style-name="T13">(</text:span><text:span text:style-name="T26">a</text:span><text:span text:style-name="T13">,</text:span><text:span text:style-name="T26">b</text:span><text:span text:style-name="T13">,</text:span><text:span text:style-name="T26">cin</text:span><text:span text:style-name="T13">)</text:span></text:p>
      <text:p text:style-name="P15"><text:span text:style-name="T13"><text:s text:c="8"/></text:span><text:span text:style-name="T6">variable</text:span><text:span text:style-name="T13"> </text:span><text:span text:style-name="T30">c</text:span><text:span text:style-name="T13"> : </text:span><text:span text:style-name="T28">bit_vector</text:span><text:span text:style-name="T13">(</text:span><text:span text:style-name="T7">n</text:span><text:span text:style-name="T13"> </text:span><text:span text:style-name="T6">downto</text:span><text:span text:style-name="T13"> </text:span><text:span text:style-name="T31">0</text:span><text:span text:style-name="T13">);</text:span></text:p>
      <text:p text:style-name="P15"><text:span text:style-name="T13"><text:s text:c="4"/></text:span><text:span text:style-name="T6">begin</text:span></text:p>
      <text:p text:style-name="P15"><text:span text:style-name="T13"><text:s text:c="8"/></text:span><text:span text:style-name="T30">c</text:span><text:span text:style-name="T13">(</text:span><text:span text:style-name="T31">0</text:span><text:span text:style-name="T13">) := </text:span><text:span text:style-name="T26">cin</text:span><text:span text:style-name="T13">;</text:span></text:p>
      <text:p text:style-name="P15"><text:span text:style-name="T13"><text:s text:c="8"/></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7">n</text:span><text:span text:style-name="T14">-</text:span><text:span text:style-name="T31">1</text:span><text:span text:style-name="T13"> </text:span><text:span text:style-name="T6">loop</text:span></text:p>
      <text:p text:style-name="P15"><text:span text:style-name="T13"><text:s text:c="12"/></text:span><text:span text:style-name="T26">s</text:span><text:span text:style-name="T13">(i) &lt;= (</text:span><text:span text:style-name="T26">a</text:span><text:span text:style-name="T13">(i) </text:span><text:span text:style-name="T6">xor</text:span><text:span text:style-name="T13"> </text:span><text:span text:style-name="T26">b</text:span><text:span text:style-name="T13">(i)) </text:span><text:span text:style-name="T6">xor</text:span><text:span text:style-name="T13"> </text:span><text:span text:style-name="T30">c</text:span><text:span text:style-name="T13">(i);</text:span></text:p>
      <text:p text:style-name="P15"><text:span text:style-name="T13"><text:s text:c="12"/></text:span><text:span text:style-name="T30">c</text:span><text:span text:style-name="T13">(i</text:span><text:span text:style-name="T14">+</text:span><text:span text:style-name="T31">1</text:span><text:span text:style-name="T13">) := (</text:span><text:span text:style-name="T26">a</text:span><text:span text:style-name="T13">(i) </text:span><text:span text:style-name="T6">and</text:span><text:span text:style-name="T13"> </text:span><text:span text:style-name="T26">b</text:span><text:span text:style-name="T13">(i)) </text:span><text:span text:style-name="T6">or</text:span><text:span text:style-name="T13"> (</text:span><text:span text:style-name="T26">a</text:span><text:span text:style-name="T13">(i) </text:span><text:span text:style-name="T6">and</text:span><text:span text:style-name="T13"> </text:span><text:span text:style-name="T30">c</text:span><text:span text:style-name="T13">(i)) </text:span><text:span text:style-name="T6">or</text:span><text:span text:style-name="T13"> (</text:span><text:span text:style-name="T26">b</text:span><text:span text:style-name="T13">(i) </text:span><text:span text:style-name="T6">and</text:span><text:span text:style-name="T13"> </text:span><text:span text:style-name="T30">c</text:span><text:span text:style-name="T13">(i));</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26">cout</text:span><text:span text:style-name="T13"> &lt;= </text:span><text:span text:style-name="T30">c</text:span><text:span text:style-name="T13">(</text:span><text:span text:style-name="T7">n</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text:span><text:span text:style-name="T13">;</text:span></text:p>
      <text:p text:style-name="P1"><draw:frame draw:style-name="fr1" draw:name="graphics1" text:anchor-type="paragraph" svg:x="0.0665in" svg:y="0.1256in" svg:width="10.378in" svg:height="3.3091in" draw:z-index="26"><draw:image xlink:href="Pictures/20000007000041A100003D30C47D9AC9.svm" xlink:type="simple" xlink:show="embed" xlink:actuate="onLoad"/></draw:frame></text:p>
      <text:p text:style-name="P2"><text:soft-page-break/>LEADING ZEROS COUNTER</text:p>
      <text:p text:style-name="P19"/>
      <text:p text:style-name="P15"><text:span text:style-name="T6">entity</text:span><text:span text:style-name="T13"> examples </text:span><text:span text:style-name="T6">is</text:span><text:span text:style-name="T13"> </text:span><text:span text:style-name="T6">port</text:span><text:span text:style-name="T13">(</text:span></text:p>
      <text:p text:style-name="P15"><text:span text:style-name="T13"><text:s text:c="4"/>a : </text:span><text:span text:style-name="T6">in</text:span><text:span text:style-name="T13"> bit_vector(</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b : </text:span><text:span text:style-name="T6">out</text:span><text:span text:style-name="T13"> natural </text:span><text:span text:style-name="T6">range</text:span><text:span text:style-name="T13"> </text:span><text:span text:style-name="T31">0</text:span><text:span text:style-name="T13"> </text:span><text:span text:style-name="T6">to</text:span><text:span text:style-name="T13"> </text:span><text:span text:style-name="T31">8</text:span><text:span text:style-name="T13">);</text:span></text:p>
      <text:p text:style-name="P15"><text:span text:style-name="T6">end</text:span><text:span text:style-name="T13"> examples;</text:span></text:p>
      <text:p text:style-name="P16"/>
      <text:p text:style-name="P15"><text:span text:style-name="T6">architecture</text:span><text:span text:style-name="T13"> </text:span><text:span text:style-name="T22">arch</text:span><text:span text:style-name="T13"> </text:span><text:span text:style-name="T6">of</text:span><text:span text:style-name="T13"> examples </text:span><text:span text:style-name="T6">is</text:span></text:p>
      <text:p text:style-name="P23">begin</text:p>
      <text:p text:style-name="P16"/>
      <text:p text:style-name="P15"><text:span text:style-name="T13"><text:s text:c="4"/></text:span><text:span text:style-name="T6">process</text:span><text:span text:style-name="T13">(a)</text:span></text:p>
      <text:p text:style-name="P15"><text:span text:style-name="T13"><text:s text:c="8"/></text:span><text:span text:style-name="T6">variable</text:span><text:span text:style-name="T13"> </text:span><text:span text:style-name="T30">c</text:span><text:span text:style-name="T13"> : </text:span><text:span text:style-name="T28">natural</text:span><text:span text:style-name="T13"> </text:span><text:span text:style-name="T6">range</text:span><text:span text:style-name="T13"> </text:span><text:span text:style-name="T31">0</text:span><text:span text:style-name="T13"> </text:span><text:span text:style-name="T6">to</text:span><text:span text:style-name="T13"> </text:span><text:span text:style-name="T31">8</text:span><text:span text:style-name="T13">;</text:span></text:p>
      <text:p text:style-name="P15"><text:span text:style-name="T13"><text:s text:c="4"/></text:span><text:span text:style-name="T6">begin</text:span></text:p>
      <text:p text:style-name="P15"><text:span text:style-name="T13"><text:s text:c="8"/></text:span><text:span text:style-name="T30">c</text:span><text:span text:style-name="T13"> := </text:span><text:span text:style-name="T31">0</text:span><text:span text:style-name="T13">;</text:span></text:p>
      <text:p text:style-name="P15"><text:span text:style-name="T13"><text:s text:c="8"/></text:span><text:span text:style-name="T6">for</text:span><text:span text:style-name="T13"> i </text:span><text:span text:style-name="T6">in</text:span><text:span text:style-name="T13"> a</text:span><text:span text:style-name="T33">'range</text:span><text:span text:style-name="T13"> </text:span><text:span text:style-name="T6">loop</text:span></text:p>
      <text:p text:style-name="P15"><text:span text:style-name="T13"><text:s text:c="12"/></text:span><text:span text:style-name="T6">case</text:span><text:span text:style-name="T13"> a(i) </text:span><text:span text:style-name="T6">is</text:span></text:p>
      <text:p text:style-name="P15"><text:span text:style-name="T13"><text:s text:c="16"/></text:span><text:span text:style-name="T6">when</text:span><text:span text:style-name="T13"> </text:span><text:span text:style-name="T34">'0'</text:span><text:span text:style-name="T13"> =&gt; </text:span><text:span text:style-name="T30">c</text:span><text:span text:style-name="T13"> := </text:span><text:span text:style-name="T30">c</text:span><text:span text:style-name="T14">+</text:span><text:span text:style-name="T31">1</text:span><text:span text:style-name="T13">;</text:span></text:p>
      <text:p text:style-name="P15"><text:span text:style-name="T13"><text:s text:c="16"/></text:span><text:span text:style-name="T6">when</text:span><text:span text:style-name="T13"> </text:span><text:span text:style-name="T6">others</text:span><text:span text:style-name="T13"> =&gt; </text:span><text:span text:style-name="T6">exit</text:span><text:span text:style-name="T13">;</text:span></text:p>
      <text:p text:style-name="P15"><text:span text:style-name="T13"><text:s text:c="12"/></text:span><text:span text:style-name="T6">end</text:span><text:span text:style-name="T13"> </text:span><text:span text:style-name="T6">case</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b &lt;= </text:span><text:span text:style-name="T30">c</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text:span><text:span text:style-name="T13">;</text:span></text:p>
      <text:p text:style-name="P1"><draw:frame draw:style-name="fr1" draw:name="graphics38" text:anchor-type="paragraph" svg:x="0.0917in" svg:y="0.1457in" svg:width="10.3898in" svg:height="2.8689in" draw:z-index="7"><draw:image xlink:href="Pictures/20000007000040B300002D11D420E9B7.svm" xlink:type="simple" xlink:show="embed" xlink:actuate="onLoad"/></draw:frame></text:p>
      <text:p text:style-name="P1"/>
      <text:p text:style-name="P1"/>
      <text:p text:style-name="P1"/>
      <text:p text:style-name="P1"/>
      <text:p text:style-name="P1"/>
      <text:p text:style-name="P2"><text:soft-page-break/>PARITY</text:p>
      <text:p text:style-name="P12"><text:span text:style-name="T6">entity</text:span><text:span text:style-name="T15"> </text:span><text:span text:style-name="T23">examples</text:span><text:span text:style-name="T15"> </text:span><text:span text:style-name="T6">is</text:span><text:span text:style-name="T15"> </text:span><text:span text:style-name="T6">port</text:span><text:span text:style-name="T15">(</text:span></text:p>
      <text:p text:style-name="P15"><text:span text:style-name="T13"><text:s text:c="4"/>x : </text:span><text:span text:style-name="T6">in</text:span><text:span text:style-name="T13"> bit_vector(</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y : </text:span><text:span text:style-name="T6">out</text:span><text:span text:style-name="T13"> bit);</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ok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signal</text:span><text:span text:style-name="T13"> temp: </text:span><text:span text:style-name="T28">bit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mp(</text:span><text:span text:style-name="T31">0</text:span><text:span text:style-name="T13">) &lt;= x(</text:span><text:span text:style-name="T31">0</text:span><text:span text:style-name="T13">);</text:span></text:p>
      <text:p text:style-name="P15"><text:span text:style-name="T13"><text:s text:c="4"/>gen: </text:span><text:span text:style-name="T6">for</text:span><text:span text:style-name="T13"> i </text:span><text:span text:style-name="T6">in</text:span><text:span text:style-name="T13"> </text:span><text:span text:style-name="T31">1</text:span><text:span text:style-name="T13"> </text:span><text:span text:style-name="T6">to</text:span><text:span text:style-name="T13"> </text:span><text:span text:style-name="T31">7</text:span><text:span text:style-name="T13"> </text:span><text:span text:style-name="T6">generate</text:span></text:p>
      <text:p text:style-name="P15"><text:span text:style-name="T13"><text:s text:c="8"/>temp(i) &lt;= temp(i</text:span><text:span text:style-name="T14">-</text:span><text:span text:style-name="T31">1</text:span><text:span text:style-name="T13">) </text:span><text:span text:style-name="T6">xor</text:span><text:span text:style-name="T13"> x(i);</text:span></text:p>
      <text:p text:style-name="P15"><text:span text:style-name="T13"><text:s text:c="4"/></text:span><text:span text:style-name="T6">end</text:span><text:span text:style-name="T13"> </text:span><text:span text:style-name="T6">generate</text:span><text:span text:style-name="T13">;</text:span></text:p>
      <text:p text:style-name="P15"><text:span text:style-name="T13"><text:s text:c="4"/>y &lt;= temp(</text:span><text:span text:style-name="T31">7</text:span><text:span text:style-name="T13">);</text:span></text:p>
      <text:p text:style-name="P15"><text:span text:style-name="T6">end</text:span><text:span text:style-name="T13"> </text:span><text:span text:style-name="T6">architecture</text:span><text:span text:style-name="T13">;</text:span></text:p>
      <text:p text:style-name="P12"/>
      <text:p text:style-name="P12"><draw:frame draw:style-name="fr1" draw:name="graphics41" text:anchor-type="paragraph" svg:x="3.6193in" svg:y="0.4047in" svg:width="6.6799in" svg:height="2.3425in" draw:z-index="8"><draw:image xlink:href="Pictures/2000000700006C5000003B89C94DCD76.svm"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PACKAGE EXAMPLE</text:p>
      <text:p text:style-name="P12"/>
      <text:p text:style-name="P12"><text:span text:style-name="T6">library</text:span><text:span text:style-name="T15"> </text:span><text:span text:style-name="T23">ieee</text:span><text:span text:style-name="T15">;</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package</text:span><text:span text:style-name="T13"> </text:span><text:span text:style-name="T22">my_package</text:span><text:span text:style-name="T13"> </text:span><text:span text:style-name="T6">is</text:span></text:p>
      <text:p text:style-name="P15"><text:span text:style-name="T13"><text:s text:c="4"/></text:span><text:span text:style-name="T6">constant</text:span><text:span text:style-name="T13"> </text:span><text:span text:style-name="T7">flag</text:span><text:span text:style-name="T13">: </text:span><text:span text:style-name="T28">std_logic</text:span><text:span text:style-name="T13">;</text:span></text:p>
      <text:p text:style-name="P15"><text:span text:style-name="T13"><text:s text:c="4"/></text:span><text:span text:style-name="T6">function</text:span><text:span text:style-name="T13"> </text:span><text:span text:style-name="T14">down_edge</text:span><text:span text:style-name="T13">(</text:span><text:span text:style-name="T6">signal</text:span><text:span text:style-name="T13"> </text:span><text:span text:style-name="T26">s</text:span><text:span text:style-name="T13">: </text:span><text:span text:style-name="T28">std_logic</text:span><text:span text:style-name="T13">) </text:span><text:span text:style-name="T6">return</text:span><text:span text:style-name="T13"> </text:span><text:span text:style-name="T28">boolean</text:span><text:span text:style-name="T13">;</text:span></text:p>
      <text:p text:style-name="P15"><text:span text:style-name="T6">end</text:span><text:span text:style-name="T13"> </text:span><text:span text:style-name="T22">my_package</text:span><text:span text:style-name="T13">;</text:span></text:p>
      <text:p text:style-name="P16"/>
      <text:p text:style-name="P15"><text:span text:style-name="T6">package</text:span><text:span text:style-name="T13"> </text:span><text:span text:style-name="T6">body</text:span><text:span text:style-name="T13"> </text:span><text:span text:style-name="T22">my_package</text:span><text:span text:style-name="T13"> </text:span><text:span text:style-name="T6">is</text:span></text:p>
      <text:p text:style-name="P15"><text:span text:style-name="T13"><text:s text:c="4"/></text:span><text:span text:style-name="T6">constant</text:span><text:span text:style-name="T13"> </text:span><text:span text:style-name="T7">flag</text:span><text:span text:style-name="T13">: </text:span><text:span text:style-name="T28">std_logic</text:span><text:span text:style-name="T13"> := </text:span><text:span text:style-name="T34">'1'</text:span><text:span text:style-name="T13">;</text:span></text:p>
      <text:p text:style-name="P15"><text:span text:style-name="T13"><text:s text:c="4"/></text:span><text:span text:style-name="T6">function</text:span><text:span text:style-name="T13"> </text:span><text:span text:style-name="T14">down_edge</text:span><text:span text:style-name="T13">(</text:span><text:span text:style-name="T6">signal</text:span><text:span text:style-name="T13"> </text:span><text:span text:style-name="T26">s</text:span><text:span text:style-name="T13">: </text:span><text:span text:style-name="T28">std_logic</text:span><text:span text:style-name="T13">) </text:span><text:span text:style-name="T6">return</text:span><text:span text:style-name="T13"> </text:span><text:span text:style-name="T28">boolean</text:span><text:span text:style-name="T13"> </text:span><text:span text:style-name="T6">is</text:span></text:p>
      <text:p text:style-name="P15"><text:span text:style-name="T13"><text:s text:c="4"/></text:span><text:span text:style-name="T6">begin</text:span></text:p>
      <text:p text:style-name="P15"><text:span text:style-name="T13"><text:s text:c="8"/></text:span><text:span text:style-name="T6">return</text:span><text:span text:style-name="T13">( </text:span><text:span text:style-name="T26">s</text:span><text:span text:style-name="T13">' </text:span><text:span text:style-name="T33">event</text:span><text:span text:style-name="T13"> </text:span><text:span text:style-name="T6">and</text:span><text:span text:style-name="T13"> </text:span><text:span text:style-name="T26">s</text:span><text:span text:style-name="T13"> = </text:span><text:span text:style-name="T34">'0'</text:span><text:span text:style-name="T13">);</text:span></text:p>
      <text:p text:style-name="P15"><text:span text:style-name="T13"><text:s text:c="4"/></text:span><text:span text:style-name="T6">end</text:span><text:span text:style-name="T13"> </text:span><text:span text:style-name="T14">down_edge</text:span><text:span text:style-name="T13">;</text:span></text:p>
      <text:p text:style-name="P15"><text:span text:style-name="T6">end</text:span><text:span text:style-name="T13"> </text:span><text:span text:style-name="T22">my_package</text:span><text:span text:style-name="T13">;</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BINARY DECADE COUNTER</text:p>
      <text:p text:style-name="P18"/>
      <text:p text:style-name="P18">–- <text:s text:c="3"/>reset <text:s text:c="3"/>clock <text:s text:c="3"/>enable <text:s text:c="3"/>load <text:s text:c="3"/>mode <text:s text:c="3"/>count <text:s text:c="19"/>when writing the process this reflects priority</text:p>
      <text:p text:style-name="P26">-- <text:s text:c="3"/>0 <text:s text:c="7"/>- <text:s text:c="7"/>- <text:s text:c="11"/>- <text:s text:c="7"/>- <text:s text:c="7"/>0 <text:s text:c="18"/>highest priority - <text:s text:c="3"/>1</text:p>
      <text:p text:style-name="P26">-- <text:s text:c="3"/>1 <text:s text:c="7"/>^ <text:s text:c="7"/>1 <text:s text:c="11"/>- <text:s text:c="7"/>- <text:s text:c="7"/>count <text:s text:c="36"/>2</text:p>
      <text:p text:style-name="P26">-- <text:s text:c="3"/>1 <text:s text:c="7"/>^ <text:s text:c="7"/>0 <text:s text:c="11"/>0 <text:s text:c="7"/>- <text:s text:c="7"/>data <text:s text:c="37"/>3</text:p>
      <text:p text:style-name="P26">-- <text:s text:c="3"/>1 <text:s text:c="7"/>^ <text:s text:c="7"/>0 <text:s text:c="11"/>1 <text:s text:c="7"/>0 <text:s text:c="7"/>count + 1 (binary) <text:s text:c="23"/>4</text:p>
      <text:p text:style-name="P26">-- <text:s text:c="3"/>1 <text:s text:c="7"/>^ <text:s text:c="7"/>0 <text:s text:c="11"/>1 <text:s text:c="7"/>1 <text:s text:c="7"/>count + 1 (decade) <text:s text:c="23"/>5</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 </text:span><text:span text:style-name="T36">-- allows to use signed and unsigned</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clock, reset, enable, load, mode: </text:span><text:span text:style-name="T6">in</text:span><text:span text:style-name="T13"> </text:span><text:span text:style-name="T28">std_logic</text:span><text:span text:style-name="T13">;</text:span></text:p>
      <text:p text:style-name="P15"><text:span text:style-name="T13"><text:s text:c="4"/>data : </text:span><text:span text:style-name="T6">in</text:span><text:span text:style-name="T13"> std_logic_vector (</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count : </text:span><text:span text:style-name="T6">out</text:span><text:span text:style-name="T13"> std_logic_vector(</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arch </text:span><text:span text:style-name="T6">of</text:span><text:span text:style-name="T13"> </text:span><text:span text:style-name="T22">examples</text:span><text:span text:style-name="T13"> </text:span><text:span text:style-name="T6">is</text:span></text:p>
      <text:p text:style-name="P16"/>
      <text:p text:style-name="P15"><text:span text:style-name="T13"><text:s text:c="4"/></text:span><text:span text:style-name="T6">constant</text:span><text:span text:style-name="T13"> nibble_max : unsigned(</text:span><text:span text:style-name="T31">3</text:span><text:span text:style-name="T13"> </text:span><text:span text:style-name="T6">downto</text:span><text:span text:style-name="T13"> </text:span><text:span text:style-name="T31">0</text:span><text:span text:style-name="T13">) := </text:span><text:span text:style-name="T34">"1111"</text:span><text:span text:style-name="T13">;</text:span></text:p>
      <text:p text:style-name="P15"><text:span text:style-name="T13"><text:s text:c="4"/></text:span><text:span text:style-name="T6">constant</text:span><text:span text:style-name="T13"> decade_max : unsigned(</text:span><text:span text:style-name="T31">3</text:span><text:span text:style-name="T13"> </text:span><text:span text:style-name="T6">downto</text:span><text:span text:style-name="T13"> </text:span><text:span text:style-name="T31">0</text:span><text:span text:style-name="T13">) := </text:span><text:span text:style-name="T34">"1001"</text:span><text:span text:style-name="T13">;</text:span></text:p>
      <text:p text:style-name="P15"><text:span text:style-name="T13"><text:s text:c="4"/></text:span><text:span text:style-name="T6">constant</text:span><text:span text:style-name="T13"> zero_nibble: unsigned(</text:span><text:span text:style-name="T31">3</text:span><text:span text:style-name="T13"> </text:span><text:span text:style-name="T6">downto</text:span><text:span text:style-name="T13"> </text:span><text:span text:style-name="T31">0</text:span><text:span text:style-name="T13">) := </text:span><text:span text:style-name="T34">"0000"</text:span><text:span text:style-name="T13">;</text:span></text:p>
      <text:p text:style-name="P15"><text:span text:style-name="T13"><text:s text:c="4"/></text:span><text:span text:style-name="T6">constant</text:span><text:span text:style-name="T13"> zero_byte <text:s/>: unsigned(</text:span><text:span text:style-name="T31">7</text:span><text:span text:style-name="T13"> </text:span><text:span text:style-name="T6">downto</text:span><text:span text:style-name="T13"> </text:span><text:span text:style-name="T31">0</text:span><text:span text:style-name="T13">) := </text:span><text:span text:style-name="T34">"00000000"</text:span><text:span text:style-name="T13">;</text:span></text:p>
      <text:p text:style-name="P15"><text:span text:style-name="T13"><text:s text:c="4"/></text:span><text:span text:style-name="T6">signal</text:span><text:span text:style-name="T13"> Q <text:s text:c="17"/>: unsigned(</text:span><text:span text:style-name="T31">7</text:span><text:span text:style-name="T13"> </text:span><text:span text:style-name="T6">downto</text:span><text:span text:style-name="T13"> </text:span><text:span text:style-name="T31">0</text:span><text:span text:style-name="T13">);</text:span></text:p>
      <text:p text:style-name="P16"/>
      <text:p text:style-name="P23">begin</text:p>
      <text:p text:style-name="P15"><text:span text:style-name="T13"><text:s text:c="4"/></text:span><text:span text:style-name="T6">process</text:span><text:span text:style-name="T13">(clock, reset)</text:span></text:p>
      <text:p text:style-name="P15"><text:span text:style-name="T13"><text:s text:c="4"/></text:span><text:span text:style-name="T6">begin</text:span></text:p>
      <text:p text:style-name="P15"><text:span text:style-name="T13"><text:s text:c="8"/></text:span><text:span text:style-name="T6">if</text:span><text:span text:style-name="T13"> reset = </text:span><text:span text:style-name="T34">'0'</text:span><text:span text:style-name="T13"> </text:span><text:span text:style-name="T6">then</text:span><text:span text:style-name="T13"> </text:span><text:span text:style-name="T36">-- reset register, Q &lt;= 0</text:span></text:p>
      <text:p text:style-name="P15"><text:span text:style-name="T13"><text:s text:c="12"/>Q &lt;= zero_byte; </text:span><text:span text:style-name="T36">--(others =&gt; '0');</text:span></text:p>
      <text:p text:style-name="P15"><text:span text:style-name="T13"><text:s text:c="8"/></text:span><text:span text:style-name="T6">elsif</text:span><text:span text:style-name="T13"> </text:span><text:span text:style-name="T14">rising_edge</text:span><text:span text:style-name="T13">(clock) </text:span><text:span text:style-name="T6">then</text:span><text:span text:style-name="T13"> </text:span><text:span text:style-name="T36">-- increment register, Q &lt;= Q + 1</text:span></text:p>
      <text:p text:style-name="P15"><text:span text:style-name="T13"><text:s text:c="12"/></text:span><text:span text:style-name="T6">if</text:span><text:span text:style-name="T13"> enable = </text:span><text:span text:style-name="T34">'0'</text:span><text:span text:style-name="T13"> </text:span><text:span text:style-name="T6">then</text:span><text:span text:style-name="T13"> </text:span><text:span text:style-name="T36">-- enable counter functionality</text:span></text:p>
      <text:p text:style-name="P15"><text:span text:style-name="T13"><text:s text:c="16"/></text:span><text:span text:style-name="T6">if</text:span><text:span text:style-name="T13"> load = </text:span><text:span text:style-name="T34">'0'</text:span><text:span text:style-name="T13"> </text:span><text:span text:style-name="T6">then</text:span><text:span text:style-name="T13"> </text:span><text:span text:style-name="T36">-- load data</text:span></text:p>
      <text:p text:style-name="P16"><text:s text:c="20"/>Q &lt;= unsigned(data);</text:p>
      <text:p text:style-name="P15"><text:span text:style-name="T13"><text:s text:c="16"/></text:span><text:span text:style-name="T6">elsif</text:span><text:span text:style-name="T13"> (mode = </text:span><text:span text:style-name="T34">'0'</text:span><text:span text:style-name="T13"> </text:span><text:span text:style-name="T6">and</text:span><text:span text:style-name="T13"> Q(</text:span><text:span text:style-name="T31">3</text:span><text:span text:style-name="T13"> </text:span><text:span text:style-name="T6">downto</text:span><text:span text:style-name="T13"> </text:span><text:span text:style-name="T31">0</text:span><text:span text:style-name="T13">) /= nibble_max) </text:span><text:span text:style-name="T6">or</text:span><text:span text:style-name="T13"> (mode = </text:span><text:span text:style-name="T34">'1'</text:span><text:span text:style-name="T13"> </text:span><text:span text:style-name="T6">and</text:span><text:span text:style-name="T13"> Q(</text:span><text:span text:style-name="T31">3</text:span><text:span text:style-name="T13"> </text:span><text:span text:style-name="T6">downto</text:span><text:span text:style-name="T13"> </text:span><text:span text:style-name="T31">0</text:span><text:span text:style-name="T13">) /= decade_max) </text:span><text:span text:style-name="T6">then</text:span><text:span text:style-name="T13"> </text:span><text:span text:style-name="T36">--implement counting <text:tab/><text:tab/><text:tab/><text:tab/><text:tab/><text:tab/><text:tab/><text:tab/><text:tab/><text:tab/><text:tab/><text:tab/><text:tab/><text:tab/><text:tab/><text:tab/><text:tab/><text:tab/><text:tab/>based on mode signal</text:span></text:p>
      <text:p text:style-name="P15"><text:span text:style-name="T13"><text:s text:c="20"/>Q(</text:span><text:span text:style-name="T31">3</text:span><text:span text:style-name="T13"> </text:span><text:span text:style-name="T6">downto</text:span><text:span text:style-name="T13"> </text:span><text:span text:style-name="T31">0</text:span><text:span text:style-name="T13">) &lt;= Q(</text:span><text:span text:style-name="T31">3</text:span><text:span text:style-name="T13"> </text:span><text:span text:style-name="T6">downto</text:span><text:span text:style-name="T13"> </text:span><text:span text:style-name="T31">0</text:span><text:span text:style-name="T13">) </text:span><text:span text:style-name="T14">+</text:span><text:span text:style-name="T13"> </text:span><text:span text:style-name="T31">1</text:span><text:span text:style-name="T13">;</text:span></text:p>
      <text:p text:style-name="P15"><text:span text:style-name="T13"><text:s text:c="16"/></text:span><text:span text:style-name="T6">else</text:span></text:p>
      <text:p text:style-name="P15"><text:span text:style-name="T13"><text:s text:c="20"/>Q(</text:span><text:span text:style-name="T31">3</text:span><text:span text:style-name="T13"> </text:span><text:span text:style-name="T6">downto</text:span><text:span text:style-name="T13"> </text:span><text:span text:style-name="T31">0</text:span><text:span text:style-name="T13">) &lt;= zero_nibble;</text:span></text:p>
      <text:p text:style-name="P15"><text:span text:style-name="T13"><text:s text:c="20"/></text:span><text:span text:style-name="T6">if</text:span><text:span text:style-name="T13"> (mode = </text:span><text:span text:style-name="T34">'0'</text:span><text:span text:style-name="T13"> </text:span><text:span text:style-name="T6">and</text:span><text:span text:style-name="T13"> Q(</text:span><text:span text:style-name="T31">7</text:span><text:span text:style-name="T13"> </text:span><text:span text:style-name="T6">downto</text:span><text:span text:style-name="T13"> </text:span><text:span text:style-name="T31">4</text:span><text:span text:style-name="T13">) /= nibble_max) </text:span><text:span text:style-name="T6">or</text:span><text:span text:style-name="T13"> <text:s text:c="3"/>(mode = </text:span><text:span text:style-name="T34">'1'</text:span><text:span text:style-name="T13"> </text:span><text:span text:style-name="T6">and</text:span><text:span text:style-name="T13"> Q(</text:span><text:span text:style-name="T31">7</text:span><text:span text:style-name="T13"> </text:span><text:span text:style-name="T6">downto</text:span><text:span text:style-name="T13"> </text:span><text:span text:style-name="T31">4</text:span><text:span text:style-name="T13">) /= decade_max) </text:span><text:span text:style-name="T6">then</text:span><text:span text:style-name="T13"> </text:span><text:span text:style-name="T36">--implement counting <text:tab/><text:tab/><text:tab/><text:tab/><text:tab/><text:tab/><text:tab/><text:tab/><text:tab/><text:tab/><text:tab/><text:tab/><text:tab/><text:tab/><text:tab/><text:tab/><text:tab/><text:tab/>based on mode signal</text:span></text:p>
      <text:p text:style-name="P15"><text:span text:style-name="T13"><text:s text:c="24"/>Q(</text:span><text:span text:style-name="T31">7</text:span><text:span text:style-name="T13"> </text:span><text:span text:style-name="T6">downto</text:span><text:span text:style-name="T13"> </text:span><text:span text:style-name="T31">4</text:span><text:span text:style-name="T13">) &lt;= Q(</text:span><text:span text:style-name="T31">7</text:span><text:span text:style-name="T13"> </text:span><text:span text:style-name="T6">downto</text:span><text:span text:style-name="T13"> </text:span><text:span text:style-name="T31">4</text:span><text:span text:style-name="T13">) </text:span><text:span text:style-name="T14">+</text:span><text:span text:style-name="T13"> </text:span><text:span text:style-name="T31">1</text:span><text:span text:style-name="T13">;</text:span><text:span text:style-name="T36">--increment upper nibble</text:span></text:p>
      <text:p text:style-name="P15"><text:span text:style-name="T13"><text:s text:c="20"/></text:span><text:span text:style-name="T6">else</text:span></text:p>
      <text:p text:style-name="P15"><text:span text:style-name="T13"><text:s text:c="24"/>Q(</text:span><text:span text:style-name="T31">7</text:span><text:span text:style-name="T13"> </text:span><text:span text:style-name="T6">downto</text:span><text:span text:style-name="T13"> </text:span><text:span text:style-name="T31">4</text:span><text:span text:style-name="T13">) &lt;= zero_nibble;</text:span><text:span text:style-name="T36">-- wrap upper nibble back to 0</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count &lt;= </text:span><text:span text:style-name="T28">std_logic_vector</text:span><text:span text:style-name="T13">(Q);</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arch;</text:span></text:p>
      <text:p text:style-name="P2"><draw:frame draw:style-name="fr1" draw:name="graphics46" text:anchor-type="paragraph" svg:x="0.1319in" svg:y="0.1181in" svg:width="10.3307in" svg:height="5.5035in" draw:z-index="9"><draw:image xlink:href="Pictures/200000070000705800004E580D8BDC9E.svm"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2"><text:soft-page-break/>RAM INFEREING ON-CHIP RAM</text:p>
      <text:p text:style-name="P2"/>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q1</text:span><text:span text:style-name="T13"> </text:span><text:span text:style-name="T6">is</text:span></text:p>
      <text:p text:style-name="P15"><text:span text:style-name="T13"><text:s text:c="4"/></text:span><text:span text:style-name="T6">generic</text:span><text:span text:style-name="T13">()</text:span></text:p>
      <text:p text:style-name="P15"><text:span text:style-name="T13"><text:s text:c="4"/>DATA_WIDTH : </text:span><text:span text:style-name="T28">natural</text:span><text:span text:style-name="T13"> := </text:span><text:span text:style-name="T31">16</text:span><text:span text:style-name="T13">;</text:span></text:p>
      <text:p text:style-name="P15"><text:span text:style-name="T13"><text:s text:c="4"/>ADDR_WIDTH : </text:span><text:span text:style-name="T28">natural</text:span><text:span text:style-name="T13"> := </text:span><text:span text:style-name="T31">5</text:span></text:p>
      <text:p text:style-name="P16"><text:s text:c="4"/>);</text:p>
      <text:p text:style-name="P15"><text:span text:style-name="T13"><text:s text:c="4"/></text:span><text:span text:style-name="T6">port</text:span><text:span text:style-name="T13"> (</text:span></text:p>
      <text:p text:style-name="P15"><text:span text:style-name="T13"><text:s text:c="8"/></text:span><text:span text:style-name="T26">clk</text:span><text:span text:style-name="T13"> <text:s text:c="7"/>: </text:span><text:span text:style-name="T6">in</text:span><text:span text:style-name="T13"> </text:span><text:span text:style-name="T28">std_logic</text:span><text:span text:style-name="T13">;</text:span></text:p>
      <text:p text:style-name="P15"><text:span text:style-name="T13"><text:s text:c="8"/></text:span><text:span text:style-name="T26">addr_a</text:span><text:span text:style-name="T13"> <text:s text:c="3"/>: </text:span><text:span text:style-name="T6">in</text:span><text:span text:style-name="T13"> </text:span><text:span text:style-name="T28">natural</text:span><text:span text:style-name="T13"> </text:span><text:span text:style-name="T6">range</text:span><text:span text:style-name="T13"> </text:span><text:span text:style-name="T31">0</text:span><text:span text:style-name="T13"> </text:span><text:span text:style-name="T6">to</text:span><text:span text:style-name="T13"> </text:span><text:span text:style-name="T31">2</text:span><text:span text:style-name="T14">**</text:span><text:span text:style-name="T13">ADDR_WIDTH </text:span><text:span text:style-name="T14">-</text:span><text:span text:style-name="T13"> </text:span><text:span text:style-name="T31">1</text:span><text:span text:style-name="T13">;</text:span></text:p>
      <text:p text:style-name="P15"><text:span text:style-name="T13"><text:s text:c="8"/></text:span><text:span text:style-name="T26">data_a</text:span><text:span text:style-name="T13"> <text:s text:c="3"/>: </text:span><text:span text:style-name="T6">in</text:span><text:span text:style-name="T13"> </text:span><text:span text:style-name="T28">std_logic_vector</text:span><text:span text:style-name="T13">((DATA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we_a</text:span><text:span text:style-name="T13"> <text:s text:c="3"/>: </text:span><text:span text:style-name="T6">in</text:span><text:span text:style-name="T13"> </text:span><text:span text:style-name="T28">std_logic</text:span><text:span text:style-name="T13"> := </text:span><text:span text:style-name="T34">'1'</text:span><text:span text:style-name="T13">;</text:span></text:p>
      <text:p text:style-name="P15"><text:span text:style-name="T13"><text:s text:c="8"/></text:span><text:span text:style-name="T26">q_a</text:span><text:span text:style-name="T13"> <text:s text:c="7"/>: </text:span><text:span text:style-name="T6">out</text:span><text:span text:style-name="T13"> </text:span><text:span text:style-name="T28">std_logic_vector</text:span><text:span text:style-name="T13">((DATA_WIDTH </text:span><text:span text:style-name="T14">-</text:span><text:span text:style-name="T31">1</text:span><text:span text:style-name="T13">) </text:span><text:span text:style-name="T6">downto</text:span><text:span text:style-name="T13"> </text:span><text:span text:style-name="T31">0</text:span><text:span text:style-name="T13">));</text:span></text:p>
      <text:p text:style-name="P16"/>
      <text:p text:style-name="P15"><text:span text:style-name="T6">end</text:span><text:span text:style-name="T13"> </text:span><text:span text:style-name="T22">eq1</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eq1</text:span><text:span text:style-name="T13"> </text:span><text:span text:style-name="T6">is</text:span></text:p>
      <text:p text:style-name="P16"/>
      <text:p text:style-name="P15"><text:span text:style-name="T13"><text:s text:c="4"/></text:span><text:span text:style-name="T36">-- Build a 2-D array type for the RAM</text:span></text:p>
      <text:p text:style-name="P15"><text:span text:style-name="T13"><text:s text:c="4"/></text:span><text:span text:style-name="T6">subtype</text:span><text:span text:style-name="T13"> </text:span><text:span text:style-name="T28">word_t</text:span><text:span text:style-name="T13"> </text:span><text:span text:style-name="T6">is</text:span><text:span text:style-name="T13"> </text:span><text:span text:style-name="T28">std_logic_vector</text:span><text:span text:style-name="T13">((</text:span><text:span text:style-name="T7">DATA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type</text:span><text:span text:style-name="T13"> </text:span><text:span text:style-name="T28">memory_t</text:span><text:span text:style-name="T13"> </text:span><text:span text:style-name="T6">is</text:span><text:span text:style-name="T13"> </text:span><text:span text:style-name="T6">array</text:span><text:span text:style-name="T13">(</text:span><text:span text:style-name="T31">2</text:span><text:span text:style-name="T14">**</text:span><text:span text:style-name="T7">ADDR_WIDTH</text:span><text:span text:style-name="T14">-</text:span><text:span text:style-name="T31">1</text:span><text:span text:style-name="T13"> </text:span><text:span text:style-name="T6">downto</text:span><text:span text:style-name="T13"> </text:span><text:span text:style-name="T31">0</text:span><text:span text:style-name="T13">) </text:span><text:span text:style-name="T6">of</text:span><text:span text:style-name="T13"> </text:span><text:span text:style-name="T28">word_t</text:span><text:span text:style-name="T13">;</text:span></text:p>
      <text:p text:style-name="P16"/>
      <text:p text:style-name="P15"><text:span text:style-name="T13"><text:s text:c="4"/></text:span><text:span text:style-name="T36">-- Declare the RAM</text:span></text:p>
      <text:p text:style-name="P15"><text:span text:style-name="T13"><text:s text:c="4"/></text:span><text:span text:style-name="T6">shared</text:span><text:span text:style-name="T13"> </text:span><text:span text:style-name="T6">variable</text:span><text:span text:style-name="T13"> </text:span><text:span text:style-name="T30">ram</text:span><text:span text:style-name="T13"> : </text:span><text:span text:style-name="T28">memory_t</text:span><text:span text:style-name="T13">;</text:span></text:p>
      <text:p text:style-name="P16"/>
      <text:p text:style-name="P23">begin</text:p>
      <text:p text:style-name="P15"><text:span text:style-name="T13"><text:s text:c="4"/></text:span><text:span text:style-name="T36">-- Port A</text:span></text:p>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text:span><text:span text:style-name="T26">we_a</text:span><text:span text:style-name="T13"> = </text:span><text:span text:style-name="T34">'1'</text:span><text:span text:style-name="T13">) </text:span><text:span text:style-name="T6">then</text:span></text:p>
      <text:p text:style-name="P15"><text:span text:style-name="T13"><text:s text:c="16"/></text:span><text:span text:style-name="T30">ram</text:span><text:span text:style-name="T13">(</text:span><text:span text:style-name="T26">addr_a</text:span><text:span text:style-name="T13">) := </text:span><text:span text:style-name="T26">data_a</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26">q_a</text:span><text:span text:style-name="T13"> &lt;= </text:span><text:span text:style-name="T30">ram</text:span><text:span text:style-name="T13">(</text:span><text:span text:style-name="T26">addr_a</text:span><text:span text:style-name="T13">); </text:span><text:span text:style-name="T36">--this is everything. ma tiktibx il hrug hekk tispicca ma tuzax il memorja ta gewwa</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rtl</text:span><text:span text:style-name="T13">;</text:span></text:p>
      <text:p text:style-name="P16"/>
      <text:p text:style-name="P16"/>
      <text:p text:style-name="P16"/>
      <text:p text:style-name="P16"/>
      <text:p text:style-name="P16"/>
      <text:p text:style-name="P16"/>
      <text:p text:style-name="P16"/>
      <text:p text:style-name="P16"/>
      <text:p text:style-name="P16"/>
      <text:section text:style-name="Sect1" text:name="Section1">
        <text:p text:style-name="P2"><text:soft-page-break/>RAM WITH MAC</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package</text:span><text:span text:style-name="T13"> </text:span><text:span text:style-name="T22">math</text:span><text:span text:style-name="T13"> </text:span><text:span text:style-name="T6">is</text:span></text:p>
        <text:p text:style-name="P15"><text:span text:style-name="T13"><text:s text:c="4"/></text:span><text:span text:style-name="T6">type</text:span><text:span text:style-name="T13"> </text:span><text:span text:style-name="T28">tw8</text:span><text:span text:style-name="T13"> <text:s/></text:span><text:span text:style-name="T6">is</text:span><text:span text:style-name="T13"> </text:span><text:span text:style-name="T6">array</text:span><text:span text:style-name="T13">(</text:span><text:span text:style-name="T31">7</text:span><text:span text:style-name="T13"> </text:span><text:span text:style-name="T6">downto</text:span><text:span text:style-name="T13"> </text:span><text:span text:style-name="T31">0</text:span><text:span text:style-name="T13">) </text:span><text:span text:style-name="T6">of</text:span><text:span text:style-name="T13"> </text:span><text:span text:style-name="T28">std_logic</text:span><text:span text:style-name="T13">;</text:span></text:p>
        <text:p text:style-name="P15"><text:span text:style-name="T13"><text:s text:c="4"/></text:span><text:span text:style-name="T6">type</text:span><text:span text:style-name="T13"> </text:span><text:span text:style-name="T28">tw10</text:span><text:span text:style-name="T13"> </text:span><text:span text:style-name="T6">is</text:span><text:span text:style-name="T13"> </text:span><text:span text:style-name="T6">array</text:span><text:span text:style-name="T13">(</text:span><text:span text:style-name="T31">15</text:span><text:span text:style-name="T13"> </text:span><text:span text:style-name="T6">downto</text:span><text:span text:style-name="T13"> </text:span><text:span text:style-name="T31">0</text:span><text:span text:style-name="T13">) </text:span><text:span text:style-name="T6">of</text:span><text:span text:style-name="T13"> </text:span><text:span text:style-name="T28">std_logic</text:span><text:span text:style-name="T13">;</text:span></text:p>
        <text:p text:style-name="P16"/>
        <text:p text:style-name="P15"><text:span text:style-name="T13"><text:s text:c="4"/></text:span><text:span text:style-name="T6">function</text:span><text:span text:style-name="T13"> </text:span><text:span text:style-name="T14">tw_add</text:span><text:span text:style-name="T13">(</text:span><text:span text:style-name="T26">a</text:span><text:span text:style-name="T13">, </text:span><text:span text:style-name="T26">b</text:span><text:span text:style-name="T13"> : </text:span><text:span text:style-name="T28">tw10</text:span><text:span text:style-name="T13">)</text:span><text:span text:style-name="T6">return</text:span><text:span text:style-name="T13"> </text:span><text:span text:style-name="T28">tw10</text:span><text:span text:style-name="T13">;</text:span></text:p>
        <text:p text:style-name="P15"><text:span text:style-name="T13"><text:s text:c="4"/></text:span><text:span text:style-name="T6">function</text:span><text:span text:style-name="T13"> </text:span><text:span text:style-name="T14">tw_mul</text:span><text:span text:style-name="T13">(</text:span><text:span text:style-name="T26">a</text:span><text:span text:style-name="T13">, </text:span><text:span text:style-name="T26">b</text:span><text:span text:style-name="T13"> : </text:span><text:span text:style-name="T28">tw8</text:span><text:span text:style-name="T13">)</text:span><text:span text:style-name="T6">return</text:span><text:span text:style-name="T13"> </text:span><text:span text:style-name="T28">tw10</text:span><text:span text:style-name="T13">;</text:span></text:p>
        <text:p text:style-name="P15"><text:span text:style-name="T6">end</text:span><text:span text:style-name="T13"> </text:span><text:span text:style-name="T22">math</text:span><text:span text:style-name="T13">;</text:span></text:p>
        <text:p text:style-name="P16"/>
        <text:p text:style-name="P15"><text:span text:style-name="T6">package</text:span><text:span text:style-name="T13"> </text:span><text:span text:style-name="T6">body</text:span><text:span text:style-name="T13"> </text:span><text:span text:style-name="T22">math</text:span><text:span text:style-name="T13"> </text:span><text:span text:style-name="T6">is</text:span></text:p>
        <text:p text:style-name="P15"><text:span text:style-name="T13"><text:s text:c="4"/></text:span><text:span text:style-name="T6">function</text:span><text:span text:style-name="T13"> </text:span><text:span text:style-name="T14">tw_add</text:span><text:span text:style-name="T13">(</text:span><text:span text:style-name="T26">a</text:span><text:span text:style-name="T13">, </text:span><text:span text:style-name="T26">b</text:span><text:span text:style-name="T13"> : </text:span><text:span text:style-name="T28">tw10</text:span><text:span text:style-name="T13">)</text:span><text:span text:style-name="T6">return</text:span><text:span text:style-name="T13"> </text:span><text:span text:style-name="T28">tw10</text:span><text:span text:style-name="T13"> </text:span><text:span text:style-name="T6">is</text:span></text:p>
        <text:p text:style-name="P15"><text:span text:style-name="T13"><text:s text:c="8"/></text:span><text:span text:style-name="T6">variable</text:span><text:span text:style-name="T13"> </text:span><text:span text:style-name="T30">y</text:span><text:span text:style-name="T13"> : </text:span><text:span text:style-name="T28">tw10</text:span><text:span text:style-name="T13">;</text:span></text:p>
        <text:p text:style-name="P15"><text:span text:style-name="T13"><text:s text:c="4"/></text:span><text:span text:style-name="T6">begin</text:span></text:p>
        <text:p text:style-name="P15"><text:span text:style-name="T13"><text:s text:c="8"/></text:span><text:span text:style-name="T30">y</text:span><text:span text:style-name="T13"> := </text:span><text:span text:style-name="T28">tw10</text:span><text:span text:style-name="T13">(</text:span><text:span text:style-name="T28">unsigned</text:span><text:span text:style-name="T13">(</text:span><text:span text:style-name="T26">a</text:span><text:span text:style-name="T13">) </text:span><text:span text:style-name="T14">+</text:span><text:span text:style-name="T13"> </text:span><text:span text:style-name="T28">unsigned</text:span><text:span text:style-name="T13">(</text:span><text:span text:style-name="T26">b</text:span><text:span text:style-name="T13">));</text:span></text:p>
        <text:p text:style-name="P15"><text:span text:style-name="T13"><text:s text:c="8"/></text:span><text:span text:style-name="T6">return</text:span><text:span text:style-name="T13"> </text:span><text:span text:style-name="T30">y</text:span><text:span text:style-name="T13">;</text:span></text:p>
        <text:p text:style-name="P15"><text:span text:style-name="T13"><text:s text:c="4"/></text:span><text:span text:style-name="T6">end</text:span><text:span text:style-name="T13"> </text:span><text:span text:style-name="T14">tw_add</text:span><text:span text:style-name="T13">;</text:span></text:p>
        <text:p text:style-name="P16"/>
        <text:p text:style-name="P15"><text:span text:style-name="T13"><text:s text:c="4"/></text:span><text:span text:style-name="T6">function</text:span><text:span text:style-name="T13"> </text:span><text:span text:style-name="T14">tw_mul</text:span><text:span text:style-name="T13">(</text:span><text:span text:style-name="T26">a</text:span><text:span text:style-name="T13">, </text:span><text:span text:style-name="T26">b</text:span><text:span text:style-name="T13"> : </text:span><text:span text:style-name="T28">tw8</text:span><text:span text:style-name="T13">)</text:span><text:span text:style-name="T6">return</text:span><text:span text:style-name="T13"> </text:span><text:span text:style-name="T28">tw10</text:span><text:span text:style-name="T13"> </text:span><text:span text:style-name="T6">is</text:span></text:p>
        <text:p text:style-name="P15"><text:span text:style-name="T13"><text:s text:c="8"/></text:span><text:span text:style-name="T6">variable</text:span><text:span text:style-name="T13"> </text:span><text:span text:style-name="T30">y</text:span><text:span text:style-name="T13"> : </text:span><text:span text:style-name="T28">tw10</text:span><text:span text:style-name="T13">;</text:span></text:p>
        <text:p text:style-name="P15"><text:span text:style-name="T13"><text:s text:c="4"/></text:span><text:span text:style-name="T6">begin</text:span></text:p>
        <text:p text:style-name="P15"><text:span text:style-name="T30"><text:tab/>y</text:span><text:span text:style-name="T13"> := </text:span><text:span text:style-name="T28">tw10</text:span><text:span text:style-name="T13">(</text:span><text:span text:style-name="T28">unsigned</text:span><text:span text:style-name="T13">(</text:span><text:span text:style-name="T26">a</text:span><text:span text:style-name="T13">) </text:span><text:span text:style-name="T14">*</text:span><text:span text:style-name="T13"> </text:span><text:span text:style-name="T28">unsigned</text:span><text:span text:style-name="T13">(</text:span><text:span text:style-name="T26">b</text:span><text:span text:style-name="T13">));</text:span></text:p>
        <text:p text:style-name="P15"><text:span text:style-name="T13"><text:s text:c="8"/></text:span><text:span text:style-name="T6">return</text:span><text:span text:style-name="T13"> </text:span><text:span text:style-name="T30">y</text:span><text:span text:style-name="T13">;</text:span></text:p>
        <text:p text:style-name="P15"><text:span text:style-name="T13"><text:s text:c="4"/></text:span><text:span text:style-name="T6">end</text:span><text:span text:style-name="T13"> </text:span><text:span text:style-name="T14">tw_mul</text:span><text:span text:style-name="T13">;</text:span></text:p>
        <text:p text:style-name="P6"><text:span text:style-name="T6">end</text:span><text:span text:style-name="T13"> </text:span><text:span text:style-name="T22">math</text:span><text:span text:style-name="T13">;</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math</text:span><text:span text:style-name="T13">.</text:span><text:span text:style-name="T6">all</text:span><text:span text:style-name="T13">;</text:span></text:p>
        <text:p text:style-name="P16"/>
        <text:p text:style-name="P15"><text:span text:style-name="T6">entity</text:span><text:span text:style-name="T13"> <text:s/></text:span><text:span text:style-name="T22">sync_ram</text:span><text:span text:style-name="T13"> </text:span><text:span text:style-name="T6">is</text:span></text:p>
        <text:p text:style-name="P15"><text:span text:style-name="T13"><text:s text:c="4"/></text:span><text:span text:style-name="T6">port</text:span><text:span text:style-name="T13"> (</text:span></text:p>
        <text:p text:style-name="P15"><text:span text:style-name="T13"><text:s text:c="8"/></text:span><text:span text:style-name="T26">clock</text:span><text:span text:style-name="T13"> <text:s text:c="2"/>: </text:span><text:span text:style-name="T6">in</text:span><text:span text:style-name="T13"> <text:s/></text:span><text:span text:style-name="T28">std_logic</text:span><text:span text:style-name="T13">;</text:span></text:p>
        <text:p text:style-name="P15"><text:span text:style-name="T13"><text:s text:c="8"/></text:span><text:span text:style-name="T26">we</text:span><text:span text:style-name="T13"> <text:s text:c="5"/>: </text:span><text:span text:style-name="T6">in</text:span><text:span text:style-name="T13"> <text:s/></text:span><text:span text:style-name="T28">std_logic</text:span><text:span text:style-name="T13">;</text:span></text:p>
        <text:p text:style-name="P15"><text:span text:style-name="T13"><text:s text:c="8"/></text:span><text:span text:style-name="T26">address</text:span><text:span text:style-name="T13"> : </text:span><text:span text:style-name="T6">in</text:span><text:span text:style-name="T13"> <text:s/></text:span><text:span text:style-name="T28">tw8</text:span><text:span text:style-name="T13">;</text:span></text:p>
        <text:p text:style-name="P15"><text:span text:style-name="T13"><text:s text:c="8"/></text:span><text:span text:style-name="T26">datain</text:span><text:span text:style-name="T13"> <text:s/>: </text:span><text:span text:style-name="T6">in</text:span><text:span text:style-name="T13"> <text:s/></text:span><text:span text:style-name="T28">tw8</text:span><text:span text:style-name="T13">;</text:span></text:p>
        <text:p text:style-name="P15"><text:span text:style-name="T13"><text:s text:c="8"/></text:span><text:span text:style-name="T26">dataout</text:span><text:span text:style-name="T13"> : </text:span><text:span text:style-name="T6">out</text:span><text:span text:style-name="T13"> </text:span><text:span text:style-name="T28">tw8</text:span><text:span text:style-name="T13">);</text:span></text:p>
        <text:p text:style-name="P15"><text:span text:style-name="T6">end</text:span><text:span text:style-name="T13"> </text:span><text:span text:style-name="T6">entity</text:span><text:span text:style-name="T13"> </text:span><text:span text:style-name="T22">sync_ram</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sync_ram</text:span><text:span text:style-name="T13"> </text:span><text:span text:style-name="T6">is</text:span></text:p>
        <text:p text:style-name="P16"/>
        <text:p text:style-name="P15"><text:span text:style-name="T13"><text:s text:c="4"/></text:span><text:span text:style-name="T6">type</text:span><text:span text:style-name="T13"> </text:span><text:span text:style-name="T28">ram_type</text:span><text:span text:style-name="T13"> </text:span><text:span text:style-name="T6">is</text:span><text:span text:style-name="T13"> </text:span><text:span text:style-name="T6">array</text:span><text:span text:style-name="T13"> (</text:span><text:span text:style-name="T31">0</text:span><text:span text:style-name="T13"> </text:span><text:span text:style-name="T6">to</text:span><text:span text:style-name="T13"> (</text:span><text:span text:style-name="T31">2</text:span><text:span text:style-name="T14">**</text:span><text:span text:style-name="T26">address</text:span><text:span text:style-name="T33">'length</text:span><text:span text:style-name="T13">)</text:span><text:span text:style-name="T14">-</text:span><text:span text:style-name="T31">1</text:span><text:span text:style-name="T13">) </text:span><text:span text:style-name="T6">of</text:span><text:span text:style-name="T13"> </text:span><text:span text:style-name="T28">tw8</text:span><text:span text:style-name="T13">;</text:span></text:p>
        <text:p text:style-name="P15"><text:span text:style-name="T13"><text:s text:c="4"/></text:span><text:span text:style-name="T6">signal</text:span><text:span text:style-name="T13"> </text:span><text:span text:style-name="T39">ram</text:span><text:span text:style-name="T13"> : </text:span><text:span text:style-name="T28">ram_type</text:span><text:span text:style-name="T13">;</text:span></text:p>
        <text:p text:style-name="P15"><text:span text:style-name="T13"><text:s text:c="4"/></text:span><text:span text:style-name="T6">signal</text:span><text:span text:style-name="T13"> </text:span><text:span text:style-name="T39">read_address</text:span><text:span text:style-name="T13"> : </text:span><text:span text:style-name="T28">std_logic_vector</text:span><text:span text:style-name="T13">(</text:span><text:span text:style-name="T26">address</text:span><text:span text:style-name="T33">'range</text:span><text:span text:style-name="T13">);</text:span></text:p>
        <text:p text:style-name="P16"/>
        <text:p text:style-name="P23">begin</text:p>
        <text:p text:style-name="P16"/>
        <text:p text:style-name="P15"><text:span text:style-name="T13"><text:s text:c="4"/></text:span><text:span text:style-name="T38">RamProc</text:span><text:span text:style-name="T13">: </text:span><text:span text:style-name="T6">process</text:span><text:span text:style-name="T13">(</text:span><text:span text:style-name="T26">clock</text:span><text:span text:style-name="T13">) </text:span><text:span text:style-name="T6">is</text:span></text:p>
        <text:p text:style-name="P16"/>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ock</text:span><text:span text:style-name="T13">) </text:span><text:span text:style-name="T6">then</text:span></text:p>
        <text:p text:style-name="P15"><text:span text:style-name="T13"><text:s text:c="12"/></text:span><text:span text:style-name="T6">if</text:span><text:span text:style-name="T13"> </text:span><text:span text:style-name="T26">we</text:span><text:span text:style-name="T13"> = </text:span><text:span text:style-name="T34">'1'</text:span><text:span text:style-name="T13"> </text:span><text:span text:style-name="T6">then</text:span></text:p>
        <text:p text:style-name="P15"><text:span text:style-name="T13"><text:s text:c="16"/></text:span><text:span text:style-name="T39">ram</text:span><text:span text:style-name="T13">(</text:span><text:span text:style-name="T14">to_integer</text:span><text:span text:style-name="T13">(</text:span><text:span text:style-name="T28">unsigned</text:span><text:span text:style-name="T13">(</text:span><text:span text:style-name="T26">address</text:span><text:span text:style-name="T13">))) &lt;= </text:span><text:span text:style-name="T26">datain</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 </text:span><text:span text:style-name="T38">RamProc</text:span><text:span text:style-name="T13">;</text:span></text:p>
        <text:p text:style-name="P16"/>
        <text:p text:style-name="P15"><text:span text:style-name="T13"><text:s text:c="4"/></text:span><text:span text:style-name="T26">dataout</text:span><text:span text:style-name="T13"> &lt;= </text:span><text:span text:style-name="T39">ram</text:span><text:span text:style-name="T13">(</text:span><text:span text:style-name="T14">to_integer</text:span><text:span text:style-name="T13">(</text:span><text:span text:style-name="T28">unsigned</text:span><text:span text:style-name="T13">(</text:span><text:span text:style-name="T26">address</text:span><text:span text:style-name="T13">)));</text:span></text:p>
        <text:p text:style-name="P15"><text:span text:style-name="T6">end</text:span><text:span text:style-name="T13"> </text:span><text:span text:style-name="T6">architecture</text:span><text:span text:style-name="T13"> </text:span><text:span text:style-name="T22">RTL</text:span><text:span text:style-name="T13">;</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math</text:span><text:span text:style-name="T13">.</text:span><text:span text:style-name="T6">all</text:span><text:span text:style-name="T13">;</text:span></text:p>
        <text:p text:style-name="P16"/>
        <text:p text:style-name="P15"><text:span text:style-name="T6">entity</text:span><text:span text:style-name="T13"> </text:span><text:span text:style-name="T22">adder</text:span><text:span text:style-name="T13"> </text:span><text:span text:style-name="T6">is</text:span><text:span text:style-name="T13"> </text:span><text:span text:style-name="T6">port</text:span><text:span text:style-name="T13"> (</text:span></text:p>
        <text:p text:style-name="P15"><text:span text:style-name="T13"><text:s text:c="4"/></text:span><text:span text:style-name="T26">data_a</text:span><text:span text:style-name="T13">, </text:span><text:span text:style-name="T26">data_b</text:span><text:span text:style-name="T13"> : </text:span><text:span text:style-name="T6">in</text:span><text:span text:style-name="T13"> </text:span><text:span text:style-name="T28">tw8</text:span><text:span text:style-name="T13">;</text:span></text:p>
        <text:p text:style-name="P15"><text:span text:style-name="T13"><text:s text:c="4"/></text:span><text:span text:style-name="T26">data_o</text:span><text:span text:style-name="T13"> : </text:span><text:span text:style-name="T6">out</text:span><text:span text:style-name="T13"> </text:span><text:span text:style-name="T28">tw10</text:span><text:span text:style-name="T13">);</text:span></text:p>
        <text:p text:style-name="P15"><text:span text:style-name="T6">end</text:span><text:span text:style-name="T13"> </text:span><text:span text:style-name="T22">adder</text:span><text:span text:style-name="T13">;</text:span></text:p>
        <text:p text:style-name="P16"/>
        <text:p text:style-name="P15"><text:span text:style-name="T6">architecture</text:span><text:span text:style-name="T13"> </text:span><text:span text:style-name="T22">cpu_blk</text:span><text:span text:style-name="T13"> </text:span><text:span text:style-name="T6">of</text:span><text:span text:style-name="T13"> </text:span><text:span text:style-name="T22">adder</text:span><text:span text:style-name="T13"> </text:span><text:span text:style-name="T6">is</text:span></text:p>
        <text:p text:style-name="P16"/>
        <text:p text:style-name="P23">begin</text:p>
        <text:p text:style-name="P15"><text:span text:style-name="T13"><text:s text:c="4"/></text:span><text:span text:style-name="T38">alu</text:span><text:span text:style-name="T13"> : </text:span><text:span text:style-name="T6">block</text:span></text:p>
        <text:p text:style-name="P15"><text:span text:style-name="T13"><text:s text:c="8"/></text:span><text:span text:style-name="T6">port</text:span><text:span text:style-name="T13">(</text:span></text:p>
        <text:p text:style-name="P15"><text:span text:style-name="T13"><text:s text:c="12"/></text:span><text:span text:style-name="T26">abus</text:span><text:span text:style-name="T13">, </text:span><text:span text:style-name="T26">bbus</text:span><text:span text:style-name="T13"> : </text:span><text:span text:style-name="T6">in</text:span><text:span text:style-name="T13"> tw8;</text:span></text:p>
        <text:p text:style-name="P15"><text:span text:style-name="T13"><text:s text:c="12"/></text:span><text:span text:style-name="T26">d_out</text:span><text:span text:style-name="T13"> : </text:span><text:span text:style-name="T6">out</text:span><text:span text:style-name="T13"> tw10);</text:span></text:p>
        <text:p text:style-name="P15"><text:span text:style-name="T13"><text:s text:c="12"/></text:span><text:span text:style-name="T6">port</text:span><text:span text:style-name="T13"> </text:span><text:span text:style-name="T6">map</text:span><text:span text:style-name="T13">( </text:span><text:span text:style-name="T26">abus</text:span><text:span text:style-name="T13"> =&gt; data_a, </text:span><text:span text:style-name="T26">bbus</text:span><text:span text:style-name="T13"> =&gt; data_b, </text:span><text:span text:style-name="T26">d_out</text:span><text:span text:style-name="T13"> =&gt; data_o);</text:span></text:p>
        <text:p text:style-name="P15"><text:span text:style-name="T13"><text:s text:c="8"/></text:span><text:span text:style-name="T6">signal</text:span><text:span text:style-name="T13"> </text:span><text:span text:style-name="T39">qbus</text:span><text:span text:style-name="T13">, </text:span><text:span text:style-name="T39">dbus</text:span><text:span text:style-name="T13"> : tw10;</text:span></text:p>
        <text:p text:style-name="P15"><text:span text:style-name="T13"><text:s text:c="4"/></text:span><text:span text:style-name="T6">begin</text:span></text:p>
        <text:p text:style-name="P15"><text:span text:style-name="T13"><text:s text:c="8"/></text:span><text:span text:style-name="T39">qbus</text:span><text:span text:style-name="T13"> &lt;= tw_mul(</text:span><text:span text:style-name="T26">abus</text:span><text:span text:style-name="T13">, </text:span><text:span text:style-name="T26">bbus</text:span><text:span text:style-name="T13">);</text:span></text:p>
        <text:p text:style-name="P15"><text:span text:style-name="T13"><text:s text:c="8"/></text:span><text:span text:style-name="T39">dbus</text:span><text:span text:style-name="T13"> &lt;= tw_add(</text:span><text:span text:style-name="T39">qbus</text:span><text:span text:style-name="T13">, </text:span><text:span text:style-name="T39">dbus</text:span><text:span text:style-name="T13">);</text:span></text:p>
        <text:p text:style-name="P15"><text:span text:style-name="T13"><text:s text:c="8"/></text:span><text:span text:style-name="T26">d_out</text:span><text:span text:style-name="T13"> &lt;= </text:span><text:span text:style-name="T39">dbus</text:span><text:span text:style-name="T13">;</text:span></text:p>
        <text:p text:style-name="P15"><text:span text:style-name="T13"><text:s text:c="4"/></text:span><text:span text:style-name="T6">end</text:span><text:span text:style-name="T13"> </text:span><text:span text:style-name="T6">block</text:span><text:span text:style-name="T13"> </text:span><text:span text:style-name="T38">alu</text:span><text:span text:style-name="T13">;</text:span></text:p>
        <text:p text:style-name="P15"><text:span text:style-name="T6">end</text:span><text:span text:style-name="T13"> </text:span><text:span text:style-name="T22">cpu_blk</text:span><text:span text:style-name="T13">;</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math</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6"/>
        <text:p text:style-name="P15"><text:span text:style-name="T13"><text:s text:c="4"/></text:span><text:span text:style-name="T26">clock</text:span><text:span text:style-name="T13"> <text:s text:c="4"/>: </text:span><text:span text:style-name="T6">in</text:span><text:span text:style-name="T13"> <text:s/></text:span><text:span text:style-name="T28">std_logic</text:span><text:span text:style-name="T13">;</text:span></text:p>
        <text:p text:style-name="P15"><text:span text:style-name="T13"><text:s text:c="4"/></text:span><text:span text:style-name="T26">we_adc</text:span><text:span text:style-name="T13"> <text:s text:c="3"/>: </text:span><text:span text:style-name="T6">in</text:span><text:span text:style-name="T13"> <text:s/></text:span><text:span text:style-name="T28">std_logic</text:span><text:span text:style-name="T13">;</text:span></text:p>
        <text:p text:style-name="P15"><text:span text:style-name="T13"><text:s text:c="4"/></text:span><text:span text:style-name="T26">we_coef</text:span><text:span text:style-name="T13"> <text:s text:c="2"/>: </text:span><text:span text:style-name="T6">in</text:span><text:span text:style-name="T13"> <text:s/></text:span><text:span text:style-name="T28">std_logic</text:span><text:span text:style-name="T13">;</text:span></text:p>
        <text:p text:style-name="P15"><text:span text:style-name="T13"><text:s text:c="4"/></text:span><text:span text:style-name="T26">address</text:span><text:span text:style-name="T13"> <text:s text:c="2"/>: </text:span><text:span text:style-name="T6">in</text:span><text:span text:style-name="T13"> <text:s/></text:span><text:span text:style-name="T28">tw8</text:span><text:span text:style-name="T13">;</text:span></text:p>
        <text:p text:style-name="P15"><text:span text:style-name="T13"><text:s text:c="4"/></text:span><text:span text:style-name="T26">data_adc</text:span><text:span text:style-name="T13"> <text:s/>: </text:span><text:span text:style-name="T6">in</text:span><text:span text:style-name="T13"> <text:s/></text:span><text:span text:style-name="T28">tw8</text:span><text:span text:style-name="T13">;</text:span></text:p>
        <text:p text:style-name="P15"><text:span text:style-name="T13"><text:s text:c="4"/></text:span><text:span text:style-name="T26">data_coef</text:span><text:span text:style-name="T13"> : </text:span><text:span text:style-name="T6">in</text:span><text:span text:style-name="T13"> <text:s/></text:span><text:span text:style-name="T28">tw8</text:span><text:span text:style-name="T13">;</text:span></text:p>
        <text:p text:style-name="P15"><text:span text:style-name="T13"><text:s text:c="4"/></text:span><text:span text:style-name="T26">cont</text:span><text:span text:style-name="T13"> <text:s text:c="5"/>: </text:span><text:span text:style-name="T6">in</text:span><text:span text:style-name="T13"> </text:span><text:span text:style-name="T28">bit</text:span><text:span text:style-name="T13">;</text:span></text:p>
        <text:p text:style-name="P15"><text:span text:style-name="T13"><text:s text:c="4"/></text:span><text:span text:style-name="T26">data_o</text:span><text:span text:style-name="T13"> <text:s text:c="3"/>: </text:span><text:span text:style-name="T6">out</text:span><text:span text:style-name="T13"> </text:span><text:span text:style-name="T28">tw10</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signal</text:span><text:span text:style-name="T13"> </text:span><text:span text:style-name="T39">int_data_a</text:span><text:span text:style-name="T13">, </text:span><text:span text:style-name="T39">int_data_b</text:span><text:span text:style-name="T13"> : </text:span><text:span text:style-name="T28">tw8</text:span><text:span text:style-name="T13">;</text:span></text:p>
        <text:p text:style-name="P23">begin</text:p>
        <text:p text:style-name="P16"/>
        <text:p text:style-name="P15"><text:span text:style-name="T13"><text:s text:c="4"/></text:span><text:span text:style-name="T38">unit0</text:span><text:span text:style-name="T13"> : </text:span><text:span text:style-name="T6">entity</text:span><text:span text:style-name="T13"> </text:span><text:span text:style-name="T22">work</text:span><text:span text:style-name="T13">.</text:span><text:span text:style-name="T22">sync_ram</text:span></text:p>
        <text:p text:style-name="P15"><text:span text:style-name="T13"><text:s text:c="8"/></text:span><text:span text:style-name="T6">port</text:span><text:span text:style-name="T13"> </text:span><text:span text:style-name="T6">map</text:span><text:span text:style-name="T13"> (</text:span><text:span text:style-name="T26">clock</text:span><text:span text:style-name="T13"> =&gt; </text:span><text:span text:style-name="T26">clock</text:span><text:span text:style-name="T13">, </text:span><text:span text:style-name="T26">we</text:span><text:span text:style-name="T13"> =&gt; </text:span><text:span text:style-name="T26">we_adc</text:span><text:span text:style-name="T13">, </text:span><text:span text:style-name="T26">address</text:span><text:span text:style-name="T13"> =&gt; </text:span><text:span text:style-name="T26">address</text:span><text:span text:style-name="T13">, <text:s text:c="19"/><text:tab/><text:tab/> <text:s text:c="4"/></text:span><text:span text:style-name="T26">datain</text:span><text:span text:style-name="T13"> =&gt; </text:span><text:span text:style-name="T26">data_adc</text:span><text:span text:style-name="T13">, </text:span><text:span text:style-name="T26">dataout</text:span><text:span text:style-name="T13"> =&gt; </text:span><text:span text:style-name="T39">int_data_a</text:span><text:span text:style-name="T13">); </text:span></text:p>
        <text:p text:style-name="P15"><text:span text:style-name="T13"><text:tab/><text:tab/> <text:s text:c="4"/></text:span><text:span text:style-name="T36">-- first component then input pin --first output pin <text:tab/><text:tab/><text:tab/> <text:s/>then signal</text:span></text:p>
        <text:p text:style-name="P15"><text:span text:style-name="T13"><text:s text:c="4"/></text:span><text:span text:style-name="T38">unit1</text:span><text:span text:style-name="T13"> : </text:span><text:span text:style-name="T6">entity</text:span><text:span text:style-name="T13"> </text:span><text:span text:style-name="T22">work</text:span><text:span text:style-name="T13">.</text:span><text:span text:style-name="T22">sync_ram</text:span></text:p>
        <text:p text:style-name="P15"><text:span text:style-name="T13"><text:s text:c="8"/></text:span><text:span text:style-name="T6">port</text:span><text:span text:style-name="T13"> </text:span><text:span text:style-name="T6">map</text:span><text:span text:style-name="T13"> (</text:span><text:span text:style-name="T26">clock</text:span><text:span text:style-name="T13"> =&gt; </text:span><text:span text:style-name="T26">clock</text:span><text:span text:style-name="T13">, </text:span><text:span text:style-name="T26">we</text:span><text:span text:style-name="T13"> =&gt; </text:span><text:span text:style-name="T26">we_coef</text:span><text:span text:style-name="T13">, </text:span><text:span text:style-name="T26">address</text:span><text:span text:style-name="T13"> =&gt; </text:span><text:span text:style-name="T26">address</text:span><text:span text:style-name="T13">, <text:tab/><text:tab/> <text:s text:c="3"/></text:span><text:span text:style-name="T26">datain</text:span><text:span text:style-name="T13"> =&gt; </text:span><text:span text:style-name="T26">data_coef</text:span><text:span text:style-name="T13">, </text:span><text:span text:style-name="T26">dataout</text:span><text:span text:style-name="T13"> =&gt; </text:span><text:span text:style-name="T39">int_data_b</text:span><text:span text:style-name="T13">);</text:span></text:p>
        <text:p text:style-name="P16"/>
        <text:p text:style-name="P15"><text:span text:style-name="T13"><text:s text:c="4"/></text:span><text:span text:style-name="T38">unit2</text:span><text:span text:style-name="T13"> : </text:span><text:span text:style-name="T6">entity</text:span><text:span text:style-name="T13"> </text:span><text:span text:style-name="T22">work</text:span><text:span text:style-name="T13">.</text:span><text:span text:style-name="T22">adder</text:span></text:p>
        <text:p text:style-name="P15"><text:span text:style-name="T13"><text:s text:c="12"/></text:span><text:span text:style-name="T6">port</text:span><text:span text:style-name="T13"> </text:span><text:span text:style-name="T6">map</text:span><text:span text:style-name="T13"> (data_a =&gt; </text:span><text:span text:style-name="T39">int_data_a</text:span><text:span text:style-name="T13">, data_b =&gt; </text:span><text:span text:style-name="T39">int_data_b</text:span><text:span text:style-name="T13">, </text:span><text:span text:style-name="T26">data_o</text:span><text:span text:style-name="T13"> <text:tab/><text:tab/> <text:s text:c="8"/>=&gt; </text:span><text:span text:style-name="T26">data_o</text:span><text:span text:style-name="T13">);</text:span></text:p>
        <text:p text:style-name="P15"><text:span text:style-name="T6">end</text:span><text:span text:style-name="T13"> </text:span><text:span text:style-name="T22">arch</text:span><text:span text:style-name="T13">;</text:span></text:p>
        <text:p text:style-name="P23"/>
        <text:p text:style-name="P23"/>
        <text:p text:style-name="P23"/>
        <text:p text:style-name="P7"/>
        <text:p text:style-name="P7"/>
        <text:p text:style-name="P7"/>
        <text:p text:style-name="P7"/>
        <text:p text:style-name="P7"/>
        <text:p text:style-name="P5"/>
        <text:p text:style-name="P5"/>
        <text:p text:style-name="P5"/>
        <text:p text:style-name="P5"/>
        <text:p text:style-name="P5"/>
      </text:section>
      <text:p text:style-name="P16"><draw:frame draw:style-name="fr1" draw:name="graphics57" text:anchor-type="paragraph" svg:x="0.0984in" svg:y="0.0681in" svg:width="10.3181in" svg:height="6.2209in" draw:z-index="10"><draw:image xlink:href="Pictures/2000000700007E9C00004CCC2E50BAF0.svm" xlink:type="simple" xlink:show="embed" xlink:actuate="onLoad"/></draw:frame><text:soft-page-break/></text:p>
      <text:p text:style-name="P16"/>
      <text:p text:style-name="P16"/>
      <text:p text:style-name="P16"/>
      <text:p text:style-name="P16"/>
      <text:p text:style-name="P16"/>
      <text:p text:style-name="P16"/>
      <text:p text:style-name="P2"/>
      <text:p text:style-name="P12"/>
      <text:p text:style-name="P14"><text:soft-page-break/><text:span text:style-name="T1">EXIT</text:span><text:span text:style-name="T41"><text:tab/></text:span></text:p>
      <text:p text:style-name="P15"><text:span text:style-name="T6">process</text:span><text:span text:style-name="T13">(a)</text:span></text:p>
      <text:p text:style-name="P23">begin</text:p>
      <text:p text:style-name="P15"><text:span text:style-name="T13"><text:s text:c="4"/>first_loop: </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31">100</text:span><text:span text:style-name="T13"> </text:span><text:span text:style-name="T6">loop</text:span></text:p>
      <text:p text:style-name="P15"><text:span text:style-name="T13"><text:s text:c="8"/>second_loop: </text:span><text:span text:style-name="T6">for</text:span><text:span text:style-name="T13"> j </text:span><text:span text:style-name="T6">in</text:span><text:span text:style-name="T13"> </text:span><text:span text:style-name="T31">1</text:span><text:span text:style-name="T13"> </text:span><text:span text:style-name="T6">to</text:span><text:span text:style-name="T13"> </text:span><text:span text:style-name="T31">10</text:span><text:span text:style-name="T13"> </text:span><text:span text:style-name="T6">loop</text:span></text:p>
      <text:p text:style-name="P15"><text:span text:style-name="T13"><text:s text:c="12"/></text:span><text:span text:style-name="T36">--. <text:s/>. <text:s/>. <text:s/>.</text:span></text:p>
      <text:p text:style-name="P15"><text:span text:style-name="T13"><text:s text:c="12"/></text:span><text:span text:style-name="T6">exit</text:span><text:span text:style-name="T13"> second_loop; </text:span><text:span text:style-name="T36">--exits the second loop only</text:span></text:p>
      <text:p text:style-name="P15"><text:span text:style-name="T13"><text:s text:c="12"/></text:span><text:span text:style-name="T36">--. <text:s/>. <text:s/>. <text:s/>.</text:span></text:p>
      <text:p text:style-name="P15"><text:span text:style-name="T13"><text:s text:c="12"/></text:span><text:span text:style-name="T6">exit</text:span><text:span text:style-name="T13"> first_loop; <text:s/></text:span><text:span text:style-name="T36">--exits first loop and second loop</text:span></text:p>
      <text:p text:style-name="P15"><text:span text:style-name="T13"><text:s text:c="12"/></text:span><text:span text:style-name="T36">--or else</text:span></text:p>
      <text:p text:style-name="P15"><text:span text:style-name="T13"><text:s text:c="12"/></text:span><text:span text:style-name="T6">exit</text:span><text:span text:style-name="T13"> first_loop </text:span><text:span text:style-name="T6">when</text:span><text:span text:style-name="T13">(i </text:span><text:span text:style-name="T14">&lt;</text:span><text:span text:style-name="T13"> </text:span><text:span text:style-name="T31">10</text:span><text:span text:style-name="T13">); </text:span><text:span text:style-name="T36">--This statement completes the execution of the loop labeled first_loop</text:span></text:p>
      <text:p text:style-name="P15"><text:span text:style-name="T13"><text:s text:c="12"/></text:span><text:span text:style-name="T36">--when the expression i &lt; 10 is true.</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6">end</text:span><text:span text:style-name="T13"> </text:span><text:span text:style-name="T6">process</text:span><text:span text:style-name="T13">;</text:span></text:p>
      <text:p text:style-name="P16"/>
      <text:p text:style-name="P16"/>
      <text:p text:style-name="P16"/>
      <text:p text:style-name="P16"/>
      <text:p text:style-name="P16"/>
      <text:p text:style-name="P16"/>
      <text:p text:style-name="P12"/>
      <text:p text:style-name="P2">GLOBAL SIGNALS</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package</text:span><text:span text:style-name="T13"> </text:span><text:span text:style-name="T22">sigdecl</text:span><text:span text:style-name="T13"> </text:span><text:span text:style-name="T6">is</text:span></text:p>
      <text:p text:style-name="P15"><text:span text:style-name="T13"><text:s text:c="4"/></text:span><text:span text:style-name="T6">type</text:span><text:span text:style-name="T13"> </text:span><text:span text:style-name="T28">bus_type</text:span><text:span text:style-name="T13"> </text:span><text:span text:style-name="T6">is</text:span><text:span text:style-name="T13"> </text:span><text:span text:style-name="T6">array</text:span><text:span text:style-name="T13">(</text:span><text:span text:style-name="T31">0</text:span><text:span text:style-name="T13"> </text:span><text:span text:style-name="T6">to</text:span><text:span text:style-name="T13"> </text:span><text:span text:style-name="T31">7</text:span><text:span text:style-name="T13">) </text:span><text:span text:style-name="T6">of</text:span><text:span text:style-name="T13"> </text:span><text:span text:style-name="T28">std_logic</text:span><text:span text:style-name="T13">;</text:span></text:p>
      <text:p text:style-name="P16"/>
      <text:p text:style-name="P15"><text:span text:style-name="T13"><text:s text:c="4"/></text:span><text:span text:style-name="T6">signal</text:span><text:span text:style-name="T13"> </text:span><text:span text:style-name="T39">vcc</text:span><text:span text:style-name="T13"> : </text:span><text:span text:style-name="T28">std_logic</text:span><text:span text:style-name="T13"> := </text:span><text:span text:style-name="T34">'1'</text:span><text:span text:style-name="T13">; </text:span><text:span text:style-name="T36">-- global signal</text:span></text:p>
      <text:p text:style-name="P15"><text:span text:style-name="T13"><text:s text:c="4"/></text:span><text:span text:style-name="T6">signal</text:span><text:span text:style-name="T13"> </text:span><text:span text:style-name="T39">gnd</text:span><text:span text:style-name="T13"> : </text:span><text:span text:style-name="T28">std_logic</text:span><text:span text:style-name="T13"> := </text:span><text:span text:style-name="T34">'0'</text:span><text:span text:style-name="T13">; </text:span><text:span text:style-name="T36">-- global signal</text:span></text:p>
      <text:p text:style-name="P16"/>
      <text:p text:style-name="P15"><text:span text:style-name="T13"><text:s text:c="4"/></text:span><text:span text:style-name="T6">function</text:span><text:span text:style-name="T13"> </text:span><text:span text:style-name="T14">magic_function</text:span><text:span text:style-name="T13">(</text:span><text:span text:style-name="T26">a</text:span><text:span text:style-name="T13"> : </text:span><text:span text:style-name="T6">in</text:span><text:span text:style-name="T13"> </text:span><text:span text:style-name="T28">bus_type</text:span><text:span text:style-name="T13">) </text:span><text:span text:style-name="T6">return</text:span><text:span text:style-name="T13"> </text:span><text:span text:style-name="T28">bus_type</text:span><text:span text:style-name="T13">;</text:span></text:p>
      <text:p text:style-name="P15"><text:span text:style-name="T6">end</text:span><text:span text:style-name="T13"> </text:span><text:span text:style-name="T22">sigdecl</text:span><text:span text:style-name="T13">;</text:span></text:p>
      <text:p text:style-name="P16"/>
      <text:p text:style-name="P15"><text:span text:style-name="T6">package</text:span><text:span text:style-name="T13"> </text:span><text:span text:style-name="T6">body</text:span><text:span text:style-name="T13"> </text:span><text:span text:style-name="T22">sigdecl</text:span><text:span text:style-name="T13"> </text:span><text:span text:style-name="T6">is</text:span></text:p>
      <text:p text:style-name="P15"><text:span text:style-name="T13"><text:s text:c="4"/></text:span><text:span text:style-name="T6">function</text:span><text:span text:style-name="T13"> </text:span><text:span text:style-name="T14">magic_function</text:span><text:span text:style-name="T13">(</text:span><text:span text:style-name="T26">a</text:span><text:span text:style-name="T13"> : </text:span><text:span text:style-name="T6">in</text:span><text:span text:style-name="T13"> </text:span><text:span text:style-name="T28">bus_type</text:span><text:span text:style-name="T13">) </text:span><text:span text:style-name="T6">return</text:span><text:span text:style-name="T13"> </text:span><text:span text:style-name="T28">bus_type</text:span><text:span text:style-name="T13"> </text:span><text:span text:style-name="T6">is</text:span></text:p>
      <text:p text:style-name="P15"><text:span text:style-name="T13"><text:s text:c="8"/></text:span><text:span text:style-name="T6">variable</text:span><text:span text:style-name="T13"> </text:span><text:span text:style-name="T30">b</text:span><text:span text:style-name="T13"> : </text:span><text:span text:style-name="T28">bus_type</text:span><text:span text:style-name="T13">;</text:span></text:p>
      <text:p text:style-name="P15"><text:span text:style-name="T13"><text:s text:c="4"/></text:span><text:span text:style-name="T6">begin</text:span></text:p>
      <text:p text:style-name="P15"><text:span text:style-name="T13"><text:s text:c="8"/></text:span><text:span text:style-name="T30">b</text:span><text:span text:style-name="T13"> := </text:span><text:span text:style-name="T26">a</text:span><text:span text:style-name="T13">;</text:span></text:p>
      <text:p text:style-name="P15"><text:span text:style-name="T13"><text:s text:c="8"/></text:span><text:span text:style-name="T6">return</text:span><text:span text:style-name="T13"> </text:span><text:span text:style-name="T30">b</text:span><text:span text:style-name="T13">;</text:span></text:p>
      <text:p text:style-name="P15"><text:span text:style-name="T13"><text:s text:c="4"/></text:span><text:span text:style-name="T6">end</text:span><text:span text:style-name="T13"> </text:span><text:span text:style-name="T14">magic_function</text:span><text:span text:style-name="T13">;</text:span></text:p>
      <text:p text:style-name="P15"><text:span text:style-name="T6">end</text:span><text:span text:style-name="T13"> </text:span><text:span text:style-name="T22">sigdecl</text:span><text:span text:style-name="T13">;</text:span></text:p>
      <text:p text:style-name="P16"/>
      <text:p text:style-name="P16"/>
      <text:p text:style-name="P16"/>
      <text:p text:style-name="P16"/>
      <text:p text:style-name="P16"/>
      <text:p text:style-name="P16"/>
      <text:p text:style-name="P2"><text:soft-page-break/>ENUMERATED TYPE EXAMPLE</text:p>
      <text:p text:style-name="P15"><text:span text:style-name="T6">package</text:span><text:span text:style-name="T13"> instr </text:span><text:span text:style-name="T6">is</text:span></text:p>
      <text:p text:style-name="P15"><text:span text:style-name="T13"><text:s text:c="4"/></text:span><text:span text:style-name="T6">type</text:span><text:span text:style-name="T13"> instruction </text:span><text:span text:style-name="T6">is</text:span><text:span text:style-name="T13"> (add, sub, lda, ldb, sta, stb, outa, xfr);</text:span></text:p>
      <text:p text:style-name="P15"><text:span text:style-name="T6">end</text:span><text:span text:style-name="T13"> instr;</text:span></text:p>
      <text:p text:style-name="P16"/>
      <text:p text:style-name="P15"><text:span text:style-name="T6">use</text:span><text:span text:style-name="T13"> </text:span><text:span text:style-name="T22">work</text:span><text:span text:style-name="T13">.instr.</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instr : </text:span><text:span text:style-name="T6">in</text:span><text:span text:style-name="T13"> instruction;</text:span></text:p>
      <text:p text:style-name="P15"><text:span text:style-name="T13"><text:s text:c="4"/>addr <text:s/>: </text:span><text:span text:style-name="T6">in</text:span><text:span text:style-name="T13"> </text:span><text:span text:style-name="T28">integer</text:span><text:span text:style-name="T13">;</text:span></text:p>
      <text:p text:style-name="P15"><text:span text:style-name="T13"><text:s text:c="4"/>data <text:s/>: </text:span><text:span text:style-name="T6">inout</text:span><text:span text:style-name="T13"> </text:span><text:span text:style-name="T28">integer</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mp </text:span><text:span text:style-name="T6">of</text:span><text:span text:style-name="T13"> </text:span><text:span text:style-name="T22">examples</text:span><text:span text:style-name="T13"> </text:span><text:span text:style-name="T6">is</text:span></text:p>
      <text:p text:style-name="P23">begin</text:p>
      <text:p text:style-name="P15"><text:span text:style-name="T13"><text:s text:c="4"/></text:span><text:span text:style-name="T6">process</text:span><text:span text:style-name="T13">(instr)</text:span></text:p>
      <text:p text:style-name="P15"><text:span text:style-name="T13"><text:s text:c="8"/></text:span><text:span text:style-name="T6">type</text:span><text:span text:style-name="T13"> regtype </text:span><text:span text:style-name="T6">is</text:span><text:span text:style-name="T13"> </text:span><text:span text:style-name="T6">array</text:span><text:span text:style-name="T13">(</text:span><text:span text:style-name="T31">0</text:span><text:span text:style-name="T13"> </text:span><text:span text:style-name="T6">to</text:span><text:span text:style-name="T13"> </text:span><text:span text:style-name="T31">255</text:span><text:span text:style-name="T13">) </text:span><text:span text:style-name="T6">of</text:span><text:span text:style-name="T13"> </text:span><text:span text:style-name="T28">integer</text:span><text:span text:style-name="T13">;</text:span></text:p>
      <text:p text:style-name="P15"><text:span text:style-name="T13"><text:s text:c="8"/></text:span><text:span text:style-name="T6">variable</text:span><text:span text:style-name="T13"> </text:span><text:span text:style-name="T26">a</text:span><text:span text:style-name="T13">, </text:span><text:span text:style-name="T30">b</text:span><text:span text:style-name="T13"> : </text:span><text:span text:style-name="T28">integer</text:span><text:span text:style-name="T13">;</text:span></text:p>
      <text:p text:style-name="P15"><text:span text:style-name="T13"><text:s text:c="8"/></text:span><text:span text:style-name="T6">variable</text:span><text:span text:style-name="T13"> reg : regtype;</text:span></text:p>
      <text:p text:style-name="P15"><text:span text:style-name="T13"><text:s text:c="4"/></text:span><text:span text:style-name="T6">begin</text:span></text:p>
      <text:p text:style-name="P15"><text:span text:style-name="T13"><text:s text:c="8"/></text:span><text:span text:style-name="T36">--select instruction to execute</text:span></text:p>
      <text:p text:style-name="P15"><text:span text:style-name="T13"><text:s text:c="8"/></text:span><text:span text:style-name="T6">case</text:span><text:span text:style-name="T13"> instr </text:span><text:span text:style-name="T6">is</text:span></text:p>
      <text:p text:style-name="P15"><text:span text:style-name="T13"><text:s text:c="12"/></text:span><text:span text:style-name="T6">when</text:span><text:span text:style-name="T13"> lda =&gt;</text:span></text:p>
      <text:p text:style-name="P15"><text:span text:style-name="T13"><text:s text:c="16"/>a := data; <text:s text:c="11"/></text:span><text:span text:style-name="T36">--load a accumulator</text:span></text:p>
      <text:p text:style-name="P15"><text:span text:style-name="T13"><text:s text:c="12"/></text:span><text:span text:style-name="T6">when</text:span><text:span text:style-name="T13"> ldb =&gt;</text:span></text:p>
      <text:p text:style-name="P15"><text:span text:style-name="T13"><text:s text:c="16"/>b := data; <text:s text:c="11"/></text:span><text:span text:style-name="T36">--load b accumulator</text:span></text:p>
      <text:p text:style-name="P15"><text:span text:style-name="T13"><text:s text:c="12"/></text:span><text:span text:style-name="T6">when</text:span><text:span text:style-name="T13"> add =&gt;</text:span></text:p>
      <text:p text:style-name="P15"><text:span text:style-name="T13"><text:s text:c="16"/>a := a </text:span><text:span text:style-name="T14">+</text:span><text:span text:style-name="T13"> b; <text:s text:c="11"/></text:span><text:span text:style-name="T36">--add accumulator</text:span></text:p>
      <text:p text:style-name="P15"><text:span text:style-name="T13"><text:s text:c="12"/></text:span><text:span text:style-name="T6">when</text:span><text:span text:style-name="T13"> sub =&gt;</text:span></text:p>
      <text:p text:style-name="P15"><text:span text:style-name="T13"><text:s text:c="16"/>a := a </text:span><text:span text:style-name="T14">-</text:span><text:span text:style-name="T13"> b; <text:s text:c="8"/></text:span><text:span text:style-name="T36">--sub accumulator</text:span></text:p>
      <text:p text:style-name="P15"><text:span text:style-name="T13"><text:s text:c="12"/></text:span><text:span text:style-name="T6">when</text:span><text:span text:style-name="T13"> sta =&gt;</text:span></text:p>
      <text:p text:style-name="P15"><text:span text:style-name="T13"><text:s text:c="16"/>reg(addr) := a; <text:s text:c="3"/></text:span><text:span text:style-name="T36">--put a accum in reg array</text:span></text:p>
      <text:p text:style-name="P15"><text:span text:style-name="T13"><text:s text:c="12"/></text:span><text:span text:style-name="T6">when</text:span><text:span text:style-name="T13"> stb =&gt;</text:span></text:p>
      <text:p text:style-name="P15"><text:span text:style-name="T13"><text:s text:c="16"/>reg(addr) := b; <text:s text:c="3"/></text:span><text:span text:style-name="T36">--put b accum in reg array</text:span></text:p>
      <text:p text:style-name="P15"><text:span text:style-name="T13"><text:s text:c="12"/></text:span><text:span text:style-name="T6">when</text:span><text:span text:style-name="T13"> outa =&gt;</text:span></text:p>
      <text:p text:style-name="P15"><text:span text:style-name="T13"><text:s text:c="16"/>data &lt;= a; <text:s text:c="11"/></text:span><text:span text:style-name="T36">--output a accum</text:span></text:p>
      <text:p text:style-name="P15"><text:span text:style-name="T13"><text:s text:c="12"/></text:span><text:span text:style-name="T6">when</text:span><text:span text:style-name="T13"> xfr =&gt;</text:span></text:p>
      <text:p text:style-name="P15"><text:span text:style-name="T13"><text:s text:c="16"/>a := b; <text:s text:c="16"/></text:span><text:span text:style-name="T36">--transfer b to a</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mp;</text:span></text:p>
      <text:p text:style-name="P16"/>
      <text:p text:style-name="P16"/>
      <text:p text:style-name="P16"/>
      <text:p text:style-name="P16"/>
      <text:p text:style-name="P16"/>
      <text:p text:style-name="P16"/>
      <text:p text:style-name="P16"/>
      <text:p text:style-name="P16"/>
      <text:p text:style-name="P11"><text:soft-page-break/>TRAFFIC LIGHT EXAMPLE WITH STATE MACHINE</text:p>
      <text:p text:style-name="P21"/>
      <text:p text:style-name="P15"><draw:frame draw:style-name="fr2" draw:name="graphics58" text:anchor-type="paragraph" svg:x="4.6126in" svg:y="0.0827in" svg:width="5.5181in" svg:height="1.6146in" draw:z-index="11"><draw:image xlink:href="Pictures/200000070000566800001830234CCE08.svm" xlink:type="simple" xlink:show="embed" xlink:actuate="onLoad"/></draw:frame><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sensor</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clock</text:span><text:span text:style-name="T13"> <text:s text:c="4"/>: </text:span><text:span text:style-name="T6">in</text:span><text:span text:style-name="T13"> </text:span><text:span text:style-name="T28">std_logic</text:span><text:span text:style-name="T13">;</text:span></text:p>
      <text:p text:style-name="P15"><text:span text:style-name="T13"><text:s text:c="4"/></text:span><text:span text:style-name="T26">red_light</text:span><text:span text:style-name="T13"> : </text:span><text:span text:style-name="T6">out</text:span><text:span text:style-name="T13"> </text:span><text:span text:style-name="T28">std_logic</text:span><text:span text:style-name="T13">;</text:span></text:p>
      <text:p text:style-name="P15"><text:span text:style-name="T13"><text:s text:c="4"/></text:span><text:span text:style-name="T26">green_light</text:span><text:span text:style-name="T13"> : </text:span><text:span text:style-name="T6">out</text:span><text:span text:style-name="T13"> </text:span><text:span text:style-name="T28">std_logic</text:span><text:span text:style-name="T13">;</text:span></text:p>
      <text:p text:style-name="P15"><text:span text:style-name="T13"><text:s text:c="4"/></text:span><text:span text:style-name="T26">yellow_ligh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simple</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type</text:span><text:span text:style-name="T13"> </text:span><text:span text:style-name="T28">t_state</text:span><text:span text:style-name="T13"> </text:span><text:span text:style-name="T6">is</text:span><text:span text:style-name="T13">( </text:span><text:span text:style-name="T7">red</text:span><text:span text:style-name="T13">, </text:span><text:span text:style-name="T7">yellow</text:span><text:span text:style-name="T13">, </text:span><text:span text:style-name="T7">green</text:span><text:span text:style-name="T13">);</text:span></text:p>
      <text:p text:style-name="P15"><text:span text:style-name="T13"><text:s text:c="4"/></text:span><text:span text:style-name="T6">signal</text:span><text:span text:style-name="T13"> </text:span><text:span text:style-name="T39">present_state</text:span><text:span text:style-name="T13">, </text:span><text:span text:style-name="T39">next_state</text:span><text:span text:style-name="T13"> : </text:span><text:span text:style-name="T28">t_state</text:span><text:span text:style-name="T13">;</text:span></text:p>
      <text:p text:style-name="P23">begin</text:p>
      <text:p text:style-name="P15"><draw:frame draw:style-name="fr2" draw:name="graphics59" text:anchor-type="paragraph" svg:x="5.1984in" svg:y="0.0555in" svg:width="4.852in" svg:height="1.9583in" draw:z-index="12"><draw:image xlink:href="Pictures/20000007000034670000136F89351AFB.svm" xlink:type="simple" xlink:show="embed" xlink:actuate="onLoad"/></draw:frame><text:span text:style-name="T13"> <text:s text:c="3"/></text:span><text:span text:style-name="T6">process</text:span><text:span text:style-name="T13">(</text:span><text:span text:style-name="T39">present_state</text:span><text:span text:style-name="T13">, </text:span><text:span text:style-name="T26">sensor</text:span><text:span text:style-name="T13">)</text:span></text:p>
      <text:p text:style-name="P15"><text:span text:style-name="T13"><text:s text:c="4"/></text:span><text:span text:style-name="T6">begin</text:span></text:p>
      <text:p text:style-name="P15"><text:span text:style-name="T13"><text:s text:c="8"/></text:span><text:span text:style-name="T6">case</text:span><text:span text:style-name="T13"> </text:span><text:span text:style-name="T39">present_state</text:span><text:span text:style-name="T13"> </text:span><text:span text:style-name="T6">is</text:span></text:p>
      <text:p text:style-name="P15"><text:span text:style-name="T13"><text:s text:c="12"/></text:span><text:span text:style-name="T6">when</text:span><text:span text:style-name="T13"> </text:span><text:span text:style-name="T7">green</text:span><text:span text:style-name="T13"> =&gt;</text:span></text:p>
      <text:p text:style-name="P15"><text:span text:style-name="T13"><text:s text:c="16"/></text:span><text:span text:style-name="T39">next_state</text:span><text:span text:style-name="T13"> &lt;= </text:span><text:span text:style-name="T7">yellow</text:span><text:span text:style-name="T13">;</text:span></text:p>
      <text:p text:style-name="P15"><text:span text:style-name="T13"><text:s text:c="16"/></text:span><text:span text:style-name="T26">red_light</text:span><text:span text:style-name="T13"> &lt;= </text:span><text:span text:style-name="T34">'0'</text:span><text:span text:style-name="T13">;</text:span></text:p>
      <text:p text:style-name="P15"><text:span text:style-name="T13"><text:s text:c="16"/></text:span><text:span text:style-name="T26">green_light</text:span><text:span text:style-name="T13"> &lt;= </text:span><text:span text:style-name="T34">'1'</text:span><text:span text:style-name="T13">;</text:span></text:p>
      <text:p text:style-name="P15"><text:span text:style-name="T13"><text:s text:c="16"/></text:span><text:span text:style-name="T26">yellow_light</text:span><text:span text:style-name="T13"> &lt;= </text:span><text:span text:style-name="T34">'0'</text:span><text:span text:style-name="T13">;</text:span></text:p>
      <text:p text:style-name="P15"><text:span text:style-name="T13"><text:s text:c="12"/></text:span><text:span text:style-name="T6">when</text:span><text:span text:style-name="T13"> </text:span><text:span text:style-name="T7">red</text:span><text:span text:style-name="T13"> =&gt;</text:span></text:p>
      <text:p text:style-name="P15"><text:span text:style-name="T13"><text:s text:c="16"/></text:span><text:span text:style-name="T26">red_light</text:span><text:span text:style-name="T13"> &lt;= </text:span><text:span text:style-name="T34">'1'</text:span><text:span text:style-name="T13">;</text:span></text:p>
      <text:p text:style-name="P15"><text:span text:style-name="T13"><text:s text:c="16"/></text:span><text:span text:style-name="T26">green_light</text:span><text:span text:style-name="T13"> &lt;= </text:span><text:span text:style-name="T34">'0'</text:span><text:span text:style-name="T13">;</text:span></text:p>
      <text:p text:style-name="P15"><text:span text:style-name="T13"><text:s text:c="16"/></text:span><text:span text:style-name="T26">yellow_light</text:span><text:span text:style-name="T13"> &lt;= </text:span><text:span text:style-name="T34">'0'</text:span><text:span text:style-name="T13">;</text:span></text:p>
      <text:p text:style-name="P15"><text:span text:style-name="T13"><text:s text:c="16"/></text:span><text:span text:style-name="T6">if</text:span><text:span text:style-name="T13"> </text:span><text:span text:style-name="T26">sensor</text:span><text:span text:style-name="T13"> = </text:span><text:span text:style-name="T34">'1'</text:span><text:span text:style-name="T13"> </text:span><text:span text:style-name="T6">then</text:span></text:p>
      <text:p text:style-name="P15"><text:span text:style-name="T13"><text:s text:c="20"/></text:span><text:span text:style-name="T39">next_state</text:span><text:span text:style-name="T13"> &lt;= </text:span><text:span text:style-name="T7">green</text:span><text:span text:style-name="T13">;</text:span></text:p>
      <text:p text:style-name="P15"><text:span text:style-name="T13"><text:s text:c="16"/></text:span><text:span text:style-name="T6">else</text:span></text:p>
      <text:p text:style-name="P15"><text:span text:style-name="T13"><text:s text:c="20"/></text:span><text:span text:style-name="T39">next_state</text:span><text:span text:style-name="T13"> &lt;= </text:span><text:span text:style-name="T7">red</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when</text:span><text:span text:style-name="T13"> </text:span><text:span text:style-name="T7">yellow</text:span><text:span text:style-name="T13"> =&gt;</text:span></text:p>
      <text:p text:style-name="P15"><text:span text:style-name="T13"><text:s text:c="16"/></text:span><text:span text:style-name="T26">red_light</text:span><text:span text:style-name="T13"> &lt;= </text:span><text:span text:style-name="T34">'0'</text:span><text:span text:style-name="T13">;</text:span></text:p>
      <text:p text:style-name="P15"><text:span text:style-name="T13"><text:s text:c="16"/></text:span><text:span text:style-name="T26">green_light</text:span><text:span text:style-name="T13"> &lt;= </text:span><text:span text:style-name="T34">'0'</text:span><text:span text:style-name="T13">;</text:span></text:p>
      <text:p text:style-name="P15"><text:span text:style-name="T13"><text:s text:c="16"/></text:span><text:span text:style-name="T26">yellow_light</text:span><text:span text:style-name="T13"> &lt;= </text:span><text:span text:style-name="T34">'1'</text:span><text:span text:style-name="T13">;</text:span></text:p>
      <text:p text:style-name="P15"><text:span text:style-name="T13"><text:s text:c="16"/></text:span><text:span text:style-name="T39">next_state</text:span><text:span text:style-name="T13"> &lt;= </text:span><text:span text:style-name="T7">red</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p>
      <text:p text:style-name="P15"><text:span text:style-name="T13"><text:s text:c="4"/></text:span><text:span text:style-name="T6">begin</text:span></text:p>
      <text:p text:style-name="P15"><text:span text:style-name="T13"><text:s text:c="8"/></text:span><text:span text:style-name="T6">wait</text:span><text:span text:style-name="T13"> </text:span><text:span text:style-name="T6">until</text:span><text:span text:style-name="T13"> </text:span><text:span text:style-name="T26">clock</text:span><text:span text:style-name="T33">'event</text:span><text:span text:style-name="T13"> </text:span><text:span text:style-name="T6">and</text:span><text:span text:style-name="T13"> </text:span><text:span text:style-name="T26">clock</text:span><text:span text:style-name="T13"> = </text:span><text:span text:style-name="T34">'1'</text:span><text:span text:style-name="T13">;</text:span></text:p>
      <text:p text:style-name="P15"><text:span text:style-name="T13"><text:s text:c="8"/></text:span><text:span text:style-name="T39">present_state</text:span><text:span text:style-name="T13"> &lt;= </text:span><text:span text:style-name="T39">next_stat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simple</text:span><text:span text:style-name="T13">;</text:span></text:p>
      <text:p text:style-name="P12"/>
      <text:p text:style-name="P2"><text:soft-page-break/>PIPELINED EXAMPLE</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6">library</text:span><text:span text:style-name="T13"> </text:span><text:span text:style-name="T22">floatfixlib</text:span><text:span text:style-name="T13">;</text:span></text:p>
      <text:p text:style-name="P15"><text:span text:style-name="T13"><text:s text:c="4"/></text:span><text:span text:style-name="T6">use</text:span><text:span text:style-name="T13"> </text:span><text:span text:style-name="T22">floatfixlib</text:span><text:span text:style-name="T13">.fixed_pkg.</text:span><text:span text:style-name="T6">all</text:span><text:span text:style-name="T13">;</text:span></text:p>
      <text:p text:style-name="P16"/>
      <text:p text:style-name="P15"><text:span text:style-name="T6">entity</text:span><text:span text:style-name="T13"> </text:span><text:span text:style-name="T22">example</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a</text:span><text:span text:style-name="T13">, </text:span><text:span text:style-name="T26">b</text:span><text:span text:style-name="T13">, </text:span><text:span text:style-name="T26">c</text:span><text:span text:style-name="T13"> :</text:span><text:span text:style-name="T6">in</text:span><text:span text:style-name="T13"> sfixed(</text:span><text:span text:style-name="T31">4</text:span><text:span text:style-name="T13"> </text:span><text:span text:style-name="T6">downto</text:span><text:span text:style-name="T13"> </text:span><text:span text:style-name="T14">-</text:span><text:span text:style-name="T31">8</text:span><text:span text:style-name="T13">);</text:span></text:p>
      <text:p text:style-name="P15"><text:span text:style-name="T13"><text:s text:c="4"/></text:span><text:span text:style-name="T26">avg</text:span><text:span text:style-name="T13"> : </text:span><text:span text:style-name="T6">out</text:span><text:span text:style-name="T13"> sfixed(</text:span><text:span text:style-name="T31">6</text:span><text:span text:style-name="T13"> </text:span><text:span text:style-name="T6">downto</text:span><text:span text:style-name="T13"> </text:span><text:span text:style-name="T14">-</text:span><text:span text:style-name="T31">8</text:span><text:span text:style-name="T13">));</text:span></text:p>
      <text:p text:style-name="P15"><text:span text:style-name="T6">end</text:span><text:span text:style-name="T13"> </text:span><text:span text:style-name="T22">example</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example</text:span><text:span text:style-name="T13"> </text:span><text:span text:style-name="T6">is</text:span></text:p>
      <text:p text:style-name="P15"><text:span text:style-name="T13"><text:s text:c="4"/></text:span><text:span text:style-name="T6">signal</text:span><text:span text:style-name="T13"> </text:span><text:span text:style-name="T39">saved_c</text:span><text:span text:style-name="T13"> <text:s text:c="18"/>: sfixed(</text:span><text:span text:style-name="T31">4</text:span><text:span text:style-name="T13"> </text:span><text:span text:style-name="T6">downto</text:span><text:span text:style-name="T13"> </text:span><text:span text:style-name="T14">-</text:span><text:span text:style-name="T31">8</text:span><text:span text:style-name="T13">);</text:span></text:p>
      <text:p text:style-name="P15"><text:span text:style-name="T13"><text:s text:c="4"/></text:span><text:span text:style-name="T6">signal</text:span><text:span text:style-name="T13"> </text:span><text:span text:style-name="T39">a_plus_b</text:span><text:span text:style-name="T13">, </text:span><text:span text:style-name="T39">saved_a_plus_b</text:span><text:span text:style-name="T13"> <text:s/>: sfixed(</text:span><text:span text:style-name="T31">5</text:span><text:span text:style-name="T13"> </text:span><text:span text:style-name="T6">downto</text:span><text:span text:style-name="T13"> </text:span><text:span text:style-name="T14">-</text:span><text:span text:style-name="T31">8</text:span><text:span text:style-name="T13">);</text:span></text:p>
      <text:p text:style-name="P15"><text:span text:style-name="T13"><text:s text:c="4"/></text:span><text:span text:style-name="T6">signal</text:span><text:span text:style-name="T13"> </text:span><text:span text:style-name="T39">saved_sum</text:span><text:span text:style-name="T13">, </text:span><text:span text:style-name="T39">sum</text:span><text:span text:style-name="T13"> <text:s text:c="11"/>: sfixed(</text:span><text:span text:style-name="T31">6</text:span><text:span text:style-name="T13"> </text:span><text:span text:style-name="T6">downto</text:span><text:span text:style-name="T13"> </text:span><text:span text:style-name="T14">-</text:span><text:span text:style-name="T31">8</text:span><text:span text:style-name="T13">);</text:span></text:p>
      <text:p text:style-name="P15"><text:span text:style-name="T13"><text:s text:c="4"/></text:span><text:span text:style-name="T6">signal</text:span><text:span text:style-name="T13"> </text:span><text:span text:style-name="T39">sum_div_3</text:span><text:span text:style-name="T13"> <text:s text:c="16"/>: sfixed(</text:span><text:span text:style-name="T31">6</text:span><text:span text:style-name="T13"> </text:span><text:span text:style-name="T6">downto</text:span><text:span text:style-name="T13"> </text:span><text:span text:style-name="T14">-</text:span><text:span text:style-name="T31">8</text:span><text:span text:style-name="T13">);</text:span></text:p>
      <text:p text:style-name="P23">begin</text:p>
      <text:p text:style-name="P15"><text:span text:style-name="T13"><text:s text:c="4"/></text:span><text:span text:style-name="T39">a_plus_b</text:span><text:span text:style-name="T13"> &lt;= </text:span><text:span text:style-name="T26">a</text:span><text:span text:style-name="T13"> </text:span><text:span text:style-name="T14">+</text:span><text:span text:style-name="T13"> </text:span><text:span text:style-name="T26">b</text:span><text:span text:style-name="T13">;</text:span></text:p>
      <text:p text:style-name="P15"><text:span text:style-name="T13"><text:s text:c="4"/></text:span><text:span text:style-name="T38">reg1</text:span><text:span text:style-name="T13"> : </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text:span><text:span text:style-name="T6">then</text:span></text:p>
      <text:p text:style-name="P15"><text:span text:style-name="T13"><text:s text:c="12"/></text:span><text:span text:style-name="T39">saved_a_plus_b</text:span><text:span text:style-name="T13"> &lt;= </text:span><text:span text:style-name="T39">a_plus_b</text:span><text:span text:style-name="T13">;</text:span></text:p>
      <text:p text:style-name="P15"><text:span text:style-name="T13"><text:s text:c="12"/></text:span><text:span text:style-name="T39">saved_c</text:span><text:span text:style-name="T13"> &lt;= </text:span><text:span text:style-name="T26">c</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sum</text:span><text:span text:style-name="T13"> &lt;= </text:span><text:span text:style-name="T39">saved_a_plus_b</text:span><text:span text:style-name="T13"> </text:span><text:span text:style-name="T14">+</text:span><text:span text:style-name="T13"> </text:span><text:span text:style-name="T39">saved_c</text:span><text:span text:style-name="T13">;</text:span></text:p>
      <text:p text:style-name="P15"><text:span text:style-name="T13"><text:s text:c="4"/></text:span><text:span text:style-name="T38">reg2</text:span><text:span text:style-name="T13"> : </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text:span><text:span text:style-name="T6">then</text:span></text:p>
      <text:p text:style-name="P15"><text:span text:style-name="T13"><text:s text:c="12"/></text:span><text:span text:style-name="T39">saved_sum</text:span><text:span text:style-name="T13"> &lt;= </text:span><text:span text:style-name="T39">sum</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saved_sum * to_fixed(1.0/3.0, sum_div_3'left, sum_div_3'right);</text:span></text:p>
      <text:p text:style-name="P15"><text:span text:style-name="T13"><text:s text:c="4"/></text:span><text:span text:style-name="T39">sum_div_3</text:span><text:span text:style-name="T13"> &lt;= </text:span><text:span text:style-name="T39">saved_sum</text:span><text:span text:style-name="T13">;</text:span></text:p>
      <text:p text:style-name="P15"><text:span text:style-name="T13"><text:s text:c="4"/></text:span><text:span text:style-name="T38">reg3</text:span><text:span text:style-name="T13"> : </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text:span><text:span text:style-name="T6">then</text:span></text:p>
      <text:p text:style-name="P15"><text:span text:style-name="T13"><text:s text:c="12"/></text:span><text:span text:style-name="T26">avg</text:span><text:span text:style-name="T13"> &lt;= </text:span><text:span text:style-name="T39">sum_div_3</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rtl</text:span><text:span text:style-name="T13">;</text:span></text:p>
      <text:p text:style-name="P12"/>
      <text:p text:style-name="P12"/>
      <text:p text:style-name="P12"/>
      <text:p text:style-name="P12"/>
      <text:p text:style-name="P12"/>
      <text:p text:style-name="P12"><draw:frame draw:style-name="fr1" draw:name="graphics3" text:anchor-type="paragraph" svg:x="0.2575in" svg:y="0.3945in" svg:width="10.1909in" svg:height="5.0583in" draw:z-index="28"><draw:image xlink:href="Pictures/2000000700006141000050D3C1AA93A7.svm"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UNCONSTRAINED TYPE</text:p>
      <text:p text:style-name="P23"/>
      <text:p text:style-name="P15"><text:span text:style-name="T6">package</text:span><text:span text:style-name="T13"> mypack </text:span><text:span text:style-name="T6">is</text:span></text:p>
      <text:p text:style-name="P15"><text:span text:style-name="T13"><text:s text:c="4"/></text:span><text:span text:style-name="T6">subtype</text:span><text:span text:style-name="T13"> eightbit </text:span><text:span text:style-name="T6">is</text:span><text:span text:style-name="T13"> bit_vector(</text:span><text:span text:style-name="T31">0</text:span><text:span text:style-name="T13"> </text:span><text:span text:style-name="T6">to</text:span><text:span text:style-name="T13"> </text:span><text:span text:style-name="T31">7</text:span><text:span text:style-name="T13">); </text:span><text:span text:style-name="T36">--subtypes of unconstrained base type bit_vector</text:span></text:p>
      <text:p text:style-name="P15"><text:span text:style-name="T13"><text:s text:c="4"/></text:span><text:span text:style-name="T6">subtype</text:span><text:span text:style-name="T13"> fourbit </text:span><text:span text:style-name="T6">is</text:span><text:span text:style-name="T13"> </text:span><text:span text:style-name="T28">bit_vector</text:span><text:span text:style-name="T13">(</text:span><text:span text:style-name="T31">0</text:span><text:span text:style-name="T13"> </text:span><text:span text:style-name="T6">to</text:span><text:span text:style-name="T13"> </text:span><text:span text:style-name="T31">3</text:span><text:span text:style-name="T13">); <text:s text:c="4"/></text:span><text:span text:style-name="T36">--range 0 to 7...</text:span></text:p>
      <text:p text:style-name="P15"><text:span text:style-name="T13"><text:s text:c="4"/></text:span><text:span text:style-name="T6">function</text:span><text:span text:style-name="T13"> shift_to_right(</text:span><text:span text:style-name="T33">val</text:span><text:span text:style-name="T13"> : </text:span><text:span text:style-name="T28">bit_vector</text:span><text:span text:style-name="T13">) </text:span><text:span text:style-name="T6">return</text:span><text:span text:style-name="T13"> </text:span><text:span text:style-name="T28">bit_vector</text:span><text:span text:style-name="T13">;</text:span></text:p>
      <text:p text:style-name="P15"><text:span text:style-name="T6">end</text:span><text:span text:style-name="T13"> mypack;</text:span></text:p>
      <text:p text:style-name="P16"/>
      <text:p text:style-name="P15"><text:span text:style-name="T6">package</text:span><text:span text:style-name="T13"> </text:span><text:span text:style-name="T6">body</text:span><text:span text:style-name="T13"> mypack </text:span><text:span text:style-name="T6">is</text:span></text:p>
      <text:p text:style-name="P15"><text:span text:style-name="T13"><text:s text:c="4"/></text:span><text:span text:style-name="T6">function</text:span><text:span text:style-name="T13"> shift_to_right(</text:span><text:span text:style-name="T33">val</text:span><text:span text:style-name="T13"> : </text:span><text:span text:style-name="T28">bit_vector</text:span><text:span text:style-name="T13">) </text:span><text:span text:style-name="T6">return</text:span><text:span text:style-name="T13"> </text:span><text:span text:style-name="T28">bit_vector</text:span><text:span text:style-name="T13"> </text:span><text:span text:style-name="T6">is</text:span></text:p>
      <text:p text:style-name="P15"><text:span text:style-name="T13"><text:s text:c="8"/></text:span><text:span text:style-name="T6">variable</text:span><text:span text:style-name="T13"> result : bit_vector(</text:span><text:span text:style-name="T31">0</text:span><text:span text:style-name="T13"> </text:span><text:span text:style-name="T6">to</text:span><text:span text:style-name="T13"> (val</text:span><text:span text:style-name="T33">'length</text:span><text:span text:style-name="T13"> </text:span><text:span text:style-name="T14">-</text:span><text:span text:style-name="T31">1</text:span><text:span text:style-name="T13">));</text:span></text:p>
      <text:p text:style-name="P15"><text:span text:style-name="T13"><text:s text:c="4"/></text:span><text:span text:style-name="T6">begin</text:span></text:p>
      <text:p text:style-name="P16"><text:s text:c="8"/>result := val;</text:p>
      <text:p text:style-name="P15"><text:span text:style-name="T13"><text:s text:c="8"/></text:span><text:span text:style-name="T6">if</text:span><text:span text:style-name="T13"> val</text:span><text:span text:style-name="T33">'length</text:span><text:span text:style-name="T13"> </text:span><text:span text:style-name="T14">&gt;</text:span><text:span text:style-name="T13"> </text:span><text:span text:style-name="T31">1</text:span><text:span text:style-name="T13"> </text:span><text:span text:style-name="T6">then</text:span></text:p>
      <text:p text:style-name="P15"><text:span text:style-name="T13"><text:s text:c="12"/></text:span><text:span text:style-name="T6">for</text:span><text:span text:style-name="T13"> i </text:span><text:span text:style-name="T6">in</text:span><text:span text:style-name="T13"> </text:span><text:span text:style-name="T31">0</text:span><text:span text:style-name="T13"> </text:span><text:span text:style-name="T6">to</text:span><text:span text:style-name="T13"> (val</text:span><text:span text:style-name="T33">'length</text:span><text:span text:style-name="T13"> </text:span><text:span text:style-name="T14">-</text:span><text:span text:style-name="T31">2</text:span><text:span text:style-name="T13">)</text:span><text:span text:style-name="T6">loop</text:span></text:p>
      <text:p text:style-name="P15"><text:span text:style-name="T13"><text:s text:c="16"/>result(i) := result(i </text:span><text:span text:style-name="T14">+</text:span><text:span text:style-name="T13"> </text:span><text:span text:style-name="T31">1</text:span><text:span text:style-name="T13">);</text:span></text:p>
      <text:p text:style-name="P15"><text:span text:style-name="T13"><text:s text:c="12"/></text:span><text:span text:style-name="T6">end</text:span><text:span text:style-name="T13"> </text:span><text:span text:style-name="T6">loop</text:span><text:span text:style-name="T13">;</text:span></text:p>
      <text:p text:style-name="P15"><text:span text:style-name="T13"><text:s text:c="12"/>result(</text:span><text:span text:style-name="T33">val'length</text:span><text:span text:style-name="T13"> </text:span><text:span text:style-name="T14">-</text:span><text:span text:style-name="T31">1</text:span><text:span text:style-name="T13">) := </text:span><text:span text:style-name="T34">'0'</text:span><text:span text:style-name="T13">;</text:span></text:p>
      <text:p text:style-name="P15"><text:span text:style-name="T13"><text:s text:c="8"/></text:span><text:span text:style-name="T6">else</text:span></text:p>
      <text:p text:style-name="P15"><text:span text:style-name="T13"><text:s text:c="12"/>result(</text:span><text:span text:style-name="T31">0</text:span><text:span text:style-name="T13">) := </text:span><text:span text:style-name="T34">'0'</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text:span><text:span text:style-name="T6">return</text:span><text:span text:style-name="T13"> result;</text:span></text:p>
      <text:p text:style-name="P15"><text:span text:style-name="T13"><text:s text:c="4"/></text:span><text:span text:style-name="T6">end</text:span><text:span text:style-name="T13"> shift_to_right;</text:span></text:p>
      <text:p text:style-name="P15"><text:span text:style-name="T6">end</text:span><text:span text:style-name="T13"> mypack;</text:span></text:p>
      <text:p text:style-name="P16"/>
      <text:p text:style-name="P16"/>
      <text:p text:style-name="P16"/>
      <text:p text:style-name="P16"/>
      <text:p text:style-name="P16"/>
      <text:p text:style-name="P16"/>
      <text:p text:style-name="P16"/>
      <text:p text:style-name="P16"/>
      <text:p text:style-name="P16"/>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2" text:name="Section2">
        <text:p text:style-name="P2"><text:soft-page-break/>CPU WITH GENERAL PURPOSE REGS. </text:p>
        <text:p text:style-name="P2">THIS PART NEEDS INSTRUCTION INPUT!</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package</text:span><text:span text:style-name="T13"> </text:span><text:span text:style-name="T22">cpu_rom</text:span><text:span text:style-name="T13"> </text:span><text:span text:style-name="T6">is</text:span></text:p>
        <text:p text:style-name="P15"><text:span text:style-name="T13"><text:s text:c="4"/></text:span><text:span text:style-name="T6">constant</text:span><text:span text:style-name="T13"> </text:span><text:span text:style-name="T7">memsize</text:span><text:span text:style-name="T13"> <text:s/>: </text:span><text:span text:style-name="T28">integer</text:span><text:span text:style-name="T13"> := </text:span><text:span text:style-name="T31">3</text:span><text:span text:style-name="T13">;</text:span></text:p>
        <text:p text:style-name="P16"/>
        <text:p text:style-name="P15"><text:span text:style-name="T13"><text:s text:c="4"/></text:span><text:span text:style-name="T6">type</text:span><text:span text:style-name="T13"> </text:span><text:span text:style-name="T28">instruction</text:span><text:span text:style-name="T13"> </text:span><text:span text:style-name="T6">is</text:span><text:span text:style-name="T13"> (</text:span><text:span text:style-name="T7">add</text:span><text:span text:style-name="T13">, </text:span><text:span text:style-name="T7">sub</text:span><text:span text:style-name="T13">, </text:span><text:span text:style-name="T7">lda</text:span><text:span text:style-name="T13">, </text:span><text:span text:style-name="T7">ldb</text:span><text:span text:style-name="T13">, </text:span><text:span text:style-name="T7">sta</text:span><text:span text:style-name="T13">, </text:span><text:span text:style-name="T7">stb</text:span><text:span text:style-name="T13">, </text:span><text:span text:style-name="T7">outa</text:span><text:span text:style-name="T13">, </text:span><text:span text:style-name="T7">xfr</text:span><text:span text:style-name="T13">);</text:span></text:p>
        <text:p text:style-name="P15"><text:span text:style-name="T13"><text:s text:c="4"/></text:span><text:span text:style-name="T6">type</text:span><text:span text:style-name="T13"> </text:span><text:span text:style-name="T28">mem_data_md</text:span><text:span text:style-name="T13"> </text:span><text:span text:style-name="T6">is</text:span><text:span text:style-name="T13"> </text:span><text:span text:style-name="T6">array</text:span><text:span text:style-name="T13">(</text:span><text:span text:style-name="T31">0</text:span><text:span text:style-name="T13"> </text:span><text:span text:style-name="T6">to</text:span><text:span text:style-name="T13"> </text:span><text:span text:style-name="T31">3</text:span><text:span text:style-name="T13">) <text:s/></text:span><text:span text:style-name="T6">of</text:span><text:span text:style-name="T13"> </text:span><text:span text:style-name="T28">instruction</text:span><text:span text:style-name="T13">;</text:span></text:p>
        <text:p text:style-name="P15"><text:span text:style-name="T6">end</text:span><text:span text:style-name="T13"> </text:span><text:span text:style-name="T22">cpu_rom</text:span><text:span text:style-name="T13">;</text:span></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cpu_rom</text:span><text:span text:style-name="T13">.</text:span><text:span text:style-name="T6">all</text:span><text:span text:style-name="T13">;</text:span></text:p>
        <text:p text:style-name="P16"/>
        <text:p text:style-name="P15"><text:span text:style-name="T6">entity</text:span><text:span text:style-name="T13"> </text:span><text:span text:style-name="T22">rom_data</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instr</text:span><text:span text:style-name="T13"> : </text:span><text:span text:style-name="T6">out</text:span><text:span text:style-name="T13"> </text:span><text:span text:style-name="T28">instruction</text:span><text:span text:style-name="T13">);</text:span></text:p>
        <text:p text:style-name="P15"><text:span text:style-name="T6">end</text:span><text:span text:style-name="T13"> </text:span><text:span text:style-name="T22">rom_data</text:span><text:span text:style-name="T13">;</text:span></text:p>
        <text:p text:style-name="P16"/>
        <text:p text:style-name="P15"><text:span text:style-name="T6">architecture</text:span><text:span text:style-name="T13"> </text:span><text:span text:style-name="T22">md</text:span><text:span text:style-name="T13"> </text:span><text:span text:style-name="T6">of</text:span><text:span text:style-name="T13"> </text:span><text:span text:style-name="T22">rom_data</text:span><text:span text:style-name="T13"> </text:span><text:span text:style-name="T6">is</text:span></text:p>
        <text:p text:style-name="P15"><text:span text:style-name="T13"><text:s text:c="4"/></text:span><text:span text:style-name="T6">constant</text:span><text:span text:style-name="T13"> </text:span><text:span text:style-name="T7">rom_data_md</text:span><text:span text:style-name="T13"> : </text:span><text:span text:style-name="T28">mem_data_md</text:span><text:span text:style-name="T13"> := </text:span></text:p>
        <text:p text:style-name="P15"><text:span text:style-name="T13"><text:tab/><text:tab/><text:tab/>(</text:span><text:span text:style-name="T7">lda</text:span><text:span text:style-name="T13">, </text:span><text:span text:style-name="T7">ldb</text:span><text:span text:style-name="T13">, </text:span><text:span text:style-name="T7">add</text:span><text:span text:style-name="T13">, </text:span><text:span text:style-name="T7">outa</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text:span><text:span text:style-name="T6">then</text:span></text:p>
        <text:p text:style-name="P15"><text:span text:style-name="T13"><text:s text:c="16"/></text:span><text:span text:style-name="T26">instr</text:span><text:span text:style-name="T13"> &lt;= </text:span><text:span text:style-name="T7">rom_data_md</text:span><text:span text:style-name="T13">(</text:span><text:span text:style-name="T31">0</text:span><text:span text:style-name="T13">);</text:span></text:p>
        <text:p text:style-name="P15"><text:span text:style-name="T13"><text:s text:c="16"/></text:span><text:span text:style-name="T26">instr</text:span><text:span text:style-name="T13"> &lt;= </text:span><text:span text:style-name="T7">rom_data_md</text:span><text:span text:style-name="T13">(</text:span><text:span text:style-name="T31">1</text:span><text:span text:style-name="T13">);</text:span></text:p>
        <text:p text:style-name="P15"><text:span text:style-name="T13"><text:s text:c="16"/></text:span><text:span text:style-name="T26">instr</text:span><text:span text:style-name="T13"> &lt;= </text:span><text:span text:style-name="T7">rom_data_md</text:span><text:span text:style-name="T13">(</text:span><text:span text:style-name="T31">2</text:span><text:span text:style-name="T13">);</text:span></text:p>
        <text:p text:style-name="P15"><text:span text:style-name="T13"><text:s text:c="16"/></text:span><text:span text:style-name="T26">instr</text:span><text:span text:style-name="T13"> &lt;= </text:span><text:span text:style-name="T7">rom_data_md</text:span><text:span text:style-name="T13">(</text:span><text:span text:style-name="T31">3</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md</text:span><text:span text:style-name="T13">;</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instr.</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instr</text:span><text:span text:style-name="T13"> : </text:span><text:span text:style-name="T6">in</text:span><text:span text:style-name="T13"> instruction;</text:span></text:p>
        <text:p text:style-name="P15"><text:span text:style-name="T13"><text:s text:c="4"/></text:span><text:span text:style-name="T26">addr</text:span><text:span text:style-name="T13"> <text:s/>: </text:span><text:span text:style-name="T6">in</text:span><text:span text:style-name="T13"> </text:span><text:span text:style-name="T28">integer</text:span><text:span text:style-name="T13">;</text:span></text:p>
        <text:p text:style-name="P15"><text:span text:style-name="T13"><text:s text:c="4"/></text:span><text:span text:style-name="T26">data</text:span><text:span text:style-name="T13"> <text:s/>: </text:span><text:span text:style-name="T6">inout</text:span><text:span text:style-name="T13"> </text:span><text:span text:style-name="T28">integer</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mp</text:span><text:span text:style-name="T13"> </text:span><text:span text:style-name="T6">of</text:span><text:span text:style-name="T13"> </text:span><text:span text:style-name="T22">examples</text:span><text:span text:style-name="T13"> </text:span><text:span text:style-name="T6">is</text:span></text:p>
        <text:p text:style-name="P23">begin</text:p>
        <text:p text:style-name="P15"><text:span text:style-name="T13"><text:s text:c="4"/></text:span><text:span text:style-name="T6">process</text:span><text:span text:style-name="T13">(</text:span><text:span text:style-name="T26">instr</text:span><text:span text:style-name="T13">)</text:span></text:p>
        <text:p text:style-name="P15"><text:span text:style-name="T13"><text:s text:c="8"/></text:span><text:span text:style-name="T6">type</text:span><text:span text:style-name="T13"> </text:span><text:span text:style-name="T28">regtype</text:span><text:span text:style-name="T13"> </text:span><text:span text:style-name="T6">is</text:span><text:span text:style-name="T13"> </text:span><text:span text:style-name="T6">array</text:span><text:span text:style-name="T13">(</text:span><text:span text:style-name="T31">0</text:span><text:span text:style-name="T13"> </text:span><text:span text:style-name="T6">to</text:span><text:span text:style-name="T13"> </text:span><text:span text:style-name="T31">255</text:span><text:span text:style-name="T13">) </text:span><text:span text:style-name="T6">of</text:span><text:span text:style-name="T13"> <text:s text:c="8"/><text:tab/><text:tab/><text:tab/><text:tab/><text:tab/></text:span><text:span text:style-name="T28">integer</text:span><text:span text:style-name="T13">;</text:span></text:p>
        <text:p text:style-name="P15"><text:span text:style-name="T13"><text:s text:c="8"/></text:span><text:span text:style-name="T6">variable</text:span><text:span text:style-name="T13"> </text:span><text:span text:style-name="T30">a</text:span><text:span text:style-name="T13">, </text:span><text:span text:style-name="T30">b</text:span><text:span text:style-name="T13"> : </text:span><text:span text:style-name="T28">integer</text:span><text:span text:style-name="T13">;</text:span></text:p>
        <text:p text:style-name="P15"><text:span text:style-name="T13"><text:s text:c="8"/></text:span><text:span text:style-name="T6">variable</text:span><text:span text:style-name="T13"> </text:span><text:span text:style-name="T30">reg</text:span><text:span text:style-name="T13"> : </text:span><text:span text:style-name="T28">regtype</text:span><text:span text:style-name="T13">;</text:span></text:p>
        <text:p text:style-name="P15"><text:span text:style-name="T13"><text:s text:c="4"/></text:span><text:span text:style-name="T6">begin</text:span></text:p>
        <text:p text:style-name="P15"><text:span text:style-name="T13"><text:s text:c="8"/></text:span><text:span text:style-name="T36">--select instruction to execute</text:span></text:p>
        <text:p text:style-name="P15"><text:span text:style-name="T13"><text:s text:c="8"/></text:span><text:span text:style-name="T6">case</text:span><text:span text:style-name="T13"> </text:span><text:span text:style-name="T26">instr</text:span><text:span text:style-name="T13"> </text:span><text:span text:style-name="T6">is</text:span></text:p>
        <text:p text:style-name="P15"><text:span text:style-name="T13"><text:s text:c="12"/></text:span><text:span text:style-name="T6">when</text:span><text:span text:style-name="T13"> lda =&gt;</text:span></text:p>
        <text:p text:style-name="P24"><text:tab/><text:tab/> <text:s/>--load a accumulator</text:p>
        <text:p text:style-name="P15"><text:span text:style-name="T13"><text:s text:c="16"/></text:span><text:span text:style-name="T30">a</text:span><text:span text:style-name="T13"> := </text:span><text:span text:style-name="T26">data</text:span><text:span text:style-name="T13">; <text:s text:c="11"/></text:span></text:p>
        <text:p text:style-name="P15"><text:span text:style-name="T13"><text:s text:c="12"/></text:span><text:span text:style-name="T6">when</text:span><text:span text:style-name="T13"> ldb =&gt;</text:span></text:p>
        <text:p text:style-name="P24"><text:tab/><text:tab/> <text:s/>--load b accumulator</text:p>
        <text:p text:style-name="P15"><text:span text:style-name="T13"><text:s text:c="16"/></text:span><text:span text:style-name="T30">b</text:span><text:span text:style-name="T13"> := </text:span><text:span text:style-name="T26">data</text:span><text:span text:style-name="T13">; <text:s text:c="11"/></text:span></text:p>
        <text:p text:style-name="P15"><text:span text:style-name="T13"><text:s text:c="12"/></text:span><text:span text:style-name="T6">when</text:span><text:span text:style-name="T13"> add =&gt;</text:span></text:p>
        <text:p text:style-name="P15"><text:span text:style-name="T13"><text:tab/><text:tab/> <text:s/></text:span><text:span text:style-name="T36">--add accumulator</text:span></text:p>
        <text:p text:style-name="P15"><text:span text:style-name="T13"><text:s text:c="16"/></text:span><text:span text:style-name="T30">a</text:span><text:span text:style-name="T13"> := </text:span><text:span text:style-name="T30">a</text:span><text:span text:style-name="T13"> </text:span><text:span text:style-name="T14">+</text:span><text:span text:style-name="T13"> </text:span><text:span text:style-name="T30">b</text:span><text:span text:style-name="T13">; <text:s text:c="10"/></text:span></text:p>
        <text:p text:style-name="P15"><text:span text:style-name="T13"><text:s text:c="12"/></text:span><text:span text:style-name="T6">when</text:span><text:span text:style-name="T13"> </text:span><text:span text:style-name="T7">sub</text:span><text:span text:style-name="T13"> =&gt;</text:span></text:p>
        <text:p text:style-name="P24"><text:tab/><text:tab/> <text:s/>--sub accumulator</text:p>
        <text:p text:style-name="P15"><text:span text:style-name="T13"><text:s text:c="16"/></text:span><text:span text:style-name="T30">a</text:span><text:span text:style-name="T13"> := </text:span><text:span text:style-name="T30">a</text:span><text:span text:style-name="T13"> </text:span><text:span text:style-name="T14">-</text:span><text:span text:style-name="T13"> </text:span><text:span text:style-name="T30">b</text:span><text:span text:style-name="T13">; <text:s text:c="8"/></text:span></text:p>
        <text:p text:style-name="P15"><text:span text:style-name="T13"><text:s text:c="12"/></text:span><text:span text:style-name="T6">when</text:span><text:span text:style-name="T13"> sta =&gt;</text:span></text:p>
        <text:p text:style-name="P24"><text:tab/><text:tab/> <text:s/>--put a accum in reg array</text:p>
        <text:p text:style-name="P15"><text:span text:style-name="T13"><text:s text:c="16"/></text:span><text:span text:style-name="T30">reg</text:span><text:span text:style-name="T13">(</text:span><text:span text:style-name="T26">addr</text:span><text:span text:style-name="T13">) := </text:span><text:span text:style-name="T30">a</text:span><text:span text:style-name="T13">; <text:s text:c="3"/></text:span></text:p>
        <text:p text:style-name="P15"><text:span text:style-name="T13"><text:s text:c="12"/></text:span><text:span text:style-name="T6">when</text:span><text:span text:style-name="T13"> stb =&gt;</text:span></text:p>
        <text:p text:style-name="P24"><text:tab/><text:tab/> <text:s/>--put b accum in reg array</text:p>
        <text:p text:style-name="P15"><text:span text:style-name="T13"><text:s text:c="16"/></text:span><text:span text:style-name="T30">reg</text:span><text:span text:style-name="T13">(</text:span><text:span text:style-name="T26">addr</text:span><text:span text:style-name="T13">) := </text:span><text:span text:style-name="T30">b</text:span><text:span text:style-name="T13">; <text:s text:c="3"/></text:span></text:p>
        <text:p text:style-name="P15"><text:span text:style-name="T13"><text:s text:c="12"/></text:span><text:span text:style-name="T6">when</text:span><text:span text:style-name="T13"> outa =&gt;</text:span></text:p>
        <text:p text:style-name="P15"><text:span text:style-name="T13"><text:tab/> <text:s text:c="8"/></text:span><text:span text:style-name="T36">--output a accum</text:span></text:p>
        <text:p text:style-name="P15"><text:span text:style-name="T13"><text:s text:c="16"/></text:span><text:span text:style-name="T26">data</text:span><text:span text:style-name="T13"> &lt;= </text:span><text:span text:style-name="T30">a</text:span><text:span text:style-name="T13">; <text:s text:c="8"/></text:span></text:p>
        <text:p text:style-name="P15"><text:span text:style-name="T13"><text:s text:c="12"/></text:span><text:span text:style-name="T6">when</text:span><text:span text:style-name="T13"> xfr =&gt;</text:span></text:p>
        <text:p text:style-name="P15"><text:span text:style-name="T13"><text:tab/> <text:s text:c="8"/></text:span><text:span text:style-name="T36">--transfer b to a</text:span></text:p>
        <text:p text:style-name="P15"><text:span text:style-name="T13"><text:s text:c="16"/></text:span><text:span text:style-name="T30">a</text:span><text:span text:style-name="T13"> := </text:span><text:span text:style-name="T30">b</text:span><text:span text:style-name="T13">; <text:s text:c="11"/></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25"><text:span text:style-name="T11">end</text:span><text:span text:style-name="T12"> </text:span><text:span text:style-name="T21">mp</text:span><text:span text:style-name="T12">;</text:span></text:p>
        <text:p text:style-name="P16"/>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cpu_rom</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 (</text:span></text:p>
        <text:p text:style-name="P15"><text:span text:style-name="T13"><text:s text:c="4"/></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data</text:span><text:span text:style-name="T13"> <text:s/>: </text:span><text:span text:style-name="T6">inout</text:span><text:span text:style-name="T13"> </text:span><text:span text:style-name="T28">integer</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signal</text:span><text:span text:style-name="T13"> </text:span><text:span text:style-name="T39">instr</text:span><text:span text:style-name="T13"> : instruction;</text:span></text:p>
        <text:p text:style-name="P15"><text:span text:style-name="T13"><text:s text:c="4"/></text:span><text:span text:style-name="T6">signal</text:span><text:span text:style-name="T13"> </text:span><text:span text:style-name="T39">addr</text:span><text:span text:style-name="T13"> <text:s/>: </text:span><text:span text:style-name="T28">integer</text:span><text:span text:style-name="T13">;</text:span></text:p>
        <text:p text:style-name="P23">begin</text:p>
        <text:p text:style-name="P16"/>
        <text:p text:style-name="P15"><text:span text:style-name="T13"><text:s text:c="4"/></text:span><text:span text:style-name="T38">unit0</text:span><text:span text:style-name="T13">: </text:span><text:span text:style-name="T6">entity</text:span><text:span text:style-name="T13"> </text:span><text:span text:style-name="T22">work</text:span><text:span text:style-name="T13">.</text:span><text:span text:style-name="T22">rom_data</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clk, instr =&gt; instr);</text:span></text:p>
        <text:p text:style-name="P16"/>
        <text:p text:style-name="P15"><text:span text:style-name="T13"><text:s text:c="4"/></text:span><text:span text:style-name="T38">unit1</text:span><text:span text:style-name="T13">: </text:span><text:span text:style-name="T6">entity</text:span><text:span text:style-name="T13"> </text:span><text:span text:style-name="T22">work</text:span><text:span text:style-name="T13">.cpu</text:span></text:p>
        <text:p text:style-name="P15"><text:span text:style-name="T13"><text:s text:c="8"/></text:span><text:span text:style-name="T6">port</text:span><text:span text:style-name="T13"> </text:span><text:span text:style-name="T6">map</text:span><text:span text:style-name="T13"> (</text:span><text:span text:style-name="T39">instr</text:span><text:span text:style-name="T13"> =&gt; </text:span><text:span text:style-name="T39">instr</text:span><text:span text:style-name="T13">, </text:span><text:span text:style-name="T39">addr</text:span><text:span text:style-name="T13"> =&gt; </text:span><text:span text:style-name="T39">addr</text:span><text:span text:style-name="T13">, </text:span><text:span text:style-name="T26">data</text:span><text:span text:style-name="T13"> =&gt; </text:span><text:span text:style-name="T26">data</text:span><text:span text:style-name="T13">);</text:span></text:p>
        <text:p text:style-name="P16"/>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
      </text:section>
      <text:p text:style-name="P2"><text:soft-page-break/>DDR</text:p>
      <text:p text:style-name="P12"/>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6"/>
      <text:p text:style-name="P15"><draw:frame draw:style-name="fr2" draw:name="graphics62" text:anchor-type="paragraph" svg:x="3.7307in" svg:y="0.0516in" svg:width="3.6043in" svg:height="2.2362in" draw:z-index="13"><draw:image xlink:href="Pictures/200000070000569D0000388A7B4B27AB.svm" xlink:type="simple" xlink:show="embed" xlink:actuate="onLoad"/></draw:frame><text:span text:style-name="T13"> <text:s text:c="3"/></text:span><text:span text:style-name="T26">clk</text:span><text:span text:style-name="T13">, </text:span><text:span text:style-name="T26">d1</text:span><text:span text:style-name="T13">, </text:span><text:span text:style-name="T26">d2</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q1</text:span><text:span text:style-name="T13"> : </text:span><text:span text:style-name="T6">out</text:span><text:span text:style-name="T13"> </text:span><text:span text:style-name="T28">std_logic</text:span><text:span text:style-name="T13">);</text:span></text:p>
      <text:p text:style-name="P16"/>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signal</text:span><text:span text:style-name="T13"> </text:span><text:span text:style-name="T39">t1</text:span><text:span text:style-name="T13">, </text:span><text:span text:style-name="T39">t2</text:span><text:span text:style-name="T13"> : </text:span><text:span text:style-name="T28">std_logic</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t1</text:span><text:span text:style-name="T13"> &lt;= </text:span><text:span text:style-name="T26">d1</text:span><text:span text:style-name="T13">;</text:span></text:p>
      <text:p text:style-name="P15"><text:span text:style-name="T13"><text:s text:c="8"/></text:span><text:span text:style-name="T6">end</text:span><text:span text:style-name="T13"> </text:span><text:span text:style-name="T6">if</text:span><text:span text:style-name="T13">;</text:span></text:p>
      <text:p text:style-name="P16"/>
      <text:p text:style-name="P15"><text:span text:style-name="T13"><text:s text:c="8"/></text:span><text:span text:style-name="T6">if</text:span><text:span text:style-name="T13"> </text:span><text:span text:style-name="T14">falling_edge</text:span><text:span text:style-name="T13">(</text:span><text:span text:style-name="T26">clk</text:span><text:span text:style-name="T13">) </text:span><text:span text:style-name="T6">then</text:span></text:p>
      <text:p text:style-name="P15"><text:span text:style-name="T13"><text:s text:c="12"/></text:span><text:span text:style-name="T39">t2</text:span><text:span text:style-name="T13"> &lt;= </text:span><text:span text:style-name="T26">d2</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26">q1</text:span><text:span text:style-name="T13"> &lt;= </text:span><text:span text:style-name="T39">t1</text:span><text:span text:style-name="T13">;</text:span></text:p>
      <text:p text:style-name="P15"><text:span text:style-name="T13"><text:s text:c="8"/></text:span><text:span text:style-name="T6">if</text:span><text:span text:style-name="T13"> </text:span><text:span text:style-name="T26">clk</text:span><text:span text:style-name="T13"> = </text:span><text:span text:style-name="T34">'1'</text:span><text:span text:style-name="T13"> </text:span><text:span text:style-name="T6">then</text:span></text:p>
      <text:p text:style-name="P15"><text:span text:style-name="T13"><text:s text:c="12"/></text:span><text:span text:style-name="T26">q1</text:span><text:span text:style-name="T13"> &lt;= </text:span><text:span text:style-name="T39">t2</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6">end</text:span><text:span text:style-name="T13"> </text:span><text:span text:style-name="T22">rtl</text:span><text:span text:style-name="T13">;</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BARREL SHIFTER</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draw:frame draw:style-name="fr2" draw:name="graphics63" text:anchor-type="paragraph" svg:x="4.8252in" svg:y="0.0256in" svg:width="5.7118in" svg:height="6.1965in" draw:z-index="14"><draw:image xlink:href="Pictures/200000070000462E00004B3FC24F8695.svm" xlink:type="simple" xlink:show="embed" xlink:actuate="onLoad"/></draw:frame></text:p>
      <text:p text:style-name="P15"><text:span text:style-name="T6">entity</text:span><text:span text:style-name="T13"> </text:span><text:span text:style-name="T22">examples</text:span><text:span text:style-name="T13"> </text:span><text:span text:style-name="T6">is</text:span></text:p>
      <text:p text:style-name="P15"><text:span text:style-name="T13"><text:s text:c="4"/></text:span><text:span text:style-name="T6">generic</text:span><text:span text:style-name="T13">(</text:span></text:p>
      <text:p text:style-name="P15"><text:span text:style-name="T13"><text:s text:c="8"/></text:span><text:span text:style-name="T7">DIST_WIDTH</text:span><text:span text:style-name="T13"> : </text:span><text:span text:style-name="T28">natural</text:span><text:span text:style-name="T13"> := </text:span><text:span text:style-name="T31">3</text:span><text:span text:style-name="T13">;</text:span></text:p>
      <text:p text:style-name="P15"><text:span text:style-name="T13"><text:s text:c="8"/></text:span><text:span text:style-name="T7">NUM_STAGES</text:span><text:span text:style-name="T13"> : </text:span><text:span text:style-name="T28">natural</text:span><text:span text:style-name="T13"> := </text:span><text:span text:style-name="T31">8</text:span><text:span text:style-name="T13">);</text:span></text:p>
      <text:p text:style-name="P15"><text:span text:style-name="T13"><text:s text:c="4"/></text:span><text:span text:style-name="T6">port</text:span><text:span text:style-name="T13">(</text:span></text:p>
      <text:p text:style-name="P15"><text:span text:style-name="T13"><text:s text:c="8"/></text:span><text:span text:style-name="T26">clk</text:span><text:span text:style-name="T13"> <text:s text:c="11"/>: </text:span><text:span text:style-name="T6">in</text:span><text:span text:style-name="T13"> </text:span><text:span text:style-name="T28">std_logic</text:span><text:span text:style-name="T13">;</text:span></text:p>
      <text:p text:style-name="P15"><text:span text:style-name="T13"><text:s text:c="8"/></text:span><text:span text:style-name="T26">enable</text:span><text:span text:style-name="T13"> <text:s text:c="7"/>: </text:span><text:span text:style-name="T6">in</text:span><text:span text:style-name="T13"> </text:span><text:span text:style-name="T28">std_logic</text:span><text:span text:style-name="T13">;</text:span></text:p>
      <text:p text:style-name="P15"><text:span text:style-name="T13"><text:s text:c="8"/></text:span><text:span text:style-name="T26">is_left</text:span><text:span text:style-name="T13"> <text:s text:c="7"/>: </text:span><text:span text:style-name="T6">in</text:span><text:span text:style-name="T13"> </text:span><text:span text:style-name="T28">std_logic</text:span><text:span text:style-name="T13">;</text:span></text:p>
      <text:p text:style-name="P15"><text:span text:style-name="T13"><text:s text:c="8"/></text:span><text:span text:style-name="T26">data</text:span><text:span text:style-name="T13"> <text:s text:c="7"/>: </text:span><text:span text:style-name="T6">in</text:span><text:span text:style-name="T13"> </text:span><text:span text:style-name="T28">std_logic_vector</text:span><text:span text:style-name="T13">((</text:span><text:span text:style-name="T7">NUM_STAGES</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distance</text:span><text:span text:style-name="T13"> <text:s text:c="3"/>: </text:span><text:span text:style-name="T6">in</text:span><text:span text:style-name="T13"> </text:span><text:span text:style-name="T28">unsigned</text:span><text:span text:style-name="T13">((</text:span><text:span text:style-name="T7">DIST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sr_out</text:span><text:span text:style-name="T13"> <text:s text:c="7"/>: </text:span><text:span text:style-name="T6">out</text:span><text:span text:style-name="T13"> </text:span><text:span text:style-name="T28">std_logic_vector</text:span><text:span text:style-name="T13">((</text:span><text:span text:style-name="T7">NUM_STAGES</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36">-- Declare the shift register signal</text:span></text:p>
      <text:p text:style-name="P15"><text:span text:style-name="T13"><text:s text:c="4"/></text:span><text:span text:style-name="T6">signal</text:span><text:span text:style-name="T13"> </text:span><text:span text:style-name="T39">sr</text:span><text:span text:style-name="T13"> : </text:span><text:span text:style-name="T28">unsigned</text:span><text:span text:style-name="T13"> ((</text:span><text:span text:style-name="T7">NUM_STAGES</text:span><text:span text:style-name="T14">-</text:span><text:span text:style-name="T31">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6">process</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enable</text:span><text:span text:style-name="T13"> = </text:span><text:span text:style-name="T34">'1'</text:span><text:span text:style-name="T13">) </text:span><text:span text:style-name="T6">then</text:span></text:p>
      <text:p text:style-name="P16"/>
      <text:p text:style-name="P15"><text:span text:style-name="T13"><text:s text:c="16"/></text:span><text:span text:style-name="T36">-- Perform rotation with functions rol and ror</text:span></text:p>
      <text:p text:style-name="P15"><text:span text:style-name="T13"><text:s text:c="16"/></text:span><text:span text:style-name="T6">if</text:span><text:span text:style-name="T13"> (</text:span><text:span text:style-name="T26">is_left</text:span><text:span text:style-name="T13"> = </text:span><text:span text:style-name="T34">'1'</text:span><text:span text:style-name="T13">) </text:span><text:span text:style-name="T6">then</text:span></text:p>
      <text:p text:style-name="P15"><text:span text:style-name="T13"><text:s text:c="20"/></text:span><text:span text:style-name="T39">sr</text:span><text:span text:style-name="T13"> &lt;= </text:span><text:span text:style-name="T28">unsigned</text:span><text:span text:style-name="T13">(</text:span><text:span text:style-name="T26">data</text:span><text:span text:style-name="T13">) </text:span><text:span text:style-name="T6">rol</text:span><text:span text:style-name="T13"> </text:span><text:span text:style-name="T14">to_integer</text:span><text:span text:style-name="T13">(</text:span><text:span text:style-name="T26">distance</text:span><text:span text:style-name="T13">);</text:span></text:p>
      <text:p text:style-name="P15"><text:span text:style-name="T13"><text:s text:c="16"/></text:span><text:span text:style-name="T6">else</text:span></text:p>
      <text:p text:style-name="P15"><text:span text:style-name="T13"><text:s text:c="20"/></text:span><text:span text:style-name="T39">sr</text:span><text:span text:style-name="T13"> &lt;= </text:span><text:span text:style-name="T28">unsigned</text:span><text:span text:style-name="T13">(</text:span><text:span text:style-name="T26">data</text:span><text:span text:style-name="T13">) </text:span><text:span text:style-name="T6">ror</text:span><text:span text:style-name="T13"> </text:span><text:span text:style-name="T14">to_integer</text:span><text:span text:style-name="T13">(</text:span><text:span text:style-name="T26">distance</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sr_out</text:span><text:span text:style-name="T13"> &lt;= </text:span><text:span text:style-name="T28">std_logic_vector</text:span><text:span text:style-name="T13">(</text:span><text:span text:style-name="T39">sr</text:span><text:span text:style-name="T13">);</text:span></text:p>
      <text:p text:style-name="P15"><text:span text:style-name="T6">end</text:span><text:span text:style-name="T13"> </text:span><text:span text:style-name="T22">rtl</text:span><text:span text:style-name="T13">;</text:span></text:p>
      <text:p text:style-name="P12"/>
      <text:p text:style-name="P12"/>
      <text:p text:style-name="P12"/>
      <text:p text:style-name="P12"/>
      <text:p text:style-name="P12"/>
      <text:p text:style-name="P12"/>
      <text:p text:style-name="P12"/>
      <text:section text:style-name="Sect1" text:name="Section3">
        <text:p text:style-name="P2"><text:soft-page-break/>ATTRIBUTES – RECORDS – NONPRUNE:</text:p>
        <text:p text:style-name="P18"/>
        <text:p text:style-name="P26">--record</text:p>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flag</text:span><text:span text:style-name="T13">: </text:span><text:span text:style-name="T6">out</text:span><text:span text:style-name="T13"> </text:span><text:span text:style-name="T28">bit_vector</text:span><text:span text:style-name="T13">(</text:span><text:span text:style-name="T31">1</text:span><text:span text:style-name="T13"> </text:span><text:span text:style-name="T6">to</text:span><text:span text:style-name="T13"> </text:span><text:span text:style-name="T31">4</text:span><text:span text:style-name="T13">);</text:span></text:p>
        <text:p text:style-name="P15"><text:span text:style-name="T13"><text:s text:c="4"/></text:span><text:span text:style-name="T26">sum</text:span><text:span text:style-name="T13"> : </text:span><text:span text:style-name="T6">out</text:span><text:span text:style-name="T13"> </text:span><text:span text:style-name="T28">natural</text:span><text:span text:style-name="T13"> </text:span><text:span text:style-name="T6">range</text:span><text:span text:style-name="T13"> </text:span><text:span text:style-name="T31">0</text:span><text:span text:style-name="T13"> </text:span><text:span text:style-name="T6">to</text:span><text:span text:style-name="T13"> </text:span><text:span text:style-name="T31">15</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type</text:span><text:span text:style-name="T13"> </text:span><text:span text:style-name="T28">pair</text:span><text:span text:style-name="T13"> </text:span><text:span text:style-name="T6">is</text:span><text:span text:style-name="T13"> </text:span><text:span text:style-name="T6">record</text:span><text:span text:style-name="T13"> a, b: </text:span><text:span text:style-name="T28">natural</text:span><text:span text:style-name="T13"> </text:span><text:span text:style-name="T6">range</text:span><text:span text:style-name="T13"> </text:span><text:span text:style-name="T31">0</text:span><text:span text:style-name="T13"> </text:span><text:span text:style-name="T6">to</text:span><text:span text:style-name="T13"> </text:span><text:span text:style-name="T31">7</text:span><text:span text:style-name="T13">;</text:span></text:p>
        <text:p text:style-name="P15"><text:span text:style-name="T13"><text:s text:c="4"/></text:span><text:span text:style-name="T6">end</text:span><text:span text:style-name="T13"> </text:span><text:span text:style-name="T6">record</text:span><text:span text:style-name="T13">;</text:span></text:p>
        <text:p text:style-name="P15"><text:span text:style-name="T13"><text:s text:c="4"/></text:span><text:span text:style-name="T6">type</text:span><text:span text:style-name="T13"> </text:span><text:span text:style-name="T28">stack</text:span><text:span text:style-name="T13"> </text:span><text:span text:style-name="T6">is</text:span><text:span text:style-name="T13"> </text:span><text:span text:style-name="T6">array</text:span><text:span text:style-name="T13">(</text:span><text:span text:style-name="T31">1</text:span><text:span text:style-name="T13"> </text:span><text:span text:style-name="T6">to</text:span><text:span text:style-name="T13"> </text:span><text:span text:style-name="T31">4</text:span><text:span text:style-name="T13">) </text:span><text:span text:style-name="T6">of</text:span><text:span text:style-name="T13"> </text:span><text:span text:style-name="T28">pair</text:span><text:span text:style-name="T13">;</text:span></text:p>
        <text:p text:style-name="P15"><text:span text:style-name="T13"><text:s text:c="4"/></text:span><text:span text:style-name="T6">constant</text:span><text:span text:style-name="T13"> </text:span><text:span text:style-name="T7">matrix</text:span><text:span text:style-name="T13">: </text:span><text:span text:style-name="T28">stack</text:span><text:span text:style-name="T13"> := ((</text:span><text:span text:style-name="T31">1</text:span><text:span text:style-name="T13">,</text:span><text:span text:style-name="T31">2</text:span><text:span text:style-name="T13">),(</text:span><text:span text:style-name="T31">3</text:span><text:span text:style-name="T13">,</text:span><text:span text:style-name="T31">4</text:span><text:span text:style-name="T13">),(</text:span><text:span text:style-name="T31">5</text:span><text:span text:style-name="T13">,</text:span><text:span text:style-name="T31">6</text:span><text:span text:style-name="T13">),(</text:span><text:span text:style-name="T31">7</text:span><text:span text:style-name="T13">,</text:span><text:span text:style-name="T31">0</text:span><text:span text:style-name="T13">));</text:span></text:p>
        <text:p text:style-name="P23">begin</text:p>
        <text:p text:style-name="P15"><text:span text:style-name="T13"><text:s text:c="4"/></text:span><text:span text:style-name="T38">gen</text:span><text:span text:style-name="T13">: </text:span><text:span text:style-name="T6">for</text:span><text:span text:style-name="T13"> </text:span><text:span text:style-name="T30">i</text:span><text:span text:style-name="T13"> </text:span><text:span text:style-name="T6">in</text:span><text:span text:style-name="T13"> </text:span><text:span text:style-name="T31">1</text:span><text:span text:style-name="T13"> </text:span><text:span text:style-name="T6">to</text:span><text:span text:style-name="T13"> </text:span><text:span text:style-name="T31">4</text:span><text:span text:style-name="T13"> </text:span><text:span text:style-name="T6">generate</text:span></text:p>
        <text:p text:style-name="P15"><text:span text:style-name="T13"><text:s text:c="8"/></text:span><text:span text:style-name="T26">flag</text:span><text:span text:style-name="T13">(</text:span><text:span text:style-name="T30">i</text:span><text:span text:style-name="T13">) &lt;= </text:span><text:span text:style-name="T34">'1'</text:span><text:span text:style-name="T13"> </text:span><text:span text:style-name="T6">when</text:span><text:span text:style-name="T13"> </text:span><text:span text:style-name="T7">matrix</text:span><text:span text:style-name="T13">(</text:span><text:span text:style-name="T30">i</text:span><text:span text:style-name="T13">).</text:span><text:span text:style-name="T7">a</text:span><text:span text:style-name="T13"> </text:span><text:span text:style-name="T14">&gt;</text:span><text:span text:style-name="T13"> </text:span><text:span text:style-name="T7">matrix</text:span><text:span text:style-name="T13">(</text:span><text:span text:style-name="T30">i</text:span><text:span text:style-name="T13">).</text:span><text:span text:style-name="T7">b</text:span><text:span text:style-name="T13"> </text:span><text:span text:style-name="T6">else</text:span><text:span text:style-name="T13"> </text:span><text:span text:style-name="T34">'0'</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5"><text:span text:style-name="T13"><text:s text:c="4"/></text:span><text:span text:style-name="T26">sum</text:span><text:span text:style-name="T13"> &lt;= </text:span><text:span text:style-name="T7">matrix</text:span><text:span text:style-name="T13">(</text:span><text:span text:style-name="T31">1</text:span><text:span text:style-name="T13">).</text:span><text:span text:style-name="T7">a</text:span><text:span text:style-name="T13"> </text:span><text:span text:style-name="T14">+</text:span><text:span text:style-name="T13"> </text:span><text:span text:style-name="T7">matrix</text:span><text:span text:style-name="T13">(</text:span><text:span text:style-name="T31">1</text:span><text:span text:style-name="T13">).</text:span><text:span text:style-name="T7">b</text:span><text:span text:style-name="T13">;</text:span></text:p>
        <text:p text:style-name="P8"><text:span text:style-name="T6">end</text:span><text:span text:style-name="T13"> </text:span><text:span text:style-name="T6">architecture</text:span><text:span text:style-name="T13">;</text:span></text:p>
        <text:p text:style-name="P16"/>
        <text:p text:style-name="P16"/>
        <text:p text:style-name="P16"/>
        <text:p text:style-name="P16"/>
        <text:p text:style-name="P16"/>
        <text:p text:style-name="P24">--attribute</text:p>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6">in</text:span><text:span text:style-name="T13"> </text:span><text:span text:style-name="T28">bit</text:span><text:span text:style-name="T13">;</text:span></text:p>
        <text:p text:style-name="P15"><text:span text:style-name="T13"><text:s text:c="4"/></text:span><text:span text:style-name="T26">data_in</text:span><text:span text:style-name="T13">: </text:span><text:span text:style-name="T6">in</text:span><text:span text:style-name="T13"> </text:span><text:span text:style-name="T28">bit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data_out</text:span><text:span text:style-name="T13">: </text:span><text:span text:style-name="T6">out</text:span><text:span text:style-name="T13"> </text:span><text:span text:style-name="T28">bit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data_register</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attribute</text:span><text:span text:style-name="T13"> </text:span><text:span text:style-name="T33">chip_pin</text:span><text:span text:style-name="T13">: </text:span><text:span text:style-name="T28">string</text:span><text:span text:style-name="T13">;</text:span></text:p>
        <text:p text:style-name="P15"><text:span text:style-name="T13"><text:s text:c="4"/></text:span><text:span text:style-name="T6">attribute</text:span><text:span text:style-name="T13"> </text:span><text:span text:style-name="T33">chip_pin</text:span><text:span text:style-name="T13"> </text:span><text:span text:style-name="T6">of</text:span><text:span text:style-name="T13"> clk: </text:span><text:span text:style-name="T6">signal</text:span><text:span text:style-name="T13"> </text:span><text:span text:style-name="T6">is</text:span><text:span text:style-name="T13"> </text:span><text:span text:style-name="T34">"n2"</text:span><text:span text:style-name="T13">;</text:span></text:p>
        <text:p text:style-name="P15"><text:span text:style-name="T13"><text:s text:c="4"/></text:span><text:span text:style-name="T6">attribute</text:span><text:span text:style-name="T13"> </text:span><text:span text:style-name="T33">chip_pin</text:span><text:span text:style-name="T13"> </text:span><text:span text:style-name="T6">of</text:span><text:span text:style-name="T13"> data_in: </text:span><text:span text:style-name="T6">signal</text:span><text:span text:style-name="T13"> </text:span><text:span text:style-name="T6">is</text:span><text:span text:style-name="T13"> </text:span><text:span text:style-name="T34">"a3, a4, a5, a6"</text:span><text:span text:style-name="T13">;</text:span></text:p>
        <text:p text:style-name="P15"><text:span text:style-name="T13"><text:s text:c="4"/></text:span><text:span text:style-name="T6">attribute</text:span><text:span text:style-name="T13"> </text:span><text:span text:style-name="T33">chip_pin</text:span><text:span text:style-name="T13"> </text:span><text:span text:style-name="T6">of</text:span><text:span text:style-name="T13"> data_out: </text:span><text:span text:style-name="T6">signal</text:span><text:span text:style-name="T13"> </text:span><text:span text:style-name="T6">is</text:span><text:span text:style-name="T13"> </text:span><text:span text:style-name="T34">"b3, b4, b5, b6"</text:span><text:span text:style-name="T13">;</text:span></text:p>
        <text:p text:style-name="P23">begin</text:p>
        <text:p text:style-name="P15"><text:span text:style-name="T6">process</text:span><text:span text:style-name="T13">(clk)</text:span></text:p>
        <text:p text:style-name="P15"><text:span text:style-name="T13"><text:s text:c="4"/></text:span><text:span text:style-name="T6">begin</text:span></text:p>
        <text:p text:style-name="P15"><text:span text:style-name="T13"><text:s text:c="8"/></text:span><text:span text:style-name="T6">if</text:span><text:span text:style-name="T13">(clk</text:span><text:span text:style-name="T33">'event</text:span><text:span text:style-name="T13"> </text:span><text:span text:style-name="T6">and</text:span><text:span text:style-name="T13"> clk=</text:span><text:span text:style-name="T34">'1'</text:span><text:span text:style-name="T13">)</text:span><text:span text:style-name="T6">then</text:span></text:p>
        <text:p text:style-name="P16"><text:s text:c="12"/>data_out &lt;= data_i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23">end<text:span text:style-name="T19"> </text:span>architecture<text:span text:style-name="T19">;</text:span></text:p>
        <text:p text:style-name="P16"/>
        <text:p text:style-name="P23"/>
        <text:p text:style-name="P23"/>
        <text:p text:style-name="P23"/>
        <text:p text:style-name="P23"/>
        <text:p text:style-name="P23"/>
        <text:p text:style-name="P23"/>
        <text:p text:style-name="P24">--preserve nonprune attribute</text:p>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text:span><text:span text:style-name="T26">x</text:span><text:span text:style-name="T13">:</text:span><text:span text:style-name="T6">in</text:span><text:span text:style-name="T13"> </text:span><text:span text:style-name="T28">bit</text:span><text:span text:style-name="T13">;</text:span></text:p>
        <text:p text:style-name="P15"><text:span text:style-name="T13"><text:s text:c="4"/></text:span><text:span text:style-name="T26">y</text:span><text:span text:style-name="T13">: </text:span><text:span text:style-name="T6">out</text:span><text:span text:style-name="T13"> </text:span><text:span text:style-name="T28">bit</text:span><text:span text:style-name="T13">);</text:span></text:p>
        <text:p text:style-name="P15"><text:span text:style-name="T6">end</text:span><text:span text:style-name="T13"> </text:span><text:span text:style-name="T22">examples</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signal</text:span><text:span text:style-name="T13"> </text:span><text:span text:style-name="T39">a</text:span><text:span text:style-name="T13">,</text:span><text:span text:style-name="T39">b</text:span><text:span text:style-name="T13">,</text:span><text:span text:style-name="T39">c</text:span><text:span text:style-name="T13">: </text:span><text:span text:style-name="T28">bit</text:span><text:span text:style-name="T13">;</text:span></text:p>
        <text:p text:style-name="P15"><text:span text:style-name="T13"><text:s text:c="4"/></text:span><text:span text:style-name="T6">attribute</text:span><text:span text:style-name="T13"> </text:span><text:span text:style-name="T33">preserve</text:span><text:span text:style-name="T13">: </text:span><text:span text:style-name="T28">boolean</text:span><text:span text:style-name="T13">;</text:span></text:p>
        <text:p text:style-name="P15"><text:span text:style-name="T13"><text:s text:c="4"/></text:span><text:span text:style-name="T6">attribute</text:span><text:span text:style-name="T13"> </text:span><text:span text:style-name="T33">preserve</text:span><text:span text:style-name="T13"> </text:span><text:span text:style-name="T6">of</text:span><text:span text:style-name="T13"> </text:span><text:span text:style-name="T39">a</text:span><text:span text:style-name="T13">,</text:span><text:span text:style-name="T39">b</text:span><text:span text:style-name="T13">,</text:span><text:span text:style-name="T39">c</text:span><text:span text:style-name="T13">: </text:span><text:span text:style-name="T6">signal</text:span><text:span text:style-name="T13"> </text:span><text:span text:style-name="T6">is</text:span><text:span text:style-name="T13"> </text:span><text:span text:style-name="T7">true</text:span><text:span text:style-name="T13">;</text:span></text:p>
        <text:p text:style-name="P15"><text:span text:style-name="T13"><text:s text:c="4"/></text:span><text:span text:style-name="T36">-- <text:s text:c="3"/>attribute nonprune: boolean;</text:span></text:p>
        <text:p text:style-name="P15"><text:span text:style-name="T13"><text:s text:c="4"/></text:span><text:span text:style-name="T36">-- <text:s text:c="3"/>attribute nonprune of a,b,c: signal is true;</text:span></text:p>
        <text:p text:style-name="P23">begin</text:p>
        <text:p text:style-name="P15"><text:span text:style-name="T13"><text:s text:c="4"/></text:span><text:span text:style-name="T6">process</text:span><text:span text:style-name="T13">(clk)</text:span></text:p>
        <text:p text:style-name="P15"><text:span text:style-name="T13"><text:s text:c="4"/></text:span><text:span text:style-name="T6">begin</text:span></text:p>
        <text:p text:style-name="P15"><text:span text:style-name="T13"><text:s text:c="8"/></text:span><text:span text:style-name="T6">if</text:span><text:span text:style-name="T13">(clk</text:span><text:span text:style-name="T33">'event</text:span><text:span text:style-name="T13"> </text:span><text:span text:style-name="T6">and</text:span><text:span text:style-name="T13"> clk=</text:span><text:span text:style-name="T34">'1'</text:span><text:span text:style-name="T13">)</text:span><text:span text:style-name="T6">then</text:span></text:p>
        <text:p text:style-name="P15"><text:span text:style-name="T13"><text:s text:c="12"/></text:span><text:span text:style-name="T39">a</text:span><text:span text:style-name="T13"> &lt;= x;</text:span></text:p>
        <text:p text:style-name="P15"><text:span text:style-name="T13"><text:s text:c="12"/></text:span><text:span text:style-name="T39">b</text:span><text:span text:style-name="T13"> &lt;= x;</text:span></text:p>
        <text:p text:style-name="P15"><text:span text:style-name="T13"><text:s text:c="12"/></text:span><text:span text:style-name="T39">c</text:span><text:span text:style-name="T13"> &lt;= x;</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y &lt;= </text:span><text:span text:style-name="T39">a</text:span><text:span text:style-name="T13"> </text:span><text:span text:style-name="T6">and</text:span><text:span text:style-name="T13"> </text:span><text:span text:style-name="T39">b</text:span><text:span text:style-name="T13">;</text:span></text:p>
        <text:p text:style-name="P23">end<text:span text:style-name="T19"> </text:span>architecture<text:span text:style-name="T19">;</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
        <text:p text:style-name="P16"/>
        <text:p text:style-name="P16"/>
        <text:p text:style-name="P16"/>
        <text:p text:style-name="P4"/>
        <text:p text:style-name="P2"/>
        <text:p text:style-name="P2"/>
        <text:p text:style-name="P2"/>
        <text:p text:style-name="P2"/>
        <text:p text:style-name="P2"/>
      </text:section>
      <text:p text:style-name="P10"><text:soft-page-break/><text:span text:style-name="T42">BARREL </text:span><text:span text:style-name="T42">SHIFTER</text:span></text:p>
      <text:p text:style-name="P22"/>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examples</text:span><text:span text:style-name="T13"> </text:span><text:span text:style-name="T6">is</text:span><text:span text:style-name="T13"> </text:span><text:span text:style-name="T6">port</text:span><text:span text:style-name="T13">(</text:span></text:p>
      <text:p text:style-name="P15"><text:span text:style-name="T13"><text:s text:c="4"/></text:span><text:span text:style-name="T26">a_uns</text:span><text:span text:style-name="T13">, </text:span><text:span text:style-name="T26">b_uns</text:span><text:span text:style-name="T13"> : </text:span><text:span text:style-name="T6">in</text:span><text:span text:style-name="T13"> </text:span><text:span text:style-name="T28">unsigned</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um</text:span><text:span text:style-name="T13"> : </text:span><text:span text:style-name="T6">out</text:span><text:span text:style-name="T13"> </text:span><text:span text:style-name="T28">unsigned</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cin</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cout_sum</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examples</text:span><text:span text:style-name="T13">;</text:span></text:p>
      <text:p text:style-name="P15"><text:span text:style-name="T6">architecture</text:span><text:span text:style-name="T13"> </text:span><text:span text:style-name="T26">sum</text:span><text:span text:style-name="T13"> </text:span><text:span text:style-name="T6">of</text:span><text:span text:style-name="T13"> </text:span><text:span text:style-name="T22">examples</text:span><text:span text:style-name="T13"> </text:span><text:span text:style-name="T6">is</text:span></text:p>
      <text:p text:style-name="P15"><text:span text:style-name="T13"><text:s text:c="4"/></text:span><text:span text:style-name="T6">signal</text:span><text:span text:style-name="T13"> </text:span><text:span text:style-name="T39">sum_uns</text:span><text:span text:style-name="T13">: unsigned(</text:span><text:span text:style-name="T31">9</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9">sum_uns</text:span><text:span text:style-name="T13"> &lt;= (</text:span><text:span text:style-name="T34">'0'</text:span><text:span text:style-name="T13"> </text:span><text:span text:style-name="T14">&amp;</text:span><text:span text:style-name="T13"> a_uns </text:span><text:span text:style-name="T14">&amp;</text:span><text:span text:style-name="T13"> cin) </text:span><text:span text:style-name="T14">+</text:span><text:span text:style-name="T13"> (</text:span><text:span text:style-name="T34">'0'</text:span><text:span text:style-name="T13"> </text:span><text:span text:style-name="T14">&amp;</text:span><text:span text:style-name="T13"> b_uns </text:span><text:span text:style-name="T14">&amp;</text:span><text:span text:style-name="T13"> </text:span><text:span text:style-name="T34">'1'</text:span><text:span text:style-name="T13">);</text:span></text:p>
      <text:p text:style-name="P15"><text:span text:style-name="T13"><text:s text:c="4"/></text:span><text:span text:style-name="T26">sum</text:span><text:span text:style-name="T13"> &lt;= </text:span><text:span text:style-name="T39">sum_uns</text:span><text:span text:style-name="T13">(</text:span><text:span text:style-name="T31">8</text:span><text:span text:style-name="T13"> </text:span><text:span text:style-name="T6">downto</text:span><text:span text:style-name="T13"> </text:span><text:span text:style-name="T31">1</text:span><text:span text:style-name="T13">);</text:span></text:p>
      <text:p text:style-name="P15"><text:span text:style-name="T13"><text:s text:c="4"/>cout_sum &lt;= </text:span><text:span text:style-name="T39">sum_uns</text:span><text:span text:style-name="T13">(</text:span><text:span text:style-name="T31">9</text:span><text:span text:style-name="T13">);</text:span></text:p>
      <text:p text:style-name="P15"><text:span text:style-name="T6">end</text:span><text:span text:style-name="T13"> </text:span><text:span text:style-name="T26">sum</text:span><text:span text:style-name="T13">;</text:span></text:p>
      <text:p text:style-name="P18"/>
      <text:p text:style-name="P18"/>
      <text:p text:style-name="P18"/>
      <text:p text:style-name="P2"/>
      <text:p text:style-name="P12"/>
      <text:p text:style-name="P12"/>
      <text:p text:style-name="P12"/>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THE FIFO HAS FLAGS, EMPTY AND FULL , THAT SIGNIFY ITS STATE. IT USES A FUNCTION TO INCREMENT TWO CIRCULAR POINTERS. ONE POINTER KEEPS TRACK OF THE ADDRESS TO WRITE TO NEXT, THE OTHER POINTER TRACKS THE ADDRESS TO READ FROM. THE FIFO MEMORY MAY BE IMPLEMENTED IN A NUMBER OF WAYS IN HARDWARE. WE SHALL ASSUME FOR THE MOMENT THAT IT WILL BE SYNTHESIZED AS A BANK OF FLIP-FLOPS.</text:p>
      <text:section text:style-name="Sect3" text:name="Section4">
        <text:p text:style-name="P12"><text:span text:style-name="T6">library</text:span><text:span text:style-name="T15"> </text:span><text:span text:style-name="T23">ieee</text:span><text:span text:style-name="T15">;</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fifo </text:span><text:span text:style-name="T6">is</text:span><text:span text:style-name="T13"> <text:s text:c="4"/></text:span><text:span text:style-name="T36">--first in first out register</text:span></text:p>
        <text:p text:style-name="P15"><text:span text:style-name="T13"><text:s text:c="4"/></text:span><text:span text:style-name="T6">generic</text:span><text:span text:style-name="T13">( b_width : integer := </text:span><text:span text:style-name="T31">12</text:span><text:span text:style-name="T13">;</text:span></text:p>
        <text:p text:style-name="P15"><text:span text:style-name="T13"><text:s text:c="4"/><text:tab/><text:tab/>depth <text:s/>: integer := </text:span><text:span text:style-name="T31">16</text:span><text:span text:style-name="T13">);</text:span></text:p>
        <text:p text:style-name="P15"><text:span text:style-name="T13"><text:s text:c="4"/></text:span><text:span text:style-name="T6">port</text:span><text:span text:style-name="T13">( <text:s text:c="3"/>clk, rst, push, pop : </text:span><text:span text:style-name="T6">in</text:span><text:span text:style-name="T13"> std_logic;</text:span></text:p>
        <text:p text:style-name="P15"><text:span text:style-name="T13"><text:s text:c="3"/><text:tab/> <text:s text:c="5"/>di : </text:span><text:span text:style-name="T6">in</text:span><text:span text:style-name="T13"> unsigned (b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tab/> <text:s text:c="5"/>do : </text:span><text:span text:style-name="T6">out</text:span><text:span text:style-name="T13"> unsigned (b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tab/> <text:s text:c="5"/>empty, full : </text:span><text:span text:style-name="T6">out</text:span><text:span text:style-name="T13"> std_logic);</text:span></text:p>
        <text:p text:style-name="P15"><text:span text:style-name="T6">end</text:span><text:span text:style-name="T13"> fifo;</text:span></text:p>
        <text:p text:style-name="P16"/>
        <text:p text:style-name="P15"><text:span text:style-name="T6">architecture</text:span><text:span text:style-name="T13"> rtl </text:span><text:span text:style-name="T6">of</text:span><text:span text:style-name="T13"> fifo </text:span><text:span text:style-name="T6">is</text:span></text:p>
        <text:p text:style-name="P15"><text:span text:style-name="T13"><text:s text:c="4"/></text:span><text:span text:style-name="T6">subtype</text:span><text:span text:style-name="T13"> ptype </text:span><text:span text:style-name="T6">is</text:span><text:span text:style-name="T13"> </text:span><text:span text:style-name="T28">integer</text:span><text:span text:style-name="T13"> </text:span><text:span text:style-name="T6">range</text:span><text:span text:style-name="T13"> </text:span><text:span text:style-name="T31">0</text:span><text:span text:style-name="T13"> </text:span><text:span text:style-name="T6">to</text:span><text:span text:style-name="T13"> (depth</text:span><text:span text:style-name="T14">-</text:span><text:span text:style-name="T31">1</text:span><text:span text:style-name="T13">);</text:span></text:p>
        <text:p text:style-name="P16"/>
        <text:p text:style-name="P15"><text:span text:style-name="T13"><text:s text:c="4"/></text:span><text:span text:style-name="T6">signal</text:span><text:span text:style-name="T13"> diff, ai, ao : ptype; </text:span><text:span text:style-name="T36">--ai and ao are indexes. difference is</text:span></text:p>
        <text:p text:style-name="P24"><text:tab/><text:tab/><text:tab/><text:tab/><text:tab/> a pointer.</text:p>
        <text:p text:style-name="P15"><text:span text:style-name="T13"><text:s text:c="4"/></text:span><text:span text:style-name="T6">signal</text:span><text:span text:style-name="T13"> f, e : std_logic;</text:span></text:p>
        <text:p text:style-name="P16"/>
        <text:p text:style-name="P15"><text:span text:style-name="T13"><text:s text:c="4"/></text:span><text:span text:style-name="T6">type</text:span><text:span text:style-name="T13"> a </text:span><text:span text:style-name="T6">is</text:span><text:span text:style-name="T13"> </text:span><text:span text:style-name="T6">array</text:span><text:span text:style-name="T13">(ptype) </text:span><text:span text:style-name="T6">of</text:span><text:span text:style-name="T13"> unsigned(b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mem : a;</text:span></text:p>
        <text:p text:style-name="P16"/>
        <text:p text:style-name="P15"><text:span text:style-name="T13"><text:s text:c="4"/></text:span><text:span text:style-name="T6">function</text:span><text:span text:style-name="T13"> bump(</text:span><text:span text:style-name="T6">signal</text:span><text:span text:style-name="T13"> ptr : </text:span><text:span text:style-name="T28">integer</text:span><text:span text:style-name="T13"> </text:span><text:span text:style-name="T6">range</text:span><text:span text:style-name="T13"> </text:span><text:span text:style-name="T31">0</text:span><text:span text:style-name="T13"> </text:span><text:span text:style-name="T6">to</text:span><text:span text:style-name="T13"> (depth</text:span><text:span text:style-name="T14">-</text:span><text:span text:style-name="T31">1</text:span><text:span text:style-name="T13">)) </text:span><text:span text:style-name="T6">return</text:span><text:span text:style-name="T13"> <text:tab/><text:tab/><text:tab/><text:tab/><text:tab/><text:tab/><text:tab/><text:tab/><text:tab/></text:span><text:span text:style-name="T28">integer</text:span><text:span text:style-name="T13"> </text:span><text:span text:style-name="T6">is</text:span></text:p>
        <text:p text:style-name="P15"><text:span text:style-name="T13"><text:s text:c="4"/></text:span><text:span text:style-name="T6">begin</text:span></text:p>
        <text:p text:style-name="P15"><text:span text:style-name="T13"><text:s text:c="8"/></text:span><text:span text:style-name="T6">if</text:span><text:span text:style-name="T13">(ptr = (depth</text:span><text:span text:style-name="T14">-</text:span><text:span text:style-name="T31">1</text:span><text:span text:style-name="T13">)) </text:span><text:span text:style-name="T6">then</text:span></text:p>
        <text:p text:style-name="P15"><text:span text:style-name="T13"><text:s text:c="12"/></text:span><text:span text:style-name="T6">return</text:span><text:span text:style-name="T13"> </text:span><text:span text:style-name="T31">0</text:span><text:span text:style-name="T13">;</text:span></text:p>
        <text:p text:style-name="P15"><text:span text:style-name="T13"><text:s text:c="8"/></text:span><text:span text:style-name="T6">else</text:span><text:span text:style-name="T13"> </text:span><text:span text:style-name="T6">return</text:span><text:span text:style-name="T13">(ptr </text:span><text:span text:style-name="T14">+</text:span><text:span text:style-name="T31">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bump;</text:span></text:p>
        <text:p text:style-name="P23">begin</text:p>
        <text:p text:style-name="P15"><text:span text:style-name="T13"><text:s text:c="4"/></text:span><text:span text:style-name="T6">process</text:span><text:span text:style-name="T13">(f,e)</text:span></text:p>
        <text:p text:style-name="P15"><text:span text:style-name="T13"><text:s text:c="4"/></text:span><text:span text:style-name="T6">begin</text:span></text:p>
        <text:p text:style-name="P16"><text:s text:c="8"/>full &lt;= f;</text:p>
        <text:p text:style-name="P16"><text:s text:c="8"/>empty &lt;= e;</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6"/>
        <text:p text:style-name="P16"/>
        <text:p text:style-name="P16"/>
        <text:p text:style-name="P16"/>
        <text:p text:style-name="P16"/>
        <text:p text:style-name="P15"><text:span text:style-name="T13"><text:s text:c="4"/></text:span><text:span text:style-name="T6">process</text:span><text:span text:style-name="T13">(diff)</text:span></text:p>
        <text:p text:style-name="P15"><text:span text:style-name="T13"><text:s text:c="4"/></text:span><text:span text:style-name="T6">begin</text:span></text:p>
        <text:p text:style-name="P15"><text:span text:style-name="T13"><text:s text:c="8"/></text:span><text:span text:style-name="T6">if</text:span><text:span text:style-name="T13">(diff = depth</text:span><text:span text:style-name="T14">-</text:span><text:span text:style-name="T31">1</text:span><text:span text:style-name="T13">)</text:span><text:span text:style-name="T6">then</text:span></text:p>
        <text:p text:style-name="P15"><text:span text:style-name="T13"><text:s text:c="12"/>f &lt;= </text:span><text:span text:style-name="T34">'1'</text:span><text:span text:style-name="T13">;</text:span></text:p>
        <text:p text:style-name="P15"><text:span text:style-name="T13"><text:s text:c="8"/></text:span><text:span text:style-name="T6">else</text:span><text:span text:style-name="T13"> f &lt;= </text:span><text:span text:style-name="T34">'0'</text:span><text:span text:style-name="T13">;</text:span></text:p>
        <text:p text:style-name="P15"><text:span text:style-name="T13"><text:s text:c="8"/></text:span><text:span text:style-name="T6">end</text:span><text:span text:style-name="T13"> </text:span><text:span text:style-name="T6">if</text:span><text:span text:style-name="T13">;</text:span></text:p>
        <text:p text:style-name="P16"/>
        <text:p text:style-name="P15"><text:span text:style-name="T13"><text:s text:c="8"/></text:span><text:span text:style-name="T6">if</text:span><text:span text:style-name="T13">(diff = </text:span><text:span text:style-name="T31">0</text:span><text:span text:style-name="T13">)</text:span><text:span text:style-name="T6">then</text:span></text:p>
        <text:p text:style-name="P15"><text:span text:style-name="T13"><text:s text:c="12"/>e &lt;= </text:span><text:span text:style-name="T34">'1'</text:span><text:span text:style-name="T13">;</text:span></text:p>
        <text:p text:style-name="P15"><text:span text:style-name="T13"><text:s text:c="8"/></text:span><text:span text:style-name="T6">else</text:span><text:span text:style-name="T13"> e &lt;= </text:span><text:span text:style-name="T34">'0'</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span text:style-name="T13">(clk) <text:s text:c="4"/></text:span><text:span text:style-name="T36">--push and pop are synchronous with clk</text:span></text:p>
        <text:p text:style-name="P15"><text:span text:style-name="T13"><text:s text:c="4"/></text:span><text:span text:style-name="T6">begin</text:span><text:span text:style-name="T13"> <text:s text:c="11"/></text:span><text:span text:style-name="T36">--read and write should not occur at the same time</text:span></text:p>
        <text:p text:style-name="P15"><text:span text:style-name="T13"><text:s text:c="8"/></text:span><text:span text:style-name="T6">if</text:span><text:span text:style-name="T13"> </text:span><text:span text:style-name="T14">rising_edge</text:span><text:span text:style-name="T13">(clk)</text:span><text:span text:style-name="T6">then</text:span></text:p>
        <text:p text:style-name="P15"><text:span text:style-name="T13"><text:s text:c="12"/></text:span><text:span text:style-name="T6">if</text:span><text:span text:style-name="T13">((push = </text:span><text:span text:style-name="T34">'1'</text:span><text:span text:style-name="T13">) </text:span><text:span text:style-name="T6">and</text:span><text:span text:style-name="T13"> (pop = </text:span><text:span text:style-name="T34">'0'</text:span><text:span text:style-name="T13">) </text:span><text:span text:style-name="T6">and</text:span><text:span text:style-name="T13"> (f = </text:span><text:span text:style-name="T34">'0'</text:span><text:span text:style-name="T13">)) </text:span><text:span text:style-name="T6">then</text:span></text:p>
        <text:p text:style-name="P16"><text:s text:c="16"/>mem(ai) &lt;= di;</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if</text:span><text:span text:style-name="T13">((push = </text:span><text:span text:style-name="T34">'0'</text:span><text:span text:style-name="T13">) </text:span><text:span text:style-name="T6">and</text:span><text:span text:style-name="T13"> (pop = </text:span><text:span text:style-name="T34">'1'</text:span><text:span text:style-name="T13">) </text:span><text:span text:style-name="T6">and</text:span><text:span text:style-name="T13"> (e = </text:span><text:span text:style-name="T34">'0'</text:span><text:span text:style-name="T13">)) </text:span><text:span text:style-name="T6">then</text:span></text:p>
        <text:p text:style-name="P16"><text:s text:c="16"/>do &lt;= mem(ao);</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span text:style-name="T13">(rst, clk)</text:span></text:p>
        <text:p text:style-name="P15"><text:span text:style-name="T13"><text:s text:c="4"/></text:span><text:span text:style-name="T6">begin</text:span></text:p>
        <text:p text:style-name="P15"><text:span text:style-name="T13"><text:s text:c="8"/></text:span><text:span text:style-name="T6">if</text:span><text:span text:style-name="T13">(rst = </text:span><text:span text:style-name="T34">'1'</text:span><text:span text:style-name="T13">)</text:span><text:span text:style-name="T6">then</text:span></text:p>
        <text:p text:style-name="P15"><text:span text:style-name="T13"><text:s text:c="12"/>ai &lt;= </text:span><text:span text:style-name="T31">0</text:span><text:span text:style-name="T13">;</text:span></text:p>
        <text:p text:style-name="P15"><text:span text:style-name="T13"><text:s text:c="12"/>ao &lt;= </text:span><text:span text:style-name="T31">0</text:span><text:span text:style-name="T13">;</text:span></text:p>
        <text:p text:style-name="P15"><text:span text:style-name="T13"><text:s text:c="12"/>diff &lt;= </text:span><text:span text:style-name="T31">0</text:span><text:span text:style-name="T13">;</text:span></text:p>
        <text:p text:style-name="P15"><text:span text:style-name="T13"><text:s text:c="8"/></text:span><text:span text:style-name="T6">elsif</text:span><text:span text:style-name="T13"> rising_edge(clk) </text:span><text:span text:style-name="T6">then</text:span></text:p>
        <text:p text:style-name="P15"><text:span text:style-name="T13"><text:s text:c="12"/></text:span><text:span text:style-name="T6">if</text:span><text:span text:style-name="T13">(push = </text:span><text:span text:style-name="T34">'1'</text:span><text:span text:style-name="T13">) </text:span><text:span text:style-name="T6">and</text:span><text:span text:style-name="T13"> (pop = </text:span><text:span text:style-name="T34">'0'</text:span><text:span text:style-name="T13">) </text:span><text:span text:style-name="T6">and</text:span><text:span text:style-name="T13"> (f = </text:span><text:span text:style-name="T34">'0'</text:span><text:span text:style-name="T13">) </text:span><text:span text:style-name="T6">then</text:span></text:p>
        <text:p text:style-name="P16"><text:s text:c="16"/>ai &lt;= bump(ai);</text:p>
        <text:p text:style-name="P15"><text:span text:style-name="T13"><text:s text:c="16"/>diff &lt;= diff </text:span><text:span text:style-name="T14">+</text:span><text:span text:style-name="T13"> </text:span><text:span text:style-name="T31">1</text:span><text:span text:style-name="T13">;</text:span></text:p>
        <text:p text:style-name="P15"><text:span text:style-name="T13"><text:s text:c="12"/></text:span><text:span text:style-name="T6">elsif</text:span><text:span text:style-name="T13">(push = </text:span><text:span text:style-name="T34">'0'</text:span><text:span text:style-name="T13">) </text:span><text:span text:style-name="T6">and</text:span><text:span text:style-name="T13"> (pop = </text:span><text:span text:style-name="T34">'1'</text:span><text:span text:style-name="T13">) </text:span><text:span text:style-name="T6">and</text:span><text:span text:style-name="T13"> (e = </text:span><text:span text:style-name="T34">'0'</text:span><text:span text:style-name="T13">) </text:span><text:span text:style-name="T6">then</text:span></text:p>
        <text:p text:style-name="P16"><text:s text:c="16"/>ao &lt;= bump(ao);</text:p>
        <text:p text:style-name="P15"><text:span text:style-name="T13"><text:s text:c="16"/>diff &lt;= diff</text:span><text:span text:style-name="T14">-</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3"><text:span text:style-name="T6">end</text:span><text:span text:style-name="T15"> rtl;</text:span></text:p>
      </text:section>
      <text:p text:style-name="P12"/>
      <text:p text:style-name="P17"/>
      <text:p text:style-name="P16"><text:soft-page-break/></text:p>
      <text:p text:style-name="P12"><draw:frame draw:style-name="fr1" draw:name="graphics66" text:anchor-type="paragraph" svg:x="0.0693in" svg:y="0.0665in" svg:width="10.3083in" svg:height="6.872in" draw:z-index="15"><draw:image xlink:href="Pictures/2000000700005E4300004D35581985FE.svm" xlink:type="simple" xlink:show="embed" xlink:actuate="onLoad"/></draw:frame></text:p>
      <text:p text:style-name="P12"/>
      <text:p text:style-name="P12"/>
      <text:p text:style-name="P12"><text:soft-page-break/><text:span text:style-name="T1">CRC GEN</text:span> </text:p>
      <text:p text:style-name="P12"/>
      <text:p text:style-name="P12"><text:span text:style-name="T6">library</text:span><text:span text:style-name="T15"> </text:span><text:span text:style-name="T23">ieee</text:span><text:span text:style-name="T15">;</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package</text:span><text:span text:style-name="T13"> </text:span><text:span text:style-name="T22">crcpack</text:span><text:span text:style-name="T13"> </text:span><text:span text:style-name="T6">is</text:span></text:p>
      <text:p text:style-name="P16"/>
      <text:p text:style-name="P15"><text:span text:style-name="T13"><text:s text:c="4"/></text:span><text:span text:style-name="T6">constant</text:span><text:span text:style-name="T13"> </text:span><text:span text:style-name="T7">crcdim</text:span><text:span text:style-name="T13">: </text:span><text:span text:style-name="T28">integer</text:span><text:span text:style-name="T13"> := </text:span><text:span text:style-name="T31">16</text:span><text:span text:style-name="T13">;</text:span></text:p>
      <text:p text:style-name="P15"><text:span text:style-name="T13"><text:s text:c="4"/></text:span><text:span text:style-name="T6">constant</text:span><text:span text:style-name="T13"> </text:span><text:span text:style-name="T7">crc16</text:span><text:span text:style-name="T13">: </text:span><text:span text:style-name="T28">std_logic_vector</text:span><text:span text:style-name="T13">(</text:span><text:span text:style-name="T7">crcdim</text:span><text:span text:style-name="T13"> </text:span><text:span text:style-name="T6">downto</text:span><text:span text:style-name="T13"> </text:span><text:span text:style-name="T31">0</text:span><text:span text:style-name="T13">) := </text:span><text:span text:style-name="T34">"11000000000000101"</text:span><text:span text:style-name="T13">;</text:span></text:p>
      <text:p text:style-name="P15"><text:span text:style-name="T13"><text:s text:c="4"/></text:span><text:span text:style-name="T6">constant</text:span><text:span text:style-name="T13"> </text:span><text:span text:style-name="T7">crc</text:span><text:span text:style-name="T13">: </text:span><text:span text:style-name="T28">std_logic_vector</text:span><text:span text:style-name="T13">(</text:span><text:span text:style-name="T7">crcdim</text:span><text:span text:style-name="T13"> </text:span><text:span text:style-name="T6">downto</text:span><text:span text:style-name="T13"> </text:span><text:span text:style-name="T31">0</text:span><text:span text:style-name="T13">) <text:s text:c="4"/>:= </text:span><text:span text:style-name="T7">crc16</text:span><text:span text:style-name="T13">;</text:span></text:p>
      <text:p text:style-name="P15"><text:span text:style-name="T13"><text:s text:c="4"/></text:span><text:span text:style-name="T6">constant</text:span><text:span text:style-name="T13"> </text:span><text:span text:style-name="T7">data_width</text:span><text:span text:style-name="T13">: </text:span><text:span text:style-name="T28">integer</text:span><text:span text:style-name="T13"> </text:span><text:span text:style-name="T6">range</text:span><text:span text:style-name="T13"> </text:span><text:span text:style-name="T31">1</text:span><text:span text:style-name="T13"> </text:span><text:span text:style-name="T6">to</text:span><text:span text:style-name="T13"> </text:span><text:span text:style-name="T7">crcdim</text:span><text:span text:style-name="T13"> <text:s text:c="4"/>:= </text:span><text:span text:style-name="T31">16</text:span><text:span text:style-name="T13">;</text:span></text:p>
      <text:p text:style-name="P16"/>
      <text:p text:style-name="P15"><text:span text:style-name="T13"><text:s text:c="4"/></text:span><text:span text:style-name="T6">type</text:span><text:span text:style-name="T13"> </text:span><text:span text:style-name="T28">matrix</text:span><text:span text:style-name="T13"> </text:span><text:span text:style-name="T6">is</text:span><text:span text:style-name="T13"> </text:span><text:span text:style-name="T6">array</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 </text:span><text:span text:style-name="T6">of</text:span><text:span text:style-name="T13"> </text:span><text:span text:style-name="T28">std_logic_vector</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crcpack</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crcpack</text:span><text:span text:style-name="T13">.</text:span><text:span text:style-name="T6">all</text:span><text:span text:style-name="T13">;</text:span></text:p>
      <text:p text:style-name="P16"/>
      <text:p text:style-name="P15"><text:span text:style-name="T6">entity</text:span><text:span text:style-name="T13"> </text:span><text:span text:style-name="T22">crcgen</text:span><text:span text:style-name="T13"> </text:span><text:span text:style-name="T6">is</text:span><text:span text:style-name="T13"> </text:span><text:span text:style-name="T6">port</text:span><text:span text:style-name="T13">(</text:span></text:p>
      <text:p text:style-name="P15"><text:span text:style-name="T13"><text:s text:c="4"/></text:span><text:span text:style-name="T26">res</text:span><text:span text:style-name="T13">, </text:span><text:span text:style-name="T26">clk</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din</text:span><text:span text:style-name="T13">: </text:span><text:span text:style-name="T6">in</text:span><text:span text:style-name="T13"> </text:span><text:span text:style-name="T28">std_logic_vector</text:span><text:span text:style-name="T13">(</text:span><text:span text:style-name="T7">data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xout</text:span><text:span text:style-name="T13">: <text:s text:c="3"/></text:span><text:span text:style-name="T6">out</text:span><text:span text:style-name="T13"> </text:span><text:span text:style-name="T28">std_logic_vector</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crcgen</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crcgen</text:span><text:span text:style-name="T13"> </text:span><text:span text:style-name="T6">is</text:span></text:p>
      <text:p text:style-name="P15"><text:span text:style-name="T13"><text:s text:c="4"/></text:span><text:span text:style-name="T6">signal</text:span><text:span text:style-name="T13"> </text:span><text:span text:style-name="T39">x</text:span><text:span text:style-name="T13">,</text:span><text:span text:style-name="T39">x1</text:span><text:span text:style-name="T13">,</text:span><text:span text:style-name="T39">x2</text:span><text:span text:style-name="T13">,</text:span><text:span text:style-name="T39">din_s</text:span><text:span text:style-name="T13"> : </text:span><text:span text:style-name="T28">std_logic_vector</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text:span><text:span text:style-name="T26">din</text:span><text:span text:style-name="T13">)</text:span></text:p>
      <text:p text:style-name="P15"><text:span text:style-name="T13"><text:s text:c="8"/></text:span><text:span text:style-name="T6">variable</text:span><text:span text:style-name="T13"> </text:span><text:span text:style-name="T30">din_v</text:span><text:span text:style-name="T13"> : </text:span><text:span text:style-name="T28">std_logic_vector</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begin</text:span></text:p>
      <text:p text:style-name="P15"><text:span text:style-name="T13"><text:s text:c="8"/></text:span><text:span text:style-name="T30">din_v</text:span><text:span text:style-name="T13"> := (</text:span><text:span text:style-name="T6">others</text:span><text:span text:style-name="T13"> =&gt; </text:span><text:span text:style-name="T34">'0'</text:span><text:span text:style-name="T13">);</text:span></text:p>
      <text:p text:style-name="P15"><text:span text:style-name="T13"><text:s text:c="8"/></text:span><text:span text:style-name="T30">din_v</text:span><text:span text:style-name="T13">(</text:span><text:span text:style-name="T7">data_width</text:span><text:span text:style-name="T14">-</text:span><text:span text:style-name="T31">1</text:span><text:span text:style-name="T13"> </text:span><text:span text:style-name="T6">downto</text:span><text:span text:style-name="T13"> </text:span><text:span text:style-name="T31">0</text:span><text:span text:style-name="T13">) := </text:span><text:span text:style-name="T26">din</text:span><text:span text:style-name="T13">; <text:s text:c="3"/></text:span><text:span text:style-name="T36">--lfsr</text:span></text:p>
      <text:p text:style-name="P15"><text:span text:style-name="T13"><text:s text:c="8"/></text:span><text:span text:style-name="T36">--din_v(crcdim-1 downto crcdim-data_width) := din; <text:s/>--lfsr2</text:span></text:p>
      <text:p text:style-name="P15"><text:span text:style-name="T13"><text:s text:c="8"/></text:span><text:span text:style-name="T39">din_s</text:span><text:span text:style-name="T13"> &lt;= </text:span><text:span text:style-name="T30">din_v</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x2</text:span><text:span text:style-name="T13"> &lt;= </text:span><text:span text:style-name="T39">x</text:span><text:span text:style-name="T13">; </text:span><text:span text:style-name="T36">--lfsr</text:span></text:p>
      <text:p text:style-name="P15"><text:span text:style-name="T13"><text:s text:c="4"/></text:span><text:span text:style-name="T36">--x2 &lt;= x xor din_s; lfsr2</text:span></text:p>
      <text:p text:style-name="P16"/>
      <text:p text:style-name="P15"><text:span text:style-name="T13"><text:s text:c="4"/></text:span><text:span text:style-name="T6">process</text:span><text:span text:style-name="T13">(</text:span><text:span text:style-name="T26">res</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es</text:span><text:span text:style-name="T13"> = </text:span><text:span text:style-name="T34">'0'</text:span><text:span text:style-name="T13"> </text:span><text:span text:style-name="T6">then</text:span><text:span text:style-name="T13"> </text:span><text:span text:style-name="T39">x</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x</text:span><text:span text:style-name="T13"> &lt;= </text:span><text:span text:style-name="T39">x1</text:span><text:span text:style-name="T13"> </text:span><text:span text:style-name="T6">xor</text:span><text:span text:style-name="T13"> </text:span><text:span text:style-name="T39">din_s</text:span><text:span text:style-name="T13">; </text:span><text:span text:style-name="T36">--lfsr</text:span></text:p>
      <text:p text:style-name="P15"><text:span text:style-name="T13"><text:s text:c="12"/></text:span><text:span text:style-name="T36">--x &lt;= x1; --lfsr2</text:span></text:p>
      <text:p text:style-name="P15"><text:span text:style-name="T13"><text:s text:c="4"/></text:span><text:span text:style-name="T6">end</text:span><text:span text:style-name="T13"> </text:span><text:span text:style-name="T6">if</text:span><text:span text:style-name="T13">;</text:span></text:p>
      <text:p text:style-name="P15"><text:span text:style-name="T6">end</text:span><text:span text:style-name="T13"> </text:span><text:span text:style-name="T6">process</text:span><text:span text:style-name="T13">;</text:span></text:p>
      <text:p text:style-name="P15"><draw:frame draw:style-name="fr2" draw:name="graphics69" text:anchor-type="paragraph" svg:x="5.8953in" svg:y="0.0299in" svg:width="4.1362in" svg:height="7.7193in" draw:z-index="16"><draw:image xlink:href="Pictures/200000070000290900004C97CE0EAF90.svm" xlink:type="simple" xlink:show="embed" xlink:actuate="onLoad"/></draw:frame><text:soft-page-break/><text:span text:style-name="T26">xout</text:span><text:span text:style-name="T13"> &lt;= </text:span><text:span text:style-name="T39">x</text:span><text:span text:style-name="T13">;</text:span></text:p>
      <text:p text:style-name="P16"/>
      <text:p text:style-name="P24">--this process build matrix m = f^w</text:p>
      <text:p text:style-name="P15"><text:span text:style-name="T6">process</text:span><text:span text:style-name="T13">(</text:span><text:span text:style-name="T39">x2</text:span><text:span text:style-name="T13">)</text:span></text:p>
      <text:p text:style-name="P15"><text:span text:style-name="T13"><text:s text:c="4"/></text:span><text:span text:style-name="T6">variable</text:span><text:span text:style-name="T13"> </text:span><text:span text:style-name="T30">xtemp</text:span><text:span text:style-name="T13">, </text:span><text:span text:style-name="T30">vect</text:span><text:span text:style-name="T13">, </text:span><text:span text:style-name="T30">vect2</text:span><text:span text:style-name="T13"> : </text:span><text:span text:style-name="T28">std_logic_vector</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variable</text:span><text:span text:style-name="T13"> <text:s text:c="3"/></text:span><text:span text:style-name="T30">m</text:span><text:span text:style-name="T13">, </text:span><text:span text:style-name="T30">f</text:span><text:span text:style-name="T13"> : </text:span><text:span text:style-name="T28">matrix</text:span><text:span text:style-name="T13">;</text:span></text:p>
      <text:p text:style-name="P23">begin</text:p>
      <text:p text:style-name="P15"><text:span text:style-name="T13"><text:s text:c="4"/></text:span><text:span text:style-name="T36">--matrix f</text:span></text:p>
      <text:p text:style-name="P15"><text:span text:style-name="T13"><text:s text:c="4"/></text:span><text:span text:style-name="T30">f</text:span><text:span text:style-name="T13">(</text:span><text:span text:style-name="T31">0</text:span><text:span text:style-name="T13">) := </text:span><text:span text:style-name="T7">crc</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7">crcdim</text:span><text:span text:style-name="T14">-</text:span><text:span text:style-name="T31">2</text:span><text:span text:style-name="T13"> </text:span><text:span text:style-name="T6">loop</text:span></text:p>
      <text:p text:style-name="P15"><text:span text:style-name="T13"><text:s text:c="8"/></text:span><text:span text:style-name="T30">vect</text:span><text:span text:style-name="T13"> <text:s text:c="3"/>:= (</text:span><text:span text:style-name="T6">others</text:span><text:span text:style-name="T13"> =&gt; </text:span><text:span text:style-name="T34">'0'</text:span><text:span text:style-name="T13">);</text:span></text:p>
      <text:p text:style-name="P15"><text:span text:style-name="T13"><text:s text:c="8"/></text:span><text:span text:style-name="T30">vect</text:span><text:span text:style-name="T13">(</text:span><text:span text:style-name="T7">crcdim</text:span><text:span text:style-name="T14">-</text:span><text:span text:style-name="T13">i</text:span><text:span text:style-name="T14">-</text:span><text:span text:style-name="T31">1</text:span><text:span text:style-name="T13">) := </text:span><text:span text:style-name="T34">'1'</text:span><text:span text:style-name="T13">;</text:span></text:p>
      <text:p text:style-name="P15"><text:span text:style-name="T13"><text:s text:c="8"/></text:span><text:span text:style-name="T30">f</text:span><text:span text:style-name="T13">(i</text:span><text:span text:style-name="T14">+</text:span><text:span text:style-name="T31">1</text:span><text:span text:style-name="T13">) := </text:span><text:span text:style-name="T30">vect</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36">--matrix m = f^w</text:span></text:p>
      <text:p text:style-name="P15"><text:span text:style-name="T13"><text:s text:c="4"/></text:span><text:span text:style-name="T30">m</text:span><text:span text:style-name="T13">(</text:span><text:span text:style-name="T7">data_width</text:span><text:span text:style-name="T14">-</text:span><text:span text:style-name="T31">1</text:span><text:span text:style-name="T13">) := </text:span><text:span text:style-name="T7">crc</text:span><text:span text:style-name="T13">(</text:span><text:span text:style-name="T7">crcdim</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for</text:span><text:span text:style-name="T13"> k </text:span><text:span text:style-name="T6">in</text:span><text:span text:style-name="T13"> </text:span><text:span text:style-name="T31">2</text:span><text:span text:style-name="T13"> </text:span><text:span text:style-name="T6">to</text:span><text:span text:style-name="T13"> </text:span><text:span text:style-name="T7">data_width</text:span><text:span text:style-name="T13"> </text:span><text:span text:style-name="T6">loop</text:span></text:p>
      <text:p text:style-name="P15"><text:span text:style-name="T13"><text:s text:c="8"/></text:span><text:span text:style-name="T30">vect2</text:span><text:span text:style-name="T13"> := </text:span><text:span text:style-name="T30">m</text:span><text:span text:style-name="T13">(</text:span><text:span text:style-name="T7">data_width</text:span><text:span text:style-name="T14">-</text:span><text:span text:style-name="T13">k</text:span><text:span text:style-name="T14">+</text:span><text:span text:style-name="T31">1</text:span><text:span text:style-name="T13">);</text:span></text:p>
      <text:p text:style-name="P15"><text:span text:style-name="T13"><text:s text:c="8"/></text:span><text:span text:style-name="T30">vect</text:span><text:span text:style-name="T13"> <text:s text:c="3"/>:= (</text:span><text:span text:style-name="T6">others</text:span><text:span text:style-name="T13"> =&gt; </text:span><text:span text:style-name="T34">'0'</text:span><text:span text:style-name="T13">);</text:span></text:p>
      <text:p text:style-name="P15"><text:span text:style-name="T13"><text:s text:c="8"/></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7">crcdim</text:span><text:span text:style-name="T14">-</text:span><text:span text:style-name="T31">1</text:span><text:span text:style-name="T13"> </text:span><text:span text:style-name="T6">loop</text:span></text:p>
      <text:p text:style-name="P15"><text:span text:style-name="T13"><text:s text:c="12"/></text:span><text:span text:style-name="T6">if</text:span><text:span text:style-name="T13"> </text:span><text:span text:style-name="T30">vect2</text:span><text:span text:style-name="T13">(</text:span><text:span text:style-name="T7">crcdim</text:span><text:span text:style-name="T14">-</text:span><text:span text:style-name="T31">1</text:span><text:span text:style-name="T14">-</text:span><text:span text:style-name="T13">i) = </text:span><text:span text:style-name="T34">'1'</text:span><text:span text:style-name="T13"> </text:span><text:span text:style-name="T6">then</text:span></text:p>
      <text:p text:style-name="P15"><text:span text:style-name="T13"><text:s text:c="16"/></text:span><text:span text:style-name="T30">vect</text:span><text:span text:style-name="T13"> := </text:span><text:span text:style-name="T30">vect</text:span><text:span text:style-name="T13"> </text:span><text:span text:style-name="T6">xor</text:span><text:span text:style-name="T13"> </text:span><text:span text:style-name="T30">f</text:span><text:span text:style-name="T13">(i);</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30">m</text:span><text:span text:style-name="T13">(</text:span><text:span text:style-name="T7">data_width</text:span><text:span text:style-name="T14">-</text:span><text:span text:style-name="T13">k) := </text:span><text:span text:style-name="T30">vect</text:span><text:span text:style-name="T13">;</text:span></text:p>
      <text:p text:style-name="P15"><text:span text:style-name="T13"><text:s text:c="4"/></text:span><text:span text:style-name="T6">end</text:span><text:span text:style-name="T13"> </text:span><text:span text:style-name="T6">loop</text:span><text:span text:style-name="T13">;</text:span></text:p>
      <text:p text:style-name="P16"/>
      <text:p text:style-name="P15"><text:span text:style-name="T13"><text:s text:c="4"/></text:span><text:span text:style-name="T6">for</text:span><text:span text:style-name="T13"> k </text:span><text:span text:style-name="T6">in</text:span><text:span text:style-name="T13"> </text:span><text:span text:style-name="T7">data_width</text:span><text:span text:style-name="T14">-</text:span><text:span text:style-name="T31">1</text:span><text:span text:style-name="T13"> </text:span><text:span text:style-name="T6">to</text:span><text:span text:style-name="T13"> </text:span><text:span text:style-name="T7">crcdim</text:span><text:span text:style-name="T14">-</text:span><text:span text:style-name="T31">1</text:span><text:span text:style-name="T13"> </text:span><text:span text:style-name="T6">loop</text:span></text:p>
      <text:p text:style-name="P15"><text:span text:style-name="T13"><text:s text:c="8"/></text:span><text:span text:style-name="T30">m</text:span><text:span text:style-name="T13">(k) := </text:span><text:span text:style-name="T30">f</text:span><text:span text:style-name="T13">(k</text:span><text:span text:style-name="T14">-</text:span><text:span text:style-name="T7">data_width</text:span><text:span text:style-name="T14">+</text:span><text:span text:style-name="T31">1</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36">--combinatinal logic equations: x1 = m(x)x</text:span></text:p>
      <text:p text:style-name="P15"><text:span text:style-name="T13"><text:s text:c="4"/></text:span><text:span text:style-name="T30">xtemp</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7">crcdim</text:span><text:span text:style-name="T14">-</text:span><text:span text:style-name="T31">1</text:span><text:span text:style-name="T13"> </text:span><text:span text:style-name="T6">loop</text:span></text:p>
      <text:p text:style-name="P15"><text:span text:style-name="T13"><text:s text:c="8"/></text:span><text:span text:style-name="T30">vect</text:span><text:span text:style-name="T13"> := </text:span><text:span text:style-name="T30">m</text:span><text:span text:style-name="T13">(i);</text:span></text:p>
      <text:p text:style-name="P15"><text:span text:style-name="T13"><text:s text:c="8"/></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7">crcdim</text:span><text:span text:style-name="T14">-</text:span><text:span text:style-name="T31">1</text:span><text:span text:style-name="T13"> </text:span><text:span text:style-name="T6">loop</text:span></text:p>
      <text:p text:style-name="P15"><text:span text:style-name="T13"><text:s text:c="12"/></text:span><text:span text:style-name="T6">if</text:span><text:span text:style-name="T13"> </text:span><text:span text:style-name="T30">vect</text:span><text:span text:style-name="T13">(j) = </text:span><text:span text:style-name="T34">'1'</text:span><text:span text:style-name="T13"> </text:span><text:span text:style-name="T6">then</text:span></text:p>
      <text:p text:style-name="P15"><text:span text:style-name="T13"><text:s text:c="16"/></text:span><text:span text:style-name="T30">xtemp</text:span><text:span text:style-name="T13">(j) := </text:span><text:span text:style-name="T30">xtemp</text:span><text:span text:style-name="T13">(j) </text:span><text:span text:style-name="T6">xor</text:span><text:span text:style-name="T13"> </text:span><text:span text:style-name="T39">x2</text:span><text:span text:style-name="T13">(</text:span><text:span text:style-name="T7">crcdim</text:span><text:span text:style-name="T14">-</text:span><text:span text:style-name="T31">1</text:span><text:span text:style-name="T14">-</text:span><text:span text:style-name="T13">i);</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39">x1</text:span><text:span text:style-name="T13"> &lt;= </text:span><text:span text:style-name="T30">xtemp</text:span><text:span text:style-name="T13">;</text:span></text:p>
      <text:p text:style-name="P15"><text:span text:style-name="T6">end</text:span><text:span text:style-name="T13"> </text:span><text:span text:style-name="T6">process</text:span><text:span text:style-name="T13">;</text:span></text:p>
      <text:p text:style-name="P15"><text:span text:style-name="T6">end</text:span><text:span text:style-name="T13"> </text:span><text:span text:style-name="T22">rtl</text:span><text:span text:style-name="T13">;</text:span></text:p>
      <text:p text:style-name="P12"/>
      <text:p text:style-name="P12"/>
      <text:p text:style-name="P12"/>
      <text:p text:style-name="P12"/>
      <text:p text:style-name="P12"/>
      <text:section text:style-name="Sect3" text:name="Section7">
        <text:p text:style-name="P2"><text:soft-page-break/>MOORE</text:p>
        <text:p text:style-name="P12"><text:span text:style-name="T6">library</text:span><text:span text:style-name="T15"> <text:s text:c="3"/></text:span><text:span text:style-name="T23">ieee</text:span><text:span text:style-name="T15">;</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moore</text:span><text:span text:style-name="T13"> </text:span><text:span text:style-name="T6">is</text:span><text:span text:style-name="T13"> </text:span><text:span text:style-name="T6">port</text:span><text:span text:style-name="T13">( <text:s/></text:span><text:span text:style-name="T36">-- moore machine</text:span></text:p>
        <text:p text:style-name="P15"><text:span text:style-name="T13"><text:s text:c="4"/></text:span><text:span text:style-name="T26">x</text:span><text:span text:style-name="T13">, </text:span><text:span text:style-name="T26">clock</text:span><text:span text:style-name="T13">: </text:span><text:span text:style-name="T6">in</text:span><text:span text:style-name="T13"> </text:span><text:span text:style-name="T28">bit</text:span><text:span text:style-name="T13">;</text:span></text:p>
        <text:p text:style-name="P15"><text:span text:style-name="T13"><text:s text:c="4"/></text:span><text:span text:style-name="T26">z</text:span><text:span text:style-name="T13">: </text:span><text:span text:style-name="T6">out</text:span><text:span text:style-name="T13"> </text:span><text:span text:style-name="T28">bit</text:span><text:span text:style-name="T13">);</text:span></text:p>
        <text:p text:style-name="P15"><text:span text:style-name="T6">end</text:span><text:span text:style-name="T13"> </text:span><text:span text:style-name="T22">moore</text:span><text:span text:style-name="T13">;</text:span></text:p>
        <text:p text:style-name="P16"/>
        <text:p text:style-name="P15"><text:span text:style-name="T6">architecture</text:span><text:span text:style-name="T13"> </text:span><text:span text:style-name="T22">behavior</text:span><text:span text:style-name="T13"> </text:span><text:span text:style-name="T6">of</text:span><text:span text:style-name="T13"> </text:span><text:span text:style-name="T22">moore</text:span><text:span text:style-name="T13"> </text:span><text:span text:style-name="T6">is</text:span></text:p>
        <text:p text:style-name="P15"><text:span text:style-name="T13"><text:s text:c="4"/></text:span><text:span text:style-name="T6">type</text:span><text:span text:style-name="T13"> </text:span><text:span text:style-name="T28">state_type</text:span><text:span text:style-name="T13"> </text:span><text:span text:style-name="T6">is</text:span><text:span text:style-name="T13"> (</text:span><text:span text:style-name="T7">s0</text:span><text:span text:style-name="T13">, </text:span><text:span text:style-name="T7">s1</text:span><text:span text:style-name="T13">, </text:span><text:span text:style-name="T7">s2</text:span><text:span text:style-name="T13">, </text:span><text:span text:style-name="T7">s3</text:span><text:span text:style-name="T13">);</text:span></text:p>
        <text:p text:style-name="P15"><text:span text:style-name="T13"><text:s text:c="4"/></text:span><text:span text:style-name="T6">signal</text:span><text:span text:style-name="T13"> </text:span><text:span text:style-name="T39">current_state</text:span><text:span text:style-name="T13">, </text:span><text:span text:style-name="T39">next_state</text:span><text:span text:style-name="T13">: </text:span><text:span text:style-name="T28">state_type</text:span><text:span text:style-name="T13">;</text:span></text:p>
        <text:p text:style-name="P23">begin</text:p>
        <text:p text:style-name="P15"><text:span text:style-name="T13"><text:s text:c="4"/></text:span><text:span text:style-name="T36">-- process to hold combinational logic</text:span></text:p>
        <text:p text:style-name="P15"><text:span text:style-name="T13"><text:s text:c="4"/></text:span><text:span text:style-name="T38">combin</text:span><text:span text:style-name="T13">: </text:span><text:span text:style-name="T6">process</text:span><text:span text:style-name="T13">(</text:span><text:span text:style-name="T39">current_state</text:span><text:span text:style-name="T13">, </text:span><text:span text:style-name="T26">x</text:span><text:span text:style-name="T13">)</text:span></text:p>
        <text:p text:style-name="P15"><text:span text:style-name="T13"><text:s text:c="4"/></text:span><text:span text:style-name="T6">begin</text:span></text:p>
        <text:p text:style-name="P15"><text:span text:style-name="T13"><text:s text:c="8"/></text:span><text:span text:style-name="T6">case</text:span><text:span text:style-name="T13"> </text:span><text:span text:style-name="T39">current_state</text:span><text:span text:style-name="T13"> </text:span><text:span text:style-name="T6">is</text:span></text:p>
        <text:p text:style-name="P15"><text:span text:style-name="T13"><text:s text:c="12"/></text:span><text:span text:style-name="T6">when</text:span><text:span text:style-name="T13"> </text:span><text:span text:style-name="T7">s0</text:span><text:span text:style-name="T13"> =&gt;</text:span></text:p>
        <text:p text:style-name="P27"><text:span text:style-name="T13"><text:s text:c="16"/></text:span><text:span text:style-name="T26">z</text:span><text:span text:style-name="T13"> &lt;= </text:span><text:span text:style-name="T34">'0'</text:span><text:span text:style-name="T13">;</text:span></text:p>
        <text:p text:style-name="P27"><text:span text:style-name="T13"><text:s text:c="16"/></text:span><text:span text:style-name="T6">if</text:span><text:span text:style-name="T13"> </text:span><text:span text:style-name="T26">x</text:span><text:span text:style-name="T13"> = </text:span><text:span text:style-name="T34">'0'</text:span><text:span text:style-name="T13"> </text:span><text:span text:style-name="T6">then</text:span></text:p>
        <text:p text:style-name="P27"><text:span text:style-name="T13"><text:s text:c="20"/></text:span><text:span text:style-name="T39">next_state</text:span><text:span text:style-name="T13"> &lt;= </text:span><text:span text:style-name="T7">s0</text:span><text:span text:style-name="T13">;</text:span></text:p>
        <text:p text:style-name="P27"><text:span text:style-name="T13"><text:s text:c="16"/></text:span><text:span text:style-name="T6">else</text:span></text:p>
        <text:p text:style-name="P27"><text:span text:style-name="T13"><text:s text:c="20"/></text:span><text:span text:style-name="T39">next_state</text:span><text:span text:style-name="T13"> &lt;= </text:span><text:span text:style-name="T7">s2</text:span><text:span text:style-name="T13">;</text:span></text:p>
        <text:p text:style-name="P27"><text:span text:style-name="T13"><text:s text:c="16"/></text:span><text:span text:style-name="T6">end</text:span><text:span text:style-name="T13"> </text:span><text:span text:style-name="T6">if</text:span><text:span text:style-name="T13">;</text:span></text:p>
        <text:p text:style-name="P20"/>
        <text:p text:style-name="P27"><text:span text:style-name="T13"><text:s text:c="12"/></text:span><text:span text:style-name="T6">when</text:span><text:span text:style-name="T13"> </text:span><text:span text:style-name="T7">s1</text:span><text:span text:style-name="T13"> =&gt;</text:span></text:p>
        <text:p text:style-name="P27"><text:span text:style-name="T13"><text:s text:c="16"/></text:span><text:span text:style-name="T26">z</text:span><text:span text:style-name="T13"> &lt;= </text:span><text:span text:style-name="T34">'1'</text:span><text:span text:style-name="T13">;</text:span></text:p>
        <text:p text:style-name="P27"><text:span text:style-name="T13"><text:s text:c="16"/></text:span><text:span text:style-name="T6">if</text:span><text:span text:style-name="T13"> </text:span><text:span text:style-name="T26">x</text:span><text:span text:style-name="T13"> = </text:span><text:span text:style-name="T34">'0'</text:span><text:span text:style-name="T13"> </text:span><text:span text:style-name="T6">then</text:span></text:p>
        <text:p text:style-name="P27"><text:span text:style-name="T13"><text:s text:c="20"/></text:span><text:span text:style-name="T39">next_state</text:span><text:span text:style-name="T13"> &lt;= </text:span><text:span text:style-name="T7">s0</text:span><text:span text:style-name="T13">;</text:span></text:p>
        <text:p text:style-name="P27"><text:span text:style-name="T13"><text:s text:c="16"/></text:span><text:span text:style-name="T6">else</text:span></text:p>
        <text:p text:style-name="P27"><text:span text:style-name="T13"><text:s text:c="20"/></text:span><text:span text:style-name="T39">next_state</text:span><text:span text:style-name="T13"> &lt;= </text:span><text:span text:style-name="T7">s2</text:span><text:span text:style-name="T13">;</text:span></text:p>
        <text:p text:style-name="P27"><text:span text:style-name="T13"><text:s text:c="16"/></text:span><text:span text:style-name="T6">end</text:span><text:span text:style-name="T13"> </text:span><text:span text:style-name="T6">if</text:span><text:span text:style-name="T13">;</text:span></text:p>
        <text:p text:style-name="P20"/>
        <text:p text:style-name="P27"><text:span text:style-name="T13"><text:s text:c="12"/></text:span><text:span text:style-name="T6">when</text:span><text:span text:style-name="T13"> </text:span><text:span text:style-name="T7">s2</text:span><text:span text:style-name="T13"> =&gt;</text:span></text:p>
        <text:p text:style-name="P27"><text:span text:style-name="T13"><text:s text:c="16"/></text:span><text:span text:style-name="T26">z</text:span><text:span text:style-name="T13"> &lt;= </text:span><text:span text:style-name="T34">'1'</text:span><text:span text:style-name="T13">;</text:span></text:p>
        <text:p text:style-name="P27"><text:span text:style-name="T13"><text:s text:c="16"/></text:span><text:span text:style-name="T6">if</text:span><text:span text:style-name="T13"> </text:span><text:span text:style-name="T26">x</text:span><text:span text:style-name="T13"> = </text:span><text:span text:style-name="T34">'0'</text:span><text:span text:style-name="T13"> </text:span><text:span text:style-name="T6">then</text:span></text:p>
        <text:p text:style-name="P27"><text:span text:style-name="T13"><text:s text:c="20"/></text:span><text:span text:style-name="T39">next_state</text:span><text:span text:style-name="T13"> &lt;= </text:span><text:span text:style-name="T7">s2</text:span><text:span text:style-name="T13">;</text:span></text:p>
        <text:p text:style-name="P27"><text:span text:style-name="T13"><text:s text:c="16"/></text:span><text:span text:style-name="T6">else</text:span></text:p>
        <text:p text:style-name="P27"><text:span text:style-name="T13"><text:s text:c="20"/></text:span><text:span text:style-name="T39">next_state</text:span><text:span text:style-name="T13"> &lt;= </text:span><text:span text:style-name="T7">s3</text:span><text:span text:style-name="T13">;</text:span></text:p>
        <text:p text:style-name="P27"><text:span text:style-name="T13"><text:s text:c="16"/></text:span><text:span text:style-name="T6">end</text:span><text:span text:style-name="T13"> </text:span><text:span text:style-name="T6">if</text:span><text:span text:style-name="T13">;</text:span></text:p>
        <text:p text:style-name="P20"/>
        <text:p text:style-name="P27"><text:span text:style-name="T13"><text:s text:c="12"/></text:span><text:span text:style-name="T6">when</text:span><text:span text:style-name="T13"> </text:span><text:span text:style-name="T7">s3</text:span><text:span text:style-name="T13"> =&gt;</text:span></text:p>
        <text:p text:style-name="P27"><text:span text:style-name="T13"><text:s text:c="16"/></text:span><text:span text:style-name="T26">z</text:span><text:span text:style-name="T13"> &lt;= </text:span><text:span text:style-name="T34">'0'</text:span><text:span text:style-name="T13">;</text:span></text:p>
        <text:p text:style-name="P27"><text:span text:style-name="T13"><text:s text:c="16"/></text:span><text:span text:style-name="T6">if</text:span><text:span text:style-name="T13"> </text:span><text:span text:style-name="T26">x</text:span><text:span text:style-name="T13"> = </text:span><text:span text:style-name="T34">'0'</text:span><text:span text:style-name="T13"> </text:span><text:span text:style-name="T6">then</text:span></text:p>
        <text:p text:style-name="P27"><text:span text:style-name="T13"><text:s text:c="20"/></text:span><text:span text:style-name="T39">next_state</text:span><text:span text:style-name="T13"> &lt;= </text:span><text:span text:style-name="T7">s3</text:span><text:span text:style-name="T13">;</text:span></text:p>
        <text:p text:style-name="P27"><text:span text:style-name="T13"><text:s text:c="16"/></text:span><text:span text:style-name="T6">else</text:span></text:p>
        <text:p text:style-name="P9"><text:span text:style-name="T13"><text:s text:c="20"/></text:span><text:span text:style-name="T39">next_state</text:span><text:span text:style-name="T13"> &lt;= </text:span><text:span text:style-name="T7">s1</text:span><text:span text:style-name="T13">;</text:span></text:p>
        <text:p text:style-name="P15"><text:span text:style-name="T6"><text:tab/> <text:s text:c="4"/>end</text:span><text:span text:style-name="T13"> </text:span><text:span text:style-name="T6">if</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process to hold synchronous elements (flip–flops)</text:p>
        <text:p text:style-name="P15"><text:span text:style-name="T13"><text:s text:c="4"/></text:span><text:span text:style-name="T38">synch</text:span><text:span text:style-name="T13">: </text:span><text:span text:style-name="T6">process</text:span></text:p>
        <text:p text:style-name="P15"><text:span text:style-name="T13"><text:s text:c="4"/></text:span><text:span text:style-name="T6">begin</text:span></text:p>
        <text:p text:style-name="P15"><text:span text:style-name="T13"><text:s text:c="8"/></text:span><text:span text:style-name="T6">wait</text:span><text:span text:style-name="T13"> </text:span><text:span text:style-name="T6">until</text:span><text:span text:style-name="T13"> </text:span><text:span text:style-name="T26">clock</text:span><text:span text:style-name="T33">'event</text:span><text:span text:style-name="T13"> </text:span><text:span text:style-name="T6">and</text:span><text:span text:style-name="T13"> </text:span><text:span text:style-name="T26">clock</text:span><text:span text:style-name="T13"> = </text:span><text:span text:style-name="T34">'1'</text:span><text:span text:style-name="T13">;</text:span></text:p>
        <text:p text:style-name="P15"><text:span text:style-name="T13"><text:s text:c="8"/></text:span><text:span text:style-name="T39">current_state</text:span><text:span text:style-name="T13"> &lt;= </text:span><text:span text:style-name="T39">next_stat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3"><text:span text:style-name="T8">end</text:span><text:span text:style-name="T13"> </text:span><text:span text:style-name="T22">behavior</text:span><text:span text:style-name="T13">;</text:span></text:p>
      </text:section>
      <text:p text:style-name="P2"><draw:frame draw:style-name="fr1" draw:name="graphics71" text:anchor-type="paragraph" svg:x="0.1752in" svg:y="0.1445in" svg:width="5.8484in" svg:height="1.1173in" draw:z-index="17"><draw:image xlink:href="Pictures/200000070000453F00001E49573F52C2.svm" xlink:type="simple" xlink:show="embed" xlink:actuate="onLoad"/></draw:frame><draw:frame draw:style-name="fr1" draw:name="graphics72" text:anchor-type="paragraph" svg:x="4.0028in" svg:y="1.0909in" svg:width="6.5272in" svg:height="2.1209in" draw:z-index="18"><draw:image xlink:href="Pictures/20000007000044F10000184BE20D2AC3.svm" xlink:type="simple" xlink:show="embed" xlink:actuate="onLoad"/></draw:frame></text:p>
      <text:p text:style-name="P17"/>
      <text:p text:style-name="P16"/>
      <text:p text:style-name="P32"><text:soft-page-break/>UNIVERSAL BINARY COUNTER</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23"/>
      <text:p text:style-name="P15"><text:span text:style-name="T6">entity</text:span><text:span text:style-name="T13"> </text:span><text:span text:style-name="T22">tdm</text:span><text:span text:style-name="T13"> </text:span><text:span text:style-name="T6">is</text:span><text:span text:style-name="T13"> <text:s/></text:span><text:span text:style-name="T36">-- univ binary counter</text:span></text:p>
      <text:p text:style-name="P15"><text:span text:style-name="T13"><text:s text:c="4"/></text:span><text:span text:style-name="T6">generic</text:span><text:span text:style-name="T13">(</text:span><text:span text:style-name="T7">n</text:span><text:span text:style-name="T13">: </text:span><text:span text:style-name="T28">integer</text:span><text:span text:style-name="T13"> :=</text:span><text:span text:style-name="T31">8</text:span><text:span text:style-name="T13">);</text:span></text:p>
      <text:p text:style-name="P15"><text:span text:style-name="T13"><text:s text:c="4"/></text:span><text:span text:style-name="T6">port</text:span><text:span text:style-name="T13">(</text:span></text:p>
      <text:p text:style-name="P15"><text:span text:style-name="T13"><text:s text:c="8"/></text:span><text:span text:style-name="T26">clk</text:span><text:span text:style-name="T13">, </text:span><text:span text:style-name="T26">reset</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syn_clr</text:span><text:span text:style-name="T13">, </text:span><text:span text:style-name="T26">load</text:span><text:span text:style-name="T13">, </text:span><text:span text:style-name="T26">en</text:span><text:span text:style-name="T13">, </text:span><text:span text:style-name="T26">up</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d</text:span><text:span text:style-name="T13">: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max_tick</text:span><text:span text:style-name="T13">, </text:span><text:span text:style-name="T26">min_tick</text:span><text:span text:style-name="T13">: </text:span><text:span text:style-name="T6">out</text:span><text:span text:style-name="T13"> </text:span><text:span text:style-name="T28">std_logic</text:span><text:span text:style-name="T13">;</text:span></text:p>
      <text:p text:style-name="P15"><draw:frame draw:style-name="fr2" draw:name="graphics77" text:anchor-type="paragraph" svg:x="4.5709in" svg:y="0.0484in" svg:width="6.0016in" svg:height="4.2354in" draw:z-index="19"><draw:image xlink:href="Pictures/2000000700006F01000049971E8DB3B4.svm" xlink:type="simple" xlink:show="embed" xlink:actuate="onLoad"/></draw:frame><text:span text:style-name="T13"> <text:s text:c="7"/></text:span><text:span text:style-name="T26">q</text:span><text:span text:style-name="T13">: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tdm</text:span><text:span text:style-name="T13">;</text:span></text:p>
      <text:p text:style-name="P15"><text:span text:style-name="T6">architecture</text:span><text:span text:style-name="T13"> </text:span><text:span text:style-name="T22">arch</text:span><text:span text:style-name="T13"> </text:span><text:span text:style-name="T6">of</text:span><text:span text:style-name="T13"> </text:span><text:span text:style-name="T22">tdm</text:span><text:span text:style-name="T13"> </text:span><text:span text:style-name="T6">is</text:span></text:p>
      <text:p text:style-name="P15"><text:span text:style-name="T13"><text:s text:c="4"/></text:span><text:span text:style-name="T6">signal</text:span><text:span text:style-name="T13"> </text:span><text:span text:style-name="T39">r_reg</text:span><text:span text:style-name="T13">: </text:span><text:span text:style-name="T28">unsigned</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r_next</text:span><text:span text:style-name="T13">: </text:span><text:span text:style-name="T28">unsigned</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6">--register</text:span></text:p>
      <text:p text:style-name="P15"><text:span text:style-name="T13"><text:s text:c="4"/></text:span><text:span text:style-name="T6">process</text:span><text:span text:style-name="T13">(</text:span><text:span text:style-name="T26">clk</text:span><text:span text:style-name="T13">, reset)</text:span></text:p>
      <text:p text:style-name="P15"><text:span text:style-name="T13"><text:s text:c="4"/></text:span><text:span text:style-name="T6">begin</text:span></text:p>
      <text:p text:style-name="P15"><text:span text:style-name="T13"><text:s text:c="8"/></text:span><text:span text:style-name="T6">if</text:span><text:span text:style-name="T13"> reset = </text:span><text:span text:style-name="T34">'1'</text:span><text:span text:style-name="T13"> </text:span><text:span text:style-name="T6">then</text:span></text:p>
      <text:p text:style-name="P15"><text:span text:style-name="T13"><text:s text:c="12"/></text:span><text:span text:style-name="T39">r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r_reg</text:span><text:span text:style-name="T13"> &lt;= </text:span><text:span text:style-name="T39">r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next state logic</text:span></text:p>
      <text:p text:style-name="P15"><text:span text:style-name="T13"><text:s text:c="4"/></text:span><text:span text:style-name="T39">r_next</text:span><text:span text:style-name="T13"> &lt;= <text:s text:c="3"/>(</text:span><text:span text:style-name="T6">others</text:span><text:span text:style-name="T13"> =&gt; </text:span><text:span text:style-name="T34">'0'</text:span><text:span text:style-name="T13">) </text:span><text:span text:style-name="T6">when</text:span><text:span text:style-name="T13"> syn_clr = </text:span><text:span text:style-name="T34">'1'</text:span><text:span text:style-name="T13"> </text:span><text:span text:style-name="T6">else</text:span></text:p>
      <text:p text:style-name="P15"><text:span text:style-name="T13"><text:s text:c="8"/></text:span><text:span text:style-name="T28">unsigned</text:span><text:span text:style-name="T13">(d) <text:s text:c="7"/></text:span><text:span text:style-name="T6">when</text:span><text:span text:style-name="T13"> load = </text:span><text:span text:style-name="T34">'1'</text:span><text:span text:style-name="T13"> </text:span><text:span text:style-name="T6">else</text:span></text:p>
      <text:p text:style-name="P15"><text:span text:style-name="T13"><text:s text:c="8"/></text:span><text:span text:style-name="T39">r_reg</text:span><text:span text:style-name="T13"> </text:span><text:span text:style-name="T14">+</text:span><text:span text:style-name="T13"> </text:span><text:span text:style-name="T31">1</text:span><text:span text:style-name="T13"> <text:s text:c="9"/></text:span><text:span text:style-name="T6">when</text:span><text:span text:style-name="T13"> en = </text:span><text:span text:style-name="T34">'1'</text:span><text:span text:style-name="T13"> </text:span><text:span text:style-name="T6">and</text:span><text:span text:style-name="T13"> up = </text:span><text:span text:style-name="T34">'1'</text:span><text:span text:style-name="T13"> </text:span><text:span text:style-name="T6">else</text:span></text:p>
      <text:p text:style-name="P15"><text:span text:style-name="T13"><text:s text:c="8"/></text:span><text:span text:style-name="T39">r_reg</text:span><text:span text:style-name="T13"> </text:span><text:span text:style-name="T14">-</text:span><text:span text:style-name="T13"> </text:span><text:span text:style-name="T31">1</text:span><text:span text:style-name="T13"> <text:s text:c="9"/></text:span><text:span text:style-name="T6">when</text:span><text:span text:style-name="T13"> en = </text:span><text:span text:style-name="T34">'1'</text:span><text:span text:style-name="T13"> </text:span><text:span text:style-name="T6">and</text:span><text:span text:style-name="T13"> up = </text:span><text:span text:style-name="T34">'0'</text:span><text:span text:style-name="T13"> </text:span><text:span text:style-name="T6">else</text:span></text:p>
      <text:p text:style-name="P15"><text:span text:style-name="T13"><text:s text:c="8"/></text:span><text:span text:style-name="T39">r_reg</text:span><text:span text:style-name="T13">;</text:span></text:p>
      <text:p text:style-name="P15"><text:span text:style-name="T13"><text:s text:c="8"/></text:span><text:span text:style-name="T36">--output logic</text:span></text:p>
      <text:p text:style-name="P15"><text:span text:style-name="T13"><text:s text:c="8"/>q &lt;= </text:span><text:span text:style-name="T28">std_logic_vector</text:span><text:span text:style-name="T13">(</text:span><text:span text:style-name="T39">r_reg</text:span><text:span text:style-name="T13">);</text:span></text:p>
      <text:p text:style-name="P15"><text:span text:style-name="T13"><text:s text:c="8"/>max_tick &lt;= </text:span><text:span text:style-name="T34">'1'</text:span><text:span text:style-name="T13"> </text:span><text:span text:style-name="T6">when</text:span><text:span text:style-name="T13"> </text:span><text:span text:style-name="T39">r_reg</text:span><text:span text:style-name="T13"> = (</text:span><text:span text:style-name="T31">2</text:span><text:span text:style-name="T14">**</text:span><text:span text:style-name="T7">n</text:span><text:span text:style-name="T14">-</text:span><text:span text:style-name="T31">1</text:span><text:span text:style-name="T13">) </text:span><text:span text:style-name="T6">else</text:span><text:span text:style-name="T13"> </text:span><text:span text:style-name="T34">'0'</text:span><text:span text:style-name="T13">;</text:span></text:p>
      <text:p text:style-name="P15"><text:span text:style-name="T13"><text:s text:c="8"/>min_tick &lt;= </text:span><text:span text:style-name="T34">'1'</text:span><text:span text:style-name="T13"> </text:span><text:span text:style-name="T6">when</text:span><text:span text:style-name="T13"> </text:span><text:span text:style-name="T39">r_reg</text:span><text:span text:style-name="T13"> = </text:span><text:span text:style-name="T31">0</text:span><text:span text:style-name="T13"> </text:span><text:span text:style-name="T6">else</text:span><text:span text:style-name="T13"> </text:span><text:span text:style-name="T34">'0'</text:span><text:span text:style-name="T13">;</text:span></text:p>
      <text:p text:style-name="P15"><text:span text:style-name="T6">end</text:span><text:span text:style-name="T13"> </text:span><text:span text:style-name="T22">arch</text:span><text:span text:style-name="T13">;</text:span></text:p>
      <text:p text:style-name="P35"><text:tab/></text:p>
      <text:p text:style-name="P30"/>
      <text:p text:style-name="P30"/>
      <text:p text:style-name="P30"/>
      <text:p text:style-name="P30"/>
      <text:p text:style-name="P30"><text:soft-page-break/><text:span text:style-name="T2">HEX TO SSEG</text:span> </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6"/>
      <text:p text:style-name="P15"><text:span text:style-name="T6">entity</text:span><text:span text:style-name="T13"> </text:span><text:span text:style-name="T22">hex_to_sseg</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36">-- <text:s text:c="3"/>hex : in std_logic_vector(3 downto 0);</text:span></text:p>
      <text:p text:style-name="P15"><text:span text:style-name="T13"><text:s text:c="4"/></text:span><text:span text:style-name="T36">-- <text:s text:c="3"/>hex : in natural (0 to 15);</text:span></text:p>
      <text:p text:style-name="P15"><text:span text:style-name="T13"><text:s text:c="4"/></text:span><text:span text:style-name="T26">dp</text:span><text:span text:style-name="T13"> <text:s/>: </text:span><text:span text:style-name="T6">in</text:span><text:span text:style-name="T13"> </text:span><text:span text:style-name="T28">std_logic</text:span><text:span text:style-name="T13">;</text:span></text:p>
      <text:p text:style-name="P15"><text:span text:style-name="T13"><text:s text:c="4"/></text:span><text:span text:style-name="T26">seg_sel</text:span><text:span text:style-name="T13"> : </text:span><text:span text:style-name="T6">out</text:span><text:span text:style-name="T13">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hex_to_sseg</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hex_to_sseg</text:span><text:span text:style-name="T13"> </text:span><text:span text:style-name="T6">is</text:span></text:p>
      <text:p text:style-name="P16"/>
      <text:p text:style-name="P15"><text:span text:style-name="T13"><text:s text:c="4"/></text:span><text:span text:style-name="T6">type</text:span><text:span text:style-name="T13"> </text:span><text:span text:style-name="T28">oned</text:span><text:span text:style-name="T13"> </text:span><text:span text:style-name="T6">is</text:span><text:span text:style-name="T13"> </text:span><text:span text:style-name="T6">array</text:span><text:span text:style-name="T13"> (</text:span><text:span text:style-name="T31">0</text:span><text:span text:style-name="T13"> </text:span><text:span text:style-name="T6">to</text:span><text:span text:style-name="T13"> </text:span><text:span text:style-name="T31">15</text:span><text:span text:style-name="T13">) </text:span><text:span text:style-name="T6">of</text:span><text:span text:style-name="T13"> </text:span><text:span text:style-name="T28">std_logic_vector</text:span><text:span text:style-name="T13">(</text:span><text:span text:style-name="T31">6</text:span><text:span text:style-name="T13"> </text:span><text:span text:style-name="T6">downto</text:span><text:span text:style-name="T13"> </text:span><text:span text:style-name="T31">0</text:span><text:span text:style-name="T13">);</text:span></text:p>
      <text:p text:style-name="P15"><text:span text:style-name="T13"><text:s text:c="4"/></text:span><text:span text:style-name="T6">constant</text:span><text:span text:style-name="T13"> </text:span><text:span text:style-name="T7">seg_data</text:span><text:span text:style-name="T13"> : </text:span><text:span text:style-name="T28">oned</text:span><text:span text:style-name="T13"> := ( <text:s text:c="3"/></text:span><text:span text:style-name="T34">"0000001"</text:span><text:span text:style-name="T13">, </text:span><text:span text:style-name="T34">"1001111"</text:span><text:span text:style-name="T13">, </text:span><text:span text:style-name="T34">"0010010"</text:span><text:span text:style-name="T13">, </text:span><text:span text:style-name="T34">"0000110"</text:span><text:span text:style-name="T13">,</text:span></text:p>
      <text:p text:style-name="P15"><text:span text:style-name="T13"><text:tab/><text:tab/><text:tab/><text:tab/><text:tab/> <text:s text:c="2"/></text:span><text:span text:style-name="T34">"0000110"</text:span><text:span text:style-name="T13">, </text:span><text:span text:style-name="T34">"1001100"</text:span><text:span text:style-name="T13">, </text:span><text:span text:style-name="T34">"0100100"</text:span><text:span text:style-name="T13">, </text:span><text:span text:style-name="T34">"0100000"</text:span><text:span text:style-name="T13">,</text:span></text:p>
      <text:p text:style-name="P15"><text:span text:style-name="T13"><text:s/><text:tab/><text:tab/><text:tab/><text:tab/><text:tab/> <text:s text:c="2"/></text:span><text:span text:style-name="T34">"0001111"</text:span><text:span text:style-name="T13">, </text:span><text:span text:style-name="T34">"0000000"</text:span><text:span text:style-name="T13">, </text:span><text:span text:style-name="T34">"0000100"</text:span><text:span text:style-name="T13">, </text:span><text:span text:style-name="T34">"0001000"</text:span><text:span text:style-name="T13">,</text:span></text:p>
      <text:p text:style-name="P15"><text:span text:style-name="T13"><text:s/><text:tab/><text:tab/><text:tab/><text:tab/><text:tab/> <text:s text:c="2"/></text:span><text:span text:style-name="T34">"1100000"</text:span><text:span text:style-name="T13">, </text:span><text:span text:style-name="T34">"0110001"</text:span><text:span text:style-name="T13">, </text:span><text:span text:style-name="T34">"0110000"</text:span><text:span text:style-name="T13">, </text:span><text:span text:style-name="T34">"0111000"</text:span><text:span text:style-name="T13">);</text:span></text:p>
      <text:p text:style-name="P16"/>
      <text:p text:style-name="P15"><text:span text:style-name="T13"><text:s text:c="4"/></text:span><text:span text:style-name="T6">signal</text:span><text:span text:style-name="T13"> </text:span><text:span text:style-name="T39">seg_inc</text:span><text:span text:style-name="T13">: unsigned(</text:span><text:span text:style-name="T31">3</text:span><text:span text:style-name="T13"> </text:span><text:span text:style-name="T6">downto</text:span><text:span text:style-name="T13"> </text:span><text:span text:style-name="T31">0</text:span><text:span text:style-name="T13">) := </text:span><text:span text:style-name="T34">"0001"</text:span><text:span text:style-name="T13"> ;</text:span></text:p>
      <text:p text:style-name="P15"><text:span text:style-name="T13"><text:s text:c="4"/></text:span><text:span text:style-name="T6">signal</text:span><text:span text:style-name="T13"> </text:span><text:span text:style-name="T39">hex</text:span><text:span text:style-name="T13"> : unsigned(</text:span><text:span text:style-name="T31">15</text:span><text:span text:style-name="T13"> </text:span><text:span text:style-name="T6">downto</text:span><text:span text:style-name="T13"> </text:span><text:span text:style-name="T31">0</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signal</text:span><text:span text:style-name="T13"> </text:span><text:span text:style-name="T39">en</text:span><text:span text:style-name="T13"> : </text:span><text:span text:style-name="T28">bit</text:span><text:span text:style-name="T13">;</text:span></text:p>
      <text:p text:style-name="P16"/>
      <text:p text:style-name="P15"><text:span text:style-name="T13"><text:s text:c="4"/></text:span><text:span text:style-name="T6">subtype</text:span><text:span text:style-name="T13"> </text:span><text:span text:style-name="T28">digit</text:span><text:span text:style-name="T13"> </text:span><text:span text:style-name="T6">is</text:span><text:span text:style-name="T13"> unsigned(</text:span><text:span text:style-name="T31">12</text:span><text:span text:style-name="T13"> </text:span><text:span text:style-name="T6">downto</text:span><text:span text:style-name="T13"> </text:span><text:span text:style-name="T31">0</text:span><text:span text:style-name="T13">);</text:span></text:p>
      <text:p text:style-name="P15"><text:span text:style-name="T13"><text:s text:c="4"/></text:span><text:span text:style-name="T6">constant</text:span><text:span text:style-name="T13"> </text:span><text:span text:style-name="T7">zero</text:span><text:span text:style-name="T13"> : </text:span><text:span text:style-name="T28">digit</text:span><text:span text:style-name="T13"> := (</text:span><text:span text:style-name="T6">others</text:span><text:span text:style-name="T13"> =&gt; </text:span><text:span text:style-name="T34">'0'</text:span><text:span text:style-name="T13">);</text:span></text:p>
      <text:p text:style-name="P16"/>
      <text:p text:style-name="P23">begin</text:p>
      <text:p text:style-name="P15"><text:span text:style-name="T13"><text:s text:c="4"/></text:span><text:span text:style-name="T36">-- <text:s text:c="3"/>gen: for i in hex'range generate</text:span></text:p>
      <text:p text:style-name="P15"><text:span text:style-name="T13"><text:s text:c="4"/></text:span><text:span text:style-name="T36">-- <text:s text:c="15"/>sseg(i) &lt;= seg_data(i) when hex = i;</text:span></text:p>
      <text:p text:style-name="P15"><text:span text:style-name="T13"><text:s text:c="4"/></text:span><text:span text:style-name="T36">-- <text:s text:c="9"/>end generate;</text:span></text:p>
      <text:p text:style-name="P15"><text:span text:style-name="T13"><text:s text:c="4"/></text:span><text:span text:style-name="T6">process</text:span><text:span text:style-name="T13">(clk, rst)</text:span></text:p>
      <text:p text:style-name="P15"><text:span text:style-name="T13"><text:s text:c="8"/></text:span><text:span text:style-name="T6">variable</text:span><text:span text:style-name="T13"> </text:span><text:span text:style-name="T30">inc</text:span><text:span text:style-name="T13"> : </text:span><text:span text:style-name="T28">digi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rst = </text:span><text:span text:style-name="T34">'1'</text:span><text:span text:style-name="T13"> </text:span><text:span text:style-name="T6">then</text:span></text:p>
      <text:p text:style-name="P15"><text:span text:style-name="T13"><text:s text:c="12"/></text:span><text:span text:style-name="T30">inc</text:span><text:span text:style-name="T13"> :=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clk) </text:span><text:span text:style-name="T6">then</text:span></text:p>
      <text:p text:style-name="P15"><text:span text:style-name="T13"><text:s text:c="12"/></text:span><text:span text:style-name="T30">inc</text:span><text:span text:style-name="T13"> := </text:span><text:span text:style-name="T30">inc</text:span><text:span text:style-name="T13"> </text:span><text:span text:style-name="T14">+</text:span><text:span text:style-name="T31">1</text:span><text:span text:style-name="T13">;</text:span></text:p>
      <text:p text:style-name="P15"><text:span text:style-name="T13"><text:s text:c="12"/></text:span><text:span text:style-name="T39">seg_inc</text:span><text:span text:style-name="T13"> &lt;= </text:span><text:span text:style-name="T39">seg_inc</text:span><text:span text:style-name="T13">(</text:span><text:span text:style-name="T31">0</text:span><text:span text:style-name="T13">) </text:span><text:span text:style-name="T14">&amp;</text:span><text:span text:style-name="T13"> </text:span><text:span text:style-name="T39">seg_inc</text:span><text:span text:style-name="T13">(</text:span><text:span text:style-name="T31">3</text:span><text:span text:style-name="T13"> </text:span><text:span text:style-name="T6">downto</text:span><text:span text:style-name="T13"> </text:span><text:span text:style-name="T31">1</text:span><text:span text:style-name="T13">);</text:span></text:p>
      <text:p text:style-name="P16"/>
      <text:p text:style-name="P15"><text:span text:style-name="T13"><text:s text:c="12"/></text:span><text:span text:style-name="T6">if</text:span><text:span text:style-name="T13"> </text:span><text:span text:style-name="T30">inc</text:span><text:span text:style-name="T13"> = </text:span><text:span text:style-name="T7">zero</text:span><text:span text:style-name="T13"> </text:span><text:span text:style-name="T6">then</text:span></text:p>
      <text:p text:style-name="P15"><text:span text:style-name="T13"><text:s text:c="16"/></text:span><text:span text:style-name="T39">hex</text:span><text:span text:style-name="T13"> &lt;= </text:span><text:span text:style-name="T39">hex</text:span><text:span text:style-name="T13"> </text:span><text:span text:style-name="T14">+</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text:soft-page-break/></text:p>
      <text:p text:style-name="P15"><text:span text:style-name="T13"><text:s text:c="4"/>seg_sel &lt;= </text:span><text:span text:style-name="T39">seg_inc</text:span><text:span text:style-name="T13">;</text:span></text:p>
      <text:p text:style-name="P15"><text:span text:style-name="T13"><text:s text:c="4"/></text:span><text:span text:style-name="T36">-- hex qed juri listes numru. irid jigi unsigned</text:span></text:p>
      <text:p text:style-name="P15"><text:span text:style-name="T13"><text:s text:c="4"/></text:span><text:span text:style-name="T6">with</text:span><text:span text:style-name="T13"> </text:span><text:span text:style-name="T39">seg_inc</text:span><text:span text:style-name="T13"> </text:span><text:span text:style-name="T6">select</text:span></text:p>
      <text:p text:style-name="P15"><text:span text:style-name="T13"><text:s text:c="4"/></text:span><text:span text:style-name="T26">sseg</text:span><text:span text:style-name="T13">(</text:span><text:span text:style-name="T31">6</text:span><text:span text:style-name="T13"> </text:span><text:span text:style-name="T6">downto</text:span><text:span text:style-name="T13"> </text:span><text:span text:style-name="T31">0</text:span><text:span text:style-name="T13">) &lt;= <text:s text:c="2"/></text:span><text:span text:style-name="T7">seg_data</text:span><text:span text:style-name="T13">(to_integer(</text:span><text:span text:style-name="T39">hex</text:span><text:span text:style-name="T13">(</text:span><text:span text:style-name="T31">3</text:span><text:span text:style-name="T13"> </text:span><text:span text:style-name="T6">downto</text:span><text:span text:style-name="T13"> </text:span><text:span text:style-name="T31">0</text:span><text:span text:style-name="T13">))) <text:s text:c="2"/></text:span><text:span text:style-name="T6">when</text:span><text:span text:style-name="T13"> </text:span><text:span text:style-name="T34">"0001"</text:span><text:span text:style-name="T13">,</text:span></text:p>
      <text:p text:style-name="P15"><text:span text:style-name="T13"><text:s text:c="8"/><text:tab/><text:tab/> <text:s text:c="5"/>s</text:span><text:span text:style-name="T7">eg_data</text:span><text:span text:style-name="T13">(to_integer(</text:span><text:span text:style-name="T39">hex</text:span><text:span text:style-name="T13">(</text:span><text:span text:style-name="T31">7</text:span><text:span text:style-name="T13"> </text:span><text:span text:style-name="T6">downto</text:span><text:span text:style-name="T13"> </text:span><text:span text:style-name="T31">4</text:span><text:span text:style-name="T13">))) <text:s text:c="2"/></text:span><text:span text:style-name="T6">when</text:span><text:span text:style-name="T13"> </text:span><text:span text:style-name="T34">"0010"</text:span><text:span text:style-name="T13">,</text:span></text:p>
      <text:p text:style-name="P15"><text:span text:style-name="T13"><text:tab/> <text:tab/><text:tab/> <text:s text:c="5"/></text:span><text:span text:style-name="T7">seg_data</text:span><text:span text:style-name="T13">(to_integer(</text:span><text:span text:style-name="T39">hex</text:span><text:span text:style-name="T13">(</text:span><text:span text:style-name="T31">11</text:span><text:span text:style-name="T13"> </text:span><text:span text:style-name="T6">downto</text:span><text:span text:style-name="T13"> </text:span><text:span text:style-name="T31">8</text:span><text:span text:style-name="T13">))) <text:s/></text:span><text:span text:style-name="T6">when</text:span><text:span text:style-name="T13"> </text:span><text:span text:style-name="T34">"0100"</text:span><text:span text:style-name="T13">,</text:span></text:p>
      <text:p text:style-name="P15"><text:span text:style-name="T13"><text:tab/><text:tab/> <text:s text:c="12"/></text:span><text:span text:style-name="T7">seg_data</text:span><text:span text:style-name="T13">(to_integer(</text:span><text:span text:style-name="T39">hex</text:span><text:span text:style-name="T13">(</text:span><text:span text:style-name="T31">15</text:span><text:span text:style-name="T13"> </text:span><text:span text:style-name="T6">downto</text:span><text:span text:style-name="T13"> </text:span><text:span text:style-name="T31">12</text:span><text:span text:style-name="T13">))) </text:span><text:span text:style-name="T6">when</text:span><text:span text:style-name="T13"> </text:span><text:span text:style-name="T34">"1000"</text:span><text:span text:style-name="T13">,</text:span></text:p>
      <text:p text:style-name="P15"><text:span text:style-name="T13"><text:tab/><text:tab/><text:tab/> <text:s text:c="5"/></text:span><text:span text:style-name="T34">"1111111"</text:span><text:span text:style-name="T13"> </text:span><text:span text:style-name="T6">when</text:span><text:span text:style-name="T13"> </text:span><text:span text:style-name="T6">others</text:span><text:span text:style-name="T13">;</text:span></text:p>
      <text:p text:style-name="P15"><text:span text:style-name="T13"><text:s text:c="8"/></text:span><text:span text:style-name="T26">sseg</text:span><text:span text:style-name="T13">(</text:span><text:span text:style-name="T31">7</text:span><text:span text:style-name="T13">) &lt;= </text:span><text:span text:style-name="T26">dp</text:span><text:span text:style-name="T13">;</text:span></text:p>
      <text:p text:style-name="P16"/>
      <text:p text:style-name="P15"><text:span text:style-name="T6">end</text:span><text:span text:style-name="T13"> </text:span><text:span text:style-name="T22">arch</text:span><text:span text:style-name="T13">;</text:span><text:tab/><text:tab/><text:tab/><text:tab/></text:p>
      <text:p text:style-name="P30"><text:tab/><text:tab/><text:tab/><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2">ACCUMULATOR</text:span> </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accumulator</text:span><text:span text:style-name="T13"> </text:span><text:span text:style-name="T6">is</text:span><text:span text:style-name="T13"> </text:span><text:span text:style-name="T6">port</text:span><text:span text:style-name="T13"> (</text:span></text:p>
      <text:p text:style-name="P15"><text:span text:style-name="T13"><text:s text:c="4"/></text:span><text:span text:style-name="T26">clk</text:span><text:span text:style-name="T13">, </text:span><text:span text:style-name="T26">rst</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data_in</text:span><text:span text:style-name="T13"> : </text:span><text:span text:style-name="T6">in</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data_out</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accumulator</text:span><text:span text:style-name="T13"> </text:span><text:span text:style-name="T6">is</text:span></text:p>
      <text:p text:style-name="P15"><text:span text:style-name="T13"><text:s text:c="4"/></text:span><text:span text:style-name="T6">signal</text:span><text:span text:style-name="T13"> </text:span><text:span text:style-name="T39">reg</text:span><text:span text:style-name="T13"> :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reg</text:span><text:span text:style-name="T13"> &lt;= </text:span><text:span text:style-name="T39">reg</text:span><text:span text:style-name="T13"> </text:span><text:span text:style-name="T14">+</text:span><text:span text:style-name="T13"> </text:span><text:span text:style-name="T28">unsigned</text:span><text:span text:style-name="T13">(</text:span><text:span text:style-name="T26">data_in</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data_out</text:span><text:span text:style-name="T13"> &lt;= </text:span><text:span text:style-name="T28">std_logic_vector</text:span><text:span text:style-name="T13">(</text:span><text:span text:style-name="T39">reg</text:span><text:span text:style-name="T13">);</text:span></text:p>
      <text:p text:style-name="P15"><text:span text:style-name="T6">end</text:span><text:span text:style-name="T13"> </text:span><text:span text:style-name="T22">arch</text:span><text:span text:style-name="T13">;</text:span></text:p>
      <text:p text:style-name="P30"><text:tab/></text:p>
      <text:p text:style-name="P30"/>
      <text:p text:style-name="P30"/>
      <text:p text:style-name="P30"><draw:frame draw:style-name="fr1" draw:name="graphics79" text:anchor-type="paragraph" svg:x="4.5898in" svg:y="-0.1362in" svg:width="5.7654in" svg:height="1.5165in" draw:z-index="20"><draw:image xlink:href="Pictures/20000007000057710000168994FFACB5.svm" xlink:type="simple" xlink:show="embed" xlink:actuate="onLoad"/></draw:frame></text:p>
      <text:p text:style-name="P30"/>
      <text:p text:style-name="P32"/>
      <text:p text:style-name="P32"><text:soft-page-break/>PWM LED MODULATIO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disp_mux_test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text:span><text:span text:style-name="T13"> : </text:span><text:span text:style-name="T28">std_logic</text:span><text:span text:style-name="T13">;</text:span></text:p>
      <text:p text:style-name="P15"><text:span text:style-name="T13"><text:s text:c="4"/>led0, led1 :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disp_mux_test </text:span><text:span text:style-name="T6">is</text:span></text:p>
      <text:p text:style-name="P15"><text:span text:style-name="T13"><text:s text:c="4"/></text:span><text:span text:style-name="T6">signal</text:span><text:span text:style-name="T13"> clk_div_reg, clk_div_next : </text:span><text:span text:style-name="T28">unsigned</text:span><text:span text:style-name="T13"> (</text:span><text:span text:style-name="T31">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pwm0_reg, pwm0_next, pwm1_reg, pwm1_next : </text:span><text:span text:style-name="T28">unsigned</text:span><text:span text:style-name="T13"> (</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led_inv_0, led_inv_1, clk_div : </text:span><text:span text:style-name="T28">std_logic</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clk_div_reg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6"><text:s text:c="12"/>clk_div_reg &lt;= clk_div_next;</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clk_div_next &lt;= (</text:span><text:span text:style-name="T6">others</text:span><text:span text:style-name="T13"> =&gt; </text:span><text:span text:style-name="T34">'0'</text:span><text:span text:style-name="T13">) </text:span><text:span text:style-name="T6">when</text:span><text:span text:style-name="T13"> clk_div_reg = </text:span><text:span text:style-name="T31">5000</text:span><text:span text:style-name="T13"> </text:span><text:span text:style-name="T6">else</text:span><text:span text:style-name="T13"> clk_div_reg </text:span><text:span text:style-name="T14">+</text:span><text:span text:style-name="T13"> </text:span><text:span text:style-name="T31">1</text:span><text:span text:style-name="T13">;</text:span></text:p>
      <text:p text:style-name="P16"/>
      <text:p text:style-name="P15"><text:span text:style-name="T13"><text:s text:c="4"/>clk_div &lt;= </text:span><text:span text:style-name="T34">'1'</text:span><text:span text:style-name="T13"> </text:span><text:span text:style-name="T6">when</text:span><text:span text:style-name="T13"> clk_div_reg = </text:span><text:span text:style-name="T31">5000</text:span><text:span text:style-name="T13"> </text:span><text:span text:style-name="T6">else</text:span><text:span text:style-name="T13"> </text:span><text:span text:style-name="T34">'0'</text:span><text:span text:style-name="T13">;</text:span></text:p>
      <text:p text:style-name="P16"><draw:frame draw:style-name="fr2" draw:name="graphics80" text:anchor-type="paragraph" svg:x="5.2618in" svg:y="0.1043in" svg:width="5.2209in" svg:height="2.5681in" draw:z-index="21"><draw:image xlink:href="Pictures/2000000700003F90000047A1E3CA0EA8.svm" xlink:type="simple" xlink:show="embed" xlink:actuate="onLoad"/></draw:frame></text:p>
      <text:p text:style-name="P16"/>
      <text:p text:style-name="P15"><text:span text:style-name="T13"><text:s text:c="4"/></text:span><text:span text:style-name="T6">process</text:span><text:span text:style-name="T13">(clk_div, rst)</text:span></text:p>
      <text:p text:style-name="P15"><text:span text:style-name="T13"><text:s text:c="4"/></text:span><text:span text:style-name="T6">begin</text:span></text:p>
      <text:p text:style-name="P15"><text:span text:style-name="T13"><text:s text:c="8"/></text:span><text:span text:style-name="T6">if</text:span><text:span text:style-name="T13"> rst = </text:span><text:span text:style-name="T34">'0'</text:span><text:span text:style-name="T13"> </text:span><text:span text:style-name="T6">then</text:span></text:p>
      <text:p text:style-name="P15"><text:span text:style-name="T13"><text:s text:c="12"/>pwm0_reg &lt;= (</text:span><text:span text:style-name="T6">others</text:span><text:span text:style-name="T13"> =&gt; </text:span><text:span text:style-name="T34">'0'</text:span><text:span text:style-name="T13">);</text:span></text:p>
      <text:p text:style-name="P15"><text:span text:style-name="T13"><text:s text:c="12"/>pwm1_reg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rising_edge(clk_div) </text:span><text:span text:style-name="T6">then</text:span></text:p>
      <text:p text:style-name="P16"><text:s text:c="12"/>pwm0_reg &lt;= pwm0_next;</text:p>
      <text:p text:style-name="P16"><text:s text:c="12"/>pwm1_reg &lt;= pwm1_next;</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pwm0_next &lt;= (</text:span><text:span text:style-name="T6">others</text:span><text:span text:style-name="T13"> =&gt; </text:span><text:span text:style-name="T34">'0'</text:span><text:span text:style-name="T13">) </text:span><text:span text:style-name="T6">when</text:span><text:span text:style-name="T13"> pwm0_reg = </text:span><text:span text:style-name="T31">254</text:span><text:span text:style-name="T13"> </text:span><text:span text:style-name="T6">else</text:span><text:span text:style-name="T13"> pwm0_reg </text:span><text:span text:style-name="T14">+</text:span><text:span text:style-name="T13"> </text:span><text:span text:style-name="T31">1</text:span><text:span text:style-name="T13">;</text:span></text:p>
      <text:p text:style-name="P15"><text:span text:style-name="T13"><text:s text:c="4"/>pwm1_next &lt;= (</text:span><text:span text:style-name="T6">others</text:span><text:span text:style-name="T13"> =&gt; </text:span><text:span text:style-name="T34">'0'</text:span><text:span text:style-name="T13">) </text:span><text:span text:style-name="T6">when</text:span><text:span text:style-name="T13"> pwm1_reg = </text:span><text:span text:style-name="T31">252</text:span><text:span text:style-name="T13"> </text:span><text:span text:style-name="T6">else</text:span><text:span text:style-name="T13"> pwm1_reg </text:span><text:span text:style-name="T14">+</text:span><text:span text:style-name="T13"> </text:span><text:span text:style-name="T31">1</text:span><text:span text:style-name="T13">;</text:span></text:p>
      <text:p text:style-name="P16"/>
      <text:p text:style-name="P15"><text:span text:style-name="T13"><text:s text:c="4"/>led_inv_0 &lt;= </text:span><text:span text:style-name="T34">'1'</text:span><text:span text:style-name="T13"> </text:span><text:span text:style-name="T6">when</text:span><text:span text:style-name="T13"> pwm0_reg </text:span><text:span text:style-name="T14">&gt;</text:span><text:span text:style-name="T13"> </text:span><text:span text:style-name="T31">127</text:span><text:span text:style-name="T13"> </text:span><text:span text:style-name="T6">else</text:span><text:span text:style-name="T13"> </text:span><text:span text:style-name="T34">'0'</text:span><text:span text:style-name="T13">;</text:span></text:p>
      <text:p text:style-name="P15"><text:span text:style-name="T13"><text:s text:c="4"/>led_inv_1 &lt;= </text:span><text:span text:style-name="T34">'1'</text:span><text:span text:style-name="T13"> </text:span><text:span text:style-name="T6">when</text:span><text:span text:style-name="T13"> pwm1_reg </text:span><text:span text:style-name="T14">&gt;</text:span><text:span text:style-name="T13"> </text:span><text:span text:style-name="T31">126</text:span><text:span text:style-name="T13"> </text:span><text:span text:style-name="T6">else</text:span><text:span text:style-name="T13"> </text:span><text:span text:style-name="T34">'0'</text:span><text:span text:style-name="T13">;</text:span></text:p>
      <text:p text:style-name="P15"><text:span text:style-name="T13"><text:s text:c="4"/>led0 &lt;= led_inv_0 </text:span><text:span text:style-name="T6">xor</text:span><text:span text:style-name="T13"> led_inv_1;</text:span></text:p>
      <text:p text:style-name="P16"/>
      <text:p text:style-name="P15"><text:span text:style-name="T6">end</text:span><text:span text:style-name="T13"> arch;</text:span></text:p>
      <text:p text:style-name="P33"><text:soft-page-break/>NOISE GENERATOR</text:p>
      <text:p text:style-name="P37"><text:span text:style-name="T6">library</text:span><text:span text:style-name="T13"> </text:span><text:span text:style-name="T22">ieee</text:span><text:span text:style-name="T13">;</text:span></text:p>
      <text:p text:style-name="P15"><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acnt</text:span><text:span text:style-name="T13"> </text:span><text:span text:style-name="T6">is</text:span><text:span text:style-name="T13"> </text:span><text:span text:style-name="T6">port</text:span><text:span text:style-name="T13">(</text:span></text:p>
      <text:p text:style-name="P15"><text:span text:style-name="T13"><text:tab/></text:span><text:span text:style-name="T26">rstn</text:span><text:span text:style-name="T13">, </text:span><text:span text:style-name="T26">en</text:span><text:span text:style-name="T13"> : </text:span><text:span text:style-name="T6">in</text:span><text:span text:style-name="T13"> </text:span><text:span text:style-name="T28">std_logic</text:span><text:span text:style-name="T13">;</text:span></text:p>
      <text:p text:style-name="P15"><text:span text:style-name="T13"><text:tab/></text:span><text:span text:style-name="T26">cntr</text:span><text:span text:style-name="T13"> <text:tab/><text:tab/>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acnt</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acnt</text:span><text:span text:style-name="T13"> </text:span><text:span text:style-name="T6">is</text:span></text:p>
      <text:p text:style-name="P15"><text:span text:style-name="T13"><text:tab/></text:span><text:span text:style-name="T6">component</text:span><text:span text:style-name="T13"> </text:span><text:span text:style-name="T22">my_jkff</text:span><text:span text:style-name="T13"> </text:span><text:span text:style-name="T6">is</text:span><text:span text:style-name="T13"> </text:span><text:span text:style-name="T6">port</text:span><text:span text:style-name="T13">( </text:span></text:p>
      <text:p text:style-name="P15"><text:span text:style-name="T13"><text:tab/><text:tab/></text:span><text:span text:style-name="T26">clk</text:span><text:span text:style-name="T13">, </text:span><text:span text:style-name="T26">rstn</text:span><text:span text:style-name="T13">, </text:span><text:span text:style-name="T26">j</text:span><text:span text:style-name="T13">, </text:span><text:span text:style-name="T26">k</text:span><text:span text:style-name="T13"> : </text:span><text:span text:style-name="T6">in</text:span><text:span text:style-name="T13"> </text:span><text:span text:style-name="T28">std_logic</text:span><text:span text:style-name="T13">;</text:span></text:p>
      <text:p text:style-name="P15"><text:span text:style-name="T13"><text:tab/><text:tab/></text:span><text:span text:style-name="T26">q</text:span><text:span text:style-name="T13">, </text:span><text:span text:style-name="T26">qn</text:span><text:span text:style-name="T13"> : </text:span><text:span text:style-name="T6">out</text:span><text:span text:style-name="T13"> </text:span><text:span text:style-name="T28">std_logic</text:span><text:span text:style-name="T13">);</text:span></text:p>
      <text:p text:style-name="P15"><text:span text:style-name="T13"><text:tab/></text:span><text:span text:style-name="T6">end</text:span><text:span text:style-name="T13"> </text:span><text:span text:style-name="T6">component</text:span><text:span text:style-name="T13">;</text:span></text:p>
      <text:p text:style-name="P16"><text:tab/></text:p>
      <text:p text:style-name="P15"><text:span text:style-name="T13"><text:tab/></text:span><text:span text:style-name="T6">signal</text:span><text:span text:style-name="T13"> </text:span><text:span text:style-name="T39">ffq</text:span><text:span text:style-name="T13"> : </text:span><text:span text:style-name="T28">std_logic_vector</text:span><text:span text:style-name="T13">(</text:span><text:span text:style-name="T31">8</text:span><text:span text:style-name="T13"> </text:span><text:span text:style-name="T6">downto</text:span><text:span text:style-name="T13"> </text:span><text:span text:style-name="T31">0</text:span><text:span text:style-name="T13">);</text:span></text:p>
      <text:p text:style-name="P15"><text:span text:style-name="T13"><text:tab/></text:span><text:span text:style-name="T6">signal</text:span><text:span text:style-name="T13"> </text:span><text:span text:style-name="T39">ffqn</text:span><text:span text:style-name="T13"> : </text:span><text:span text:style-name="T28">std_logic_vector</text:span><text:span text:style-name="T13">(</text:span><text:span text:style-name="T31">8</text:span><text:span text:style-name="T13"> </text:span><text:span text:style-name="T6">downto</text:span><text:span text:style-name="T13"> </text:span><text:span text:style-name="T31">0</text:span><text:span text:style-name="T13">);</text:span></text:p>
      <text:p text:style-name="P15"><text:span text:style-name="T13"><text:tab/></text:span><text:span text:style-name="T6">signal</text:span><text:span text:style-name="T13"> </text:span><text:span text:style-name="T39">vdd</text:span><text:span text:style-name="T13"> : </text:span><text:span text:style-name="T28">std_logic</text:span><text:span text:style-name="T13">;</text:span></text:p>
      <text:p text:style-name="P16"><text:tab/></text:p>
      <text:p text:style-name="P23">begin</text:p>
      <text:p text:style-name="P15"><text:span text:style-name="T13"><text:tab/></text:span><text:span text:style-name="T39">vdd</text:span><text:span text:style-name="T13"> &lt;= </text:span><text:span text:style-name="T34">'1'</text:span><text:span text:style-name="T13">; </text:span><text:span text:style-name="T39">ffqn</text:span><text:span text:style-name="T13">(</text:span><text:span text:style-name="T31">0</text:span><text:span text:style-name="T13">) &lt;= </text:span><text:span text:style-name="T26">en</text:span><text:span text:style-name="T13">;</text:span></text:p>
      <text:p text:style-name="P15"><text:span text:style-name="T13"><text:tab/></text:span><text:span text:style-name="T38">jk0</text:span><text:span text:style-name="T13"> : </text:span><text:span text:style-name="T6">for</text:span><text:span text:style-name="T13"> </text:span><text:span text:style-name="T30">j</text:span><text:span text:style-name="T13"> </text:span><text:span text:style-name="T6">in</text:span><text:span text:style-name="T13"> </text:span><text:span text:style-name="T31">1</text:span><text:span text:style-name="T13"> </text:span><text:span text:style-name="T6">to</text:span><text:span text:style-name="T13"> </text:span><text:span text:style-name="T31">8</text:span><text:span text:style-name="T13"> </text:span><text:span text:style-name="T6">generate</text:span><text:span text:style-name="T13"> </text:span></text:p>
      <text:p text:style-name="P15"><text:span text:style-name="T13"><text:tab/><text:tab/></text:span><text:span text:style-name="T38">b17</text:span><text:span text:style-name="T13"> : </text:span><text:span text:style-name="T22">my_jkff</text:span><text:span text:style-name="T13"> </text:span><text:span text:style-name="T6">port</text:span><text:span text:style-name="T13"> </text:span><text:span text:style-name="T6">map</text:span><text:span text:style-name="T13">(</text:span><text:span text:style-name="T26">clk</text:span><text:span text:style-name="T13"> =&gt; </text:span><text:span text:style-name="T39">ffqn</text:span><text:span text:style-name="T13">(</text:span><text:span text:style-name="T30">j</text:span><text:span text:style-name="T14">-</text:span><text:span text:style-name="T31">1</text:span><text:span text:style-name="T13">), </text:span><text:span text:style-name="T26">rstn</text:span><text:span text:style-name="T13"> =&gt; </text:span><text:span text:style-name="T26">rstn</text:span><text:span text:style-name="T13">, </text:span><text:span text:style-name="T26">j</text:span><text:span text:style-name="T13"> =&gt; </text:span><text:span text:style-name="T39">vdd</text:span><text:span text:style-name="T13">,</text:span></text:p>
      <text:p text:style-name="P15"><text:span text:style-name="T13"><text:tab/><text:tab/><text:tab/></text:span><text:span text:style-name="T26">k</text:span><text:span text:style-name="T13"> =&gt; </text:span><text:span text:style-name="T39">vdd</text:span><text:span text:style-name="T13">, </text:span><text:span text:style-name="T26">q</text:span><text:span text:style-name="T13"> =&gt; </text:span><text:span text:style-name="T39">ffq</text:span><text:span text:style-name="T13">(</text:span><text:span text:style-name="T30">j</text:span><text:span text:style-name="T13">), </text:span><text:span text:style-name="T26">qn</text:span><text:span text:style-name="T13"> =&gt; </text:span><text:span text:style-name="T39">ffqn</text:span><text:span text:style-name="T13">(</text:span><text:span text:style-name="T30">j</text:span><text:span text:style-name="T13">));</text:span></text:p>
      <text:p text:style-name="P15"><text:span text:style-name="T13"><text:tab/></text:span><text:span text:style-name="T6">end</text:span><text:span text:style-name="T13"> </text:span><text:span text:style-name="T6">generate</text:span><text:span text:style-name="T13">;</text:span></text:p>
      <text:p text:style-name="P15"><text:span text:style-name="T13"><text:tab/></text:span><text:span text:style-name="T26">cntr</text:span><text:span text:style-name="T13"> &lt;= </text:span><text:span text:style-name="T39">ffq</text:span><text:span text:style-name="T13">(</text:span><text:span text:style-name="T31">8</text:span><text:span text:style-name="T13"> </text:span><text:span text:style-name="T6">downto</text:span><text:span text:style-name="T13"> </text:span><text:span text:style-name="T31">1</text:span><text:span text:style-name="T13">);</text:span></text:p>
      <text:p text:style-name="P15"><text:span text:style-name="T6">end</text:span><text:span text:style-name="T13"> </text:span><text:span text:style-name="T22">rtl</text:span><text:span text:style-name="T13">;</text:span></text:p>
      <text:p text:style-name="P29"/>
      <text:p text:style-name="P30"/>
      <text:p text:style-name="P30"/>
      <text:p text:style-name="P30"/>
      <text:p text:style-name="P30"/>
      <text:p text:style-name="P30"/>
      <text:p text:style-name="P30"/>
      <text:p text:style-name="P30"/>
      <text:p text:style-name="P30"/>
      <text:p text:style-name="P30"/>
      <text:p text:style-name="P30"><text:soft-page-break/><text:span text:style-name="T3">HOW TO USE IF – ELSE IF </text:span></text:p>
      <text:p text:style-name="P30"><draw:frame draw:style-name="fr1" draw:name="graphics84" text:anchor-type="paragraph" svg:x="4.0173in" svg:y="-0.1118in" svg:width="6.1173in" svg:height="3.1571in" draw:z-index="23"><draw:image xlink:href="Pictures/20000007000059D100002D7BA50E6EC0.svm" xlink:type="simple" xlink:show="embed" xlink:actuate="onLoad"/></draw:frame><draw:frame draw:style-name="fr1" draw:name="graphics83" text:anchor-type="paragraph" svg:x="0.2047in" svg:y="0.3791in" svg:width="3.1984in" svg:height="3.8228in" draw:z-index="22"><draw:image xlink:href="Pictures/2000000700001FBC000025EF621A59E7.svm" xlink:type="simple" xlink:show="embed" xlink:actuate="onLoad"/></draw:frame><draw:frame draw:style-name="fr2" draw:name="graphics85" text:anchor-type="paragraph" svg:x="5.7862in" svg:y="3.2709in" svg:width="4.2953in" svg:height="3.5217in" draw:z-index="24"><draw:image xlink:href="Pictures/20000007000040CE000037EBFE2C78B8.svm" xlink:type="simple" xlink:show="embed" xlink:actuate="onLoad"/></draw:frame></text:p>
      <text:p text:style-name="P30"/>
      <text:p text:style-name="P39"/>
      <text:p text:style-name="P39"/>
      <text:p text:style-name="P39"/>
      <text:p text:style-name="P39"/>
      <text:p text:style-name="P39"/>
      <text:p text:style-name="P39"/>
      <text:p text:style-name="P39"/>
      <text:p text:style-name="P39"/>
      <text:p text:style-name="P39"/>
      <text:p text:style-name="P39"/>
      <text:p text:style-name="P53"><text:soft-page-break/><text:span text:style-name="T4">HOW TO USE IF – ELSE IF </text:span></text:p>
      <text:p text:style-name="Standard"><text:span text:style-name="T6">library</text:span><text:span text:style-name="T13"> </text:span><text:span text:style-name="T22">ieee</text:span><text:span text:style-name="T13">;</text:span></text:p>
      <text:p text:style-name="Standard"><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Standard"/>
      <text:p text:style-name="P15"><text:span text:style-name="T6">entity</text:span><text:span text:style-name="T13"> </text:span><text:span text:style-name="T22">fa</text:span><text:span text:style-name="T13"> </text:span><text:span text:style-name="T6">is</text:span><text:span text:style-name="T13"> </text:span><text:span text:style-name="T6">port</text:span><text:span text:style-name="T13">(</text:span></text:p>
      <text:p text:style-name="P15"><text:span text:style-name="T13"><text:s text:c="4"/></text:span><text:span text:style-name="T26">s1</text:span><text:span text:style-name="T13">, </text:span><text:span text:style-name="T26">s2</text:span><text:span text:style-name="T13">, </text:span><text:span text:style-name="T26">s3</text:span><text:span text:style-name="T13">, </text:span><text:span text:style-name="T26">x</text:span><text:span text:style-name="T13">, </text:span><text:span text:style-name="T26">y</text:span><text:span text:style-name="T13">, </text:span><text:span text:style-name="T26">z</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clk</text:span><text:span text:style-name="T13">, </text:span><text:span text:style-name="T26">rst</text:span><text:span text:style-name="T13">, </text:span><text:span text:style-name="T26">clk_ena</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data_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data_out</text:span><text:span text:style-name="T13">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Out1</text:span><text:span text:style-name="T13">, </text:span><text:span text:style-name="T26">Out2</text:span><text:span text:style-name="T13">, </text:span><text:span text:style-name="T26">Out3</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fa</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fa</text:span><text:span text:style-name="T13"> </text:span><text:span text:style-name="T6">is</text:span></text:p>
      <text:p text:style-name="P23">begin</text:p>
      <text:p text:style-name="P16"/>
      <text:p text:style-name="P15"><text:span text:style-name="T13"><text:s text:c="4"/></text:span><text:span text:style-name="T6">process</text:span><text:span text:style-name="T13"> (s1, s2, s3, x, y, z)</text:span></text:p>
      <text:p text:style-name="P15"><text:span text:style-name="T13"><text:s text:c="4"/></text:span><text:span text:style-name="T6">begin</text:span></text:p>
      <text:p text:style-name="P15"><text:span text:style-name="T13"><text:s text:c="8"/>Out1 &lt;= </text:span><text:span text:style-name="T34">'0'</text:span><text:span text:style-name="T13">;</text:span></text:p>
      <text:p text:style-name="P15"><text:span text:style-name="T13"><text:s text:c="8"/>Out2 &lt;= </text:span><text:span text:style-name="T34">'0'</text:span><text:span text:style-name="T13">;</text:span></text:p>
      <text:p text:style-name="P15"><text:span text:style-name="T13"><text:s text:c="8"/>Out3 &lt;= </text:span><text:span text:style-name="T34">'0'</text:span><text:span text:style-name="T13">;</text:span></text:p>
      <text:p text:style-name="P16"/>
      <text:p text:style-name="P15"><text:span text:style-name="T13"><text:s text:c="8"/></text:span><text:span text:style-name="T6">if</text:span><text:span text:style-name="T13"> s1 = </text:span><text:span text:style-name="T34">'1'</text:span><text:span text:style-name="T13"> </text:span><text:span text:style-name="T6">then</text:span><text:span text:style-name="T13"> Out1 &lt;= x; </text:span><text:span text:style-name="T6">end</text:span><text:span text:style-name="T13"> </text:span><text:span text:style-name="T6">if</text:span><text:span text:style-name="T13">;</text:span></text:p>
      <text:p text:style-name="P15"><text:span text:style-name="T13"><text:s text:c="8"/></text:span><text:span text:style-name="T6">if</text:span><text:span text:style-name="T13"> s2 = </text:span><text:span text:style-name="T34">'1'</text:span><text:span text:style-name="T13"> </text:span><text:span text:style-name="T6">then</text:span><text:span text:style-name="T13"> Out2 &lt;= y; </text:span><text:span text:style-name="T6">end</text:span><text:span text:style-name="T13"> </text:span><text:span text:style-name="T6">if</text:span><text:span text:style-name="T13">;</text:span></text:p>
      <text:p text:style-name="P15"><text:span text:style-name="T13"><text:s text:c="8"/></text:span><text:span text:style-name="T6">if</text:span><text:span text:style-name="T13"> s3 = </text:span><text:span text:style-name="T34">'1'</text:span><text:span text:style-name="T13"> </text:span><text:span text:style-name="T6">then</text:span><text:span text:style-name="T13"> Out3 &lt;= z; </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beh</text:span><text:span text:style-name="T13">;</text:span></text:p>
      <text:p text:style-name="P30"/>
      <text:p text:style-name="P30"/>
      <text:p text:style-name="P30"/>
      <text:p text:style-name="P30"/>
      <text:p text:style-name="P30"/>
      <text:p text:style-name="P30"/>
      <text:p text:style-name="P30"/>
      <text:p text:style-name="P30"/>
      <text:p text:style-name="P30"/>
      <text:p text:style-name="P30"/>
      <text:h text:style-name="P36" text:outline-level="1"><text:soft-page-break/>Signal Assignments in VHDL: with/select, when/else and case</text:h>
      <text:h text:style-name="Heading_20_3" text:outline-level="3"><text:bookmark text:name="with-select"/>With / Select</text:h>
      <text:p text:style-name="Text_20_body">The most specific way to do this is with as selected signal assignment. Based on several possible values of <text:span text:style-name="Source_20_Text">a</text:span>, you assign a value to <text:span text:style-name="Source_20_Text">b</text:span>. No redundancy in the code here. The official name for this VHDL with/select assignment is the selected signal assignment.</text:p>
      <text:p text:style-name="Preformatted_20_Text">with a select b &lt;=</text:p>
      <text:p text:style-name="Preformatted_20_Text"><text:s text:c="4"/>"1000" when "00",</text:p>
      <text:p text:style-name="Preformatted_20_Text"><text:s text:c="4"/>"0100" when "01",</text:p>
      <text:p text:style-name="Preformatted_20_Text"><text:s text:c="4"/>"0010" when "10",</text:p>
      <text:p text:style-name="Preformatted_20_Text"><text:s text:c="4"/>"0001" when "11";</text:p>
      <text:h text:style-name="Heading_20_3" text:outline-level="3"><text:bookmark text:name="when-else-assignment"/>When / Else Assignment</text:h>
      <text:p text:style-name="Text_20_body">The construct of a conditional signal assignment is a little more general. For each option, you have to give a condition. This means that you could write any boolean expression as a condition, which give you more freedom than equality checking. While this construct would give you more freedom, there is a bit more redundancy too. We had to write the equality check (<text:span text:style-name="Source_20_Text">a =</text:span>) on every line. If you use a signal with a long name, this will make your code bulkier. Also, the separator that's used in the selected signal assignment was a comma. In the conditional signal assignment, you need the <text:span text:style-name="Source_20_Text">else</text:span> keyword. More code for the same functionality. Official name for this VHDL when/else assignment is the conditional signal assignment</text:p>
      <text:p text:style-name="Preformatted_20_Text">b &lt;= "1000" when a = "00" else </text:p>
      <text:p text:style-name="Preformatted_20_Text"><text:s text:c="5"/>"0100" when a = "01" else </text:p>
      <text:p text:style-name="Preformatted_20_Text"><text:s text:c="5"/>"0010" when a = "10" else </text:p>
      <text:p text:style-name="Preformatted_20_Text"><text:s text:c="5"/>"0001" when a = "11";</text:p>
      <text:p text:style-name="P30"><text:bookmark text:name="combinational-process-with-case-statement"/>Combinational Process with Case Statement</text:p>
      <text:p text:style-name="Text_20_body">The most generally usable construct is a process. Inside this process, you can write a case statement, or a cascade of if statements. There is even more redundancy here. You the skeleton code for a process (begin, end) and the sensitivity list. That's not a big effort, but while I was drafting this, I had put <text:span text:style-name="Source_20_Text">b</text:span> in the sensitivity list instead of <text:span text:style-name="Source_20_Text">a</text:span>. Easy to make a small misstake. You also need to specify what happens in the <text:span text:style-name="Source_20_Text">other</text:span> cases. Of course, you could do the same thing with a bunch of IF-statements, either consecutive or nested, but a case statement looks so much nicer.</text:p>
      <text:p text:style-name="Preformatted_20_Text">process(a)</text:p>
      <text:p text:style-name="Preformatted_20_Text">begin</text:p>
      <text:p text:style-name="Preformatted_20_Text"><text:s text:c="4"/>case a is</text:p>
      <text:p text:style-name="Preformatted_20_Text"><text:s text:c="8"/>when "00" =&gt; b &lt;= "1000";</text:p>
      <text:p text:style-name="Preformatted_20_Text"><text:s text:c="8"/>when "01" =&gt; b &lt;= "0100";</text:p>
      <text:p text:style-name="Preformatted_20_Text"><text:s text:c="8"/>when "10" =&gt; b &lt;= "0010";</text:p>
      <text:p text:style-name="Preformatted_20_Text"><text:s text:c="8"/>when "11" =&gt; b &lt;= "0001";</text:p>
      <text:p text:style-name="Preformatted_20_Text"><text:s text:c="8"/>when others =&gt; report "unreachable" severity failure;</text:p>
      <text:p text:style-name="Preformatted_20_Text"><text:s text:c="4"/>end case;</text:p>
      <text:p text:style-name="Preformatted_20_Text">end process;</text:p>
      <text:p text:style-name="Text_20_body">While this last code snippet is the largest and perhaps most error-prone, it is probably also the most common. It uses two familiar and often-used constructs: the process and the case statements. </text:p>
      <text:p text:style-name="P30"><draw:frame draw:style-name="fr1" draw:name="graphics86" text:anchor-type="paragraph" svg:x="0.0571in" svg:y="0.0846in" svg:width="7.9425in" svg:height="7.5236in" draw:z-index="25"><draw:image xlink:href="Pictures/2000000700007496000074E4312EB0F9.svm" xlink:type="simple" xlink:show="embed" xlink:actuate="onLoad"/></draw:frame><text:soft-page-break/></text:p>
      <text:section text:style-name="Sect3" text:name="Section8">
        <text:p text:style-name="P34"><text:soft-page-break/>CLOCK DIV – EDGE DETEC – SHIFT BIT COUNT – CONSTANT MEM SHIFT</text:p>
        <text:p text:style-name="P37"><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shf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rst</text:span><text:span text:style-name="T13">: </text:span><text:span text:style-name="T6">in</text:span><text:span text:style-name="T13"> </text:span><text:span text:style-name="T28">boolean</text:span><text:span text:style-name="T13">;</text:span></text:p>
        <text:p text:style-name="P15"><text:span text:style-name="T13"><text:s text:c="4"/></text:span><text:span text:style-name="T26">bit_cnt_view</text:span><text:span text:style-name="T13"> : </text:span><text:span text:style-name="T6">out</text:span><text:span text:style-name="T13"> </text:span><text:span text:style-name="T28">unsigned</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26">my_data_view</text:span><text:span text:style-name="T13">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do</text:span><text:span text:style-name="T13">, </text:span><text:span text:style-name="T26">sclk</text:span><text:span text:style-name="T13">, </text:span><text:span text:style-name="T26">r_e</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shft</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shft</text:span><text:span text:style-name="T13"> </text:span><text:span text:style-name="T6">is</text:span></text:p>
        <text:p text:style-name="P15"><text:span text:style-name="T13"><text:s text:c="4"/></text:span><text:span text:style-name="T6">type</text:span><text:span text:style-name="T13"> </text:span><text:span text:style-name="T28">data</text:span><text:span text:style-name="T13"> </text:span><text:span text:style-name="T6">is</text:span><text:span text:style-name="T13"> </text:span><text:span text:style-name="T6">array</text:span><text:span text:style-name="T13"> (</text:span><text:span text:style-name="T31">0</text:span><text:span text:style-name="T13"> </text:span><text:span text:style-name="T6">to</text:span><text:span text:style-name="T13"> </text:span><text:span text:style-name="T31">15</text:span><text:span text:style-name="T13">) </text:span><text:span text:style-name="T6">of</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my_data</text:span><text:span text:style-name="T13"> : </text:span><text:span text:style-name="T28">data</text:span><text:span text:style-name="T13"> := ( <text:s/></text:span><text:span text:style-name="T34">"10101010"</text:span><text:span text:style-name="T13">,</text:span><text:span text:style-name="T34">"10110100"</text:span><text:span text:style-name="T13">,</text:span></text:p>
        <text:p text:style-name="P15"><text:span text:style-name="T13"><text:s text:c="4"/><text:tab/><text:tab/><text:tab/><text:tab/> <text:s text:c="4"/></text:span><text:span text:style-name="T34">"10001010"</text:span><text:span text:style-name="T13">,</text:span><text:span text:style-name="T34">"10101001"</text:span><text:span text:style-name="T13">,</text:span></text:p>
        <text:p text:style-name="P15"><text:span text:style-name="T13"><text:s text:c="4"/><text:tab/><text:tab/><text:tab/><text:tab/> <text:s text:c="4"/></text:span><text:span text:style-name="T34">"10101101"</text:span><text:span text:style-name="T13">,</text:span><text:span text:style-name="T34">"11010011"</text:span><text:span text:style-name="T13">,</text:span></text:p>
        <text:p text:style-name="P15"><text:span text:style-name="T13"><text:s text:c="4"/><text:tab/><text:tab/><text:tab/><text:tab/> <text:s text:c="4"/></text:span><text:span text:style-name="T34">"10010100"</text:span><text:span text:style-name="T13">,</text:span><text:span text:style-name="T34">"10100101"</text:span><text:span text:style-name="T13">,</text:span></text:p>
        <text:p text:style-name="P15"><text:span text:style-name="T13"><text:s text:c="4"/><text:tab/><text:tab/><text:tab/><text:tab/> <text:s text:c="4"/></text:span><text:span text:style-name="T34">"10001010"</text:span><text:span text:style-name="T13">,</text:span><text:span text:style-name="T34">"11101010"</text:span><text:span text:style-name="T13">,</text:span></text:p>
        <text:p text:style-name="P15"><text:span text:style-name="T13"><text:s text:c="4"/><text:tab/><text:tab/><text:tab/><text:tab/> <text:s text:c="4"/></text:span><text:span text:style-name="T34">"10010011"</text:span><text:span text:style-name="T13">,</text:span><text:span text:style-name="T34">"00100110"</text:span><text:span text:style-name="T13">,</text:span></text:p>
        <text:p text:style-name="P15"><text:span text:style-name="T13"><text:s text:c="4"/><text:tab/><text:tab/><text:tab/><text:tab/> <text:s text:c="4"/></text:span><text:span text:style-name="T34">"10001010"</text:span><text:span text:style-name="T13">,</text:span><text:span text:style-name="T34">"11001101"</text:span><text:span text:style-name="T13">,</text:span></text:p>
        <text:p text:style-name="P15"><text:span text:style-name="T13"><text:s text:c="4"/><text:tab/><text:tab/><text:tab/><text:tab/> <text:s text:c="4"/></text:span><text:span text:style-name="T34">"10010110"</text:span><text:span text:style-name="T13">,</text:span><text:span text:style-name="T34">"00011010"</text:span><text:span text:style-name="T13">);</text:span></text:p>
        <text:p text:style-name="P16"/>
        <text:p text:style-name="P15"><text:span text:style-name="T13"><text:s text:c="4"/></text:span><text:span text:style-name="T6">signal</text:span><text:span text:style-name="T13"> </text:span><text:span text:style-name="T39">clk_div</text:span><text:span text:style-name="T13"> : </text:span><text:span text:style-name="T28">unsigned</text:span><text:span text:style-name="T13">(</text:span><text:span text:style-name="T31">9</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new_clk</text:span><text:span text:style-name="T13">, </text:span><text:span text:style-name="T39">hold</text:span><text:span text:style-name="T13">, </text:span><text:span text:style-name="T39">rise_edge</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shft_reg</text:span><text:span text:style-name="T13"> : </text:span><text:span text:style-name="T28">std_logic_vector</text:span><text:span text:style-name="T13">(</text:span><text:span text:style-name="T31">8</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bit_cnt</text:span><text:span text:style-name="T13"> : </text:span><text:span text:style-name="T28">unsigned</text:span><text:span text:style-name="T13">(</text:span><text:span text:style-name="T31">2</text:span><text:span text:style-name="T13"> </text:span><text:span text:style-name="T6">downto</text:span><text:span text:style-name="T13"> </text:span><text:span text:style-name="T31">0</text:span><text:span text:style-name="T13">);</text:span></text:p>
        <text:p text:style-name="P16"/>
        <text:p text:style-name="P23">begin</text:p>
        <text:p text:style-name="P15"><text:span text:style-name="T13"><text:s text:c="4"/></text:span><text:span text:style-name="T36">--clock division</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clk_div</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new_clk</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clk_div</text:span><text:span text:style-name="T13"> &lt;= </text:span><text:span text:style-name="T39">clk_div</text:span><text:span text:style-name="T13"> </text:span><text:span text:style-name="T14">+</text:span><text:span text:style-name="T31">1</text:span><text:span text:style-name="T13">;</text:span></text:p>
        <text:p text:style-name="P15"><text:span text:style-name="T13"><text:s text:c="12"/></text:span><text:span text:style-name="T6">if</text:span><text:span text:style-name="T13"> </text:span><text:span text:style-name="T39">clk_div</text:span><text:span text:style-name="T13"> = </text:span><text:span text:style-name="T31">0</text:span><text:span text:style-name="T13"> </text:span><text:span text:style-name="T6">then</text:span></text:p>
        <text:p text:style-name="P15"><text:span text:style-name="T13"><text:s text:c="16"/></text:span><text:span text:style-name="T39">new_clk</text:span><text:span text:style-name="T13"> &lt;= </text:span><text:span text:style-name="T6">not</text:span><text:span text:style-name="T13"> </text:span><text:span text:style-name="T39">new_clk</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rising edge detector for new clock</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hold</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hold</text:span><text:span text:style-name="T13"> &lt;= </text:span><text:span text:style-name="T39">new_clk</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rise_edge</text:span><text:span text:style-name="T13"> &lt;= </text:span><text:span text:style-name="T39">new_clk</text:span><text:span text:style-name="T13"> </text:span><text:span text:style-name="T6">and</text:span><text:span text:style-name="T13"> (</text:span><text:span text:style-name="T6">not</text:span><text:span text:style-name="T13"> </text:span><text:span text:style-name="T39">hold</text:span><text:span text:style-name="T13">);</text:span></text:p>
        <text:p text:style-name="P16"/>
        <text:p text:style-name="P15"><text:span text:style-name="T13"><text:s text:c="4"/></text:span><text:span text:style-name="T36">--bit counter</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bit_cnt</text:span><text:span text:style-name="T13"> &lt;= (</text:span><text:span text:style-name="T6">others</text:span><text:span text:style-name="T13"> =&gt; </text:span><text:span text:style-name="T34">'1'</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rise_edge</text:span><text:span text:style-name="T13"> = </text:span><text:span text:style-name="T34">'1'</text:span><text:span text:style-name="T13"> </text:span><text:span text:style-name="T6">then</text:span></text:p>
        <text:p text:style-name="P15"><text:span text:style-name="T13"><text:s text:c="16"/></text:span><text:span text:style-name="T39">bit_cnt</text:span><text:span text:style-name="T13"> &lt;= </text:span><text:span text:style-name="T39">bit_cnt</text:span><text:span text:style-name="T13"> </text:span><text:span text:style-name="T14">-</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shift register</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8"/></text:span><text:span text:style-name="T6">variable</text:span><text:span text:style-name="T13"> </text:span><text:span text:style-name="T30">my_data_count</text:span><text:span text:style-name="T13"> :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shft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0">my_data_count</text:span><text:span text:style-name="T13"> := (</text:span><text:span text:style-name="T6">others</text:span><text:span text:style-name="T13"> =&gt; </text:span><text:span text:style-name="T34">'0'</text:span><text:span text:style-name="T13">);</text:span></text:p>
        <text:p text:style-name="P15"><text:span text:style-name="T13"><text:s text:c="12"/></text:span><text:span text:style-name="T26">my_data_view</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 (</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rise_edge</text:span><text:span text:style-name="T13"> = </text:span><text:span text:style-name="T34">'1'</text:span><text:span text:style-name="T13"> </text:span><text:span text:style-name="T6">then</text:span></text:p>
        <text:p text:style-name="P15"><text:span text:style-name="T13"><text:s text:c="16"/></text:span><text:span text:style-name="T39">shft_reg</text:span><text:span text:style-name="T13"> &lt;= </text:span><text:span text:style-name="T39">shft_reg</text:span><text:span text:style-name="T13">(</text:span><text:span text:style-name="T31">7</text:span><text:span text:style-name="T13"> </text:span><text:span text:style-name="T6">downto</text:span><text:span text:style-name="T13"> </text:span><text:span text:style-name="T31">0</text:span><text:span text:style-name="T13">) </text:span><text:span text:style-name="T14">&amp;</text:span><text:span text:style-name="T13"> </text:span><text:span text:style-name="T34">'1'</text:span><text:span text:style-name="T13">;</text:span></text:p>
        <text:p text:style-name="P15"><text:span text:style-name="T13"><text:s text:c="16"/></text:span><text:span text:style-name="T6">if</text:span><text:span text:style-name="T13"> </text:span><text:span text:style-name="T39">bit_cnt</text:span><text:span text:style-name="T13"> = </text:span><text:span text:style-name="T31">0</text:span><text:span text:style-name="T13"> </text:span><text:span text:style-name="T6">then</text:span></text:p>
        <text:p text:style-name="P15"><text:span text:style-name="T13"><text:s text:c="20"/></text:span><text:span text:style-name="T39">shft_reg</text:span><text:span text:style-name="T13">(</text:span><text:span text:style-name="T31">7</text:span><text:span text:style-name="T13"> </text:span><text:span text:style-name="T6">downto</text:span><text:span text:style-name="T13"> </text:span><text:span text:style-name="T31">0</text:span><text:span text:style-name="T13">) &lt;= <text:tab/><text:tab/><text:tab/><text:tab/> <text:tab/> <text:s text:c="12"/></text:span><text:span text:style-name="T39">my_data</text:span><text:span text:style-name="T13">(</text:span><text:span text:style-name="T14">to_integer</text:span><text:span text:style-name="T13">(</text:span><text:span text:style-name="T30">my_data_count</text:span><text:span text:style-name="T13">));</text:span></text:p>
        <text:p text:style-name="P15"><text:span text:style-name="T13"><text:s text:c="20"/></text:span><text:span text:style-name="T26">my_data_view</text:span><text:span text:style-name="T13"> &lt;= </text:span><text:span text:style-name="T39">my_data</text:span><text:span text:style-name="T13">(</text:span><text:span text:style-name="T14">to_integer</text:span><text:span text:style-name="T13">(</text:span><text:span text:style-name="T30">my_data_count</text:span><text:span text:style-name="T13">));</text:span></text:p>
        <text:p text:style-name="P15"><text:span text:style-name="T13"><text:s text:c="20"/></text:span><text:span text:style-name="T30">my_data_count</text:span><text:span text:style-name="T13"> := </text:span><text:span text:style-name="T30">my_data_count</text:span><text:span text:style-name="T13"> </text:span><text:span text:style-name="T14">+</text:span><text:span text:style-name="T31">1</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sdo</text:span><text:span text:style-name="T13"> &lt;= </text:span><text:span text:style-name="T39">shft_reg</text:span><text:span text:style-name="T13">(</text:span><text:span text:style-name="T31">8</text:span><text:span text:style-name="T13">);</text:span></text:p>
        <text:p text:style-name="P15"><text:span text:style-name="T13"><text:s text:c="4"/></text:span><text:span text:style-name="T26">sclk</text:span><text:span text:style-name="T13"> &lt;= </text:span><text:span text:style-name="T39">new_clk</text:span><text:span text:style-name="T13">;</text:span></text:p>
        <text:p text:style-name="P15"><text:span text:style-name="T13"><text:s text:c="4"/></text:span><text:span text:style-name="T26">r_e</text:span><text:span text:style-name="T13"> &lt;= </text:span><text:span text:style-name="T39">rise_edge</text:span><text:span text:style-name="T13">;</text:span></text:p>
        <text:p text:style-name="P15"><text:span text:style-name="T13"><text:s text:c="4"/></text:span><text:span text:style-name="T26">bit_cnt_view</text:span><text:span text:style-name="T13"> &lt;= </text:span><text:span text:style-name="T39">bit_cnt</text:span><text:span text:style-name="T13">;</text:span></text:p>
        <text:p text:style-name="P16"/>
        <text:p text:style-name="P15"><text:span text:style-name="T6">end</text:span><text:span text:style-name="T13"> </text:span><text:span text:style-name="T22">arch</text:span><text:span text:style-name="T13">;</text:span></text:p>
      </text:section>
      <text:p text:style-name="P30"/>
      <text:section text:style-name="Sect3" text:name="Section9">
        <text:p text:style-name="P34"><text:soft-page-break/>UART FROM BOOK</text:p>
        <text:p text:style-name="P18"/>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math_real</text:span><text:span text:style-name="T13">.</text:span><text:span text:style-name="T6">all</text:span><text:span text:style-name="T13">;</text:span></text:p>
        <text:p text:style-name="P16"/>
        <text:p text:style-name="P15"><text:span text:style-name="T6">package</text:span><text:span text:style-name="T13"> </text:span><text:span text:style-name="T22">defines</text:span><text:span text:style-name="T13"> </text:span><text:span text:style-name="T6">is</text:span></text:p>
        <text:p text:style-name="P15"><text:span text:style-name="T13"><text:s text:c="4"/></text:span><text:span text:style-name="T6">constant</text:span><text:span text:style-name="T13"> </text:span><text:span text:style-name="T7">dbit</text:span><text:span text:style-name="T13">: </text:span><text:span text:style-name="T28">natural</text:span><text:span text:style-name="T13"> := </text:span><text:span text:style-name="T31">8</text:span><text:span text:style-name="T13">;</text:span></text:p>
        <text:p text:style-name="P15"><text:span text:style-name="T13"><text:s text:c="4"/></text:span><text:span text:style-name="T6">constant</text:span><text:span text:style-name="T13"> </text:span><text:span text:style-name="T7">sb_tick</text:span><text:span text:style-name="T13">: </text:span><text:span text:style-name="T28">natural</text:span><text:span text:style-name="T13"> := </text:span><text:span text:style-name="T31">16</text:span><text:span text:style-name="T13">;</text:span></text:p>
        <text:p text:style-name="P15"><text:span text:style-name="T13"><text:s text:c="4"/></text:span><text:span text:style-name="T6">constant</text:span><text:span text:style-name="T13"> </text:span><text:span text:style-name="T7">gesu</text:span><text:span text:style-name="T13">: </text:span><text:span text:style-name="T28">natural</text:span><text:span text:style-name="T13"> := </text:span><text:span text:style-name="T28">natural</text:span><text:span text:style-name="T13">(</text:span><text:span text:style-name="T14">log2</text:span><text:span text:style-name="T13">(</text:span><text:span text:style-name="T28">real</text:span><text:span text:style-name="T13">(</text:span><text:span text:style-name="T7">dbit</text:span><text:span text:style-name="T13">)));</text:span></text:p>
        <text:p text:style-name="P16"/>
        <text:p text:style-name="P15"><text:span text:style-name="T13"><text:s text:c="4"/></text:span><text:span text:style-name="T6">type</text:span><text:span text:style-name="T13"> </text:span><text:span text:style-name="T28">data_size</text:span><text:span text:style-name="T13"> </text:span><text:span text:style-name="T6">is</text:span><text:span text:style-name="T13"> </text:span><text:span text:style-name="T6">array</text:span><text:span text:style-name="T13"> (</text:span><text:span text:style-name="T7">dbit</text:span><text:span text:style-name="T14">-</text:span><text:span text:style-name="T31">1</text:span><text:span text:style-name="T13"> </text:span><text:span text:style-name="T6">downto</text:span><text:span text:style-name="T13"> </text:span><text:span text:style-name="T31">0</text:span><text:span text:style-name="T13">) </text:span><text:span text:style-name="T6">of</text:span><text:span text:style-name="T13"> </text:span><text:span text:style-name="T28">std_logic</text:span><text:span text:style-name="T13">;</text:span></text:p>
        <text:p text:style-name="P15"><text:span text:style-name="T13"><text:s text:c="4"/></text:span><text:span text:style-name="T36">-- <text:s text:c="3"/>type data_width is array (gesu-1 downto 0) of unsigned;</text:span></text:p>
        <text:p text:style-name="P15"><text:span text:style-name="T6">end</text:span><text:span text:style-name="T13"> </text:span><text:span text:style-name="T22">defines</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24">--use work.defines.all;</text:p>
        <text:p text:style-name="P16"/>
        <text:p text:style-name="P15"><text:span text:style-name="T6">entity</text:span><text:span text:style-name="T13"> </text:span><text:span text:style-name="T22">uart_rx</text:span><text:span text:style-name="T13"> </text:span><text:span text:style-name="T6">is</text:span></text:p>
        <text:p text:style-name="P15"><text:span text:style-name="T13"><text:s text:c="4"/></text:span><text:span text:style-name="T6">generic</text:span><text:span text:style-name="T13">(</text:span></text:p>
        <text:p text:style-name="P15"><text:span text:style-name="T13"><text:s text:c="8"/></text:span><text:span text:style-name="T7">dbit</text:span><text:span text:style-name="T13">: </text:span><text:span text:style-name="T28">integer</text:span><text:span text:style-name="T13"> := </text:span><text:span text:style-name="T31">8</text:span><text:span text:style-name="T13">; </text:span><text:span text:style-name="T36">--# data bits</text:span></text:p>
        <text:p text:style-name="P15"><text:span text:style-name="T13"><text:s text:c="8"/></text:span><text:span text:style-name="T7">sb_tick</text:span><text:span text:style-name="T13">: </text:span><text:span text:style-name="T28">integer</text:span><text:span text:style-name="T13"> := </text:span><text:span text:style-name="T31">16</text:span><text:span text:style-name="T13">); </text:span><text:span text:style-name="T36">-- # ticks for stop bits</text:span></text:p>
        <text:p text:style-name="P16"/>
        <text:p text:style-name="P15"><text:span text:style-name="T13"><text:s text:c="8"/></text:span><text:span text:style-name="T6">port</text:span><text:span text:style-name="T13">(</text:span></text:p>
        <text:p text:style-name="P15"><text:span text:style-name="T13"><text:s text:c="12"/></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12"/></text:span><text:span text:style-name="T26">s_tick</text:span><text:span text:style-name="T13">, </text:span><text:span text:style-name="T26">rx</text:span><text:span text:style-name="T13">: </text:span><text:span text:style-name="T6">in</text:span><text:span text:style-name="T13"> </text:span><text:span text:style-name="T28">std_logic</text:span><text:span text:style-name="T13">; </text:span><text:span text:style-name="T36">--s_tick is the enable tick from the baud rate gen and there are 16 ticks in a bit interval</text:span></text:p>
        <text:p text:style-name="P15"><text:span text:style-name="T13"><text:s text:c="12"/></text:span><text:span text:style-name="T26">data_out</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text:span><text:span text:style-name="T36">--data_size;</text:span></text:p>
        <text:p text:style-name="P15"><text:span text:style-name="T13"><text:s text:c="12"/></text:span><text:span text:style-name="T26">rx_done_tick</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uart_rx</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uart_rx</text:span><text:span text:style-name="T13"> </text:span><text:span text:style-name="T6">is</text:span></text:p>
        <text:p text:style-name="P15"><text:span text:style-name="T13"><text:s text:c="4"/></text:span><text:span text:style-name="T6">type</text:span><text:span text:style-name="T13"> </text:span><text:span text:style-name="T28">state_type</text:span><text:span text:style-name="T13"> </text:span><text:span text:style-name="T6">is</text:span><text:span text:style-name="T13">(</text:span><text:span text:style-name="T7">idle</text:span><text:span text:style-name="T13">, </text:span><text:span text:style-name="T7">start</text:span><text:span text:style-name="T13">, </text:span><text:span text:style-name="T7">data</text:span><text:span text:style-name="T13">, </text:span><text:span text:style-name="T7">stop</text:span><text:span text:style-name="T13">);</text:span></text:p>
        <text:p text:style-name="P15"><text:span text:style-name="T13"><text:s text:c="4"/></text:span><text:span text:style-name="T6">signal</text:span><text:span text:style-name="T13"> </text:span><text:span text:style-name="T39">state_reg</text:span><text:span text:style-name="T13">, </text:span><text:span text:style-name="T39">state_next</text:span><text:span text:style-name="T13">: </text:span><text:span text:style-name="T28">state_type</text:span><text:span text:style-name="T13">;</text:span></text:p>
        <text:p text:style-name="P15"><text:span text:style-name="T13"><text:s text:c="4"/></text:span><text:span text:style-name="T6">signal</text:span><text:span text:style-name="T13"> </text:span><text:span text:style-name="T39">s_reg</text:span><text:span text:style-name="T13">, </text:span><text:span text:style-name="T39">s_next</text:span><text:span text:style-name="T13">: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 </text:span><text:span text:style-name="T36">--(sb_tick-1 downto 0); --tracks # of sampling ticks: 7 start state, 15 data state, sb_tick stop state</text:span></text:p>
        <text:p text:style-name="P15"><text:span text:style-name="T13"><text:s text:c="4"/></text:span><text:span text:style-name="T6">signal</text:span><text:span text:style-name="T13"> </text:span><text:span text:style-name="T39">n_reg</text:span><text:span text:style-name="T13">, </text:span><text:span text:style-name="T39">n_next</text:span><text:span text:style-name="T13">: </text:span><text:span text:style-name="T28">unsigned</text:span><text:span text:style-name="T13">(</text:span><text:span text:style-name="T31">2</text:span><text:span text:style-name="T13"> </text:span><text:span text:style-name="T6">downto</text:span><text:span text:style-name="T13"> </text:span><text:span text:style-name="T31">0</text:span><text:span text:style-name="T13">);</text:span><text:span text:style-name="T36">--(gesu-1 downto 0);-- data_width; --tracks # of data bits received in the data state.</text:span></text:p>
        <text:p text:style-name="P15"><text:span text:style-name="T13"><text:s text:c="4"/></text:span><text:span text:style-name="T6">signal</text:span><text:span text:style-name="T13"> </text:span><text:span text:style-name="T39">b_reg</text:span><text:span text:style-name="T13">, </text:span><text:span text:style-name="T39">b_nex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text:span><text:span text:style-name="T36">--data_size; --serial shift register</text:span></text:p>
        <text:p text:style-name="P23">begin</text:p>
        <text:p text:style-name="P15"><text:span text:style-name="T13"><text:s text:c="4"/></text:span><text:span text:style-name="T36">--FSMD state &amp; data registers</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state_reg</text:span><text:span text:style-name="T13"> &lt;= </text:span><text:span text:style-name="T7">idle</text:span><text:span text:style-name="T13">;</text:span></text:p>
        <text:p text:style-name="P15"><text:span text:style-name="T13"><text:s text:c="12"/></text:span><text:span text:style-name="T39">s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n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b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state_reg</text:span><text:span text:style-name="T13"> &lt;= </text:span><text:span text:style-name="T39">state_next</text:span><text:span text:style-name="T13">;</text:span></text:p>
        <text:p text:style-name="P15"><text:span text:style-name="T13"><text:s text:c="12"/></text:span><text:span text:style-name="T39">s_reg</text:span><text:span text:style-name="T13"> &lt;= </text:span><text:span text:style-name="T39">s_next</text:span><text:span text:style-name="T13">;</text:span></text:p>
        <text:p text:style-name="P15"><text:span text:style-name="T13"><text:s text:c="12"/></text:span><text:span text:style-name="T39">n_reg</text:span><text:span text:style-name="T13"> &lt;= </text:span><text:span text:style-name="T39">n_next</text:span><text:span text:style-name="T13">;</text:span></text:p>
        <text:p text:style-name="P15"><text:span text:style-name="T13"><text:s text:c="12"/></text:span><text:span text:style-name="T39">b_reg</text:span><text:span text:style-name="T13"> &lt;= </text:span><text:span text:style-name="T39">b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next state logic &amp; data path functional units/routing</text:span></text:p>
        <text:p text:style-name="P15"><text:span text:style-name="T13"><text:s text:c="4"/></text:span><text:span text:style-name="T6">process</text:span><text:span text:style-name="T13">(</text:span><text:span text:style-name="T39">state_reg</text:span><text:span text:style-name="T13">, </text:span><text:span text:style-name="T39">s_reg</text:span><text:span text:style-name="T13">, </text:span><text:span text:style-name="T39">n_reg</text:span><text:span text:style-name="T13">, </text:span><text:span text:style-name="T39">b_reg</text:span><text:span text:style-name="T13">, </text:span><text:span text:style-name="T26">rx</text:span><text:span text:style-name="T13">, </text:span><text:span text:style-name="T26">s_tick</text:span><text:span text:style-name="T13">, </text:span><text:span text:style-name="T39">b_next</text:span><text:span text:style-name="T13">)</text:span></text:p>
        <text:p text:style-name="P15"><text:span text:style-name="T13"><text:s text:c="4"/></text:span><text:span text:style-name="T6">begin</text:span></text:p>
        <text:p text:style-name="P16"/>
        <text:p text:style-name="P15"><text:span text:style-name="T13"><text:s text:c="8"/></text:span><text:span text:style-name="T39">state_next</text:span><text:span text:style-name="T13"> &lt;= </text:span><text:span text:style-name="T39">state_reg</text:span><text:span text:style-name="T13">;</text:span></text:p>
        <text:p text:style-name="P15"><text:span text:style-name="T13"><text:s text:c="8"/></text:span><text:span text:style-name="T39">s_next</text:span><text:span text:style-name="T13"> &lt;= </text:span><text:span text:style-name="T39">s_reg</text:span><text:span text:style-name="T13">;</text:span></text:p>
        <text:p text:style-name="P15"><text:span text:style-name="T13"><text:s text:c="8"/></text:span><text:span text:style-name="T39">n_next</text:span><text:span text:style-name="T13"> &lt;= </text:span><text:span text:style-name="T39">n_reg</text:span><text:span text:style-name="T13">;</text:span></text:p>
        <text:p text:style-name="P15"><text:span text:style-name="T13"><text:s text:c="8"/></text:span><text:span text:style-name="T39">b_next</text:span><text:span text:style-name="T13"> &lt;= </text:span><text:span text:style-name="T39">b_reg</text:span><text:span text:style-name="T13">;</text:span></text:p>
        <text:p text:style-name="P15"><text:span text:style-name="T13"><text:s text:c="8"/></text:span><text:span text:style-name="T26">rx_done_tick</text:span><text:span text:style-name="T13"> &lt;= </text:span><text:span text:style-name="T34">'0'</text:span><text:span text:style-name="T13">;</text:span></text:p>
        <text:p text:style-name="P16"/>
        <text:p text:style-name="P15"><text:span text:style-name="T13"><text:s text:c="8"/></text:span><text:span text:style-name="T6">case</text:span><text:span text:style-name="T13"> </text:span><text:span text:style-name="T39">state_reg</text:span><text:span text:style-name="T13"> </text:span><text:span text:style-name="T6">is</text:span></text:p>
        <text:p text:style-name="P15"><text:span text:style-name="T13"><text:s text:c="12"/></text:span><text:span text:style-name="T6">when</text:span><text:span text:style-name="T13"> </text:span><text:span text:style-name="T7">idle</text:span><text:span text:style-name="T13"> =&gt; </text:span><text:span text:style-name="T36">--start bit '0', stop bit '1'</text:span></text:p>
        <text:p text:style-name="P15"><text:span text:style-name="T13"><text:s text:c="16"/></text:span><text:span text:style-name="T6">if</text:span><text:span text:style-name="T13"> </text:span><text:span text:style-name="T26">rx</text:span><text:span text:style-name="T13"> = </text:span><text:span text:style-name="T34">'0'</text:span><text:span text:style-name="T13"> </text:span><text:span text:style-name="T6">then</text:span></text:p>
        <text:p text:style-name="P15"><text:span text:style-name="T13"><text:s text:c="20"/></text:span><text:span text:style-name="T39">state_next</text:span><text:span text:style-name="T13"> &lt;= </text:span><text:span text:style-name="T7">start</text:span><text:span text:style-name="T13">;</text:span></text:p>
        <text:p text:style-name="P15"><text:span text:style-name="T13"><text:s text:c="20"/></text:span><text:span text:style-name="T39">s_next</text:span><text:span text:style-name="T13"> &lt;= (</text:span><text:span text:style-name="T6">others</text:span><text:span text:style-name="T13"> =&gt; </text:span><text:span text:style-name="T34">'0'</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when</text:span><text:span text:style-name="T13"> </text:span><text:span text:style-name="T7">start</text:span><text:span text:style-name="T13"> =&gt;</text:span></text:p>
        <text:p text:style-name="P15"><text:span text:style-name="T13"><text:s text:c="16"/></text:span><text:span text:style-name="T6">if</text:span><text:span text:style-name="T13"> </text:span><text:span text:style-name="T26">s_tick</text:span><text:span text:style-name="T13"> = </text:span><text:span text:style-name="T34">'1'</text:span><text:span text:style-name="T13"> </text:span><text:span text:style-name="T6">then</text:span></text:p>
        <text:p text:style-name="P15"><text:span text:style-name="T13"><text:s text:c="20"/></text:span><text:span text:style-name="T6">if</text:span><text:span text:style-name="T13"> </text:span><text:span text:style-name="T39">s_reg</text:span><text:span text:style-name="T13"> = </text:span><text:span text:style-name="T31">7</text:span><text:span text:style-name="T13"> </text:span><text:span text:style-name="T6">then</text:span></text:p>
        <text:p text:style-name="P15"><text:span text:style-name="T13"><text:s text:c="24"/></text:span><text:span text:style-name="T39">state_next</text:span><text:span text:style-name="T13"> &lt;= </text:span><text:span text:style-name="T7">data</text:span><text:span text:style-name="T13">;</text:span></text:p>
        <text:p text:style-name="P15"><text:span text:style-name="T13"><text:s text:c="24"/></text:span><text:span text:style-name="T39">s_next</text:span><text:span text:style-name="T13"> &lt;= (</text:span><text:span text:style-name="T6">others</text:span><text:span text:style-name="T13"> =&gt; </text:span><text:span text:style-name="T34">'0'</text:span><text:span text:style-name="T13">);</text:span></text:p>
        <text:p text:style-name="P15"><text:span text:style-name="T13"><text:s text:c="24"/></text:span><text:span text:style-name="T39">n_next</text:span><text:span text:style-name="T13"> &lt;= (</text:span><text:span text:style-name="T6">others</text:span><text:span text:style-name="T13"> =&gt; </text:span><text:span text:style-name="T34">'0'</text:span><text:span text:style-name="T13">);</text:span></text:p>
        <text:p text:style-name="P15"><text:span text:style-name="T13"><text:s text:c="20"/></text:span><text:span text:style-name="T6">else</text:span></text:p>
        <text:p text:style-name="P15"><text:span text:style-name="T13"><text:s text:c="24"/></text:span><text:span text:style-name="T39">s_next</text:span><text:span text:style-name="T13"> &lt;= </text:span><text:span text:style-name="T39">s_reg</text:span><text:span text:style-name="T13"> </text:span><text:span text:style-name="T14">+</text:span><text:span text:style-name="T31">1</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when</text:span><text:span text:style-name="T13"> </text:span><text:span text:style-name="T7">data</text:span><text:span text:style-name="T13"> =&gt;</text:span></text:p>
        <text:p text:style-name="P15"><text:span text:style-name="T13"><text:s text:c="16"/></text:span><text:span text:style-name="T6">if</text:span><text:span text:style-name="T13"> (</text:span><text:span text:style-name="T26">s_tick</text:span><text:span text:style-name="T13"> = </text:span><text:span text:style-name="T34">'1'</text:span><text:span text:style-name="T13">) </text:span><text:span text:style-name="T6">then</text:span></text:p>
        <text:p text:style-name="P15"><text:span text:style-name="T13"><text:s text:c="20"/></text:span><text:span text:style-name="T6">if</text:span><text:span text:style-name="T13"> </text:span><text:span text:style-name="T39">s_reg</text:span><text:span text:style-name="T13"> = </text:span><text:span text:style-name="T31">15</text:span><text:span text:style-name="T13"> </text:span><text:span text:style-name="T6">then</text:span></text:p>
        <text:p text:style-name="P15"><text:span text:style-name="T13"><text:s text:c="24"/></text:span><text:span text:style-name="T39">b_reg</text:span><text:span text:style-name="T13"> &lt;= </text:span><text:span text:style-name="T26">rx</text:span><text:span text:style-name="T13"> </text:span><text:span text:style-name="T14">&amp;</text:span><text:span text:style-name="T13"> </text:span><text:span text:style-name="T39">b_reg</text:span><text:span text:style-name="T13">(</text:span><text:span text:style-name="T31">7</text:span><text:span text:style-name="T13"> </text:span><text:span text:style-name="T6">downto</text:span><text:span text:style-name="T13"> </text:span><text:span text:style-name="T31">1</text:span><text:span text:style-name="T13">);</text:span></text:p>
        <text:p text:style-name="P15"><text:span text:style-name="T13"><text:s text:c="24"/></text:span><text:span text:style-name="T39">s_next</text:span><text:span text:style-name="T13"> &lt;= (</text:span><text:span text:style-name="T6">others</text:span><text:span text:style-name="T13"> =&gt; </text:span><text:span text:style-name="T34">'0'</text:span><text:span text:style-name="T13">);</text:span></text:p>
        <text:p text:style-name="P16"/>
        <text:p text:style-name="P15"><text:span text:style-name="T13"><text:s text:c="24"/></text:span><text:span text:style-name="T6">if</text:span><text:span text:style-name="T13"> </text:span><text:span text:style-name="T39">n_reg</text:span><text:span text:style-name="T13"> = </text:span><text:span text:style-name="T7">dbit</text:span><text:span text:style-name="T14">-</text:span><text:span text:style-name="T31">1</text:span><text:span text:style-name="T13"> </text:span><text:span text:style-name="T6">then</text:span></text:p>
        <text:p text:style-name="P15"><text:span text:style-name="T13"><text:s text:c="28"/></text:span><text:span text:style-name="T39">state_next</text:span><text:span text:style-name="T13"> &lt;= </text:span><text:span text:style-name="T7">stop</text:span><text:span text:style-name="T13">;</text:span></text:p>
        <text:p text:style-name="P15"><text:span text:style-name="T13"><text:s text:c="24"/></text:span><text:span text:style-name="T6">else</text:span></text:p>
        <text:p text:style-name="P15"><text:span text:style-name="T13"><text:s text:c="28"/></text:span><text:span text:style-name="T39">n_next</text:span><text:span text:style-name="T13"> &lt;= </text:span><text:span text:style-name="T39">n_reg</text:span><text:span text:style-name="T13"> </text:span><text:span text:style-name="T14">+</text:span><text:span text:style-name="T31">1</text:span><text:span text:style-name="T13">;</text:span></text:p>
        <text:p text:style-name="P15"><text:span text:style-name="T13"><text:s text:c="24"/></text:span><text:span text:style-name="T6">end</text:span><text:span text:style-name="T13"> </text:span><text:span text:style-name="T6">if</text:span><text:span text:style-name="T13">;</text:span></text:p>
        <text:p text:style-name="P15"><text:soft-page-break/><text:span text:style-name="T13"><text:s text:c="24"/></text:span><text:span text:style-name="T39">s_next</text:span><text:span text:style-name="T13"> &lt;= </text:span><text:span text:style-name="T39">s_reg</text:span><text:span text:style-name="T13"> </text:span><text:span text:style-name="T14">+</text:span><text:span text:style-name="T31">1</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6"><text:tab/><text:tab/><text:tab/><text:tab/>when stop =&gt;</text:p>
        <text:p text:style-name="P16"><text:tab/><text:tab/><text:tab/><text:tab/><text:tab/>tx_next &lt;= '1';</text:p>
        <text:p text:style-name="P16"><text:tab/><text:tab/><text:tab/><text:tab/><text:tab/>if s_tick = '1' then</text:p>
        <text:p text:style-name="P16"><text:tab/><text:tab/><text:tab/><text:tab/><text:tab/><text:tab/>if s_reg = sb_tick -1 then</text:p>
        <text:p text:style-name="P16"><text:tab/><text:tab/><text:tab/><text:tab/><text:tab/><text:tab/><text:tab/>state_next &lt;= idle;</text:p>
        <text:p text:style-name="P16"><text:tab/><text:tab/><text:tab/><text:tab/><text:tab/><text:tab/><text:tab/>tx_done_tick &lt;= '1';</text:p>
        <text:p text:style-name="P16"><text:tab/><text:tab/><text:tab/><text:tab/><text:tab/><text:tab/>else</text:p>
        <text:p text:style-name="P16"><text:tab/><text:tab/><text:tab/><text:tab/><text:tab/><text:tab/><text:tab/>s_next &lt;= s_reg +1;</text:p>
        <text:p text:style-name="P16"><text:tab/><text:tab/><text:tab/><text:tab/><text:tab/><text:tab/>end if;</text:p>
        <text:p text:style-name="P16"><text:tab/><text:tab/><text:tab/>end if;</text:p>
        <text:p text:style-name="P15"><text:span text:style-name="T13"><text:s text:c="8"/></text:span><text:span text:style-name="T6">end</text:span><text:span text:style-name="T13"> </text:span><text:span text:style-name="T6">case</text:span><text:span text:style-name="T13">; <text:s text:c="2"/></text:span></text:p>
        <text:p text:style-name="P15"><text:span text:style-name="T13"><text:s/></text:span><text:span text:style-name="T6">end</text:span><text:span text:style-name="T13"> </text:span><text:span text:style-name="T6">process</text:span><text:span text:style-name="T13">; <text:s/></text:span></text:p>
        <text:p text:style-name="P15"><text:span text:style-name="T26">data_out</text:span><text:span text:style-name="T13"> &lt;= </text:span><text:span text:style-name="T39">b_reg</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section>
      <text:section text:style-name="Sect3" text:name="Section10">
        <text:p text:style-name="P34"><text:soft-page-break/>I2S - TX</text:p>
        <text:p text:style-name="P38"><text:span text:style-name="T10">library</text:span><text:span text:style-name="T17"> </text:span><text:span text:style-name="T25">ieee</text:span><text:span text:style-name="T17">;</text:span></text:p>
        <text:p text:style-name="P28"><text:span text:style-name="T17"><text:s text:c="4"/></text:span><text:span text:style-name="T10">use</text:span><text:span text:style-name="T17"> </text:span><text:span text:style-name="T25">ieee</text:span><text:span text:style-name="T17">.</text:span><text:span text:style-name="T25">std_logic_1164</text:span><text:span text:style-name="T17">.</text:span><text:span text:style-name="T10">all</text:span><text:span text:style-name="T17">;</text:span></text:p>
        <text:p text:style-name="P28"><text:span text:style-name="T17"><text:s text:c="4"/></text:span><text:span text:style-name="T10">use</text:span><text:span text:style-name="T17"> </text:span><text:span text:style-name="T25">ieee</text:span><text:span text:style-name="T17">.</text:span><text:span text:style-name="T25">numeric_std</text:span><text:span text:style-name="T17">.</text:span><text:span text:style-name="T10">all</text:span><text:span text:style-name="T17">;</text:span></text:p>
        <text:p text:style-name="P16"/>
        <text:p text:style-name="P28"><text:span text:style-name="T10">entity</text:span><text:span text:style-name="T17"> </text:span><text:span text:style-name="T25">i2s_tx</text:span><text:span text:style-name="T17"> </text:span><text:span text:style-name="T10">is</text:span></text:p>
        <text:p text:style-name="P28"><text:span text:style-name="T17"><text:s text:c="4"/></text:span><text:span text:style-name="T10">port</text:span><text:span text:style-name="T17">( </text:span><text:span text:style-name="T27">clk</text:span><text:span text:style-name="T17">: </text:span><text:span text:style-name="T10">in</text:span><text:span text:style-name="T17"> </text:span><text:span text:style-name="T29">std_logic</text:span><text:span text:style-name="T17">;</text:span></text:p>
        <text:p text:style-name="P28"><text:span text:style-name="T17"><text:s text:c="4"/></text:span><text:span text:style-name="T27">fall_edge</text:span><text:span text:style-name="T17">, </text:span><text:span text:style-name="T27">rise_edge</text:span><text:span text:style-name="T17">: </text:span><text:span text:style-name="T10">in</text:span><text:span text:style-name="T17"> </text:span><text:span text:style-name="T29">std_logic</text:span><text:span text:style-name="T17">;</text:span></text:p>
        <text:p text:style-name="P28"><text:span text:style-name="T17"><text:s text:c="4"/></text:span><text:span text:style-name="T27">rst</text:span><text:span text:style-name="T17">: </text:span><text:span text:style-name="T10">in</text:span><text:span text:style-name="T17"> </text:span><text:span text:style-name="T29">boolean</text:span><text:span text:style-name="T17">;</text:span></text:p>
        <text:p text:style-name="P28"><text:span text:style-name="T17"><text:s text:c="4"/></text:span><text:span text:style-name="T27">it_sel</text:span><text:span text:style-name="T17">: </text:span><text:span text:style-name="T10">in</text:span><text:span text:style-name="T17"> </text:span><text:span text:style-name="T29">std_logic_vector</text:span><text:span text:style-name="T17">(</text:span><text:span text:style-name="T32">1</text:span><text:span text:style-name="T17"> </text:span><text:span text:style-name="T10">downto</text:span><text:span text:style-name="T17"> </text:span><text:span text:style-name="T32">0</text:span><text:span text:style-name="T17">);</text:span></text:p>
        <text:p text:style-name="P28"><text:span text:style-name="T17"><text:s text:c="4"/></text:span><text:span text:style-name="T27">it_data</text:span><text:span text:style-name="T17">: </text:span><text:span text:style-name="T10">in</text:span><text:span text:style-name="T17"> </text:span><text:span text:style-name="T29">std_logic_vector</text:span><text:span text:style-name="T17">(</text:span><text:span text:style-name="T32">7</text:span><text:span text:style-name="T17"> </text:span><text:span text:style-name="T10">downto</text:span><text:span text:style-name="T17"> </text:span><text:span text:style-name="T32">0</text:span><text:span text:style-name="T17">);</text:span></text:p>
        <text:p text:style-name="P28"><text:span text:style-name="T17"><text:s text:c="4"/></text:span><text:span text:style-name="T27">it_ws</text:span><text:span text:style-name="T17">, </text:span><text:span text:style-name="T27">it_sclk</text:span><text:span text:style-name="T17">, </text:span><text:span text:style-name="T27">it_sd</text:span><text:span text:style-name="T17">: </text:span><text:span text:style-name="T10">out</text:span><text:span text:style-name="T17"> </text:span><text:span text:style-name="T29">std_logic</text:span><text:span text:style-name="T17">);</text:span></text:p>
        <text:p text:style-name="P28"><text:span text:style-name="T10">end</text:span><text:span text:style-name="T17"> </text:span><text:span text:style-name="T10">entity</text:span><text:span text:style-name="T17">;</text:span></text:p>
        <text:p text:style-name="P16"/>
        <text:p text:style-name="P28"><text:span text:style-name="T10">architecture</text:span><text:span text:style-name="T17"> </text:span><text:span text:style-name="T25">arch</text:span><text:span text:style-name="T17"> </text:span><text:span text:style-name="T10">of</text:span><text:span text:style-name="T17"> </text:span><text:span text:style-name="T25">i2s_tx</text:span><text:span text:style-name="T17"> </text:span><text:span text:style-name="T10">is</text:span></text:p>
        <text:p text:style-name="P16"/>
        <text:p text:style-name="P28"><text:span text:style-name="T17"><text:s text:c="4"/></text:span><text:span text:style-name="T10">signal</text:span><text:span text:style-name="T17"> </text:span><text:span text:style-name="T40">ssclk</text:span><text:span text:style-name="T17">, </text:span><text:span text:style-name="T40">s_ws</text:span><text:span text:style-name="T17">, </text:span><text:span text:style-name="T40">sel</text:span><text:span text:style-name="T17">, </text:span><text:span text:style-name="T40">lr_edge</text:span><text:span text:style-name="T17">, </text:span><text:span text:style-name="T40">sel_rise</text:span><text:span text:style-name="T17">: </text:span><text:span text:style-name="T29">std_logic</text:span><text:span text:style-name="T17">;</text:span></text:p>
        <text:p text:style-name="P28"><text:span text:style-name="T17"><text:s text:c="4"/></text:span><text:span text:style-name="T10">signal</text:span><text:span text:style-name="T17"> </text:span><text:span text:style-name="T40">bit_count</text:span><text:span text:style-name="T17">: </text:span><text:span text:style-name="T29">unsigned</text:span><text:span text:style-name="T17">(</text:span><text:span text:style-name="T32">3</text:span><text:span text:style-name="T17"> </text:span><text:span text:style-name="T10">downto</text:span><text:span text:style-name="T17"> </text:span><text:span text:style-name="T32">0</text:span><text:span text:style-name="T17">);</text:span></text:p>
        <text:p text:style-name="P16"/>
        <text:p text:style-name="P28"><text:span text:style-name="T17"><text:s text:c="4"/></text:span><text:span text:style-name="T10">signal</text:span><text:span text:style-name="T17"> </text:span><text:span text:style-name="T40">shift</text:span><text:span text:style-name="T17">, <text:s/></text:span><text:span text:style-name="T40">shift_nxt</text:span><text:span text:style-name="T17">, </text:span><text:span text:style-name="T40">shift_lft</text:span><text:span text:style-name="T17">, </text:span><text:span text:style-name="T40">shift_rht</text:span><text:span text:style-name="T17">: </text:span><text:span text:style-name="T29">std_logic_vector</text:span></text:p>
        <text:p text:style-name="P28"><text:span text:style-name="T29"><text:s text:c="4"/></text:span><text:span text:style-name="T17">(</text:span><text:span text:style-name="T32">7</text:span><text:span text:style-name="T17"> </text:span><text:span text:style-name="T10">downto</text:span><text:span text:style-name="T17"> </text:span><text:span text:style-name="T32">0</text:span><text:span text:style-name="T17">);</text:span></text:p>
        <text:p text:style-name="P28"><text:span text:style-name="T17"><text:s text:c="4"/></text:span><text:span text:style-name="T10">signal</text:span><text:span text:style-name="T17"> </text:span><text:span text:style-name="T40">int_rise_e</text:span><text:span text:style-name="T17">, </text:span><text:span text:style-name="T40">int_fall_e</text:span><text:span text:style-name="T17">, </text:span><text:span text:style-name="T40">int_edge_reg</text:span><text:span text:style-name="T17">: </text:span><text:span text:style-name="T29">std_logic</text:span><text:span text:style-name="T17">;</text:span></text:p>
        <text:p text:style-name="P16"/>
        <text:p text:style-name="P23">begin</text:p>
        <text:p text:style-name="P16"/>
        <text:p text:style-name="P28"><text:span text:style-name="T17"><text:s text:c="4"/></text:span><text:span text:style-name="T10">process</text:span><text:span text:style-name="T17">(</text:span><text:span text:style-name="T27">clk</text:span><text:span text:style-name="T17">, </text:span><text:span text:style-name="T27">rst</text:span><text:span text:style-name="T17">, </text:span><text:span text:style-name="T40">sel_rise</text:span><text:span text:style-name="T17">)</text:span></text:p>
        <text:p text:style-name="P28"><text:span text:style-name="T17"><text:s text:c="4"/></text:span><text:span text:style-name="T10">begin</text:span></text:p>
        <text:p text:style-name="P28"><text:span text:style-name="T17"><text:s text:c="8"/></text:span><text:span text:style-name="T10">if</text:span><text:span text:style-name="T17"> </text:span><text:span text:style-name="T27">rst</text:span><text:span text:style-name="T17"> </text:span><text:span text:style-name="T10">or</text:span><text:span text:style-name="T17"> </text:span><text:span text:style-name="T40">sel_rise</text:span><text:span text:style-name="T17"> = </text:span><text:span text:style-name="T35">'1'</text:span><text:span text:style-name="T17"> </text:span><text:span text:style-name="T10">then</text:span></text:p>
        <text:p text:style-name="P28"><text:span text:style-name="T17"><text:s text:c="12"/></text:span><text:span text:style-name="T40">ssclk</text:span><text:span text:style-name="T17"> &lt;= </text:span><text:span text:style-name="T35">'0'</text:span><text:span text:style-name="T17">;</text:span></text:p>
        <text:p text:style-name="P28"><text:span text:style-name="T17"><text:s text:c="8"/></text:span><text:span text:style-name="T10">elsif</text:span><text:span text:style-name="T17"> </text:span><text:span text:style-name="T18">rising_edge</text:span><text:span text:style-name="T17">(</text:span><text:span text:style-name="T27">clk</text:span><text:span text:style-name="T17">) </text:span><text:span text:style-name="T10">then</text:span></text:p>
        <text:p text:style-name="P28"><text:span text:style-name="T17"><text:s text:c="12"/></text:span><text:span text:style-name="T10">if</text:span><text:span text:style-name="T17"> </text:span><text:span text:style-name="T27">rise_edge</text:span><text:span text:style-name="T17"> = </text:span><text:span text:style-name="T35">'1'</text:span><text:span text:style-name="T17"> </text:span><text:span text:style-name="T10">then</text:span></text:p>
        <text:p text:style-name="P28"><text:span text:style-name="T17"><text:s text:c="16"/></text:span><text:span text:style-name="T40">ssclk</text:span><text:span text:style-name="T17"> &lt;= </text:span><text:span text:style-name="T10">not</text:span><text:span text:style-name="T17"> </text:span><text:span text:style-name="T40">ssclk</text:span><text:span text:style-name="T17">;</text:span></text:p>
        <text:p text:style-name="P28"><text:span text:style-name="T17"><text:s text:c="12"/></text:span><text:span text:style-name="T10">end</text:span><text:span text:style-name="T17"> </text:span><text:span text:style-name="T10">if</text:span><text:span text:style-name="T17">;</text:span></text:p>
        <text:p text:style-name="P28"><text:span text:style-name="T17"><text:s text:c="8"/></text:span><text:span text:style-name="T10">end</text:span><text:span text:style-name="T17"> </text:span><text:span text:style-name="T10">if</text:span><text:span text:style-name="T17">;</text:span></text:p>
        <text:p text:style-name="P28"><text:span text:style-name="T17"><text:s text:c="4"/></text:span><text:span text:style-name="T10">end</text:span><text:span text:style-name="T17"> </text:span><text:span text:style-name="T10">process</text:span><text:span text:style-name="T17">;</text:span></text:p>
        <text:p text:style-name="P16"/>
        <text:p text:style-name="P28"><text:span text:style-name="T17"><text:s text:c="4"/></text:span><text:span text:style-name="T10">process</text:span><text:span text:style-name="T17">(</text:span><text:span text:style-name="T27">clk</text:span><text:span text:style-name="T17">, </text:span><text:span text:style-name="T27">rst</text:span><text:span text:style-name="T17">)</text:span></text:p>
        <text:p text:style-name="P28"><text:span text:style-name="T17"><text:s text:c="4"/></text:span><text:span text:style-name="T10">begin</text:span></text:p>
        <text:p text:style-name="P28"><text:span text:style-name="T17"><text:s text:c="8"/></text:span><text:span text:style-name="T10">if</text:span><text:span text:style-name="T17"> </text:span><text:span text:style-name="T27">rst</text:span><text:span text:style-name="T17"> </text:span><text:span text:style-name="T10">then</text:span></text:p>
        <text:p text:style-name="P28"><text:span text:style-name="T17"><text:s text:c="12"/></text:span><text:span text:style-name="T40">int_edge_reg</text:span><text:span text:style-name="T17"> &lt;= </text:span><text:span text:style-name="T35">'0'</text:span><text:span text:style-name="T17">;</text:span></text:p>
        <text:p text:style-name="P28"><text:span text:style-name="T17"><text:s text:c="8"/></text:span><text:span text:style-name="T10">elsif</text:span><text:span text:style-name="T17"> </text:span><text:span text:style-name="T18">rising_edge</text:span><text:span text:style-name="T17">(</text:span><text:span text:style-name="T27">clk</text:span><text:span text:style-name="T17">) </text:span><text:span text:style-name="T10">then</text:span></text:p>
        <text:p text:style-name="P28"><text:span text:style-name="T17"><text:s text:c="12"/></text:span><text:span text:style-name="T40">int_edge_reg</text:span><text:span text:style-name="T17"> &lt;= </text:span><text:span text:style-name="T40">ssclk</text:span><text:span text:style-name="T17">;</text:span></text:p>
        <text:p text:style-name="P28"><text:span text:style-name="T17"><text:s text:c="8"/></text:span><text:span text:style-name="T10">end</text:span><text:span text:style-name="T17"> </text:span><text:span text:style-name="T10">if</text:span><text:span text:style-name="T17">;</text:span></text:p>
        <text:p text:style-name="P28"><text:span text:style-name="T17"><text:s text:c="4"/></text:span><text:span text:style-name="T10">end</text:span><text:span text:style-name="T17"> </text:span><text:span text:style-name="T10">process</text:span><text:span text:style-name="T17">;</text:span></text:p>
        <text:p text:style-name="P16"/>
        <text:p text:style-name="P28"><text:span text:style-name="T17"><text:s text:c="4"/></text:span><text:span text:style-name="T40">int_fall_e</text:span><text:span text:style-name="T17"> &lt;= (</text:span><text:span text:style-name="T10">not</text:span><text:span text:style-name="T17"> </text:span><text:span text:style-name="T40">int_edge_reg</text:span><text:span text:style-name="T17">) </text:span><text:span text:style-name="T10">nor</text:span><text:span text:style-name="T17"> </text:span><text:span text:style-name="T40">ssclk</text:span><text:span text:style-name="T17">;</text:span></text:p>
        <text:p text:style-name="P28"><text:span text:style-name="T17"><text:s text:c="4"/></text:span><text:span text:style-name="T40">int_rise_e</text:span><text:span text:style-name="T17"> &lt;= (</text:span><text:span text:style-name="T10">not</text:span><text:span text:style-name="T17"> </text:span><text:span text:style-name="T40">int_edge_reg</text:span><text:span text:style-name="T17">) </text:span><text:span text:style-name="T10">and</text:span><text:span text:style-name="T17"> </text:span><text:span text:style-name="T40">ssclk</text:span><text:span text:style-name="T17">;</text:span></text:p>
        <text:p text:style-name="P16"/>
        <text:p text:style-name="P28"><text:span text:style-name="T17"><text:s text:c="4"/></text:span><text:span text:style-name="T10">process</text:span><text:span text:style-name="T17">(</text:span><text:span text:style-name="T27">clk</text:span><text:span text:style-name="T17">, </text:span><text:span text:style-name="T27">rst</text:span><text:span text:style-name="T17">, </text:span><text:span text:style-name="T40">sel_rise</text:span><text:span text:style-name="T17">)</text:span></text:p>
        <text:p text:style-name="P28"><text:span text:style-name="T17"><text:s text:c="4"/></text:span><text:span text:style-name="T10">begin</text:span></text:p>
        <text:p text:style-name="P28"><text:span text:style-name="T17"><text:s text:c="8"/></text:span><text:span text:style-name="T10">if</text:span><text:span text:style-name="T17"> </text:span><text:span text:style-name="T27">rst</text:span><text:span text:style-name="T17"> </text:span><text:span text:style-name="T10">or</text:span><text:span text:style-name="T17"> </text:span><text:span text:style-name="T40">sel_rise</text:span><text:span text:style-name="T17"> = </text:span><text:span text:style-name="T35">'1'</text:span><text:span text:style-name="T17"> </text:span><text:span text:style-name="T10">then</text:span></text:p>
        <text:p text:style-name="P28"><text:span text:style-name="T17"><text:s text:c="12"/></text:span><text:span text:style-name="T40">bit_count</text:span><text:span text:style-name="T17"> &lt;= (</text:span><text:span text:style-name="T10">others</text:span><text:span text:style-name="T17"> =&gt; </text:span><text:span text:style-name="T35">'0'</text:span><text:span text:style-name="T17">);</text:span></text:p>
        <text:p text:style-name="P28"><text:span text:style-name="T17"><text:s text:c="12"/></text:span><text:span text:style-name="T40">s_ws</text:span><text:span text:style-name="T17"> &lt;= </text:span><text:span text:style-name="T35">'0'</text:span><text:span text:style-name="T17">;</text:span></text:p>
        <text:p text:style-name="P28"><text:span text:style-name="T17"><text:s text:c="8"/></text:span><text:span text:style-name="T10">elsif</text:span><text:span text:style-name="T17"> <text:s text:c="3"/></text:span><text:span text:style-name="T18">rising_edge</text:span><text:span text:style-name="T17">(</text:span><text:span text:style-name="T27">clk</text:span><text:span text:style-name="T17">) </text:span><text:span text:style-name="T10">then</text:span></text:p>
        <text:p text:style-name="P28"><text:span text:style-name="T17"><text:s text:c="12"/></text:span><text:span text:style-name="T10">if</text:span><text:span text:style-name="T17"> </text:span><text:span text:style-name="T40">int_fall_e</text:span><text:span text:style-name="T17"> = </text:span><text:span text:style-name="T35">'1'</text:span><text:span text:style-name="T17"> </text:span><text:span text:style-name="T10">then</text:span></text:p>
        <text:p text:style-name="P28"><text:span text:style-name="T17"><text:s text:c="16"/></text:span><text:span text:style-name="T40">bit_count</text:span><text:span text:style-name="T17"> &lt;= </text:span><text:span text:style-name="T40">bit_count</text:span><text:span text:style-name="T17"> </text:span><text:span text:style-name="T18">+</text:span><text:span text:style-name="T32">1</text:span><text:span text:style-name="T17">;</text:span></text:p>
        <text:p text:style-name="P16"/>
        <text:p text:style-name="P28"><text:span text:style-name="T17"><text:s text:c="16"/></text:span><text:span text:style-name="T10">if</text:span><text:span text:style-name="T17"> </text:span><text:span text:style-name="T40">bit_count</text:span><text:span text:style-name="T17"> = </text:span><text:span text:style-name="T32">6</text:span><text:span text:style-name="T17"> </text:span><text:span text:style-name="T10">or</text:span><text:span text:style-name="T17"> </text:span><text:span text:style-name="T40">bit_count</text:span><text:span text:style-name="T17"> = </text:span><text:span text:style-name="T32">14</text:span><text:span text:style-name="T17"> </text:span><text:span text:style-name="T10">then</text:span></text:p>
        <text:p text:style-name="P28"><text:span text:style-name="T17"><text:s text:c="20"/></text:span><text:span text:style-name="T40">s_ws</text:span><text:span text:style-name="T17"> &lt;= </text:span><text:span text:style-name="T10">not</text:span><text:span text:style-name="T17"> </text:span><text:span text:style-name="T40">s_ws</text:span><text:span text:style-name="T17">;</text:span></text:p>
        <text:p text:style-name="P28"><text:span text:style-name="T17"><text:s text:c="16"/></text:span><text:span text:style-name="T10">end</text:span><text:span text:style-name="T17"> </text:span><text:span text:style-name="T10">if</text:span><text:span text:style-name="T17">;</text:span></text:p>
        <text:p text:style-name="P28"><text:span text:style-name="T17"><text:s text:c="12"/></text:span><text:span text:style-name="T10">end</text:span><text:span text:style-name="T17"> </text:span><text:span text:style-name="T10">if</text:span><text:span text:style-name="T17">;</text:span></text:p>
        <text:p text:style-name="P28"><text:span text:style-name="T17"><text:s text:c="8"/></text:span><text:span text:style-name="T10">end</text:span><text:span text:style-name="T17"> </text:span><text:span text:style-name="T10">if</text:span><text:span text:style-name="T17">;</text:span></text:p>
        <text:p text:style-name="P28"><text:span text:style-name="T17"><text:s text:c="4"/></text:span><text:span text:style-name="T10">end</text:span><text:span text:style-name="T17"> </text:span><text:span text:style-name="T10">process</text:span><text:span text:style-name="T17">;</text:span></text:p>
        <text:p text:style-name="P16"/>
        <text:p text:style-name="P28"><text:span text:style-name="T17"><text:s text:c="4"/></text:span><text:span text:style-name="T27">it_sclk</text:span><text:span text:style-name="T17"> &lt;= </text:span><text:span text:style-name="T40">ssclk</text:span><text:span text:style-name="T17">;</text:span></text:p>
        <text:p text:style-name="P28"><text:span text:style-name="T17"><text:s text:c="4"/></text:span><text:span text:style-name="T27">it_ws</text:span><text:span text:style-name="T17"> &lt;= </text:span><text:span text:style-name="T40">s_ws</text:span><text:span text:style-name="T17">;</text:span></text:p>
        <text:p text:style-name="P16"/>
        <text:p text:style-name="P16"/>
        <text:p text:style-name="P28"><text:span text:style-name="T17"><text:s text:c="4"/></text:span><text:span text:style-name="T40">sel</text:span><text:span text:style-name="T17"> &lt;= </text:span><text:span text:style-name="T27">it_sel</text:span><text:span text:style-name="T17">(</text:span><text:span text:style-name="T32">0</text:span><text:span text:style-name="T17">) </text:span><text:span text:style-name="T10">nor</text:span><text:span text:style-name="T17"> </text:span><text:span text:style-name="T27">it_sel</text:span><text:span text:style-name="T17">(</text:span><text:span text:style-name="T32">1</text:span><text:span text:style-name="T17">);</text:span></text:p>
        <text:p text:style-name="P16"/>
        <text:p text:style-name="P28"><text:span text:style-name="T17"><text:s text:c="4"/></text:span><text:span text:style-name="T10">process</text:span><text:span text:style-name="T17">(</text:span><text:span text:style-name="T27">clk</text:span><text:span text:style-name="T17">, </text:span><text:span text:style-name="T27">rst</text:span><text:span text:style-name="T17">)</text:span></text:p>
        <text:p text:style-name="P28"><text:span text:style-name="T17"><text:s text:c="4"/></text:span><text:span text:style-name="T10">begin</text:span></text:p>
        <text:p text:style-name="P28"><text:span text:style-name="T17"><text:s text:c="8"/></text:span><text:span text:style-name="T10">if</text:span><text:span text:style-name="T17"> </text:span><text:span text:style-name="T27">rst</text:span><text:span text:style-name="T17"> </text:span><text:span text:style-name="T10">then</text:span></text:p>
        <text:p text:style-name="P28"><text:span text:style-name="T17"><text:s text:c="12"/></text:span><text:span text:style-name="T40">lr_edge</text:span><text:span text:style-name="T17"> &lt;= </text:span><text:span text:style-name="T35">'0'</text:span><text:span text:style-name="T17">;</text:span></text:p>
        <text:p text:style-name="P28"><text:span text:style-name="T17"><text:s text:c="8"/></text:span><text:span text:style-name="T10">elsif</text:span><text:span text:style-name="T17"> </text:span><text:span text:style-name="T18">rising_edge</text:span><text:span text:style-name="T17">(</text:span><text:span text:style-name="T27">clk</text:span><text:span text:style-name="T17">) </text:span><text:span text:style-name="T10">then</text:span></text:p>
        <text:p text:style-name="P28"><text:span text:style-name="T17"><text:s text:c="12"/></text:span><text:span text:style-name="T40">lr_edge</text:span><text:span text:style-name="T17"> &lt;= </text:span><text:span text:style-name="T40">sel</text:span><text:span text:style-name="T17">;</text:span></text:p>
        <text:p text:style-name="P28"><text:span text:style-name="T17"><text:s text:c="8"/></text:span><text:span text:style-name="T10">end</text:span><text:span text:style-name="T17"> </text:span><text:span text:style-name="T10">if</text:span><text:span text:style-name="T17">;</text:span></text:p>
        <text:p text:style-name="P28"><text:span text:style-name="T17"><text:s text:c="4"/></text:span><text:span text:style-name="T10">end</text:span><text:span text:style-name="T17"> </text:span><text:span text:style-name="T10">process</text:span><text:span text:style-name="T17">;</text:span></text:p>
        <text:p text:style-name="P16"/>
        <text:p text:style-name="P16"/>
        <text:p text:style-name="P28"><text:span text:style-name="T17"><text:s text:c="4"/></text:span><text:span text:style-name="T40">sel_rise</text:span><text:span text:style-name="T17"> &lt;= </text:span><text:span text:style-name="T40">sel</text:span><text:span text:style-name="T17"> </text:span><text:span text:style-name="T10">and</text:span><text:span text:style-name="T17"> (</text:span><text:span text:style-name="T10">not</text:span><text:span text:style-name="T17"> </text:span><text:span text:style-name="T40">lr_edge</text:span><text:span text:style-name="T17">);</text:span></text:p>
        <text:p text:style-name="P16"/>
        <text:p text:style-name="P16"/>
        <text:p text:style-name="P28"><text:span text:style-name="T17"><text:s text:c="4"/></text:span><text:span text:style-name="T37">--main shift register</text:span></text:p>
        <text:p text:style-name="P28"><text:span text:style-name="T17"><text:s text:c="4"/></text:span><text:span text:style-name="T10">process</text:span><text:span text:style-name="T17">(</text:span><text:span text:style-name="T27">clk</text:span><text:span text:style-name="T17">)</text:span></text:p>
        <text:p text:style-name="P28"><text:span text:style-name="T17"><text:s text:c="4"/></text:span><text:span text:style-name="T10">begin</text:span></text:p>
        <text:p text:style-name="P28"><text:span text:style-name="T17"><text:s text:c="8"/></text:span><text:span text:style-name="T10">if</text:span><text:span text:style-name="T17"> </text:span><text:span text:style-name="T18">rising_edge</text:span><text:span text:style-name="T17">(</text:span><text:span text:style-name="T27">clk</text:span><text:span text:style-name="T17">) </text:span><text:span text:style-name="T10">then</text:span></text:p>
        <text:p text:style-name="P28"><text:span text:style-name="T17"><text:s text:c="12"/></text:span><text:span text:style-name="T40">shift</text:span><text:span text:style-name="T17"> &lt;= </text:span><text:span text:style-name="T40">shift_nxt</text:span><text:span text:style-name="T17">;</text:span></text:p>
        <text:p text:style-name="P28"><text:span text:style-name="T17"><text:s text:c="8"/></text:span><text:span text:style-name="T10">end</text:span><text:span text:style-name="T17"> </text:span><text:span text:style-name="T10">if</text:span><text:span text:style-name="T17">;</text:span></text:p>
        <text:p text:style-name="P28"><text:span text:style-name="T17"><text:s text:c="4"/></text:span><text:span text:style-name="T10">end</text:span><text:span text:style-name="T17"> </text:span><text:span text:style-name="T10">process</text:span><text:span text:style-name="T17">;</text:span></text:p>
        <text:p text:style-name="P16"/>
        <text:p text:style-name="P28"><text:span text:style-name="T17"><text:s text:c="4"/></text:span><text:span text:style-name="T40">shift_nxt</text:span><text:span text:style-name="T17"> &lt;= </text:span><text:span text:style-name="T40">shift</text:span><text:span text:style-name="T17">(</text:span><text:span text:style-name="T32">6</text:span><text:span text:style-name="T17"> </text:span><text:span text:style-name="T10">downto</text:span><text:span text:style-name="T17"> </text:span><text:span text:style-name="T32">0</text:span><text:span text:style-name="T17">) </text:span><text:span text:style-name="T18">&amp;</text:span><text:span text:style-name="T17"> </text:span><text:span text:style-name="T35">'0'</text:span><text:span text:style-name="T17"> </text:span><text:span text:style-name="T10">when</text:span><text:span text:style-name="T17"> </text:span><text:span text:style-name="T40">int_fall_e</text:span><text:span text:style-name="T17"> = </text:span><text:span text:style-name="T35">'1'</text:span><text:span text:style-name="T17"> </text:span><text:span text:style-name="T10">else</text:span></text:p>
        <text:p text:style-name="P28"><text:span text:style-name="T17"><text:s text:c="8"/></text:span><text:span text:style-name="T40">shift_lft</text:span><text:span text:style-name="T17"> </text:span><text:span text:style-name="T10">when</text:span><text:span text:style-name="T17"> </text:span><text:span text:style-name="T40">bit_count</text:span><text:span text:style-name="T17"> = </text:span><text:span text:style-name="T32">0</text:span><text:span text:style-name="T17"> </text:span><text:span text:style-name="T10">and</text:span><text:span text:style-name="T17"> </text:span><text:span text:style-name="T40">int_rise_e</text:span><text:span text:style-name="T17"> = </text:span><text:span text:style-name="T35">'1'</text:span><text:span text:style-name="T17"> </text:span><text:span text:style-name="T10">else</text:span></text:p>
        <text:p text:style-name="P28"><text:span text:style-name="T17"><text:s text:c="8"/></text:span><text:span text:style-name="T40">shift_rht</text:span><text:span text:style-name="T17"> </text:span><text:span text:style-name="T10">when</text:span><text:span text:style-name="T17"> </text:span><text:span text:style-name="T40">bit_count</text:span><text:span text:style-name="T17"> = </text:span><text:span text:style-name="T32">8</text:span><text:span text:style-name="T17"> </text:span><text:span text:style-name="T10">and</text:span><text:span text:style-name="T17"> </text:span><text:span text:style-name="T27">fall_edge</text:span><text:span text:style-name="T17"> = </text:span><text:span text:style-name="T35">'1'</text:span><text:span text:style-name="T17"> </text:span><text:span text:style-name="T10">else</text:span><text:span text:style-name="T17"> <text:s/></text:span><text:span text:style-name="T37">-- change to bit_count 7 and int fall</text:span></text:p>
        <text:p text:style-name="P28"><text:span text:style-name="T17"><text:s text:c="8"/></text:span><text:span text:style-name="T40">shift</text:span><text:span text:style-name="T17">;</text:span></text:p>
        <text:p text:style-name="P16"/>
        <text:p text:style-name="P28"><text:soft-page-break/><text:span text:style-name="T17"><text:s text:c="8"/></text:span><text:span text:style-name="T10">process</text:span><text:span text:style-name="T17">(</text:span><text:span text:style-name="T27">clk</text:span><text:span text:style-name="T17">, </text:span><text:span text:style-name="T27">rst</text:span><text:span text:style-name="T17">)</text:span></text:p>
        <text:p text:style-name="P28"><text:span text:style-name="T17"><text:s text:c="8"/></text:span><text:span text:style-name="T10">begin</text:span></text:p>
        <text:p text:style-name="P28"><text:span text:style-name="T17"><text:s text:c="12"/></text:span><text:span text:style-name="T10">if</text:span><text:span text:style-name="T17"> </text:span><text:span text:style-name="T27">rst</text:span><text:span text:style-name="T17"> </text:span><text:span text:style-name="T10">then</text:span></text:p>
        <text:p text:style-name="P28"><text:span text:style-name="T17"><text:s text:c="16"/></text:span><text:span text:style-name="T40">shift_lft</text:span><text:span text:style-name="T17"> &lt;= (</text:span><text:span text:style-name="T10">others</text:span><text:span text:style-name="T17"> =&gt; </text:span><text:span text:style-name="T35">'0'</text:span><text:span text:style-name="T17">);</text:span></text:p>
        <text:p text:style-name="P28"><text:span text:style-name="T17"><text:s text:c="16"/></text:span><text:span text:style-name="T40">shift_rht</text:span><text:span text:style-name="T17"> &lt;= (</text:span><text:span text:style-name="T10">others</text:span><text:span text:style-name="T17"> =&gt; </text:span><text:span text:style-name="T35">'0'</text:span><text:span text:style-name="T17">);</text:span></text:p>
        <text:p text:style-name="P28"><text:span text:style-name="T17"><text:s text:c="12"/></text:span><text:span text:style-name="T10">elsif</text:span><text:span text:style-name="T17"> </text:span><text:span text:style-name="T18">rising_edge</text:span><text:span text:style-name="T17">(</text:span><text:span text:style-name="T27">clk</text:span><text:span text:style-name="T17">) </text:span><text:span text:style-name="T10">then</text:span></text:p>
        <text:p text:style-name="P28"><text:span text:style-name="T17"><text:s text:c="16"/></text:span><text:span text:style-name="T10">if</text:span><text:span text:style-name="T17"> </text:span><text:span text:style-name="T27">it_sel</text:span><text:span text:style-name="T17"> = </text:span><text:span text:style-name="T35">"00"</text:span><text:span text:style-name="T17"> </text:span><text:span text:style-name="T10">then</text:span></text:p>
        <text:p text:style-name="P28"><text:span text:style-name="T17"><text:s text:c="20"/></text:span><text:span text:style-name="T40">shift_lft</text:span><text:span text:style-name="T17"> &lt;= </text:span><text:span text:style-name="T27">it_data</text:span><text:span text:style-name="T17">;</text:span></text:p>
        <text:p text:style-name="P28"><text:span text:style-name="T17"><text:s text:c="16"/></text:span><text:span text:style-name="T10">end</text:span><text:span text:style-name="T17"> </text:span><text:span text:style-name="T10">if</text:span><text:span text:style-name="T17">;</text:span></text:p>
        <text:p text:style-name="P16"/>
        <text:p text:style-name="P28"><text:span text:style-name="T17"><text:s text:c="16"/></text:span><text:span text:style-name="T10">if</text:span><text:span text:style-name="T17"> </text:span><text:span text:style-name="T27">it_sel</text:span><text:span text:style-name="T17"> = </text:span><text:span text:style-name="T35">"01"</text:span><text:span text:style-name="T17"> </text:span><text:span text:style-name="T10">then</text:span></text:p>
        <text:p text:style-name="P28"><text:span text:style-name="T17"><text:s text:c="20"/></text:span><text:span text:style-name="T40">shift_rht</text:span><text:span text:style-name="T17"> &lt;= </text:span><text:span text:style-name="T27">it_data</text:span><text:span text:style-name="T17">;</text:span></text:p>
        <text:p text:style-name="P28"><text:span text:style-name="T17"><text:s text:c="16"/></text:span><text:span text:style-name="T10">end</text:span><text:span text:style-name="T17"> </text:span><text:span text:style-name="T10">if</text:span><text:span text:style-name="T17">;</text:span></text:p>
        <text:p text:style-name="P28"><text:span text:style-name="T17"><text:s text:c="12"/></text:span><text:span text:style-name="T10">end</text:span><text:span text:style-name="T17"> </text:span><text:span text:style-name="T10">if</text:span><text:span text:style-name="T17">;</text:span></text:p>
        <text:p text:style-name="P28"><text:span text:style-name="T17"><text:s text:c="8"/></text:span><text:span text:style-name="T10">end</text:span><text:span text:style-name="T17"> </text:span><text:span text:style-name="T10">process</text:span><text:span text:style-name="T17">;</text:span></text:p>
        <text:p text:style-name="P16"/>
        <text:p text:style-name="P16"/>
        <text:p text:style-name="P28"><text:span text:style-name="T17"><text:s text:c="8"/></text:span><text:span text:style-name="T27">it_sd</text:span><text:span text:style-name="T17"> &lt;= </text:span><text:span text:style-name="T40">shift</text:span><text:span text:style-name="T17">(</text:span><text:span text:style-name="T32">7</text:span><text:span text:style-name="T17">);</text:span></text:p>
        <text:p text:style-name="P16"/>
        <text:p text:style-name="P28"><text:span text:style-name="T10">end</text:span><text:span text:style-name="T17"> </text:span><text:span text:style-name="T25">arch</text:span><text:span text:style-name="T17">;</text:span></text:p>
        <text:p text:style-name="P16"/>
        <text:p text:style-name="P16"/>
        <text:p text:style-name="P16"/>
      </text:section>
      <text:section text:style-name="Sect3" text:name="Section11">
        <text:p text:style-name="P34">I2S – RX</text:p>
        <text:p text:style-name="P31"><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i2s_rx</text:span><text:span text:style-name="T13"> </text:span><text:span text:style-name="T6">is</text:span></text:p>
        <text:p text:style-name="P15"><text:span text:style-name="T13"><text:s text:c="4"/></text:span><text:span text:style-name="T6">generic</text:span><text:span text:style-name="T13">( </text:span><text:span text:style-name="T7">n</text:span><text:span text:style-name="T13">: </text:span><text:span text:style-name="T28">natural</text:span><text:span text:style-name="T13"> := </text:span><text:span text:style-name="T31">8</text:span><text:span text:style-name="T13"> );</text:span></text:p>
        <text:p text:style-name="P15"><text:span text:style-name="T13"><text:s text:c="4"/></text:span><text:span text:style-name="T6">port</text:span><text:span text:style-name="T13">( </text:span><text:span text:style-name="T26">clk</text:span><text:span text:style-name="T13">, </text:span><text:span text:style-name="T26">ir_sd</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rst</text:span><text:span text:style-name="T13">: </text:span><text:span text:style-name="T6">in</text:span><text:span text:style-name="T13"> </text:span><text:span text:style-name="T28">boolean</text:span><text:span text:style-name="T13">;</text:span></text:p>
        <text:p text:style-name="P15"><text:span text:style-name="T13"><text:s text:c="4"/></text:span><text:span text:style-name="T26">data</text:span><text:span text:style-name="T13">: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ir_ws</text:span><text:span text:style-name="T13">, </text:span><text:span text:style-name="T26">ir_sclk</text:span><text:span text:style-name="T13">: </text:span><text:span text:style-name="T6">in</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i2s_rx</text:span><text:span text:style-name="T13"> </text:span><text:span text:style-name="T6">is</text:span></text:p>
        <text:p text:style-name="P15"><text:span text:style-name="T13"><text:s text:c="4"/></text:span><text:span text:style-name="T6">signal</text:span><text:span text:style-name="T13"> </text:span><text:span text:style-name="T39">rx_shif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rise_edge</text:span><text:span text:style-name="T13">, </text:span><text:span text:style-name="T39">fall_edge</text:span><text:span text:style-name="T13">, </text:span><text:span text:style-name="T39">wsd</text:span><text:span text:style-name="T13">, </text:span><text:span text:style-name="T39">wsp</text:span><text:span text:style-name="T13">, </text:span><text:span text:style-name="T39">pl</text:span><text:span text:style-name="T13">, </text:span><text:span text:style-name="T39">ssclk</text:span><text:span text:style-name="T13">, </text:span><text:span text:style-name="T39">ena_reg</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bit_count</text:span><text:span text:style-name="T13">: </text:span><text:span text:style-name="T28">unsigned</text:span><text:span text:style-name="T13">(</text:span><text:span text:style-name="T31">2</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ena_reg</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ena_reg</text:span><text:span text:style-name="T13"> &lt;= </text:span><text:span text:style-name="T39">ssclk</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9">rise_edge</text:span><text:span text:style-name="T13"> &lt;= (</text:span><text:span text:style-name="T6">not</text:span><text:span text:style-name="T13"> </text:span><text:span text:style-name="T39">ena_reg</text:span><text:span text:style-name="T13">) </text:span><text:span text:style-name="T6">and</text:span><text:span text:style-name="T13"> </text:span><text:span text:style-name="T39">ssclk</text:span><text:span text:style-name="T13">;</text:span></text:p>
        <text:p text:style-name="P15"><text:span text:style-name="T13"><text:s text:c="4"/></text:span><text:span text:style-name="T39">fall_edge</text:span><text:span text:style-name="T13"> &lt;= (</text:span><text:span text:style-name="T6">not</text:span><text:span text:style-name="T13"> </text:span><text:span text:style-name="T39">ena_reg</text:span><text:span text:style-name="T13">) </text:span><text:span text:style-name="T6">nor</text:span><text:span text:style-name="T13"> </text:span><text:span text:style-name="T39">ssclk</text:span><text:span text:style-name="T13">;</text:span></text:p>
        <text:p text:style-name="P16"/>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 </text:span><text:span text:style-name="T39">fall_edge</text:span><text:span text:style-name="T13">, </text:span><text:span text:style-name="T39">wsp</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or</text:span><text:span text:style-name="T13"> (</text:span><text:span text:style-name="T39">fall_edge</text:span><text:span text:style-name="T13"> = </text:span><text:span text:style-name="T34">'1'</text:span><text:span text:style-name="T13"> </text:span><text:span text:style-name="T6">and</text:span><text:span text:style-name="T13"> </text:span><text:span text:style-name="T39">wsp</text:span><text:span text:style-name="T13"> = </text:span><text:span text:style-name="T34">'1'</text:span><text:span text:style-name="T13">) </text:span><text:span text:style-name="T6">then</text:span></text:p>
        <text:p text:style-name="P15"><text:span text:style-name="T13"><text:s text:c="12"/></text:span><text:span text:style-name="T39">bit_count</text:span><text:span text:style-name="T13"> &lt;= (</text:span><text:span text:style-name="T6">others</text:span><text:span text:style-name="T13"> =&gt; </text:span><text:span text:style-name="T34">'0'</text:span><text:span text:style-name="T13">);</text:span></text:p>
        <text:p text:style-name="P16"/>
        <text:p text:style-name="P15"><text:span text:style-name="T13"><text:s text:c="8"/></text:span><text:span text:style-name="T6">elsif</text:span><text:span text:style-name="T13"> <text:s text:c="3"/></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fall_edge</text:span><text:span text:style-name="T13"> = </text:span><text:span text:style-name="T34">'1'</text:span><text:span text:style-name="T13"> </text:span><text:span text:style-name="T6">then</text:span></text:p>
        <text:p text:style-name="P15"><text:span text:style-name="T13"><text:s text:c="16"/></text:span><text:span text:style-name="T39">bit_count</text:span><text:span text:style-name="T13"> &lt;= </text:span><text:span text:style-name="T39">bit_count</text:span><text:span text:style-name="T13"> </text:span><text:span text:style-name="T14">+</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wsd</text:span><text:span text:style-name="T13"> &lt;= </text:span><text:span text:style-name="T34">'0'</text:span><text:span text:style-name="T13">;</text:span></text:p>
        <text:p text:style-name="P15"><text:span text:style-name="T13"><text:s text:c="12"/></text:span><text:span text:style-name="T39">wsp</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fall_edge</text:span><text:span text:style-name="T13"> = </text:span><text:span text:style-name="T34">'1'</text:span><text:span text:style-name="T13"> </text:span><text:span text:style-name="T6">then</text:span></text:p>
        <text:p text:style-name="P15"><text:span text:style-name="T13"><text:s text:c="16"/></text:span><text:span text:style-name="T39">wsd</text:span><text:span text:style-name="T13"> &lt;= </text:span><text:span text:style-name="T26">ir_ws</text:span><text:span text:style-name="T13">;</text:span></text:p>
        <text:p text:style-name="P15"><text:span text:style-name="T13"><text:s text:c="16"/></text:span><text:span text:style-name="T39">wsp</text:span><text:span text:style-name="T13"> &lt;= </text:span><text:span text:style-name="T39">wsd</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pl</text:span><text:span text:style-name="T13"> &lt;= </text:span><text:span text:style-name="T39">wsp</text:span><text:span text:style-name="T13"> </text:span><text:span text:style-name="T6">xor</text:span><text:span text:style-name="T13"> </text:span><text:span text:style-name="T39">wsd</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rx_shift</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26">data</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rise_edge</text:span><text:span text:style-name="T13"> = </text:span><text:span text:style-name="T34">'1'</text:span><text:span text:style-name="T13"> </text:span><text:span text:style-name="T6">then</text:span></text:p>
        <text:p text:style-name="P15"><text:span text:style-name="T13"><text:s text:c="16"/></text:span><text:span text:style-name="T39">rx_shift</text:span><text:span text:style-name="T13"> &lt;= </text:span><text:span text:style-name="T39">rx_shift</text:span><text:span text:style-name="T13">(</text:span><text:span text:style-name="T7">n</text:span><text:span text:style-name="T14">-</text:span><text:span text:style-name="T31">2</text:span><text:span text:style-name="T13"> </text:span><text:span text:style-name="T6">downto</text:span><text:span text:style-name="T13"> </text:span><text:span text:style-name="T31">0</text:span><text:span text:style-name="T13">) </text:span><text:span text:style-name="T14">&amp;</text:span><text:span text:style-name="T13"> </text:span><text:span text:style-name="T26">ir_sd</text:span><text:span text:style-name="T13">;</text:span></text:p>
        <text:p text:style-name="P16"/>
        <text:p text:style-name="P15"><text:span text:style-name="T13"><text:s text:c="16"/></text:span><text:span text:style-name="T6">if</text:span><text:span text:style-name="T13"> (</text:span><text:span text:style-name="T39">pl</text:span><text:span text:style-name="T13"> = </text:span><text:span text:style-name="T34">'1'</text:span><text:span text:style-name="T13"> </text:span><text:span text:style-name="T6">and</text:span><text:span text:style-name="T13"> </text:span><text:span text:style-name="T26">ir_ws</text:span><text:span text:style-name="T13"> = </text:span><text:span text:style-name="T34">'1'</text:span><text:span text:style-name="T13">) </text:span><text:span text:style-name="T6">then</text:span></text:p>
        <text:p text:style-name="P15"><text:span text:style-name="T13"><text:s text:c="20"/></text:span><text:span text:style-name="T26">data</text:span><text:span text:style-name="T13"> &lt;= </text:span><text:span text:style-name="T39">rx_shift</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6"/></text:span><text:span text:style-name="T6">if</text:span><text:span text:style-name="T13"> (</text:span><text:span text:style-name="T39">pl</text:span><text:span text:style-name="T13"> = </text:span><text:span text:style-name="T34">'1'</text:span><text:span text:style-name="T13"> </text:span><text:span text:style-name="T6">and</text:span><text:span text:style-name="T13"> </text:span><text:span text:style-name="T26">ir_ws</text:span><text:span text:style-name="T13"> = </text:span><text:span text:style-name="T34">'0'</text:span><text:span text:style-name="T13">) </text:span><text:span text:style-name="T6">then</text:span></text:p>
        <text:p text:style-name="P15"><text:soft-page-break/><text:span text:style-name="T13"><text:s text:c="20"/></text:span><text:span text:style-name="T26">data</text:span><text:span text:style-name="T13"> &lt;= </text:span><text:span text:style-name="T39">rx_shift</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6"/>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text:span><text:span text:style-name="T39">ssclk</text:span><text:span text:style-name="T13"> &lt;= </text:span><text:span text:style-name="T26">ir_sclk</text:span><text:span text:style-name="T13">;</text:span></text:p>
        <text:p text:style-name="P16"/>
        <text:p text:style-name="P15"><text:span text:style-name="T6">end</text:span><text:span text:style-name="T13"> </text:span><text:span text:style-name="T22">arch</text:span><text:span text:style-name="T13">;</text:span></text:p>
      </text:section>
      <text:p text:style-name="P30"/>
      <text:p text:style-name="P30"><draw:frame draw:style-name="fr4" draw:name="graphics5" text:anchor-type="paragraph" svg:width="8.489in" svg:height="2.8618in" draw:z-index="29"><draw:image xlink:href="Pictures/20000007000042DE000044A1F2942BE9.svm" xlink:type="simple" xlink:show="embed" xlink:actuate="onLoad"/></draw:frame></text:p>
      <text:p text:style-name="P30"/>
      <text:p text:style-name="P30"/>
      <text:p text:style-name="P30"/>
      <text:p text:style-name="P30"/>
      <text:p text:style-name="P30"/>
      <text:p text:style-name="P30"/>
      <text:p text:style-name="P30"/>
      <text:p text:style-name="P30"><draw:frame draw:style-name="fr5" draw:name="graphics6" text:anchor-type="paragraph" svg:width="10.6in" svg:height="5.9626in" draw:z-index="30"><draw:image xlink:href="Pictures/1000000000000780000004381CFB1986.png" xlink:type="simple" xlink:show="embed" xlink:actuate="onLoad"/></draw:frame><text:soft-page-break/></text:p>
      <text:p text:style-name="P30"/>
      <text:p text:style-name="P30"/>
      <text:p text:style-name="P30"/>
      <text:p text:style-name="P30"><draw:frame draw:style-name="fr5" draw:name="graphics7" text:anchor-type="paragraph" svg:width="10.6in" svg:height="5.9626in" draw:z-index="31"><draw:image xlink:href="Pictures/100000000000078000000438C988E3A4.png" xlink:type="simple" xlink:show="embed" xlink:actuate="onLoad"/></draw:frame><text:soft-page-break/></text:p>
      <text:p text:style-name="P30"><text:span text:style-name="Source_20_Text"/></text:p>
      <text:p text:style-name="P30"><text:a xlink:type="simple" xlink:href="http://www.labbookpages.co.uk/fpgas/modules/i2cController.html"><text:span text:style-name="Source_20_Text">http://www.labbookpages.co.uk/fpgas/modules/i2cController.html</text:span></text:a></text:p>
      <text:p text:style-name="P30"><text:span text:style-name="Source_20_Text"/></text:p>
      <text:p text:style-name="P30"><text:span text:style-name="Source_20_Text"/></text:p>
      <text:p text:style-name="P37"><text:soft-page-break/><text:span text:style-name="Source_20_Text"><text:span text:style-name="T5">GRAY COUNTER</text:span></text:span></text:p>
      <text:p text:style-name="P37"><text:span text:style-name="Source_20_Text"><text:span text:style-name="T9">library</text:span></text:span><text:span text:style-name="Source_20_Text"><text:span text:style-name="T16"> </text:span></text:span><text:span text:style-name="Source_20_Text"><text:span text:style-name="T24">ieee</text:span></text:span><text:span text:style-name="Source_20_Text"><text:span text:style-name="T16">;</text:span></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mem_ctrl </text:span><text:span text:style-name="T6">is</text:span></text:p>
      <text:p text:style-name="P15"><text:span text:style-name="T13"><text:s text:c="4"/></text:span><text:span text:style-name="T6">generic</text:span><text:span text:style-name="T13">( </text:span><text:span text:style-name="T7">n</text:span><text:span text:style-name="T13"> : </text:span><text:span text:style-name="T28">natural</text:span><text:span text:style-name="T13"> := </text:span><text:span text:style-name="T31">4</text:span><text:span text:style-name="T13">);</text:span></text:p>
      <text:p text:style-name="P15"><text:span text:style-name="T13"><text:s text:c="4"/></text:span><text:span text:style-name="T6">port</text:span><text:span text:style-name="T13">(</text:span></text:p>
      <text:p text:style-name="P15"><text:span text:style-name="T13"><text:s text:c="8"/></text:span><text:span text:style-name="T26">clk</text:span><text:span text:style-name="T13">, </text:span><text:span text:style-name="T26">rst</text:span><text:span text:style-name="T13"> : </text:span><text:span text:style-name="T6">in</text:span><text:span text:style-name="T13"> <text:s/></text:span><text:span text:style-name="T28">std_logic</text:span><text:span text:style-name="T13">;</text:span></text:p>
      <text:p text:style-name="P15"><text:span text:style-name="T13"><text:s text:c="8"/>count_ld <text:s text:c="3"/>: </text:span><text:span text:style-name="T6">in</text:span><text:span text:style-name="T13"> <text:s/></text:span><text:span text:style-name="T28">std_logic</text:span><text:span text:style-name="T13">;</text:span></text:p>
      <text:p text:style-name="P15"><text:span text:style-name="T13"><text:s text:c="8"/>cout_ena : </text:span><text:span text:style-name="T6">in</text:span><text:span text:style-name="T13"> <text:s/></text:span><text:span text:style-name="T28">std_logic</text:span><text:span text:style-name="T13">;</text:span></text:p>
      <text:p text:style-name="P15"><text:span text:style-name="T13"><text:s text:c="8"/>index <text:s text:c="4"/>: </text:span><text:span text:style-name="T6">in</text:span><text:span text:style-name="T13"> <text:s/>std_logic_vector(n </text:span><text:span text:style-name="T6">downto</text:span><text:span text:style-name="T13"> </text:span><text:span text:style-name="T31">0</text:span><text:span text:style-name="T13">);</text:span></text:p>
      <text:p text:style-name="P15"><text:span text:style-name="T13"><text:s text:c="8"/>add_out <text:s text:c="3"/>: </text:span><text:span text:style-name="T6">out</text:span><text:span text:style-name="T13"> std_logic_vector(n </text:span><text:span text:style-name="T6">downto</text:span><text:span text:style-name="T13"> </text:span><text:span text:style-name="T31">0</text:span><text:span text:style-name="T13">));</text:span></text:p>
      <text:p text:style-name="P15"><text:span text:style-name="T6">end</text:span><text:span text:style-name="T13"> mem_ctrl;</text:span></text:p>
      <text:p text:style-name="P16"/>
      <text:p text:style-name="P15"><text:span text:style-name="T6">architecture</text:span><text:span text:style-name="T13"> </text:span><text:span text:style-name="T22">arch</text:span><text:span text:style-name="T13"> </text:span><text:span text:style-name="T6">of</text:span><text:span text:style-name="T13"> mem_ctrl </text:span><text:span text:style-name="T6">is</text:span></text:p>
      <text:p text:style-name="P15"><text:span text:style-name="T13"><text:s text:c="4"/></text:span><text:span text:style-name="T6">signal</text:span><text:span text:style-name="T13"> count, gray : </text:span><text:span text:style-name="T28">unsigned</text:span><text:span text:style-name="T13">(</text:span><text:span text:style-name="T7">n</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count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cout_ena = </text:span><text:span text:style-name="T34">'1'</text:span><text:span text:style-name="T13"> </text:span><text:span text:style-name="T6">then</text:span></text:p>
      <text:p text:style-name="P15"><text:span text:style-name="T13"><text:s text:c="16"/>count &lt;= gray </text:span><text:span text:style-name="T14">+</text:span><text:span text:style-name="T31">1</text:span><text:span text:style-name="T13">;</text:span></text:p>
      <text:p text:style-name="P15"><text:span text:style-name="T13"><text:s text:c="16"/></text:span><text:span text:style-name="T6">if</text:span><text:span text:style-name="T13"> count_ld = </text:span><text:span text:style-name="T34">'1'</text:span><text:span text:style-name="T13"> </text:span><text:span text:style-name="T6">then</text:span></text:p>
      <text:p text:style-name="P15"><text:span text:style-name="T13"><text:s text:c="20"/>count &lt;= </text:span><text:span text:style-name="T28">unsigned</text:span><text:span text:style-name="T13">(index);</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gray &lt;= count </text:span><text:span text:style-name="T6">xor</text:span><text:span text:style-name="T13">(</text:span><text:span text:style-name="T34">'0'</text:span><text:span text:style-name="T13"> </text:span><text:span text:style-name="T14">&amp;</text:span><text:span text:style-name="T13"> count(</text:span><text:span text:style-name="T7">n</text:span><text:span text:style-name="T13"> </text:span><text:span text:style-name="T14">-</text:span><text:span text:style-name="T31">1</text:span><text:span text:style-name="T13"> </text:span><text:span text:style-name="T6">downto</text:span><text:span text:style-name="T13"> </text:span><text:span text:style-name="T31">1</text:span><text:span text:style-name="T13">));</text:span></text:p>
      <text:p text:style-name="P15"><text:span text:style-name="T13"><text:s text:c="4"/>add_out &lt;= </text:span><text:span text:style-name="T28">std_logic_vector</text:span><text:span text:style-name="T13">(count);</text:span></text:p>
      <text:p text:style-name="P15"><text:span text:style-name="T6">end</text:span><text:span text:style-name="T13"> </text:span><text:span text:style-name="T22">arch</text:span><text:span text:style-name="T13">;</text:span><text:span text:style-name="Source_20_Text"><text:span text:style-name="T20"><text:tab/><text:tab/><text:tab/>.</text:span></text:span></text:p>
      <text:p text:style-name="P15"><text:span text:style-name="Source_20_Text"><text:span text:style-name="T20"/></text:span></text:p>
      <text:p text:style-name="P15"/>
      <text:p text:style-name="P15"/>
      <text:p text:style-name="P15"/>
      <text:p text:style-name="P15"/>
      <text:p text:style-name="P15"/>
      <text:p text:style-name="P15"/>
      <text:p text:style-name="P15"/>
      <text:p text:style-name="P15"/>
      <text:p text:style-name="P15"/>
      <text:p text:style-name="P15"/>
      <text:section text:style-name="Sect4" text:name="Section5">
        <text:p text:style-name="P15"><text:soft-page-break/><text:span text:style-name="T3">DEBOUNCING <text:s/>/ LFSR / GRAYCODE / RESIZE / OVF</text:span></text:p>
        <text:p text:style-name="P15"/>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6"/>
        <text:p text:style-name="P15"><text:span text:style-name="T6">entity</text:span><text:span text:style-name="T13"> </text:span><text:span text:style-name="T22">button_in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sw_in</text:span><text:span text:style-name="T13"> <text:s text:c="5"/>: </text:span><text:span text:style-name="T6">in</text:span><text:span text:style-name="T13"> </text:span><text:span text:style-name="T28">std_logic</text:span><text:span text:style-name="T13">;</text:span></text:p>
        <text:p text:style-name="P15"><text:span text:style-name="T13"><text:s text:c="4"/></text:span><text:span text:style-name="T26">edge_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button_int</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button_int</text:span><text:span text:style-name="T13"> </text:span><text:span text:style-name="T6">is</text:span></text:p>
        <text:p text:style-name="P15"><text:span text:style-name="T13"><text:s text:c="4"/></text:span><text:span text:style-name="T6">constant</text:span><text:span text:style-name="T13"> </text:span><text:span text:style-name="T7">n</text:span><text:span text:style-name="T13"> : </text:span><text:span text:style-name="T28">natural</text:span><text:span text:style-name="T13"> := </text:span><text:span text:style-name="T31">4</text:span><text:span text:style-name="T13">;</text:span></text:p>
        <text:p text:style-name="P16"/>
        <text:p text:style-name="P15"><text:span text:style-name="T13"><text:s text:c="4"/></text:span><text:span text:style-name="T6">signal</text:span><text:span text:style-name="T13"> </text:span><text:span text:style-name="T39">synchro</text:span><text:span text:style-name="T13"> : </text:span><text:span text:style-name="T28">std_logic_vector</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lfsr</text:span><text:span text:style-name="T13"> <text:s text:c="3"/>: </text:span><text:span text:style-name="T28">unsigned</text:span><text:span text:style-name="T13">(</text:span><text:span text:style-name="T7">n</text:span><text:span text:style-name="T13"> </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lfsr_sum</text:span><text:span text:style-name="T13">: </text:span><text:span text:style-name="T28">unsigned</text:span><text:span text:style-name="T13">(</text:span><text:span text:style-name="T7">n</text:span><text:span text:style-name="T13"> </text:span><text:span text:style-name="T6">downto</text:span><text:span text:style-name="T13"> </text:span><text:span text:style-name="T31">0</text:span><text:span text:style-name="T13">);</text:span></text:p>
        <text:p text:style-name="P16"/>
        <text:p text:style-name="P15"><text:span text:style-name="T13"><text:s text:c="4"/></text:span><text:span text:style-name="T6">signal</text:span><text:span text:style-name="T13"> </text:span><text:span text:style-name="T39">cout_ena</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count</text:span><text:span text:style-name="T13"> <text:s text:c="2"/>: </text:span><text:span text:style-name="T28">unsigned</text:span><text:span text:style-name="T13">(</text:span><text:span text:style-name="T7">n</text:span><text:span text:style-name="T13"> </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sum</text:span><text:span text:style-name="T13"> <text:s text:c="4"/>: </text:span><text:span text:style-name="T28">unsigned</text:span><text:span text:style-name="T13">(</text:span><text:span text:style-name="T7">n</text:span><text:span text:style-name="T13"> </text:span><text:span text:style-name="T14">-</text:span><text:span text:style-name="T31">1</text:span><text:span text:style-name="T13"> </text:span><text:span text:style-name="T6">downto</text:span><text:span text:style-name="T13"> </text:span><text:span text:style-name="T31">0</text:span><text:span text:style-name="T13">);</text:span></text:p>
        <text:p text:style-name="P16"/>
        <text:p text:style-name="P15"><text:span text:style-name="T13"><text:s text:c="4"/></text:span><text:span text:style-name="T6">signal</text:span><text:span text:style-name="T13"> </text:span><text:span text:style-name="T39">latch</text:span><text:span text:style-name="T13">, </text:span><text:span text:style-name="T39">rise_reg</text:span><text:span text:style-name="T13"> : </text:span><text:span text:style-name="T28">std_logic</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text:span><text:span text:style-name="T39">lfsr</text:span><text:span text:style-name="T13"> &lt;= (</text:span><text:span text:style-name="T31">0</text:span><text:span text:style-name="T13"> =&gt; </text:span><text:span text:style-name="T34">'1'</text:span><text:span text:style-name="T13">, </text:span><text:span text:style-name="T6">others</text:span><text:span text:style-name="T13"> =&gt; </text:span><text:span text:style-name="T34">'0'</text:span><text:span text:style-name="T13">);</text:span></text:p>
        <text:p text:style-name="P15"><text:span text:style-name="T13"><text:s text:c="12"/></text:span><text:span text:style-name="T39">synchro</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lfsr</text:span><text:span text:style-name="T13"> &lt;= </text:span><text:span text:style-name="T39">lfsr</text:span><text:span text:style-name="T13">(</text:span><text:span text:style-name="T7">n</text:span><text:span text:style-name="T14">-</text:span><text:span text:style-name="T31">2</text:span><text:span text:style-name="T13"> </text:span><text:span text:style-name="T6">downto</text:span><text:span text:style-name="T13"> </text:span><text:span text:style-name="T31">0</text:span><text:span text:style-name="T13">) </text:span><text:span text:style-name="T14">&amp;</text:span><text:span text:style-name="T13"> (</text:span><text:span text:style-name="T39">lfsr</text:span><text:span text:style-name="T13">(</text:span><text:span text:style-name="T7">n</text:span><text:span text:style-name="T14">-</text:span><text:span text:style-name="T31">1</text:span><text:span text:style-name="T13">) </text:span><text:span text:style-name="T6">xor</text:span><text:span text:style-name="T13"> </text:span><text:span text:style-name="T39">lfsr</text:span><text:span text:style-name="T13">(</text:span><text:span text:style-name="T7">n</text:span><text:span text:style-name="T14">-</text:span><text:span text:style-name="T31">2</text:span><text:span text:style-name="T13">));</text:span></text:p>
        <text:p text:style-name="P16"/>
        <text:p text:style-name="P15"><text:span text:style-name="T13"><text:s text:c="12"/></text:span><text:span text:style-name="T39">synchro</text:span><text:span text:style-name="T13"> &lt;= </text:span><text:span text:style-name="T26">sw_in</text:span><text:span text:style-name="T13"> </text:span><text:span text:style-name="T14">&amp;</text:span><text:span text:style-name="T13"> </text:span><text:span text:style-name="T39">synchro</text:span><text:span text:style-name="T13">(</text:span><text:span text:style-name="T31">2</text:span><text:span text:style-name="T13"> </text:span><text:span text:style-name="T6">downto</text:span><text:span text:style-name="T13"> </text:span><text:span text:style-name="T31">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lfsr_sum</text:span><text:span text:style-name="T13"> <text:s/>&lt;= </text:span><text:span text:style-name="T14">resize</text:span><text:span text:style-name="T13">(</text:span><text:span text:style-name="T39">lfsr</text:span><text:span text:style-name="T13">,</text:span><text:span text:style-name="T7">n</text:span><text:span text:style-name="T13"> </text:span><text:span text:style-name="T14">+</text:span><text:span text:style-name="T31">1</text:span><text:span text:style-name="T13">) </text:span><text:span text:style-name="T14">+</text:span><text:span text:style-name="T31">1</text:span><text:span text:style-name="T13">;</text:span></text:p>
        <text:p text:style-name="P15"><text:span text:style-name="T13"><text:s text:c="4"/></text:span><text:span text:style-name="T39">cout_ena</text:span><text:span text:style-name="T13"> &lt;= </text:span><text:span text:style-name="T39">lfsr_sum</text:span><text:span text:style-name="T13">(</text:span><text:span text:style-name="T7">n</text:span><text:span text:style-name="T13">) </text:span><text:span text:style-name="T6">and</text:span><text:span text:style-name="T13"> </text:span><text:span text:style-name="T39">synchro</text:span><text:span text:style-name="T13">(</text:span><text:span text:style-name="T31">0</text:span><text:span text:style-name="T13">);</text:span></text:p>
        <text:p text:style-name="P16"/>
        <text:p text:style-name="P16"/>
        <text:p text:style-name="P16"/>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39">synchro</text:span><text:span text:style-name="T13">(</text:span><text:span text:style-name="T31">0</text:span><text:span text:style-name="T13">) = </text:span><text:span text:style-name="T34">'0'</text:span><text:span text:style-name="T13"> </text:span><text:span text:style-name="T6">then</text:span></text:p>
        <text:p text:style-name="P15"><text:span text:style-name="T13"><text:s text:c="12"/></text:span><text:span text:style-name="T39">count</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cout_ena</text:span><text:span text:style-name="T13"> = </text:span><text:span text:style-name="T34">'1'</text:span><text:span text:style-name="T13"> </text:span><text:span text:style-name="T6">and</text:span><text:span text:style-name="T13"> </text:span><text:span text:style-name="T39">count</text:span><text:span text:style-name="T13"> /= </text:span><text:span text:style-name="T31">X"F"</text:span><text:span text:style-name="T13"> </text:span><text:span text:style-name="T6">then</text:span></text:p>
        <text:p text:style-name="P15"><text:span text:style-name="T13"><text:s text:c="16"/></text:span><text:span text:style-name="T39">count</text:span><text:span text:style-name="T13"> &lt;= </text:span><text:span text:style-name="T39">count</text:span><text:span text:style-name="T13"> </text:span><text:span text:style-name="T14">+</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sum</text:span><text:span text:style-name="T13"> &lt;= </text:span><text:span text:style-name="T39">count</text:span><text:span text:style-name="T13"> </text:span><text:span text:style-name="T6">xor</text:span><text:span text:style-name="T13">(</text:span><text:span text:style-name="T34">'0'</text:span><text:span text:style-name="T13"> </text:span><text:span text:style-name="T14">&amp;</text:span><text:span text:style-name="T13"> </text:span><text:span text:style-name="T39">count</text:span><text:span text:style-name="T13">(</text:span><text:span text:style-name="T7">n</text:span><text:span text:style-name="T13"> </text:span><text:span text:style-name="T14">-</text:span><text:span text:style-name="T31">1</text:span><text:span text:style-name="T13"> </text:span><text:span text:style-name="T6">downto</text:span><text:span text:style-name="T13"> </text:span><text:span text:style-name="T31">1</text:span><text:span text:style-name="T13">));</text:span></text:p>
        <text:p text:style-name="P16"/>
        <text:p text:style-name="P15"><text:span text:style-name="T13"><text:s text:c="4"/></text:span><text:span text:style-name="T39">latch</text:span><text:span text:style-name="T13"> &lt;= </text:span><text:span text:style-name="T39">count</text:span><text:span text:style-name="T13">(</text:span><text:span text:style-name="T31">0</text:span><text:span text:style-name="T13">) </text:span><text:span text:style-name="T6">and</text:span><text:span text:style-name="T13"> </text:span><text:span text:style-name="T39">count</text:span><text:span text:style-name="T13">(</text:span><text:span text:style-name="T31">1</text:span><text:span text:style-name="T13">) </text:span><text:span text:style-name="T6">and</text:span><text:span text:style-name="T13"> </text:span><text:span text:style-name="T39">count</text:span><text:span text:style-name="T13">(</text:span><text:span text:style-name="T31">2</text:span><text:span text:style-name="T13">) </text:span><text:span text:style-name="T6">and</text:span><text:span text:style-name="T13"> </text:span><text:span text:style-name="T39">count</text:span><text:span text:style-name="T13">(</text:span><text:span text:style-name="T31">3</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rise_reg</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rise_reg</text:span><text:span text:style-name="T13"> &lt;= </text:span><text:span text:style-name="T39">latch</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edge_out</text:span><text:span text:style-name="T13"> &lt;= (</text:span><text:span text:style-name="T6">not</text:span><text:span text:style-name="T13"> </text:span><text:span text:style-name="T39">rise_reg</text:span><text:span text:style-name="T13">) </text:span><text:span text:style-name="T6">and</text:span><text:span text:style-name="T13"> </text:span><text:span text:style-name="T39">latch</text:span><text:span text:style-name="T13">;</text:span></text:p>
        <text:p text:style-name="P16"/>
        <text:p text:style-name="P15"><text:span text:style-name="T6">end</text:span><text:span text:style-name="T13"> </text:span><text:span text:style-name="T22">rtl</text:span><text:span text:style-name="T13">;</text:span></text:p>
        <text:p text:style-name="P16"/>
      </text:section>
      <text:p text:style-name="P16"><text:span text:style-name="T3"/></text:p>
      <text:p text:style-name="P16"><text:s text:c="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text:soft-page-break/><text:span text:style-name="T3">UNIVERSAL BIT COUNTER</text:span></text:p>
      <text:p text:style-name="P24">--syn_clr <text:s text:c="4"/>load <text:s text:c="5"/>en <text:s text:c="5"/>up <text:s text:c="10"/>q* <text:s text:c="15"/>operation</text:p>
      <text:p text:style-name="P26">---- <text:s text:c="3"/>1 <text:s text:c="6"/>- <text:s text:c="7"/>- <text:s text:c="7"/>- <text:s text:c="7"/>00...00 <text:s text:c="7"/>synchronous clear sampled at rising_edge</text:p>
      <text:p text:style-name="P26">---- <text:s text:c="3"/>0 <text:s text:c="6"/>1 <text:s text:c="7"/>- <text:s text:c="7"/>- <text:s text:c="11"/>d <text:s text:c="11"/>parallel load</text:p>
      <text:p text:style-name="P26">---- <text:s text:c="3"/>0 <text:s text:c="6"/>0 <text:s text:c="7"/>1 <text:s text:c="7"/>1 <text:s text:c="9"/>q+1 <text:s text:c="11"/>count up</text:p>
      <text:p text:style-name="P26">---- <text:s text:c="3"/>0 <text:s text:c="6"/>0 <text:s text:c="7"/>1 <text:s text:c="7"/>0 <text:s text:c="9"/>q-1 <text:s text:c="10"/>count down</text:p>
      <text:p text:style-name="P26">---- <text:s text:c="3"/>0 <text:s text:c="6"/>0 <text:s text:c="7"/>0 <text:s text:c="7"/>- <text:s text:c="11"/>q <text:s text:c="11"/>pause</text:p>
      <text:p text:style-name="P18"/>
      <text:p text:style-name="P15"><text:span text:style-name="T6">library</text:span><text:span text:style-name="T13"> </text:span><text:span text:style-name="T22">ieee</text:span><text:span text:style-name="T13">;</text:span></text:p>
      <text:p text:style-name="P15"><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univ_bit_counter</text:span><text:span text:style-name="T13"> </text:span><text:span text:style-name="T6">is</text:span></text:p>
      <text:p text:style-name="P15"><text:span text:style-name="T13"><text:s text:c="4"/></text:span><text:span text:style-name="T6">generic</text:span><text:span text:style-name="T13"> ( </text:span><text:span text:style-name="T7">n</text:span><text:span text:style-name="T13"> : </text:span><text:span text:style-name="T28">integer</text:span><text:span text:style-name="T13"> := </text:span><text:span text:style-name="T31">8</text:span><text:span text:style-name="T13">);</text:span></text:p>
      <text:p text:style-name="P15"><text:span text:style-name="T13"><text:s text:c="4"/></text:span><text:span text:style-name="T6">port</text:span><text:span text:style-name="T13">( </text:span><text:span text:style-name="T26">clk</text:span><text:span text:style-name="T13">, </text:span><text:span text:style-name="T26">rst</text:span><text:span text:style-name="T13"> : </text:span><text:span text:style-name="T6">in</text:span><text:span text:style-name="T13"> </text:span><text:span text:style-name="T28">std_logic</text:span><text:span text:style-name="T13">;</text:span></text:p>
      <text:p text:style-name="P15"><text:span text:style-name="T13"><text:s text:c="10"/></text:span><text:span text:style-name="T26">syn_clr</text:span><text:span text:style-name="T13">, </text:span><text:span text:style-name="T26">load</text:span><text:span text:style-name="T13">, </text:span><text:span text:style-name="T26">en</text:span><text:span text:style-name="T13">, </text:span><text:span text:style-name="T26">up</text:span><text:span text:style-name="T13"> : </text:span><text:span text:style-name="T6">in</text:span><text:span text:style-name="T13"> </text:span><text:span text:style-name="T28">std_logic</text:span><text:span text:style-name="T13">;</text:span></text:p>
      <text:p text:style-name="P15"><text:span text:style-name="T13"><text:s text:c="10"/></text:span><text:span text:style-name="T26">d</text:span><text:span text:style-name="T13"> :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max_tick</text:span><text:span text:style-name="T13">, </text:span><text:span text:style-name="T26">min_tick</text:span><text:span text:style-name="T13"> : </text:span><text:span text:style-name="T6">out</text:span><text:span text:style-name="T13"> </text:span><text:span text:style-name="T28">std_logic</text:span><text:span text:style-name="T13">;</text:span></text:p>
      <text:p text:style-name="P15"><text:span text:style-name="T13"><text:s text:c="10"/></text:span><text:span text:style-name="T26">q</text:span><text:span text:style-name="T13"> :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univ_bit_counter</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univ_bit_counter</text:span><text:span text:style-name="T13"> </text:span><text:span text:style-name="T6">is</text:span></text:p>
      <text:p text:style-name="P15"><text:span text:style-name="T13"><text:s text:c="4"/></text:span><text:span text:style-name="T6">signal</text:span><text:span text:style-name="T13"> </text:span><text:span text:style-name="T39">r_reg</text:span><text:span text:style-name="T13">, </text:span><text:span text:style-name="T39">r_next</text:span><text:span text:style-name="T13"> : </text:span><text:span text:style-name="T28">unsigned</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comb</text:span><text:span text:style-name="T13"> : </text:span><text:span text:style-name="T28">std_logic_vector</text:span><text:span text:style-name="T13">(</text:span><text:span text:style-name="T31">2</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text:span><text:span text:style-name="T26">rst</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r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text:span><text:span text:style-name="T6">then</text:span></text:p>
      <text:p text:style-name="P15"><text:span text:style-name="T13"><text:s text:c="12"/></text:span><text:span text:style-name="T6">if</text:span><text:span text:style-name="T13"> </text:span><text:span text:style-name="T26">syn_clr</text:span><text:span text:style-name="T13"> = </text:span><text:span text:style-name="T34">'1'</text:span><text:span text:style-name="T13"> </text:span><text:span text:style-name="T6">then</text:span><text:span text:style-name="T13"> </text:span></text:p>
      <text:p text:style-name="P15"><text:span text:style-name="T13"><text:s text:c="16"/></text:span><text:span text:style-name="T39">r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6">else</text:span><text:span text:style-name="T13"> </text:span><text:span text:style-name="T39">r_reg</text:span><text:span text:style-name="T13"> &lt;= </text:span><text:span text:style-name="T39">r_next</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6"><text:s text:c="4"/>end</text:span><text:span text:style-name="T13"> </text:span><text:span text:style-name="T6">process</text:span><text:span text:style-name="T13">;</text:span></text:p>
      <text:p text:style-name="P16"/>
      <text:p text:style-name="P50"><text:span text:style-name="T39">comb</text:span><text:span text:style-name="T13"> &lt;= </text:span><text:span text:style-name="T26">load</text:span><text:span text:style-name="T13"> </text:span><text:span text:style-name="T14">&amp;</text:span><text:span text:style-name="T13"> </text:span><text:span text:style-name="T26">en</text:span><text:span text:style-name="T13"> </text:span><text:span text:style-name="T14">&amp;</text:span><text:span text:style-name="T13"> </text:span><text:span text:style-name="T26">up</text:span><text:span text:style-name="T13">;</text:span></text:p>
      <text:p text:style-name="P50"><text:span text:style-name="T6">with</text:span><text:span text:style-name="T13"> (</text:span><text:span text:style-name="T39">comb</text:span><text:span text:style-name="T13">) </text:span><text:span text:style-name="T6">select</text:span></text:p>
      <text:p text:style-name="P50"><text:span text:style-name="T39">r_next</text:span><text:span text:style-name="T13"> &lt;=</text:span></text:p>
      <text:p text:style-name="P50"><text:span text:style-name="T28">unsigned</text:span><text:span text:style-name="T13">(</text:span><text:span text:style-name="T26">d</text:span><text:span text:style-name="T13">) </text:span><text:span text:style-name="T6">when</text:span><text:span text:style-name="T13"> </text:span><text:span text:style-name="T34">"100"</text:span><text:span text:style-name="T13">,</text:span></text:p>
      <text:p text:style-name="P50"><text:span text:style-name="T39">r_reg</text:span><text:span text:style-name="T13"> </text:span><text:span text:style-name="T14">+</text:span><text:span text:style-name="T13"> </text:span><text:span text:style-name="T31">1</text:span><text:span text:style-name="T13"> </text:span><text:span text:style-name="T6">when</text:span><text:span text:style-name="T13"> </text:span><text:span text:style-name="T34">"011"</text:span><text:span text:style-name="T13">,</text:span></text:p>
      <text:p text:style-name="P50"><text:span text:style-name="T39">r_reg</text:span><text:span text:style-name="T13"> </text:span><text:span text:style-name="T14">-</text:span><text:span text:style-name="T13"> </text:span><text:span text:style-name="T31">1</text:span><text:span text:style-name="T13"> </text:span><text:span text:style-name="T6">when</text:span><text:span text:style-name="T13"> </text:span><text:span text:style-name="T34">"010"</text:span><text:span text:style-name="T13">,</text:span></text:p>
      <text:p text:style-name="P50"><text:span text:style-name="T39">r_reg</text:span><text:span text:style-name="T13"> </text:span><text:span text:style-name="T6">when</text:span><text:span text:style-name="T13"> </text:span><text:span text:style-name="T6">others</text:span><text:span text:style-name="T13">;</text:span></text:p>
      <text:p text:style-name="P16"/>
      <text:p text:style-name="P24">-- <text:s text:c="3"/>r_next &lt;= unsigned(d) when (load = '1') else</text:p>
      <text:p text:style-name="P24">-- <text:s text:c="16"/>r_reg + 1 when (en = '1' and up = '1') else</text:p>
      <text:p text:style-name="P24">-- <text:s text:c="16"/>r_reg - 1 when (en = '1' and up = '0') else</text:p>
      <text:p text:style-name="P24">-- <text:s text:c="16"/>r_reg;</text:p>
      <text:p text:style-name="P16"><text:soft-page-break/></text:p>
      <text:p text:style-name="P50"><text:span text:style-name="T26">q</text:span><text:span text:style-name="T13"> &lt;= </text:span><text:span text:style-name="T28">std_logic_vector</text:span><text:span text:style-name="T13">(</text:span><text:span text:style-name="T39">r_reg</text:span><text:span text:style-name="T13">);</text:span></text:p>
      <text:p text:style-name="P50"><text:span text:style-name="T26">max_tick</text:span><text:span text:style-name="T13"> &lt;= </text:span><text:span text:style-name="T34">'1'</text:span><text:span text:style-name="T13"> </text:span><text:span text:style-name="T6">when</text:span><text:span text:style-name="T13"> </text:span><text:span text:style-name="T39">r_reg</text:span><text:span text:style-name="T13"> = </text:span><text:span text:style-name="T31">2</text:span><text:span text:style-name="T14">**</text:span><text:span text:style-name="T7">n</text:span><text:span text:style-name="T13"> </text:span><text:span text:style-name="T14">-</text:span><text:span text:style-name="T13"> </text:span><text:span text:style-name="T31">1</text:span><text:span text:style-name="T13"> </text:span><text:span text:style-name="T6">else</text:span><text:span text:style-name="T13"> </text:span><text:span text:style-name="T34">'0'</text:span><text:span text:style-name="T13">; </text:span></text:p>
      <text:p text:style-name="P50"><text:span text:style-name="T26">min_tick</text:span><text:span text:style-name="T13"> &lt;= </text:span><text:span text:style-name="T34">'1'</text:span><text:span text:style-name="T13"> </text:span><text:span text:style-name="T6">when</text:span><text:span text:style-name="T13"> </text:span><text:span text:style-name="T39">r_reg</text:span><text:span text:style-name="T13"> = </text:span><text:span text:style-name="T31">0</text:span><text:span text:style-name="T13"> </text:span><text:span text:style-name="T6">else</text:span><text:span text:style-name="T13"> </text:span><text:span text:style-name="T34">'0'</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SIGN MAGNITUDE ADDER</text:span></text:p>
      <text:p text:style-name="P24">--A signed magnitude adder performs an addition operation in this format:</text:p>
      <text:p text:style-name="P26">-- <text:s text:c="3"/>- <text:s text:c="3"/>if the two operands have the same signs, add the magnitudes and keep the sign.</text:p>
      <text:p text:style-name="P26">-- <text:s text:c="3"/>- <text:s/>if the two operands have different signs, subtract the smaller magnitude from</text:p>
      <text:p text:style-name="P26">-- <text:s text:c="7"/>the large one and keep the sign of the numner that has the larger magnitude.</text:p>
      <text:p text:style-name="P26">--One way of doing it is in two stages: First stage sorts the two inputs according to </text:p>
      <text:p text:style-name="P26">--their magnitudes and routes them to the max and min signals. The second stage examines </text:p>
      <text:p text:style-name="P26">--the signs and performs addition or subtraction on the magnitude accordingly. Note that </text:p>
      <text:p text:style-name="P26">--since the two numbers have been sorted, the magnituse of max is always larger then that </text:p>
      <text:p text:style-name="P26">--of min and the final sign is the sign max. Also note that the relevant magnituse signals </text:p>
      <text:p text:style-name="P26">--are declared as unsigned to facilitate the arithmetic operation, and type conversions </text:p>
      <text:p text:style-name="P26">--are performed at the beginning and end of the code.</text:p>
      <text:p text:style-name="P18"/>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package</text:span><text:span text:style-name="T13"> </text:span><text:span text:style-name="T22">define</text:span><text:span text:style-name="T13"> </text:span><text:span text:style-name="T6">is</text:span></text:p>
      <text:p text:style-name="P15"><text:span text:style-name="T13"><text:s text:c="4"/></text:span><text:span text:style-name="T6">constant</text:span><text:span text:style-name="T13"> </text:span><text:span text:style-name="T7">n</text:span><text:span text:style-name="T13"> : </text:span><text:span text:style-name="T28">integer</text:span><text:span text:style-name="T13"> := </text:span><text:span text:style-name="T31">4</text:span><text:span text:style-name="T13">;</text:span></text:p>
      <text:p text:style-name="P15"><text:span text:style-name="T13"><text:s text:c="4"/></text:span><text:span text:style-name="T6">subtype</text:span><text:span text:style-name="T13"> </text:span><text:span text:style-name="T28">digit</text:span><text:span text:style-name="T13"> </text:span><text:span text:style-name="T6">is</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ubtype</text:span><text:span text:style-name="T13"> </text:span><text:span text:style-name="T28">size</text:span><text:span text:style-name="T13"> </text:span><text:span text:style-name="T6">is</text:span><text:span text:style-name="T13"> </text:span><text:span text:style-name="T28">unsigned</text:span><text:span text:style-name="T13">(</text:span><text:span text:style-name="T7">n</text:span><text:span text:style-name="T14">-</text:span><text:span text:style-name="T31">2</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define</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define</text:span><text:span text:style-name="T13">.</text:span><text:span text:style-name="T6">all</text:span><text:span text:style-name="T13">;</text:span></text:p>
      <text:p text:style-name="P16"/>
      <text:p text:style-name="P15"><text:span text:style-name="T6">entity</text:span><text:span text:style-name="T13"> </text:span><text:span text:style-name="T22">sign_mag_add</text:span><text:span text:style-name="T13"> </text:span><text:span text:style-name="T6">is</text:span><text:span text:style-name="T13"> </text:span><text:span text:style-name="T6">port</text:span><text:span text:style-name="T13">(</text:span></text:p>
      <text:p text:style-name="P15"><text:span text:style-name="T13"><text:s text:c="4"/></text:span><text:span text:style-name="T26">a</text:span><text:span text:style-name="T13">, </text:span><text:span text:style-name="T26">b</text:span><text:span text:style-name="T13">: </text:span><text:span text:style-name="T6">in</text:span><text:span text:style-name="T13"> </text:span><text:span text:style-name="T28">digit</text:span><text:span text:style-name="T13">;</text:span></text:p>
      <text:p text:style-name="P15"><text:span text:style-name="T13"><text:s text:c="4"/></text:span><text:span text:style-name="T26">sum</text:span><text:span text:style-name="T13">: </text:span><text:span text:style-name="T6">out</text:span><text:span text:style-name="T13"> </text:span><text:span text:style-name="T28">digit</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sign_mag_add</text:span><text:span text:style-name="T13"> </text:span><text:span text:style-name="T6">is</text:span></text:p>
      <text:p text:style-name="P15"><text:span text:style-name="T13"><text:s text:c="4"/></text:span><text:span text:style-name="T6">signal</text:span><text:span text:style-name="T13"> </text:span><text:span text:style-name="T39">mag_a</text:span><text:span text:style-name="T13">, </text:span><text:span text:style-name="T39">mag_b</text:span><text:span text:style-name="T13">: </text:span><text:span text:style-name="T28">size</text:span><text:span text:style-name="T13">;</text:span></text:p>
      <text:p text:style-name="P15"><text:span text:style-name="T13"><text:s text:c="4"/></text:span><text:span text:style-name="T6">signal</text:span><text:span text:style-name="T13"> </text:span><text:span text:style-name="T39">mag_sum</text:span><text:span text:style-name="T13">, </text:span><text:span text:style-name="T39">max</text:span><text:span text:style-name="T13">, </text:span><text:span text:style-name="T39">min</text:span><text:span text:style-name="T13"> : </text:span><text:span text:style-name="T28">size</text:span><text:span text:style-name="T13">;</text:span></text:p>
      <text:p text:style-name="P15"><text:span text:style-name="T13"><text:s text:c="4"/></text:span><text:span text:style-name="T6">signal</text:span><text:span text:style-name="T13"> </text:span><text:span text:style-name="T39">sign_a</text:span><text:span text:style-name="T13">, </text:span><text:span text:style-name="T39">sign_b</text:span><text:span text:style-name="T13">, </text:span><text:span text:style-name="T39">sign_sum</text:span><text:span text:style-name="T13">: </text:span><text:span text:style-name="T28">std_logic</text:span><text:span text:style-name="T13">; <text:s text:c="3"/></text:span></text:p>
      <text:p text:style-name="P23">begin</text:p>
      <text:p text:style-name="P15"><text:span text:style-name="T13"><text:s text:c="4"/></text:span><text:span text:style-name="T39">mag_a</text:span><text:span text:style-name="T13"> &lt;= </text:span><text:span text:style-name="T28">unsigned</text:span><text:span text:style-name="T13">(</text:span><text:span text:style-name="T26">a</text:span><text:span text:style-name="T13">(</text:span><text:span text:style-name="T7">n</text:span><text:span text:style-name="T14">-</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39">mag_b</text:span><text:span text:style-name="T13"> &lt;= </text:span><text:span text:style-name="T28">unsigned</text:span><text:span text:style-name="T13">(</text:span><text:span text:style-name="T26">b</text:span><text:span text:style-name="T13">(</text:span><text:span text:style-name="T7">n</text:span><text:span text:style-name="T14">-</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39">sign_a</text:span><text:span text:style-name="T13"> &lt;= </text:span><text:span text:style-name="T26">a</text:span><text:span text:style-name="T13">(</text:span><text:span text:style-name="T7">n</text:span><text:span text:style-name="T14">-</text:span><text:span text:style-name="T31">1</text:span><text:span text:style-name="T13">);</text:span></text:p>
      <text:p text:style-name="P15"><text:span text:style-name="T13"><text:s text:c="4"/></text:span><text:span text:style-name="T39">sign_b</text:span><text:span text:style-name="T13"> &lt;= </text:span><text:span text:style-name="T26">b</text:span><text:span text:style-name="T13">(</text:span><text:span text:style-name="T7">n</text:span><text:span text:style-name="T14">-</text:span><text:span text:style-name="T31">1</text:span><text:span text:style-name="T13">);</text:span></text:p>
      <text:p text:style-name="P15"><text:span text:style-name="T13"><text:s text:c="4"/></text:span><text:span text:style-name="T36">--sort according to magnitude</text:span></text:p>
      <text:p text:style-name="P15"><text:span text:style-name="T13"><text:s text:c="4"/></text:span><text:span text:style-name="T6">process</text:span><text:span text:style-name="T13">(</text:span><text:span text:style-name="T39">mag_a</text:span><text:span text:style-name="T13">, </text:span><text:span text:style-name="T39">mag_b</text:span><text:span text:style-name="T13">, </text:span><text:span text:style-name="T39">sign_a</text:span><text:span text:style-name="T13">, </text:span><text:span text:style-name="T39">sign_b</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39">mag_a</text:span><text:span text:style-name="T13"> </text:span><text:span text:style-name="T14">&gt;</text:span><text:span text:style-name="T13"> </text:span><text:span text:style-name="T39">mag_b</text:span><text:span text:style-name="T13"> </text:span><text:span text:style-name="T6">then</text:span></text:p>
      <text:p text:style-name="P15"><text:span text:style-name="T13"><text:s text:c="12"/></text:span><text:span text:style-name="T39">max</text:span><text:span text:style-name="T13"> &lt;= </text:span><text:span text:style-name="T39">mag_a</text:span><text:span text:style-name="T13">;</text:span></text:p>
      <text:p text:style-name="P15"><text:span text:style-name="T13"><text:s text:c="12"/></text:span><text:span text:style-name="T39">min</text:span><text:span text:style-name="T13"> &lt;= </text:span><text:span text:style-name="T39">mag_b</text:span><text:span text:style-name="T13">;</text:span></text:p>
      <text:p text:style-name="P15"><text:span text:style-name="T13"><text:s text:c="12"/></text:span><text:span text:style-name="T39">sign_sum</text:span><text:span text:style-name="T13"> &lt;= </text:span><text:span text:style-name="T39">sign_a</text:span><text:span text:style-name="T13">;</text:span></text:p>
      <text:p text:style-name="P15"><text:span text:style-name="T13"><text:s text:c="8"/></text:span><text:span text:style-name="T6">else</text:span><text:span text:style-name="T13"> <text:s text:c="3"/></text:span></text:p>
      <text:p text:style-name="P15"><text:soft-page-break/><text:span text:style-name="T13"><text:s text:c="12"/></text:span><text:span text:style-name="T39">max</text:span><text:span text:style-name="T13"> &lt;= </text:span><text:span text:style-name="T39">mag_b</text:span><text:span text:style-name="T13">;</text:span></text:p>
      <text:p text:style-name="P15"><text:span text:style-name="T13"><text:s text:c="12"/></text:span><text:span text:style-name="T39">min</text:span><text:span text:style-name="T13"> &lt;= </text:span><text:span text:style-name="T39">mag_a</text:span><text:span text:style-name="T13">;</text:span></text:p>
      <text:p text:style-name="P15"><text:span text:style-name="T13"><text:s text:c="12"/></text:span><text:span text:style-name="T39">sign_sum</text:span><text:span text:style-name="T13"> &lt;= </text:span><text:span text:style-name="T39">sign_b</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 add/sub magnitude</text:span></text:p>
      <text:p text:style-name="P15"><text:span text:style-name="T13"><text:s text:c="4"/></text:span><text:span text:style-name="T39">mag_sum</text:span><text:span text:style-name="T13"> &lt;= </text:span><text:span text:style-name="T39">max</text:span><text:span text:style-name="T13"> </text:span><text:span text:style-name="T14">+</text:span><text:span text:style-name="T13"> </text:span><text:span text:style-name="T39">min</text:span><text:span text:style-name="T13"> </text:span><text:span text:style-name="T6">when</text:span><text:span text:style-name="T13"> </text:span><text:span text:style-name="T39">sign_a</text:span><text:span text:style-name="T13"> = </text:span><text:span text:style-name="T39">sign_b</text:span><text:span text:style-name="T13"> </text:span><text:span text:style-name="T6">else</text:span></text:p>
      <text:p text:style-name="P15"><text:span text:style-name="T13"><text:s text:c="8"/></text:span><text:span text:style-name="T39">max</text:span><text:span text:style-name="T13"> </text:span><text:span text:style-name="T14">-</text:span><text:span text:style-name="T13"> </text:span><text:span text:style-name="T39">min</text:span><text:span text:style-name="T13">;</text:span></text:p>
      <text:p text:style-name="P15"><text:span text:style-name="T13"><text:s text:c="8"/></text:span><text:span text:style-name="T36">--form output</text:span></text:p>
      <text:p text:style-name="P15"><text:span text:style-name="T13"><text:s text:c="8"/></text:span><text:span text:style-name="T26">sum</text:span><text:span text:style-name="T13"> &lt;= </text:span><text:span text:style-name="T28">std_logic_vector</text:span><text:span text:style-name="T13">(</text:span><text:span text:style-name="T39">sign_sum</text:span><text:span text:style-name="T13"> </text:span><text:span text:style-name="T14">&amp;</text:span><text:span text:style-name="T13"> </text:span><text:span text:style-name="T39">mag_sum</text:span><text:span text:style-name="T13">);</text:span></text:p>
      <text:p text:style-name="P15"><text:span text:style-name="T13"><text:s text:c="4"/></text:span><text:span text:style-name="T6">end</text:span><text:span text:style-name="T13"> </text:span><text:span text:style-name="T22">arch</text:span><text:span text:style-name="T13">;</text:span></text:p>
      <text:p text:style-name="P16"><text:span text:style-name="T3"/></text:p>
      <text:p text:style-name="P16"><text:span text:style-name="T3">SIGN MAGNITUDE ADDER - TEST BENCH</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sm_add_tes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btn</text:span><text:span text:style-name="T13"> : </text:span><text:span text:style-name="T6">in</text:span><text:span text:style-name="T13"> </text:span><text:span text:style-name="T28">std_logic_vector</text:span><text:span text:style-name="T13">(</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w</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an</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sm_add_test</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sm_add_test</text:span><text:span text:style-name="T13"> </text:span><text:span text:style-name="T6">is</text:span></text:p>
      <text:p text:style-name="P15"><text:span text:style-name="T13"><text:s text:c="4"/></text:span><text:span text:style-name="T6">signal</text:span><text:span text:style-name="T13"> </text:span><text:span text:style-name="T39">sum</text:span><text:span text:style-name="T13">, </text:span><text:span text:style-name="T39">mout</text:span><text:span text:style-name="T13">, </text:span><text:span text:style-name="T39">oct</text:span><text:span text:style-name="T13"> :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led3</text:span><text:span text:style-name="T13">, </text:span><text:span text:style-name="T39">led2</text:span><text:span text:style-name="T13">, </text:span><text:span text:style-name="T39">led1</text:span><text:span text:style-name="T13">, </text:span><text:span text:style-name="T39">led0</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6">--instantiate adder</text:span></text:p>
      <text:p text:style-name="P15"><text:span text:style-name="T13"><text:s text:c="4"/></text:span><text:span text:style-name="T38">sm_adder_unit</text:span><text:span text:style-name="T13"> : </text:span><text:span text:style-name="T6">entity</text:span><text:span text:style-name="T13"> </text:span><text:span text:style-name="T22">work</text:span><text:span text:style-name="T13">.</text:span><text:span text:style-name="T22">sign_mag_add</text:span></text:p>
      <text:p text:style-name="P15"><text:span text:style-name="T13"><text:s text:c="8"/></text:span><text:span text:style-name="T36">-- <text:s text:c="7"/>generic map(n =&gt; 4)</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26">sw</text:span><text:span text:style-name="T13"> (</text:span><text:span text:style-name="T31">3</text:span><text:span text:style-name="T13"> </text:span><text:span text:style-name="T6">downto</text:span><text:span text:style-name="T13"> </text:span><text:span text:style-name="T31">0</text:span><text:span text:style-name="T13">), </text:span><text:span text:style-name="T26">b</text:span><text:span text:style-name="T13"> =&gt; </text:span><text:span text:style-name="T26">sw</text:span><text:span text:style-name="T13"> (</text:span><text:span text:style-name="T31">7</text:span><text:span text:style-name="T13"> </text:span><text:span text:style-name="T6">downto</text:span><text:span text:style-name="T13"> </text:span><text:span text:style-name="T31">4</text:span><text:span text:style-name="T13">), </text:span><text:span text:style-name="T26">sum</text:span><text:span text:style-name="T13"> =&gt; </text:span><text:span text:style-name="T39">sum</text:span><text:span text:style-name="T13">);</text:span></text:p>
      <text:p text:style-name="P16"/>
      <text:p text:style-name="P15"><text:span text:style-name="T13"><text:s text:c="4"/></text:span><text:span text:style-name="T36">--3-to-1 mux to select a number to display</text:span></text:p>
      <text:p text:style-name="P15"><text:span text:style-name="T13"><text:s text:c="4"/></text:span><text:span text:style-name="T6">with</text:span><text:span text:style-name="T13"> </text:span><text:span text:style-name="T26">btn</text:span><text:span text:style-name="T13"> </text:span><text:span text:style-name="T6">select</text:span></text:p>
      <text:p text:style-name="P15"><text:span text:style-name="T13"><text:s text:c="4"/></text:span><text:span text:style-name="T39">mout</text:span><text:span text:style-name="T13"> &lt;= <text:s text:c="4"/></text:span><text:span text:style-name="T26">sw</text:span><text:span text:style-name="T13">(</text:span><text:span text:style-name="T31">3</text:span><text:span text:style-name="T13"> </text:span><text:span text:style-name="T6">downto</text:span><text:span text:style-name="T13"> </text:span><text:span text:style-name="T31">0</text:span><text:span text:style-name="T13">) </text:span><text:span text:style-name="T6">when</text:span><text:span text:style-name="T13"> </text:span><text:span text:style-name="T34">"00"</text:span><text:span text:style-name="T13">, </text:span><text:span text:style-name="T36">--a</text:span></text:p>
      <text:p text:style-name="P15"><text:span text:style-name="T13"><text:s text:c="4"/></text:span><text:span text:style-name="T26">sw</text:span><text:span text:style-name="T13">(</text:span><text:span text:style-name="T31">7</text:span><text:span text:style-name="T13"> </text:span><text:span text:style-name="T6">downto</text:span><text:span text:style-name="T13"> </text:span><text:span text:style-name="T31">4</text:span><text:span text:style-name="T13">) </text:span><text:span text:style-name="T6">when</text:span><text:span text:style-name="T13"> </text:span><text:span text:style-name="T34">"01"</text:span><text:span text:style-name="T13">, </text:span><text:span text:style-name="T36">--b</text:span></text:p>
      <text:p text:style-name="P15"><text:span text:style-name="T13"><text:s text:c="4"/></text:span><text:span text:style-name="T39">sum</text:span><text:span text:style-name="T13"> </text:span><text:span text:style-name="T6">when</text:span><text:span text:style-name="T13"> </text:span><text:span text:style-name="T6">others</text:span><text:span text:style-name="T13">;</text:span></text:p>
      <text:p text:style-name="P16"/>
      <text:p text:style-name="P15"><text:span text:style-name="T13"><text:s text:c="4"/></text:span><text:span text:style-name="T36">--magnitude display on rightmost 7-seg led0</text:span></text:p>
      <text:p text:style-name="P15"><text:span text:style-name="T13"><text:s text:c="4"/></text:span><text:span text:style-name="T39">oct</text:span><text:span text:style-name="T13"> &lt;= </text:span><text:span text:style-name="T34">'0'</text:span><text:span text:style-name="T13"> </text:span><text:span text:style-name="T14">&amp;</text:span><text:span text:style-name="T13"> </text:span><text:span text:style-name="T39">mout</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38">sseg_unit</text:span><text:span text:style-name="T13">: </text:span><text:span text:style-name="T6">entity</text:span><text:span text:style-name="T13"> </text:span><text:span text:style-name="T22">work</text:span><text:span text:style-name="T13">.</text:span><text:span text:style-name="T22">hex_to_sseg</text:span></text:p>
      <text:p text:style-name="P15"><text:span text:style-name="T13"><text:s text:c="8"/></text:span><text:span text:style-name="T6">port</text:span><text:span text:style-name="T13"> </text:span><text:span text:style-name="T6">map</text:span><text:span text:style-name="T13">(</text:span><text:span text:style-name="T26">hex</text:span><text:span text:style-name="T13"> =&gt; </text:span><text:span text:style-name="T39">oct</text:span><text:span text:style-name="T13">, </text:span><text:span text:style-name="T26">dp</text:span><text:span text:style-name="T13"> =&gt; </text:span><text:span text:style-name="T34">'0'</text:span><text:span text:style-name="T13">, </text:span><text:span text:style-name="T26">sseg</text:span><text:span text:style-name="T13"> =&gt; </text:span><text:span text:style-name="T39">led0</text:span><text:span text:style-name="T13">);</text:span></text:p>
      <text:p text:style-name="P15"><text:span text:style-name="T13"><text:s text:c="4"/></text:span><text:span text:style-name="T36">--sign display on 2nd 7-seg led0</text:span></text:p>
      <text:p text:style-name="P16"/>
      <text:p text:style-name="P15"><text:span text:style-name="T13"><text:s text:c="4"/></text:span><text:span text:style-name="T39">led1</text:span><text:span text:style-name="T13"> &lt;= <text:s text:c="4"/></text:span><text:span text:style-name="T34">"11111110"</text:span><text:span text:style-name="T13"> </text:span><text:span text:style-name="T6">when</text:span><text:span text:style-name="T13"> </text:span><text:span text:style-name="T39">mout</text:span><text:span text:style-name="T13">(</text:span><text:span text:style-name="T31">3</text:span><text:span text:style-name="T13">) = </text:span><text:span text:style-name="T34">'1'</text:span><text:span text:style-name="T13"> </text:span><text:span text:style-name="T6">else</text:span><text:span text:style-name="T13"> </text:span><text:span text:style-name="T36">--middle bar</text:span></text:p>
      <text:p text:style-name="P15"><text:span text:style-name="T13"><text:s text:c="8"/></text:span><text:span text:style-name="T34">"11111111"</text:span><text:span text:style-name="T13">;</text:span></text:p>
      <text:p text:style-name="P15"><text:span text:style-name="T13"><text:s text:c="8"/></text:span><text:span text:style-name="T36">--other tw0 7-seg leds blank</text:span></text:p>
      <text:p text:style-name="P15"><text:span text:style-name="T13"><text:s text:c="8"/></text:span><text:span text:style-name="T39">led2</text:span><text:span text:style-name="T13"> &lt;= <text:s text:c="4"/></text:span><text:span text:style-name="T34">"11111111"</text:span><text:span text:style-name="T13">;</text:span></text:p>
      <text:p text:style-name="P15"><text:soft-page-break/><text:span text:style-name="T13"><text:s text:c="8"/></text:span><text:span text:style-name="T39">led3</text:span><text:span text:style-name="T13"> &lt;= <text:s text:c="4"/></text:span><text:span text:style-name="T34">"11111111"</text:span><text:span text:style-name="T13">;</text:span></text:p>
      <text:p text:style-name="P16"/>
      <text:p text:style-name="P15"><text:span text:style-name="T13"><text:s text:c="8"/></text:span><text:span text:style-name="T36">--instantiate display multiplexer</text:span></text:p>
      <text:p text:style-name="P15"><text:span text:style-name="T13"><text:s text:c="8"/></text:span><text:span text:style-name="T38">disp_unit</text:span><text:span text:style-name="T13">: </text:span><text:span text:style-name="T6">entity</text:span><text:span text:style-name="T13"> </text:span><text:span text:style-name="T22">work</text:span><text:span text:style-name="T13">.</text:span><text:span text:style-name="T22">disp_mux</text:span></text:p>
      <text:p text:style-name="P15"><text:span text:style-name="T13"><text:s text:c="12"/></text:span><text:span text:style-name="T6">port</text:span><text:span text:style-name="T13"> </text:span><text:span text:style-name="T6">map</text:span><text:span text:style-name="T13">(</text:span></text:p>
      <text:p text:style-name="P15"><text:span text:style-name="T13"><text:s text:c="16"/></text:span><text:span text:style-name="T26">clk</text:span><text:span text:style-name="T13"> =&gt; </text:span><text:span text:style-name="T26">clk</text:span><text:span text:style-name="T13">, </text:span><text:span text:style-name="T26">reset</text:span><text:span text:style-name="T13"> =&gt; </text:span><text:span text:style-name="T34">'0'</text:span><text:span text:style-name="T13">, </text:span><text:span text:style-name="T26">in0</text:span><text:span text:style-name="T13"> =&gt; </text:span><text:span text:style-name="T39">led0</text:span><text:span text:style-name="T13">, </text:span><text:span text:style-name="T26">in1</text:span><text:span text:style-name="T13"> =&gt; </text:span><text:span text:style-name="T39">led1</text:span><text:span text:style-name="T13">,</text:span></text:p>
      <text:p text:style-name="P15"><text:span text:style-name="T13"><text:s text:c="16"/></text:span><text:span text:style-name="T26">in2</text:span><text:span text:style-name="T13"> =&gt; </text:span><text:span text:style-name="T39">led2</text:span><text:span text:style-name="T13">, </text:span><text:span text:style-name="T26">in3</text:span><text:span text:style-name="T13"> =&gt; </text:span><text:span text:style-name="T39">led3</text:span><text:span text:style-name="T13">, </text:span><text:span text:style-name="T26">an</text:span><text:span text:style-name="T13"> =&gt; </text:span><text:span text:style-name="T26">an</text:span><text:span text:style-name="T13">, </text:span><text:span text:style-name="T26">sseg</text:span><text:span text:style-name="T13"> =&gt; </text:span><text:span text:style-name="T26">sseg</text:span><text:span text:style-name="T13">);</text:span></text:p>
      <text:p text:style-name="P15"><text:span text:style-name="T13"><text:s text:c="4"/></text:span><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DISPLAY MUX</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disp_mux</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eset</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in3</text:span><text:span text:style-name="T13">, </text:span><text:span text:style-name="T26">in2</text:span><text:span text:style-name="T13">, </text:span><text:span text:style-name="T26">in1</text:span><text:span text:style-name="T13">, </text:span><text:span text:style-name="T26">in0</text:span><text:span text:style-name="T13">: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an</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disp_mux</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disp_mux</text:span><text:span text:style-name="T13"> </text:span><text:span text:style-name="T6">is</text:span></text:p>
      <text:p text:style-name="P15"><text:span text:style-name="T13"><text:s text:c="4"/></text:span><text:span text:style-name="T36">--refreshing rate around 800hz (50Mhz/2^16)</text:span></text:p>
      <text:p text:style-name="P15"><text:span text:style-name="T13"><text:s text:c="4"/></text:span><text:span text:style-name="T6">constant</text:span><text:span text:style-name="T13"> </text:span><text:span text:style-name="T7">n</text:span><text:span text:style-name="T13"> : </text:span><text:span text:style-name="T28">integer</text:span><text:span text:style-name="T13"> := </text:span><text:span text:style-name="T31">18</text:span><text:span text:style-name="T13">;</text:span></text:p>
      <text:p text:style-name="P15"><text:span text:style-name="T13"><text:s text:c="4"/></text:span><text:span text:style-name="T6">signal</text:span><text:span text:style-name="T13"> </text:span><text:span text:style-name="T39">q_reg</text:span><text:span text:style-name="T13">, </text:span><text:span text:style-name="T39">q_next</text:span><text:span text:style-name="T13">: </text:span><text:span text:style-name="T28">unsigned</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sel</text:span><text:span text:style-name="T13">: </text:span><text:span text:style-name="T28">std_logic_vector</text:span><text:span text:style-name="T13">(</text:span><text:span text:style-name="T31">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6">--register</text:span></text:p>
      <text:p text:style-name="P15"><text:span text:style-name="T13"><text:s text:c="4"/></text:span><text:span text:style-name="T6">process</text:span><text:span text:style-name="T13">(</text:span><text:span text:style-name="T26">clk</text:span><text:span text:style-name="T13">,</text:span><text:span text:style-name="T26">rese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eset</text:span><text:span text:style-name="T13"> = </text:span><text:span text:style-name="T34">'1'</text:span><text:span text:style-name="T13"> </text:span><text:span text:style-name="T6">then</text:span></text:p>
      <text:p text:style-name="P15"><text:span text:style-name="T13"><text:s text:c="12"/></text:span><text:span text:style-name="T39">q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26">clk</text:span><text:span text:style-name="T33">'event</text:span><text:span text:style-name="T13"> </text:span><text:span text:style-name="T6">and</text:span><text:span text:style-name="T13"> </text:span><text:span text:style-name="T26">clk</text:span><text:span text:style-name="T13"> =</text:span><text:span text:style-name="T34">'1'</text:span><text:span text:style-name="T13">)</text:span><text:span text:style-name="T6">then</text:span></text:p>
      <text:p text:style-name="P15"><text:span text:style-name="T13"><text:s text:c="12"/></text:span><text:span text:style-name="T39">q_reg</text:span><text:span text:style-name="T13"> &lt;= </text:span><text:span text:style-name="T39">q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next-state logic for the counter</text:span></text:p>
      <text:p text:style-name="P15"><text:span text:style-name="T13"><text:s text:c="4"/></text:span><text:span text:style-name="T39">q_next</text:span><text:span text:style-name="T13"> &lt;= </text:span><text:span text:style-name="T39">q_reg</text:span><text:span text:style-name="T13"> </text:span><text:span text:style-name="T14">+</text:span><text:span text:style-name="T13"> </text:span><text:span text:style-name="T31">1</text:span><text:span text:style-name="T13">;</text:span></text:p>
      <text:p text:style-name="P16"/>
      <text:p text:style-name="P15"><text:span text:style-name="T13"><text:s text:c="4"/></text:span><text:span text:style-name="T36">--2 MSBs of counter to control 4-to-1 multiplexing</text:span></text:p>
      <text:p text:style-name="P15"><text:span text:style-name="T13"><text:s text:c="4"/></text:span><text:span text:style-name="T36">--and to generate active-low enable signal</text:span></text:p>
      <text:p text:style-name="P15"><text:span text:style-name="T13"><text:s text:c="4"/></text:span><text:span text:style-name="T39">sel</text:span><text:span text:style-name="T13"> &lt;= </text:span><text:span text:style-name="T28">std_logic_vector</text:span><text:span text:style-name="T13">(</text:span><text:span text:style-name="T39">q_reg</text:span><text:span text:style-name="T13">(</text:span><text:span text:style-name="T7">n</text:span><text:span text:style-name="T14">-</text:span><text:span text:style-name="T31">1</text:span><text:span text:style-name="T13"> </text:span><text:span text:style-name="T6">downto</text:span><text:span text:style-name="T13"> </text:span><text:span text:style-name="T7">n</text:span><text:span text:style-name="T14">-</text:span><text:span text:style-name="T31">2</text:span><text:span text:style-name="T13">));</text:span></text:p>
      <text:p text:style-name="P15"><text:span text:style-name="T13"><text:s text:c="4"/></text:span><text:span text:style-name="T6">process</text:span><text:span text:style-name="T13">(</text:span><text:span text:style-name="T39">sel</text:span><text:span text:style-name="T13">, </text:span><text:span text:style-name="T26">in0</text:span><text:span text:style-name="T13">, </text:span><text:span text:style-name="T26">in1</text:span><text:span text:style-name="T13">, </text:span><text:span text:style-name="T26">in2</text:span><text:span text:style-name="T13">, </text:span><text:span text:style-name="T26">in3</text:span><text:span text:style-name="T13">)</text:span></text:p>
      <text:p text:style-name="P15"><text:span text:style-name="T13"><text:s text:c="4"/></text:span><text:span text:style-name="T6">begin</text:span></text:p>
      <text:p text:style-name="P15"><text:span text:style-name="T13"><text:s text:c="8"/></text:span><text:span text:style-name="T6">case</text:span><text:span text:style-name="T13"> </text:span><text:span text:style-name="T39">sel</text:span><text:span text:style-name="T13"> </text:span><text:span text:style-name="T6">is</text:span></text:p>
      <text:p text:style-name="P15"><text:span text:style-name="T13"><text:s text:c="12"/></text:span><text:span text:style-name="T6">when</text:span><text:span text:style-name="T13"> </text:span><text:span text:style-name="T34">"00"</text:span><text:span text:style-name="T13"> =&gt; </text:span></text:p>
      <text:p text:style-name="P15"><text:span text:style-name="T13"><text:s text:c="16"/></text:span><text:span text:style-name="T26">an</text:span><text:span text:style-name="T13"> &lt;= </text:span><text:span text:style-name="T34">"1110"</text:span><text:span text:style-name="T13">;</text:span></text:p>
      <text:p text:style-name="P15"><text:span text:style-name="T13"><text:s text:c="16"/></text:span><text:span text:style-name="T26">sseg</text:span><text:span text:style-name="T13"> &lt;= </text:span><text:span text:style-name="T26">in0</text:span><text:span text:style-name="T13">;</text:span></text:p>
      <text:p text:style-name="P15"><text:span text:style-name="T13"><text:s text:c="12"/></text:span><text:span text:style-name="T6">when</text:span><text:span text:style-name="T13"> </text:span><text:span text:style-name="T34">"01"</text:span><text:span text:style-name="T13"> =&gt;</text:span></text:p>
      <text:p text:style-name="P15"><text:span text:style-name="T13"><text:s text:c="16"/></text:span><text:span text:style-name="T26">an</text:span><text:span text:style-name="T13"> &lt;= </text:span><text:span text:style-name="T34">"1101"</text:span><text:span text:style-name="T13">;</text:span></text:p>
      <text:p text:style-name="P15"><text:span text:style-name="T13"><text:s text:c="16"/></text:span><text:span text:style-name="T26">sseg</text:span><text:span text:style-name="T13"> &lt;= </text:span><text:span text:style-name="T26">in1</text:span><text:span text:style-name="T13">;</text:span></text:p>
      <text:p text:style-name="P15"><text:span text:style-name="T13"><text:s text:c="12"/></text:span><text:span text:style-name="T6">when</text:span><text:span text:style-name="T13"> </text:span><text:span text:style-name="T34">"10"</text:span><text:span text:style-name="T13"> =&gt;</text:span></text:p>
      <text:p text:style-name="P15"><text:span text:style-name="T13"><text:s text:c="16"/></text:span><text:span text:style-name="T26">an</text:span><text:span text:style-name="T13"> &lt;= </text:span><text:span text:style-name="T34">"1011"</text:span><text:span text:style-name="T13">;</text:span></text:p>
      <text:p text:style-name="P15"><text:span text:style-name="T13"><text:s text:c="16"/></text:span><text:span text:style-name="T26">sseg</text:span><text:span text:style-name="T13"> &lt;= </text:span><text:span text:style-name="T26">in2</text:span><text:span text:style-name="T13">;</text:span></text:p>
      <text:p text:style-name="P15"><text:span text:style-name="T13"><text:s text:c="12"/></text:span><text:span text:style-name="T6">when</text:span><text:span text:style-name="T13"> </text:span><text:span text:style-name="T6">others</text:span><text:span text:style-name="T13"> =&gt;</text:span></text:p>
      <text:p text:style-name="P15"><text:span text:style-name="T13"><text:s text:c="16"/></text:span><text:span text:style-name="T26">an</text:span><text:span text:style-name="T13"> &lt;= </text:span><text:span text:style-name="T34">"0111"</text:span><text:span text:style-name="T13">;</text:span></text:p>
      <text:p text:style-name="P15"><text:span text:style-name="T13"><text:s text:c="16"/></text:span><text:span text:style-name="T26">sseg</text:span><text:span text:style-name="T13"> &lt;= </text:span><text:span text:style-name="T26">in3</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oft-page-break/><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HEX TO SEVEN SEGMENT</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hex_to_sseg_tes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sw</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an</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hex_to_sseg_test</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hex_to_sseg_test</text:span><text:span text:style-name="T13"> </text:span><text:span text:style-name="T6">is</text:span></text:p>
      <text:p text:style-name="P15"><text:span text:style-name="T13"><text:s text:c="4"/></text:span><text:span text:style-name="T6">signal</text:span><text:span text:style-name="T13"> </text:span><text:span text:style-name="T39">inc</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led3</text:span><text:span text:style-name="T13">, </text:span><text:span text:style-name="T39">led2</text:span><text:span text:style-name="T13">, </text:span><text:span text:style-name="T39">led1</text:span><text:span text:style-name="T13">, </text:span><text:span text:style-name="T39">led0</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6">--increment input</text:span></text:p>
      <text:p text:style-name="P15"><text:span text:style-name="T13"><text:s text:c="4"/></text:span><text:span text:style-name="T39">inc</text:span><text:span text:style-name="T13"> &lt;= </text:span><text:span text:style-name="T28">std_logic_vector</text:span><text:span text:style-name="T13">(</text:span><text:span text:style-name="T28">unsigned</text:span><text:span text:style-name="T13">(</text:span><text:span text:style-name="T26">sw</text:span><text:span text:style-name="T13">) </text:span><text:span text:style-name="T14">+</text:span><text:span text:style-name="T31">1</text:span><text:span text:style-name="T13">);</text:span></text:p>
      <text:p text:style-name="P15"><text:span text:style-name="T13"><text:s text:c="4"/></text:span><text:span text:style-name="T36">--instantiate four instaces of hex decoders</text:span></text:p>
      <text:p text:style-name="P16"/>
      <text:p text:style-name="P15"><text:span text:style-name="T13"><text:s text:c="4"/></text:span><text:span text:style-name="T36">--instance for 4 lsbs of input</text:span></text:p>
      <text:p text:style-name="P15"><text:span text:style-name="T13"><text:s text:c="4"/></text:span><text:span text:style-name="T38">sseg_unit_0</text:span><text:span text:style-name="T13">: </text:span><text:span text:style-name="T6">entity</text:span><text:span text:style-name="T13"> </text:span><text:span text:style-name="T22">work</text:span><text:span text:style-name="T13">.</text:span><text:span text:style-name="T22">hex_to_sseg</text:span></text:p>
      <text:p text:style-name="P15"><text:span text:style-name="T13"><text:s text:c="8"/></text:span><text:span text:style-name="T6">port</text:span><text:span text:style-name="T13"> </text:span><text:span text:style-name="T6">map</text:span><text:span text:style-name="T13">(</text:span><text:span text:style-name="T26">hex</text:span><text:span text:style-name="T13"> =&gt; </text:span><text:span text:style-name="T26">sw</text:span><text:span text:style-name="T13">(</text:span><text:span text:style-name="T31">3</text:span><text:span text:style-name="T13"> </text:span><text:span text:style-name="T6">downto</text:span><text:span text:style-name="T13"> </text:span><text:span text:style-name="T31">0</text:span><text:span text:style-name="T13">), </text:span><text:span text:style-name="T26">dp</text:span><text:span text:style-name="T13"> =&gt; </text:span><text:span text:style-name="T34">'0'</text:span><text:span text:style-name="T13">, </text:span><text:span text:style-name="T26">sseg</text:span><text:span text:style-name="T13"> =&gt; </text:span><text:span text:style-name="T39">led0</text:span><text:span text:style-name="T13">);</text:span></text:p>
      <text:p text:style-name="P15"><text:span text:style-name="T13"><text:s text:c="4"/></text:span><text:span text:style-name="T36">--instance for 4 msbs of input</text:span></text:p>
      <text:p text:style-name="P15"><text:span text:style-name="T13"><text:s text:c="4"/></text:span><text:span text:style-name="T38">sseg_unit_1</text:span><text:span text:style-name="T13">: </text:span><text:span text:style-name="T6">entity</text:span><text:span text:style-name="T13"> </text:span><text:span text:style-name="T22">work</text:span><text:span text:style-name="T13">.</text:span><text:span text:style-name="T22">hex_to_sseg</text:span></text:p>
      <text:p text:style-name="P15"><text:span text:style-name="T13"><text:s text:c="8"/></text:span><text:span text:style-name="T6">port</text:span><text:span text:style-name="T13"> </text:span><text:span text:style-name="T6">map</text:span><text:span text:style-name="T13">(</text:span><text:span text:style-name="T26">hex</text:span><text:span text:style-name="T13"> =&gt; </text:span><text:span text:style-name="T26">sw</text:span><text:span text:style-name="T13">(</text:span><text:span text:style-name="T31">7</text:span><text:span text:style-name="T13"> </text:span><text:span text:style-name="T6">downto</text:span><text:span text:style-name="T13"> </text:span><text:span text:style-name="T31">4</text:span><text:span text:style-name="T13">), </text:span><text:span text:style-name="T26">dp</text:span><text:span text:style-name="T13"> =&gt; </text:span><text:span text:style-name="T34">'0'</text:span><text:span text:style-name="T13">, </text:span><text:span text:style-name="T26">sseg</text:span><text:span text:style-name="T13"> =&gt; </text:span><text:span text:style-name="T39">led1</text:span><text:span text:style-name="T13">);</text:span></text:p>
      <text:p text:style-name="P15"><text:span text:style-name="T13"><text:s text:c="4"/></text:span><text:span text:style-name="T36">--instance for 4 lsbs of input</text:span></text:p>
      <text:p text:style-name="P15"><text:span text:style-name="T13"><text:s text:c="4"/></text:span><text:span text:style-name="T38">sseg_unit_2</text:span><text:span text:style-name="T13">: </text:span><text:span text:style-name="T6">entity</text:span><text:span text:style-name="T13"> </text:span><text:span text:style-name="T22">work</text:span><text:span text:style-name="T13">.</text:span><text:span text:style-name="T22">hex_to_sseg</text:span></text:p>
      <text:p text:style-name="P15"><text:span text:style-name="T13"><text:s text:c="8"/></text:span><text:span text:style-name="T6">port</text:span><text:span text:style-name="T13"> </text:span><text:span text:style-name="T6">map</text:span><text:span text:style-name="T13">(</text:span><text:span text:style-name="T26">hex</text:span><text:span text:style-name="T13"> =&gt; </text:span><text:span text:style-name="T26">sw</text:span><text:span text:style-name="T13">(</text:span><text:span text:style-name="T31">3</text:span><text:span text:style-name="T13"> </text:span><text:span text:style-name="T6">downto</text:span><text:span text:style-name="T13"> </text:span><text:span text:style-name="T31">0</text:span><text:span text:style-name="T13">), </text:span><text:span text:style-name="T26">dp</text:span><text:span text:style-name="T13"> =&gt; </text:span><text:span text:style-name="T34">'1'</text:span><text:span text:style-name="T13">, </text:span><text:span text:style-name="T26">sseg</text:span><text:span text:style-name="T13"> =&gt; </text:span><text:span text:style-name="T39">led2</text:span><text:span text:style-name="T13">);</text:span></text:p>
      <text:p text:style-name="P15"><text:span text:style-name="T13"><text:s text:c="4"/></text:span><text:span text:style-name="T36">--instance for 4 msbs of input</text:span></text:p>
      <text:p text:style-name="P15"><text:span text:style-name="T13"><text:s text:c="4"/></text:span><text:span text:style-name="T38">sseg_unit_3</text:span><text:span text:style-name="T13">: </text:span><text:span text:style-name="T6">entity</text:span><text:span text:style-name="T13"> </text:span><text:span text:style-name="T22">work</text:span><text:span text:style-name="T13">.</text:span><text:span text:style-name="T22">hex_to_sseg</text:span></text:p>
      <text:p text:style-name="P15"><text:span text:style-name="T13"><text:s text:c="8"/></text:span><text:span text:style-name="T6">port</text:span><text:span text:style-name="T13"> </text:span><text:span text:style-name="T6">map</text:span><text:span text:style-name="T13">(</text:span><text:span text:style-name="T26">hex</text:span><text:span text:style-name="T13"> =&gt; </text:span><text:span text:style-name="T26">sw</text:span><text:span text:style-name="T13">(</text:span><text:span text:style-name="T31">7</text:span><text:span text:style-name="T13"> </text:span><text:span text:style-name="T6">downto</text:span><text:span text:style-name="T13"> </text:span><text:span text:style-name="T31">4</text:span><text:span text:style-name="T13">), </text:span><text:span text:style-name="T26">dp</text:span><text:span text:style-name="T13"> =&gt; </text:span><text:span text:style-name="T34">'1'</text:span><text:span text:style-name="T13">, </text:span><text:span text:style-name="T26">sseg</text:span><text:span text:style-name="T13"> =&gt; </text:span><text:span text:style-name="T39">led3</text:span><text:span text:style-name="T13">);</text:span></text:p>
      <text:p text:style-name="P16"/>
      <text:p text:style-name="P15"><text:span text:style-name="T13"><text:s text:c="4"/></text:span><text:span text:style-name="T36">--instantiate 7-seg led display time-multiplexing module</text:span></text:p>
      <text:p text:style-name="P15"><text:span text:style-name="T13"><text:s text:c="4"/></text:span><text:span text:style-name="T38">disp_unit</text:span><text:span text:style-name="T13">: </text:span><text:span text:style-name="T6">entity</text:span><text:span text:style-name="T13"> </text:span><text:span text:style-name="T22">work</text:span><text:span text:style-name="T13">.</text:span><text:span text:style-name="T22">disp_mux</text:span></text:p>
      <text:p text:style-name="P15"><text:span text:style-name="T13"><text:s text:c="8"/></text:span><text:span text:style-name="T6">port</text:span><text:span text:style-name="T13"> </text:span><text:span text:style-name="T6">map</text:span><text:span text:style-name="T13">(</text:span></text:p>
      <text:p text:style-name="P15"><text:span text:style-name="T13"><text:s text:c="12"/></text:span><text:span text:style-name="T26">clk</text:span><text:span text:style-name="T13"> =&gt; </text:span><text:span text:style-name="T26">clk</text:span><text:span text:style-name="T13">, </text:span><text:span text:style-name="T26">reset</text:span><text:span text:style-name="T13"> =&gt; </text:span><text:span text:style-name="T34">'0'</text:span><text:span text:style-name="T13">,</text:span></text:p>
      <text:p text:style-name="P15"><text:span text:style-name="T13"><text:s text:c="12"/></text:span><text:span text:style-name="T26">in0</text:span><text:span text:style-name="T13"> =&gt; </text:span><text:span text:style-name="T39">led0</text:span><text:span text:style-name="T13">, </text:span><text:span text:style-name="T26">in1</text:span><text:span text:style-name="T13"> =&gt; </text:span><text:span text:style-name="T39">led1</text:span><text:span text:style-name="T13">, </text:span><text:span text:style-name="T26">in2</text:span><text:span text:style-name="T13"> =&gt; </text:span><text:span text:style-name="T39">led2</text:span><text:span text:style-name="T13">, </text:span><text:span text:style-name="T26">in3</text:span><text:span text:style-name="T13"> =&gt; </text:span><text:span text:style-name="T39">led3</text:span><text:span text:style-name="T13">, </text:span></text:p>
      <text:p text:style-name="P15"><text:span text:style-name="T13"><text:s text:c="12"/></text:span><text:span text:style-name="T26">an</text:span><text:span text:style-name="T13"> =&gt; </text:span><text:span text:style-name="T26">an</text:span><text:span text:style-name="T13">, </text:span><text:span text:style-name="T26">sseg</text:span><text:span text:style-name="T13"> =&gt; </text:span><text:span text:style-name="T26">sseg</text:span><text:span text:style-name="T13">);</text:span></text:p>
      <text:p text:style-name="P15"><text:span text:style-name="T6">end</text:span><text:span text:style-name="T13"> </text:span><text:span text:style-name="T22">arch</text:span><text:span text:style-name="T13">;</text:span></text:p>
      <text:p text:style-name="P15"/>
      <text:p text:style-name="P15"/>
      <text:p text:style-name="P15"/>
      <text:p text:style-name="P15"/>
      <text:p text:style-name="P15"/>
      <text:p text:style-name="P15"/>
      <text:p text:style-name="P15"/>
      <text:p text:style-name="P15"/>
      <text:p text:style-name="P16"><text:soft-page-break/><text:span text:style-name="T3">BARREL SHIFTER</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barrel_shifter </text:span><text:span text:style-name="T6">is</text:span><text:span text:style-name="T13"> </text:span><text:span text:style-name="T6">port</text:span><text:span text:style-name="T13"> (</text:span></text:p>
      <text:p text:style-name="P15"><text:span text:style-name="T13"><text:s text:c="4"/>a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amt : </text:span><text:span text:style-name="T6">in</text:span><text:span text:style-name="T13"> </text:span><text:span text:style-name="T28">std_logic_vector</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y: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barrel_shifter;</text:span></text:p>
      <text:p text:style-name="P16"/>
      <text:p text:style-name="P24">--architecture sel_arch of barrel_shifter is</text:p>
      <text:p text:style-name="P24">--begin</text:p>
      <text:p text:style-name="P24">-- <text:s text:c="3"/>with amt select </text:p>
      <text:p text:style-name="P24">-- <text:s text:c="7"/>y &lt;= <text:s text:c="4"/>a <text:s text:c="39"/>when "000",</text:p>
      <text:p text:style-name="P24">-- <text:s text:c="15"/>a(0) &amp; a(7 downto 1) <text:s text:c="15"/>when "001",</text:p>
      <text:p text:style-name="P24">-- <text:s text:c="15"/>a(1 downto 0) &amp; a(7 downto 2) <text:s text:c="3"/>when "010",</text:p>
      <text:p text:style-name="P24">-- <text:s text:c="15"/>a(2 downto 0) &amp; a(7 downto 3) <text:s text:c="3"/>when "011",</text:p>
      <text:p text:style-name="P24">-- <text:s text:c="15"/>a(3 downto 0) &amp; a(7 downto 4) <text:s text:c="3"/>when "100",</text:p>
      <text:p text:style-name="P24">-- <text:s text:c="15"/>a(4 downto 0) &amp; a(7 downto 5) <text:s text:c="3"/>when "101",</text:p>
      <text:p text:style-name="P24">-- <text:s text:c="15"/>a(5 downto 0) &amp; a(7 downto 6) <text:s text:c="3"/>when "110",</text:p>
      <text:p text:style-name="P24">-- <text:s text:c="15"/>a(6 downto 0) &amp; a(7) when others; --111</text:p>
      <text:p text:style-name="P16"/>
      <text:p text:style-name="P15"><text:span text:style-name="T6">architecture</text:span><text:span text:style-name="T13"> multi_stage_arch </text:span><text:span text:style-name="T6">of</text:span><text:span text:style-name="T13"> barrel_shifter </text:span><text:span text:style-name="T6">is</text:span></text:p>
      <text:p text:style-name="P15"><text:span text:style-name="T13"><text:s text:c="4"/></text:span><text:span text:style-name="T6">signal</text:span><text:span text:style-name="T13"> s0, s1: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6">-- stage 0, shift 0 or 1 bit</text:span></text:p>
      <text:p text:style-name="P15"><text:span text:style-name="T13"><text:s text:c="4"/>s0 &lt;= a(</text:span><text:span text:style-name="T31">0</text:span><text:span text:style-name="T13">) </text:span><text:span text:style-name="T14">&amp;</text:span><text:span text:style-name="T13"> a(</text:span><text:span text:style-name="T31">7</text:span><text:span text:style-name="T13"> </text:span><text:span text:style-name="T6">downto</text:span><text:span text:style-name="T13"> </text:span><text:span text:style-name="T31">1</text:span><text:span text:style-name="T13">) </text:span><text:span text:style-name="T6">when</text:span><text:span text:style-name="T13"> amt(</text:span><text:span text:style-name="T31">0</text:span><text:span text:style-name="T13">) = </text:span><text:span text:style-name="T34">'1'</text:span><text:span text:style-name="T13"> </text:span><text:span text:style-name="T6">else</text:span></text:p>
      <text:p text:style-name="P16"><text:s text:c="8"/>a;</text:p>
      <text:p text:style-name="P15"><text:span text:style-name="T13"><text:s text:c="8"/></text:span><text:span text:style-name="T36">--stage 1, shift 0 or 2 bits</text:span></text:p>
      <text:p text:style-name="P15"><text:span text:style-name="T13"><text:s text:c="8"/>s1 &lt;= s0(</text:span><text:span text:style-name="T31">1</text:span><text:span text:style-name="T13"> </text:span><text:span text:style-name="T6">downto</text:span><text:span text:style-name="T13"> </text:span><text:span text:style-name="T31">0</text:span><text:span text:style-name="T13">) </text:span><text:span text:style-name="T14">&amp;</text:span><text:span text:style-name="T13"> s0(</text:span><text:span text:style-name="T31">7</text:span><text:span text:style-name="T13"> </text:span><text:span text:style-name="T6">downto</text:span><text:span text:style-name="T13"> </text:span><text:span text:style-name="T31">2</text:span><text:span text:style-name="T13">) </text:span><text:span text:style-name="T6">when</text:span><text:span text:style-name="T13"> amt(</text:span><text:span text:style-name="T31">1</text:span><text:span text:style-name="T13">) = </text:span><text:span text:style-name="T34">'1'</text:span><text:span text:style-name="T13"> </text:span><text:span text:style-name="T6">else</text:span></text:p>
      <text:p text:style-name="P16"><text:s text:c="12"/>s0;</text:p>
      <text:p text:style-name="P15"><text:span text:style-name="T13"><text:s text:c="12"/></text:span><text:span text:style-name="T36">-- stage 2, shift 0 or 4 bits</text:span></text:p>
      <text:p text:style-name="P15"><text:span text:style-name="T13"><text:s text:c="12"/>y &lt;= s1(</text:span><text:span text:style-name="T31">3</text:span><text:span text:style-name="T13"> </text:span><text:span text:style-name="T6">downto</text:span><text:span text:style-name="T13"> </text:span><text:span text:style-name="T31">0</text:span><text:span text:style-name="T13">) </text:span><text:span text:style-name="T14">&amp;</text:span><text:span text:style-name="T13"> s0(</text:span><text:span text:style-name="T31">7</text:span><text:span text:style-name="T13"> </text:span><text:span text:style-name="T6">downto</text:span><text:span text:style-name="T13"> </text:span><text:span text:style-name="T31">4</text:span><text:span text:style-name="T13">) </text:span><text:span text:style-name="T6">when</text:span><text:span text:style-name="T13"> amt(</text:span><text:span text:style-name="T31">2</text:span><text:span text:style-name="T13">) = </text:span><text:span text:style-name="T34">'1'</text:span><text:span text:style-name="T13"> </text:span><text:span text:style-name="T6">else</text:span></text:p>
      <text:p text:style-name="P16"><text:s text:c="16"/>s1; <text:s text:c="3"/></text:p>
      <text:p text:style-name="P15"><text:span text:style-name="T13"><text:s text:c="12"/></text:span><text:span text:style-name="T6">end</text:span><text:span text:style-name="T13"> multi_stage_arch;</text:span></text:p>
      <text:p text:style-name="P16"/>
      <text:p text:style-name="P16"/>
      <text:p text:style-name="P24">--parameterized register file</text:p>
      <text:p text:style-name="P26">--the write address signal, w_addr, specifies where to store data, </text:p>
      <text:p text:style-name="P26">--and the read address signal, r_addr, specifies where to retrieve data. </text:p>
      <text:p text:style-name="P26">--the register file is generally used ads <text:s/>fast temporary storage. This </text:p>
      <text:p text:style-name="P26">--code is for 2^w - by b parameterized register file. </text:p>
      <text:p text:style-name="P18"/>
      <text:p text:style-name="P18"/>
      <text:p text:style-name="P18"/>
      <text:p text:style-name="P18"/>
      <text:p text:style-name="P18"/>
      <text:p text:style-name="P18"/>
      <text:p text:style-name="P18"/>
      <text:p text:style-name="P18"/>
      <text:p text:style-name="P16"><text:soft-page-break/><text:span text:style-name="T3">REGISTER FILE</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reg_file </text:span><text:span text:style-name="T6">is</text:span><text:span text:style-name="T13"> </text:span><text:span text:style-name="T6">generic</text:span><text:span text:style-name="T13">(</text:span></text:p>
      <text:p text:style-name="P15"><text:span text:style-name="T13"><text:s text:c="4"/>b: </text:span><text:span text:style-name="T28">integer</text:span><text:span text:style-name="T13"> := </text:span><text:span text:style-name="T31">8</text:span><text:span text:style-name="T13">; <text:s text:c="3"/></text:span><text:span text:style-name="T36">--use integer to define generic number of bits</text:span></text:p>
      <text:p text:style-name="P15"><text:span text:style-name="T13"><text:s text:c="4"/>w: </text:span><text:span text:style-name="T28">integer</text:span><text:span text:style-name="T13"> := </text:span><text:span text:style-name="T31">2</text:span><text:span text:style-name="T13">); <text:s text:c="3"/></text:span><text:span text:style-name="T36">--use integer to define generic number of address bits</text:span></text:p>
      <text:p text:style-name="P15"><text:span text:style-name="T6">port</text:span><text:span text:style-name="T13">( </text:span><text:span text:style-name="T26">clk</text:span><text:span text:style-name="T13">, reset: </text:span><text:span text:style-name="T6">in</text:span><text:span text:style-name="T13"> </text:span><text:span text:style-name="T28">std_logic</text:span><text:span text:style-name="T13">;</text:span></text:p>
      <text:p text:style-name="P15"><text:span text:style-name="T13"><text:s text:c="6"/>wr_en: </text:span><text:span text:style-name="T6">in</text:span><text:span text:style-name="T13"> </text:span><text:span text:style-name="T28">std_logic</text:span><text:span text:style-name="T13">;</text:span></text:p>
      <text:p text:style-name="P15"><text:span text:style-name="T13"><text:s text:c="6"/>w_addr, r_addr, r_addr_2: </text:span><text:span text:style-name="T6">in</text:span><text:span text:style-name="T13"> </text:span><text:span text:style-name="T28">std_logic_vector</text:span><text:span text:style-name="T13">(w</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6"/>w_data: </text:span><text:span text:style-name="T6">in</text:span><text:span text:style-name="T13"> </text:span><text:span text:style-name="T28">std_logic_vector</text:span><text:span text:style-name="T13">(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6"/>r_data, r_data2: </text:span><text:span text:style-name="T6">out</text:span><text:span text:style-name="T13"> </text:span><text:span text:style-name="T28">std_logic_vector</text:span><text:span text:style-name="T13">(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reg_file;</text:span></text:p>
      <text:p text:style-name="P16"/>
      <text:p text:style-name="P15"><text:span text:style-name="T6">architecture</text:span><text:span text:style-name="T13"> </text:span><text:span text:style-name="T22">arch</text:span><text:span text:style-name="T13"> </text:span><text:span text:style-name="T6">of</text:span><text:span text:style-name="T13"> reg_file </text:span><text:span text:style-name="T6">is</text:span></text:p>
      <text:p text:style-name="P15"><text:span text:style-name="T13"><text:s text:c="4"/></text:span><text:span text:style-name="T6">type</text:span><text:span text:style-name="T13"> reg_file_type </text:span><text:span text:style-name="T6">is</text:span><text:span text:style-name="T13"> </text:span><text:span text:style-name="T6">array</text:span><text:span text:style-name="T13"> (</text:span><text:span text:style-name="T31">2</text:span><text:span text:style-name="T14">**</text:span><text:span text:style-name="T13">w</text:span><text:span text:style-name="T14">-</text:span><text:span text:style-name="T31">1</text:span><text:span text:style-name="T13"> </text:span><text:span text:style-name="T6">downto</text:span><text:span text:style-name="T13"> </text:span><text:span text:style-name="T31">0</text:span><text:span text:style-name="T13">) </text:span><text:span text:style-name="T6">of</text:span><text:span text:style-name="T13"> </text:span><text:span text:style-name="T28">std_logic_vector</text:span><text:span text:style-name="T13">(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array_reg: reg_file_type;</text:span></text:p>
      <text:p text:style-name="P23">begin</text:p>
      <text:p text:style-name="P15"><text:span text:style-name="T13"><text:s text:c="4"/></text:span><text:span text:style-name="T6">process</text:span><text:span text:style-name="T13">(</text:span><text:span text:style-name="T26">clk</text:span><text:span text:style-name="T13">, reset)</text:span></text:p>
      <text:p text:style-name="P15"><text:span text:style-name="T13"><text:s text:c="4"/></text:span><text:span text:style-name="T6">begin</text:span></text:p>
      <text:p text:style-name="P15"><text:span text:style-name="T13"><text:s text:c="8"/></text:span><text:span text:style-name="T6">if</text:span><text:span text:style-name="T13">(reset = </text:span><text:span text:style-name="T34">'1'</text:span><text:span text:style-name="T13">) </text:span><text:span text:style-name="T6">then</text:span></text:p>
      <text:p text:style-name="P15"><text:span text:style-name="T13"><text:s text:c="12"/>array_reg &lt;= (</text:span><text:span text:style-name="T6">others</text:span><text:span text:style-name="T13"> =&g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wr_en = </text:span><text:span text:style-name="T34">'1'</text:span><text:span text:style-name="T13"> </text:span><text:span text:style-name="T6">then</text:span></text:p>
      <text:p text:style-name="P15"><text:span text:style-name="T13"><text:s text:c="16"/>array_reg(</text:span><text:span text:style-name="T14">to_integer</text:span><text:span text:style-name="T13">(</text:span><text:span text:style-name="T28">unsigned</text:span><text:span text:style-name="T13">(w_addr))) &lt;= w_data; </text:span><text:span text:style-name="T36">-- address decoder</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read port</text:span></text:p>
      <text:p text:style-name="P15"><text:span text:style-name="T13"><text:s text:c="4"/>r_data &lt;= array_reg(</text:span><text:span text:style-name="T14">to_integer</text:span><text:span text:style-name="T13">(</text:span><text:span text:style-name="T28">unsigned</text:span><text:span text:style-name="T13">(r_addr))); </text:span><text:span text:style-name="T36">-- data multiplexing</text:span></text:p>
      <text:p text:style-name="P15"><text:span text:style-name="T13"><text:s text:c="4"/>r_data2 &lt;= array_reg(</text:span><text:span text:style-name="T14">to_integer</text:span><text:span text:style-name="T13">(</text:span><text:span text:style-name="T28">unsigned</text:span><text:span text:style-name="T13">(r_addr_2))); </text:span><text:span text:style-name="T36">-- data multiplexing</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FREE RUN SHIFT REGISTER</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free_run_shift_reg </text:span><text:span text:style-name="T6">is</text:span><text:span text:style-name="T13"> </text:span><text:span text:style-name="T6">port</text:span><text:span text:style-name="T13">(</text:span></text:p>
      <text:p text:style-name="P15"><text:span text:style-name="T13"><text:s text:c="4"/>reset, d, </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q : </text:span><text:span text:style-name="T6">out</text:span><text:span text:style-name="T13"> </text:span><text:span text:style-name="T28">std_logic</text:span><text:span text:style-name="T13">);</text:span></text:p>
      <text:p text:style-name="P15"><text:span text:style-name="T6">end</text:span><text:span text:style-name="T13"> free_run_shift_reg;</text:span></text:p>
      <text:p text:style-name="P16"/>
      <text:p text:style-name="P15"><text:span text:style-name="T6">architecture</text:span><text:span text:style-name="T13"> </text:span><text:span text:style-name="T22">arch</text:span><text:span text:style-name="T13"> </text:span><text:span text:style-name="T6">of</text:span><text:span text:style-name="T13"> free_run_shift_reg </text:span><text:span text:style-name="T6">is</text:span></text:p>
      <text:p text:style-name="P15"><text:span text:style-name="T13"><text:s text:c="4"/></text:span><text:span text:style-name="T6">signal</text:span><text:span text:style-name="T13"> r_reg, r_next : std_logic_vector(</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6">process</text:span><text:span text:style-name="T13">(</text:span><text:span text:style-name="T26">clk</text:span><text:span text:style-name="T13">, reset)</text:span></text:p>
      <text:p text:style-name="P15"><text:span text:style-name="T13"><text:s text:c="4"/></text:span><text:span text:style-name="T6">begin</text:span></text:p>
      <text:p text:style-name="P15"><text:span text:style-name="T13"><text:s text:c="8"/></text:span><text:span text:style-name="T6">if</text:span><text:span text:style-name="T13"> (reset = </text:span><text:span text:style-name="T34">'1'</text:span><text:span text:style-name="T13">) </text:span><text:span text:style-name="T6">then</text:span></text:p>
      <text:p text:style-name="P15"><text:span text:style-name="T13"><text:s text:c="12"/>r_reg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6"><text:s text:c="12"/>r_reg &lt;= r_next;</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r_next &lt;= d </text:span><text:span text:style-name="T14">&amp;</text:span><text:span text:style-name="T13"> r_reg(</text:span><text:span text:style-name="T31">7</text:span><text:span text:style-name="T13"> </text:span><text:span text:style-name="T6">downto</text:span><text:span text:style-name="T13"> </text:span><text:span text:style-name="T31">1</text:span><text:span text:style-name="T13">);</text:span></text:p>
      <text:p text:style-name="P15"><text:span text:style-name="T13"><text:s text:c="4"/>q &lt;= r_reg(</text:span><text:span text:style-name="T31">0</text:span><text:span text:style-name="T13">);</text:span></text:p>
      <text:p text:style-name="P16"/>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univ_shift_reg</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text:span><text:span text:style-name="T13">, </text:span><text:span text:style-name="T26">en</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ctrl</text:span><text:span text:style-name="T13"> : </text:span><text:span text:style-name="T6">in</text:span><text:span text:style-name="T13"> </text:span><text:span text:style-name="T28">std_logic_vector</text:span><text:span text:style-name="T13">(</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d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dout</text:span><text:span text:style-name="T13">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univ_shift_reg</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univ_shift_reg</text:span><text:span text:style-name="T13"> </text:span><text:span text:style-name="T6">is</text:span></text:p>
      <text:p text:style-name="P15"><text:span text:style-name="T13"><text:s text:c="4"/></text:span><text:span text:style-name="T6">signal</text:span><text:span text:style-name="T13"> </text:span><text:span text:style-name="T39">r_reg</text:span><text:span text:style-name="T13">, </text:span><text:span text:style-name="T39">r_next</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r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 (</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en</text:span><text:span text:style-name="T13"> = </text:span><text:span text:style-name="T34">'1'</text:span><text:span text:style-name="T13"> </text:span><text:span text:style-name="T6">then</text:span></text:p>
      <text:p text:style-name="P15"><text:span text:style-name="T13"><text:s text:c="16"/></text:span><text:span text:style-name="T39">r_reg</text:span><text:span text:style-name="T13"> &lt;= </text:span><text:span text:style-name="T39">r_next</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with</text:span><text:span text:style-name="T13"> </text:span><text:span text:style-name="T26">ctrl</text:span><text:span text:style-name="T13"> </text:span><text:span text:style-name="T6">select</text:span></text:p>
      <text:p text:style-name="P15"><text:span text:style-name="T13"><text:s text:c="4"/></text:span><text:span text:style-name="T39">r_next</text:span><text:span text:style-name="T13"> &lt;=</text:span></text:p>
      <text:p text:style-name="P15"><text:span text:style-name="T13"><text:s text:c="4"/></text:span><text:span text:style-name="T39">r_reg</text:span><text:span text:style-name="T13"> <text:s text:c="36"/></text:span><text:span text:style-name="T6">when</text:span><text:span text:style-name="T13"> </text:span><text:span text:style-name="T34">"00"</text:span><text:span text:style-name="T13">, </text:span><text:span text:style-name="T36">-- no op</text:span></text:p>
      <text:p text:style-name="P15"><text:span text:style-name="T13"><text:s text:c="4"/></text:span><text:span text:style-name="T39">r_reg</text:span><text:span text:style-name="T13"> (</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26">din</text:span><text:span text:style-name="T13">(</text:span><text:span text:style-name="T31">0</text:span><text:span text:style-name="T13">) <text:s text:c="8"/></text:span><text:span text:style-name="T6">when</text:span><text:span text:style-name="T13"> </text:span><text:span text:style-name="T34">"01"</text:span><text:span text:style-name="T13">, </text:span><text:span text:style-name="T36">-- shift_left</text:span></text:p>
      <text:p text:style-name="P15"><text:span text:style-name="T13"><text:s text:c="4"/></text:span><text:span text:style-name="T26">din</text:span><text:span text:style-name="T13">(</text:span><text:span text:style-name="T31">7</text:span><text:span text:style-name="T13">) </text:span><text:span text:style-name="T14">&amp;</text:span><text:span text:style-name="T13"> </text:span><text:span text:style-name="T39">r_reg</text:span><text:span text:style-name="T13">(</text:span><text:span text:style-name="T31">7</text:span><text:span text:style-name="T13"> </text:span><text:span text:style-name="T6">downto</text:span><text:span text:style-name="T13"> </text:span><text:span text:style-name="T31">1</text:span><text:span text:style-name="T13">) <text:s text:c="8"/></text:span><text:span text:style-name="T6">when</text:span><text:span text:style-name="T13"> </text:span><text:span text:style-name="T34">"10"</text:span><text:span text:style-name="T13">, </text:span><text:span text:style-name="T36">--shift_right</text:span></text:p>
      <text:p text:style-name="P15"><text:span text:style-name="T13"><text:s text:c="4"/></text:span><text:span text:style-name="T26">din</text:span><text:span text:style-name="T13"> <text:s text:c="40"/></text:span><text:span text:style-name="T6">when</text:span><text:span text:style-name="T13"> </text:span><text:span text:style-name="T6">others</text:span><text:span text:style-name="T13">; </text:span><text:span text:style-name="T36">-- load</text:span></text:p>
      <text:p text:style-name="P16"/>
      <text:p text:style-name="P15"><text:span text:style-name="T13"><text:s text:c="4"/></text:span><text:span text:style-name="T36">--output <text:s text:c="19"/></text:span></text:p>
      <text:p text:style-name="P15"><text:span text:style-name="T13"><text:s text:c="4"/></text:span><text:span text:style-name="T26">dout</text:span><text:span text:style-name="T13"> &lt;= </text:span><text:span text:style-name="T39">r_reg</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UNIVERSAL SHIFT REGISTER</text:span></text:p>
      <text:p text:style-name="P15"><text:span text:style-name="T6">library</text:span><text:span text:style-name="T13"> ieee;</text:span></text:p>
      <text:p text:style-name="P15"><text:span text:style-name="T13"><text:s text:c="4"/></text:span><text:span text:style-name="T6">use</text:span><text:span text:style-name="T13"> ieee.std_logic_1164.</text:span><text:span text:style-name="T6">all</text:span><text:span text:style-name="T13">;</text:span></text:p>
      <text:p text:style-name="P16"/>
      <text:p text:style-name="P15"><text:span text:style-name="T6">entity</text:span><text:span text:style-name="T13"> univ_shift_reg </text:span><text:span text:style-name="T6">is</text:span><text:span text:style-name="T13"> </text:span><text:span text:style-name="T6">port</text:span><text:span text:style-name="T13">(</text:span></text:p>
      <text:p text:style-name="P15"><text:span text:style-name="T13"><text:s text:c="4"/>clk, rst, en1, en2 : </text:span><text:span text:style-name="T6">in</text:span><text:span text:style-name="T13"> std_logic;</text:span></text:p>
      <text:p text:style-name="P15"><text:span text:style-name="T13"><text:s text:c="4"/>ctrl, ctrl1 : </text:span><text:span text:style-name="T6">in</text:span><text:span text:style-name="T13"> std_logic;</text:span></text:p>
      <text:p text:style-name="P15"><text:span text:style-name="T13"><text:s text:c="4"/>sin : </text:span><text:span text:style-name="T6">in</text:span><text:span text:style-name="T13"> std_logic;</text:span></text:p>
      <text:p text:style-name="P15"><text:span text:style-name="T13"><text:s text:c="4"/>din : </text:span><text:span text:style-name="T6">in</text:span><text:span text:style-name="T13"> std_logic_vector(</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sout, sout2 : </text:span><text:span text:style-name="T6">out</text:span><text:span text:style-name="T13"> std_logic);</text:span></text:p>
      <text:p text:style-name="P15"><text:span text:style-name="T6">end</text:span><text:span text:style-name="T13"> univ_shift_reg;</text:span></text:p>
      <text:p text:style-name="P16"/>
      <text:p text:style-name="P15"><text:span text:style-name="T6">architecture</text:span><text:span text:style-name="T13"> arch </text:span><text:span text:style-name="T6">of</text:span><text:span text:style-name="T13"> univ_shift_reg </text:span><text:span text:style-name="T6">is</text:span></text:p>
      <text:p text:style-name="P15"><text:span text:style-name="T13"><text:s text:c="4"/></text:span><text:span text:style-name="T6">signal</text:span><text:span text:style-name="T13"> r_reg, r_next : std_logic_vector(</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r_reg_1, r_next_1 : std_logic_vector(</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dout : std_logic_vector(</text:span><text:span text:style-name="T31">7</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clk, rst)</text:span></text:p>
      <text:p text:style-name="P15"><text:span text:style-name="T13"><text:s text:c="4"/></text:span><text:span text:style-name="T6">begin</text:span></text:p>
      <text:p text:style-name="P15"><text:span text:style-name="T13"><text:s text:c="8"/></text:span><text:span text:style-name="T6">if</text:span><text:span text:style-name="T13"> rst = </text:span><text:span text:style-name="T34">'1'</text:span><text:span text:style-name="T13"> </text:span><text:span text:style-name="T6">then</text:span></text:p>
      <text:p text:style-name="P15"><text:span text:style-name="T13"><text:s text:c="12"/>r_reg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rising_edge (clk) </text:span><text:span text:style-name="T6">then</text:span></text:p>
      <text:p text:style-name="P15"><text:span text:style-name="T13"><text:s text:c="12"/></text:span><text:span text:style-name="T6">if</text:span><text:span text:style-name="T13"> en1 = </text:span><text:span text:style-name="T34">'1'</text:span><text:span text:style-name="T13"> </text:span><text:span text:style-name="T6">then</text:span></text:p>
      <text:p text:style-name="P16"><text:s text:c="16"/>r_reg &lt;= r_next;</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r_next &lt;= <text:s text:c="4"/>din </text:span><text:span text:style-name="T6">when</text:span><text:span text:style-name="T13"> (ctrl = </text:span><text:span text:style-name="T34">'1'</text:span><text:span text:style-name="T13">) </text:span><text:span text:style-name="T6">else</text:span><text:span text:style-name="T13"> </text:span><text:span text:style-name="T36">-- no op</text:span></text:p>
      <text:p text:style-name="P15"><text:span text:style-name="T13"><text:s text:c="8"/>sin </text:span><text:span text:style-name="T14">&amp;</text:span><text:span text:style-name="T13"> r_reg(</text:span><text:span text:style-name="T31">7</text:span><text:span text:style-name="T13"> </text:span><text:span text:style-name="T6">downto</text:span><text:span text:style-name="T13"> </text:span><text:span text:style-name="T31">1</text:span><text:span text:style-name="T13">); </text:span><text:span text:style-name="T36">--shift_right</text:span></text:p>
      <text:p text:style-name="P15"><text:span text:style-name="T13"><text:s text:c="8"/></text:span><text:span text:style-name="T36">--output <text:s text:c="19"/></text:span></text:p>
      <text:p text:style-name="P15"><text:span text:style-name="T13"><text:s text:c="8"/>sout &lt;= r_reg(</text:span><text:span text:style-name="T31">0</text:span><text:span text:style-name="T13">);</text:span></text:p>
      <text:p text:style-name="P16"/>
      <text:p text:style-name="P15"><text:span text:style-name="T13"><text:s text:c="8"/></text:span><text:span text:style-name="T6">process</text:span><text:span text:style-name="T13">(clk, rst)</text:span></text:p>
      <text:p text:style-name="P15"><text:span text:style-name="T13"><text:s text:c="8"/></text:span><text:span text:style-name="T6">begin</text:span></text:p>
      <text:p text:style-name="P15"><text:span text:style-name="T13"><text:s text:c="12"/></text:span><text:span text:style-name="T6">if</text:span><text:span text:style-name="T13"> rst = </text:span><text:span text:style-name="T34">'1'</text:span><text:span text:style-name="T13"> </text:span><text:span text:style-name="T6">then</text:span></text:p>
      <text:p text:style-name="P15"><text:span text:style-name="T13"><text:s text:c="16"/>r_reg_1 &lt;= (</text:span><text:span text:style-name="T6">others</text:span><text:span text:style-name="T13"> =&gt; </text:span><text:span text:style-name="T34">'0'</text:span><text:span text:style-name="T13">);</text:span></text:p>
      <text:p text:style-name="P15"><text:span text:style-name="T13"><text:s text:c="12"/></text:span><text:span text:style-name="T6">elsif</text:span><text:span text:style-name="T13"> rising_edge (clk) </text:span><text:span text:style-name="T6">then</text:span></text:p>
      <text:p text:style-name="P15"><text:span text:style-name="T13"><text:s text:c="16"/></text:span><text:span text:style-name="T6">if</text:span><text:span text:style-name="T13"> en2 = </text:span><text:span text:style-name="T34">'1'</text:span><text:span text:style-name="T13"> </text:span><text:span text:style-name="T6">then</text:span></text:p>
      <text:p text:style-name="P16"><text:s text:c="20"/>r_reg_1 &lt;= r_next_1;</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process</text:span><text:span text:style-name="T13">;</text:span></text:p>
      <text:p text:style-name="P16"/>
      <text:p text:style-name="P16"/>
      <text:p text:style-name="P15"><text:span text:style-name="T13"><text:s text:c="8"/>r_next_1 &lt;= <text:s text:c="4"/>r_reg </text:span><text:span text:style-name="T6">when</text:span><text:span text:style-name="T13"> (ctrl1 = </text:span><text:span text:style-name="T34">'1'</text:span><text:span text:style-name="T13">) </text:span><text:span text:style-name="T6">else</text:span><text:span text:style-name="T13"> </text:span><text:span text:style-name="T36">-- no op</text:span></text:p>
      <text:p text:style-name="P15"><text:span text:style-name="T13"><text:s text:c="12"/></text:span><text:span text:style-name="T34">'0'</text:span><text:span text:style-name="T13"> </text:span><text:span text:style-name="T14">&amp;</text:span><text:span text:style-name="T13"> r_reg_1(</text:span><text:span text:style-name="T31">7</text:span><text:span text:style-name="T13"> </text:span><text:span text:style-name="T6">downto</text:span><text:span text:style-name="T13"> </text:span><text:span text:style-name="T31">1</text:span><text:span text:style-name="T13">); </text:span><text:span text:style-name="T36">--shift_right</text:span></text:p>
      <text:p text:style-name="P15"><text:span text:style-name="T13"><text:s text:c="12"/></text:span><text:span text:style-name="T36">--output <text:s text:c="19"/></text:span></text:p>
      <text:p text:style-name="P15"><text:soft-page-break/><text:span text:style-name="T13"><text:s text:c="12"/>sout2 &lt;= r_reg_1(</text:span><text:span text:style-name="T31">0</text:span><text:span text:style-name="T13">);</text:span></text:p>
      <text:p text:style-name="P16"/>
      <text:p text:style-name="P16"/>
      <text:p text:style-name="P15"><text:span text:style-name="T13"><text:s text:c="8"/></text:span><text:span text:style-name="T6">end</text:span><text:span text:style-name="T13"> arch;</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FREE RUNNING BINARY COUNTER</text:span></text:p>
      <text:p text:style-name="P24">-- A free running binary counter circulates through a binary sequence repeatedly. </text:p>
      <text:p text:style-name="P26">--For example, a 4-bit binary counter counts from "0000" to "1111" and wraps around. </text:p>
      <text:p text:style-name="P26">--The next state logic is an incrementor which adds 1 to the register's current vlaue.</text:p>
      <text:p text:style-name="P26">--By definition of the + operator in the numeric_std package, the operation </text:p>
      <text:p text:style-name="P26">--implicitly wraps around after the r_reg reaches "1111". The circuit also outputs </text:p>
      <text:p text:style-name="P26">--status - max_tick - which is asserted when the counter reaches the maximal value </text:p>
      <text:p text:style-name="P26">--which is equal to 2^n-1 and deaserrted when value is "0000". The max_tick signal </text:p>
      <text:p text:style-name="P26">--represents a special type of signal that is asserted from a single clock cycle. </text:p>
      <text:p text:style-name="P18"/>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free_run_bin_counter</text:span><text:span text:style-name="T13"> </text:span><text:span text:style-name="T6">is</text:span><text:span text:style-name="T13"> </text:span></text:p>
      <text:p text:style-name="P15"><text:span text:style-name="T13"><text:s text:c="4"/></text:span><text:span text:style-name="T6">generic</text:span><text:span text:style-name="T13">( </text:span><text:span text:style-name="T7">n</text:span><text:span text:style-name="T13">: </text:span><text:span text:style-name="T28">integer</text:span><text:span text:style-name="T13"> := </text:span><text:span text:style-name="T31">7</text:span><text:span text:style-name="T13">);</text:span></text:p>
      <text:p text:style-name="P15"><text:span text:style-name="T13"><text:s text:c="4"/></text:span><text:span text:style-name="T6">port</text:span><text:span text:style-name="T13">( </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10"/></text:span><text:span text:style-name="T26">max_tick</text:span><text:span text:style-name="T13">: </text:span><text:span text:style-name="T6">out</text:span><text:span text:style-name="T13"> </text:span><text:span text:style-name="T28">std_logic</text:span><text:span text:style-name="T13">;</text:span></text:p>
      <text:p text:style-name="P15"><text:span text:style-name="T13"><text:s text:c="10"/></text:span><text:span text:style-name="T26">q</text:span><text:span text:style-name="T13">: </text:span><text:span text:style-name="T6">out</text:span><text:span text:style-name="T13"> </text:span><text:span text:style-name="T28">std_logic_vector</text:span><text:span text:style-name="T13">(</text:span><text:span text:style-name="T7">n</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free_run_bin_counter</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free_run_bin_counter</text:span><text:span text:style-name="T13"> </text:span><text:span text:style-name="T6">is</text:span></text:p>
      <text:p text:style-name="P15"><text:span text:style-name="T13"><text:s text:c="4"/></text:span><text:span text:style-name="T6">signal</text:span><text:span text:style-name="T13"> </text:span><text:span text:style-name="T39">r_reg</text:span><text:span text:style-name="T13">, </text:span><text:span text:style-name="T39">r_next</text:span><text:span text:style-name="T13"> : </text:span><text:span text:style-name="T28">unsigned</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r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 (</text:span><text:span text:style-name="T26">clk</text:span><text:span text:style-name="T13">) </text:span><text:span text:style-name="T6">then</text:span></text:p>
      <text:p text:style-name="P15"><text:span text:style-name="T13"><text:s text:c="12"/></text:span><text:span text:style-name="T39">r_reg</text:span><text:span text:style-name="T13"> &lt;= </text:span><text:span text:style-name="T39">r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r_next</text:span><text:span text:style-name="T13"> &lt;= </text:span><text:span text:style-name="T39">r_reg</text:span><text:span text:style-name="T13"> </text:span><text:span text:style-name="T14">+</text:span><text:span text:style-name="T13"> </text:span><text:span text:style-name="T31">1</text:span><text:span text:style-name="T13">;</text:span></text:p>
      <text:p text:style-name="P16"/>
      <text:p text:style-name="P15"><text:span text:style-name="T13"><text:s text:c="4"/></text:span><text:span text:style-name="T26">max_tick</text:span><text:span text:style-name="T13"> &lt;= </text:span><text:span text:style-name="T34">'1'</text:span><text:span text:style-name="T13"> </text:span><text:span text:style-name="T6">when</text:span><text:span text:style-name="T13"> </text:span><text:span text:style-name="T39">r_reg</text:span><text:span text:style-name="T13"> = (</text:span><text:span text:style-name="T31">2</text:span><text:span text:style-name="T14">**</text:span><text:span text:style-name="T31">8</text:span><text:span text:style-name="T13"> </text:span><text:span text:style-name="T14">-</text:span><text:span text:style-name="T31">1</text:span><text:span text:style-name="T13">) </text:span><text:span text:style-name="T6">else</text:span><text:span text:style-name="T13"> </text:span><text:span text:style-name="T34">'0'</text:span><text:span text:style-name="T13">;</text:span></text:p>
      <text:p text:style-name="P15"><text:span text:style-name="T13"><text:s text:c="4"/></text:span><text:span text:style-name="T26">q</text:span><text:span text:style-name="T13"> &lt;= </text:span><text:span text:style-name="T28">std_logic_vector</text:span><text:span text:style-name="T13">(</text:span><text:span text:style-name="T39">r_reg</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MOD-M COUNTER</text:span></text:p>
      <text:p text:style-name="P24">--example <text:s/>of pwm</text:p>
      <text:p text:style-name="P26">--a mod-m counter counts from 0 to m-1 and wraps around. generic m specifies the </text:p>
      <text:p text:style-name="P26">--limit and n specifies the number of bits needed and should be equal to [log2 m]</text:p>
      <text:p text:style-name="P18"/>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mod_m_counter </text:span><text:span text:style-name="T6">is</text:span><text:span text:style-name="T13"> </text:span></text:p>
      <text:p text:style-name="P15"><text:span text:style-name="T13"><text:s text:c="4"/></text:span><text:span text:style-name="T6">generic</text:span><text:span text:style-name="T13">( m : integer := </text:span><text:span text:style-name="T31">10</text:span><text:span text:style-name="T13">; <text:s text:c="3"/></text:span><text:span text:style-name="T36">--number of bits</text:span></text:p>
      <text:p text:style-name="P15"><text:span text:style-name="T13"><text:s text:c="13"/>n : integer := </text:span><text:span text:style-name="T31">4</text:span><text:span text:style-name="T13">); <text:s text:c="3"/></text:span><text:span text:style-name="T36">--mod-m</text:span></text:p>
      <text:p text:style-name="P15"><text:span text:style-name="T13"><text:s text:c="4"/></text:span><text:span text:style-name="T6">port</text:span><text:span text:style-name="T13">( <text:s text:c="7"/>clk, rst : </text:span><text:span text:style-name="T6">in</text:span><text:span text:style-name="T13"> std_logic;</text:span></text:p>
      <text:p text:style-name="P15"><text:span text:style-name="T13"><text:s text:c="17"/>max_tick : </text:span><text:span text:style-name="T6">out</text:span><text:span text:style-name="T13"> std_logic;</text:span></text:p>
      <text:p text:style-name="P15"><text:span text:style-name="T13"><text:s text:c="17"/></text:span><text:span text:style-name="T26">q</text:span><text:span text:style-name="T13"> :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end</text:span><text:span text:style-name="T13"> mod_m_counter;</text:span></text:p>
      <text:p text:style-name="P16"/>
      <text:p text:style-name="P15"><text:span text:style-name="T6">architecture</text:span><text:span text:style-name="T13"> </text:span><text:span text:style-name="T22">arch</text:span><text:span text:style-name="T13"> </text:span><text:span text:style-name="T6">of</text:span><text:span text:style-name="T13"> mod_m_counter </text:span><text:span text:style-name="T6">is</text:span></text:p>
      <text:p text:style-name="P15"><text:span text:style-name="T13"><text:s text:c="4"/></text:span><text:span text:style-name="T6">signal</text:span><text:span text:style-name="T13"> r_reg, r_next : </text:span><text:span text:style-name="T28">unsigned</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text:span><text:span text:style-name="T39">r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r_reg</text:span><text:span text:style-name="T13"> &lt;= </text:span><text:span text:style-name="T39">r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next state logic</text:span></text:p>
      <text:p text:style-name="P15"><text:span text:style-name="T13"><text:s text:c="4"/></text:span><text:span text:style-name="T36">-- the next state logic is constructed by a conditional signal assignment statement.</text:span></text:p>
      <text:p text:style-name="P15"><text:span text:style-name="T13"><text:s text:c="4"/></text:span><text:span text:style-name="T36">-- If the counter reaches m-1 the new value is cleared to 0. otherwise it is incremented by 1. <text:s text:c="7"/></text:span></text:p>
      <text:p text:style-name="P15"><text:span text:style-name="T13"><text:s text:c="4"/></text:span><text:span text:style-name="T39">r_next</text:span><text:span text:style-name="T13"> &lt;= (</text:span><text:span text:style-name="T6">others</text:span><text:span text:style-name="T13"> =&gt; </text:span><text:span text:style-name="T34">'0'</text:span><text:span text:style-name="T13">) </text:span><text:span text:style-name="T6">when</text:span><text:span text:style-name="T13"> </text:span><text:span text:style-name="T39">r_reg</text:span><text:span text:style-name="T13"> = m</text:span><text:span text:style-name="T14">-</text:span><text:span text:style-name="T31">1</text:span><text:span text:style-name="T13"> </text:span><text:span text:style-name="T6">else</text:span><text:span text:style-name="T13"> </text:span><text:span text:style-name="T39">r_reg</text:span><text:span text:style-name="T13"> </text:span><text:span text:style-name="T14">+</text:span><text:span text:style-name="T31">1</text:span><text:span text:style-name="T13">;</text:span></text:p>
      <text:p text:style-name="P16"/>
      <text:p text:style-name="P15"><text:span text:style-name="T13"><text:s text:c="4"/></text:span><text:span text:style-name="T36">--output logic</text:span></text:p>
      <text:p text:style-name="P15"><text:span text:style-name="T13"><text:s text:c="4"/></text:span><text:span text:style-name="T26">q</text:span><text:span text:style-name="T13"> &lt;= </text:span><text:span text:style-name="T28">std_logic_vector</text:span><text:span text:style-name="T13">(</text:span><text:span text:style-name="T39">r_reg</text:span><text:span text:style-name="T13">);</text:span></text:p>
      <text:p text:style-name="P15"><text:span text:style-name="T13"><text:s text:c="4"/></text:span><text:span text:style-name="T26">max_tick</text:span><text:span text:style-name="T13"> &lt;= </text:span><text:span text:style-name="T34">'1'</text:span><text:span text:style-name="T13"> </text:span><text:span text:style-name="T6">when</text:span><text:span text:style-name="T13"> </text:span><text:span text:style-name="T39">r_reg</text:span><text:span text:style-name="T13"> = m</text:span><text:span text:style-name="T14">-</text:span><text:span text:style-name="T31">1</text:span><text:span text:style-name="T13"> </text:span><text:span text:style-name="T6">else</text:span><text:span text:style-name="T13"> </text:span><text:span text:style-name="T34">'0'</text:span><text:span text:style-name="T13">;</text:span></text:p>
      <text:p text:style-name="P16"/>
      <text:p text:style-name="P15"><text:span text:style-name="T6">end</text:span><text:span text:style-name="T13"> </text:span><text:span text:style-name="T22">arch</text:span><text:span text:style-name="T13">; <text:s text:c="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BINARY COUNTER - TESTBENCH</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bin_counter_tb </text:span><text:span text:style-name="T6">is</text:span></text:p>
      <text:p text:style-name="P15"><text:span text:style-name="T6">end</text:span><text:span text:style-name="T13"> bin_counter_tb;</text:span></text:p>
      <text:p text:style-name="P16"/>
      <text:p text:style-name="P15"><text:span text:style-name="T6">architecture</text:span><text:span text:style-name="T13"> </text:span><text:span text:style-name="T22">arch</text:span><text:span text:style-name="T13"> </text:span><text:span text:style-name="T6">of</text:span><text:span text:style-name="T13"> bin_counter_tb </text:span><text:span text:style-name="T6">is</text:span></text:p>
      <text:p text:style-name="P15"><text:span text:style-name="T13"><text:s text:c="4"/></text:span><text:span text:style-name="T6">constant</text:span><text:span text:style-name="T13"> three : integer := </text:span><text:span text:style-name="T31">3</text:span><text:span text:style-name="T13">;</text:span></text:p>
      <text:p text:style-name="P16"/>
      <text:p text:style-name="P15"><text:span text:style-name="T13"><text:s text:c="4"/></text:span><text:span text:style-name="T36">--since the operation of a synchronous system is synced by a clock signal, </text:span></text:p>
      <text:p text:style-name="P15"><text:span text:style-name="T13"><text:s text:c="4"/></text:span><text:span text:style-name="T36">--we define a constant with a built in data type time for the clock period:</text:span></text:p>
      <text:p text:style-name="P15"><text:span text:style-name="T13"><text:s text:c="4"/></text:span><text:span text:style-name="T6">constant</text:span><text:span text:style-name="T13"> t: time := </text:span><text:span text:style-name="T31">20</text:span><text:span text:style-name="T13"> ns; </text:span><text:span text:style-name="T36">-- clk period</text:span></text:p>
      <text:p text:style-name="P16"/>
      <text:p text:style-name="P15"><text:span text:style-name="T13"><text:s text:c="4"/></text:span><text:span text:style-name="T6">signal</text:span><text:span text:style-name="T13"> </text:span><text:span text:style-name="T26">clk</text:span><text:span text:style-name="T13">, </text:span><text:span text:style-name="T26">rst</text:span><text:span text:style-name="T13"> : </text:span><text:span text:style-name="T28">std_logic</text:span><text:span text:style-name="T13">;</text:span></text:p>
      <text:p text:style-name="P15"><text:span text:style-name="T13"><text:s text:c="4"/></text:span><text:span text:style-name="T6">signal</text:span><text:span text:style-name="T13"> syn_clr, load, en, up: </text:span><text:span text:style-name="T28">std_logic</text:span><text:span text:style-name="T13">;</text:span></text:p>
      <text:p text:style-name="P15"><text:span text:style-name="T13"><text:s text:c="4"/></text:span><text:span text:style-name="T6">signal</text:span><text:span text:style-name="T13"> d: </text:span><text:span text:style-name="T28">std_logic_vector</text:span><text:span text:style-name="T13">(three </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26">max_tick</text:span><text:span text:style-name="T13">, min_tick: </text:span><text:span text:style-name="T28">std_logic</text:span><text:span text:style-name="T13">;</text:span></text:p>
      <text:p text:style-name="P15"><text:span text:style-name="T13"><text:s text:c="4"/></text:span><text:span text:style-name="T6">signal</text:span><text:span text:style-name="T13"> </text:span><text:span text:style-name="T26">q</text:span><text:span text:style-name="T13">: </text:span><text:span text:style-name="T28">std_logic_vector</text:span><text:span text:style-name="T13">(three </text:span><text:span text:style-name="T14">-</text:span><text:span text:style-name="T31">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6">--instatiation</text:span></text:p>
      <text:p text:style-name="P15"><text:span text:style-name="T13"><text:s text:c="4"/></text:span><text:span text:style-name="T36">--the code consists of a component instatiation statement, which creates an </text:span></text:p>
      <text:p text:style-name="P15"><text:span text:style-name="T13"><text:s text:c="4"/></text:span><text:span text:style-name="T36">--instance of a 3-bit counter and three segments which generate a stimulus for a </text:span></text:p>
      <text:p text:style-name="P15"><text:span text:style-name="T13"><text:s text:c="4"/></text:span><text:span text:style-name="T36">--clock, reset, and regular inputs.</text:span></text:p>
      <text:p text:style-name="P16"/>
      <text:p text:style-name="P15"><text:span text:style-name="T13"><text:s text:c="4"/>counter_unit: </text:span><text:span text:style-name="T6">entity</text:span><text:span text:style-name="T13"> </text:span><text:span text:style-name="T22">work</text:span><text:span text:style-name="T13">.</text:span><text:span text:style-name="T22">univ_bit_counter</text:span><text:span text:style-name="T13">(</text:span><text:span text:style-name="T22">arch</text:span><text:span text:style-name="T13">)</text:span></text:p>
      <text:p text:style-name="P15"><text:span text:style-name="T13"><text:s text:c="8"/></text:span><text:span text:style-name="T6">generic</text:span><text:span text:style-name="T13"> </text:span><text:span text:style-name="T6">map</text:span><text:span text:style-name="T13">( </text:span><text:span text:style-name="T7">n</text:span><text:span text:style-name="T13"> =&gt; three)</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26">clk</text:span><text:span text:style-name="T13">, </text:span><text:span text:style-name="T26">rst</text:span><text:span text:style-name="T13"> =&gt; </text:span><text:span text:style-name="T26">rst</text:span><text:span text:style-name="T13">, syn_clr =&gt; syn_clr,</text:span></text:p>
      <text:p text:style-name="P16"><text:s text:c="17"/>load =&gt; load, en =&gt; en, up =&gt; up, d =&gt; d, </text:p>
      <text:p text:style-name="P15"><text:span text:style-name="T13"><text:s text:c="17"/></text:span><text:span text:style-name="T26">max_tick</text:span><text:span text:style-name="T13"> =&gt; </text:span><text:span text:style-name="T26">max_tick</text:span><text:span text:style-name="T13">, min_tick =&gt; min_tick,</text:span></text:p>
      <text:p text:style-name="P15"><text:span text:style-name="T13"><text:s text:c="17"/></text:span><text:span text:style-name="T26">q</text:span><text:span text:style-name="T13"> =&gt; </text:span><text:span text:style-name="T26">q</text:span><text:span text:style-name="T13">);</text:span></text:p>
      <text:p text:style-name="P16"/>
      <text:p text:style-name="P15"><text:span text:style-name="T13"><text:s text:c="4"/></text:span><text:span text:style-name="T36">--clock</text:span></text:p>
      <text:p text:style-name="P15"><text:span text:style-name="T13"><text:s text:c="4"/></text:span><text:span text:style-name="T36">--20 ns clock running forever</text:span></text:p>
      <text:p text:style-name="P15"><text:span text:style-name="T13"><text:s text:c="4"/></text:span><text:span text:style-name="T36">--the clock generation is specified by a process:</text:span></text:p>
      <text:p text:style-name="P15"><text:span text:style-name="T13"><text:s text:c="4"/></text:span><text:span text:style-name="T36">--the clk signal is assigned between '0' and '1' alternativley, </text:span></text:p>
      <text:p text:style-name="P15"><text:span text:style-name="T13"><text:s text:c="4"/></text:span><text:span text:style-name="T36">--and each value lasts for half a period. note that the process has no </text:span></text:p>
      <text:p text:style-name="P15"><text:span text:style-name="T13"><text:s text:c="4"/></text:span><text:span text:style-name="T36">--sensitivity list and repeats itself forever.</text:span></text:p>
      <text:p text:style-name="P15"><text:span text:style-name="T13"><text:s text:c="4"/></text:span><text:span text:style-name="T6">process</text:span></text:p>
      <text:p text:style-name="P15"><text:span text:style-name="T13"><text:s text:c="4"/></text:span><text:span text:style-name="T6">begin</text:span></text:p>
      <text:p text:style-name="P15"><text:span text:style-name="T13"><text:s text:c="8"/>clk &lt;= </text:span><text:span text:style-name="T34">'0'</text:span><text:span text:style-name="T13">; <text:s text:c="7"/></text:span></text:p>
      <text:p text:style-name="P15"><text:span text:style-name="T13"><text:s text:c="8"/></text:span><text:span text:style-name="T6">wait</text:span><text:span text:style-name="T13"> </text:span><text:span text:style-name="T6">for</text:span><text:span text:style-name="T13"> t</text:span><text:span text:style-name="T14">/</text:span><text:span text:style-name="T31">2</text:span><text:span text:style-name="T13">;</text:span></text:p>
      <text:p text:style-name="P15"><text:span text:style-name="T13"><text:s text:c="8"/>clk &lt;= </text:span><text:span text:style-name="T34">'1'</text:span><text:span text:style-name="T13">;</text:span></text:p>
      <text:p text:style-name="P15"><text:span text:style-name="T13"><text:s text:c="8"/></text:span><text:span text:style-name="T6">wait</text:span><text:span text:style-name="T13"> </text:span><text:span text:style-name="T6">for</text:span><text:span text:style-name="T13"> t</text:span><text:span text:style-name="T14">/</text:span><text:span text:style-name="T31">2</text:span><text:span text:style-name="T13">; <text:s text:c="7"/></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reset</text:span></text:p>
      <text:p text:style-name="P15"><text:span text:style-name="T13"><text:s text:c="4"/></text:span><text:span text:style-name="T36">--reset assert for t/2</text:span></text:p>
      <text:p text:style-name="P15"><text:span text:style-name="T13"><text:s text:c="4"/>rst &lt;= </text:span><text:span text:style-name="T34">'1'</text:span><text:span text:style-name="T13">, </text:span><text:span text:style-name="T34">'0'</text:span><text:span text:style-name="T13"> </text:span><text:span text:style-name="T6">after</text:span><text:span text:style-name="T13"> t</text:span><text:span text:style-name="T14">/</text:span><text:span text:style-name="T31">2</text:span><text:span text:style-name="T13">;</text:span></text:p>
      <text:p text:style-name="P16"><text:soft-page-break/></text:p>
      <text:p text:style-name="P15"><text:span text:style-name="T13"><text:s text:c="4"/></text:span><text:span text:style-name="T36">--other stimulus</text:span></text:p>
      <text:p text:style-name="P15"><text:span text:style-name="T13"><text:s text:c="4"/></text:span><text:span text:style-name="T6">process</text:span></text:p>
      <text:p text:style-name="P15"><text:span text:style-name="T13"><text:s text:c="4"/></text:span><text:span text:style-name="T6">begin</text:span></text:p>
      <text:p text:style-name="P15"><text:span text:style-name="T13"><text:s text:c="8"/></text:span><text:span text:style-name="T36">--initial input</text:span></text:p>
      <text:p text:style-name="P15"><text:span text:style-name="T13"><text:s text:c="8"/>syn_clr &lt;= </text:span><text:span text:style-name="T34">'0'</text:span><text:span text:style-name="T13">;</text:span></text:p>
      <text:p text:style-name="P15"><text:span text:style-name="T13"><text:s text:c="8"/>load &lt;= </text:span><text:span text:style-name="T34">'0'</text:span><text:span text:style-name="T13">;</text:span></text:p>
      <text:p text:style-name="P15"><text:span text:style-name="T13"><text:s text:c="8"/>en &lt;= </text:span><text:span text:style-name="T34">'0'</text:span><text:span text:style-name="T13">;</text:span></text:p>
      <text:p text:style-name="P15"><text:span text:style-name="T13"><text:s text:c="8"/>up &lt;= </text:span><text:span text:style-name="T34">'1'</text:span><text:span text:style-name="T13">; </text:span><text:span text:style-name="T36">--count up</text:span></text:p>
      <text:p text:style-name="P15"><text:span text:style-name="T13"><text:s text:c="8"/>d &lt;= (</text:span><text:span text:style-name="T6">others</text:span><text:span text:style-name="T13"> =&gt; </text:span><text:span text:style-name="T34">'0'</text:span><text:span text:style-name="T13">);</text:span></text:p>
      <text:p text:style-name="P16"/>
      <text:p text:style-name="P15"><text:span text:style-name="T13"><text:s text:c="8"/></text:span><text:span text:style-name="T36">--DIN WASALT GHALIJA WAHDI GHAX BIL BAJT. For a synchronous system with positive </text:span></text:p>
      <text:p text:style-name="P15"><text:span text:style-name="T13"><text:s text:c="8"/></text:span><text:span text:style-name="T36">-- <text:s text:c="3"/>edge triggered FFs an input signal must be stable around the rising_edge to satisfy</text:span></text:p>
      <text:p text:style-name="P15"><text:span text:style-name="T13"><text:s text:c="8"/></text:span><text:span text:style-name="T36">-- <text:s text:c="3"/>the setup and hold time constraints. one way is to change an input signal during</text:span></text:p>
      <text:p text:style-name="P15"><text:span text:style-name="T13"><text:s text:c="8"/></text:span><text:span text:style-name="T36">-- <text:s text:c="3"/>the falling edge.</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text:span><text:span text:style-name="T36">--test load</text:span></text:p>
      <text:p text:style-name="P15"><text:span text:style-name="T13"><text:s text:c="8"/>load &lt;= </text:span><text:span text:style-name="T34">'1'</text:span><text:span text:style-name="T13">;</text:span></text:p>
      <text:p text:style-name="P15"><text:span text:style-name="T13"><text:s text:c="8"/>d &lt;= </text:span><text:span text:style-name="T34">"011"</text:span><text:span text:style-name="T13">;</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load &lt;= </text:span><text:span text:style-name="T34">'0'</text:span><text:span text:style-name="T13">;</text:span></text:p>
      <text:p text:style-name="P15"><text:span text:style-name="T13"><text:s text:c="8"/></text:span><text:span text:style-name="T36">--pause 2 clocks</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text:span><text:span text:style-name="T36">--test syn_clr</text:span></text:p>
      <text:p text:style-name="P15"><text:span text:style-name="T13"><text:s text:c="8"/>syn_clr &lt;= </text:span><text:span text:style-name="T34">'1'</text:span><text:span text:style-name="T13">; </text:span><text:span text:style-name="T36">-- clear</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syn_clr &lt;= </text:span><text:span text:style-name="T34">'0'</text:span><text:span text:style-name="T13">;</text:span></text:p>
      <text:p text:style-name="P15"><text:span text:style-name="T13"><text:s text:c="8"/></text:span><text:span text:style-name="T36">--test up counter and pause</text:span></text:p>
      <text:p text:style-name="P15"><text:span text:style-name="T13"><text:s text:c="8"/>en &lt;= </text:span><text:span text:style-name="T34">'1'</text:span><text:span text:style-name="T13">; </text:span><text:span text:style-name="T36">-- count</text:span></text:p>
      <text:p text:style-name="P15"><text:span text:style-name="T13"><text:s text:c="8"/>up &lt;= </text:span><text:span text:style-name="T34">'1'</text:span><text:span text:style-name="T13">;</text:span></text:p>
      <text:p text:style-name="P15"><text:span text:style-name="T13"><text:s text:c="8"/></text:span><text:span text:style-name="T6">for</text:span><text:span text:style-name="T13"> i </text:span><text:span text:style-name="T6">in</text:span><text:span text:style-name="T13"> </text:span><text:span text:style-name="T31">1</text:span><text:span text:style-name="T13"> </text:span><text:span text:style-name="T6">to</text:span><text:span text:style-name="T13"> </text:span><text:span text:style-name="T31">10</text:span><text:span text:style-name="T13"> </text:span><text:span text:style-name="T6">loop</text:span><text:span text:style-name="T13"> </text:span><text:span text:style-name="T36">-- count 10 clocks</text:span></text:p>
      <text:p text:style-name="P15"><text:span text:style-name="T13"><text:s text:c="12"/></text:span><text:span text:style-name="T6">wait</text:span><text:span text:style-name="T13"> </text:span><text:span text:style-name="T6">until</text:span><text:span text:style-name="T13"> falling_edge(clk);</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en &lt;= </text:span><text:span text:style-name="T34">'0'</text:span><text:span text:style-name="T13">;</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en &lt;= </text:span><text:span text:style-name="T34">'1'</text:span><text:span text:style-name="T13">;</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text:span><text:span text:style-name="T36">--test down counter</text:span></text:p>
      <text:p text:style-name="P15"><text:span text:style-name="T13"><text:s text:c="8"/>up &lt;= </text:span><text:span text:style-name="T34">'0'</text:span><text:span text:style-name="T13">;</text:span></text:p>
      <text:p text:style-name="P15"><text:span text:style-name="T13"><text:s text:c="8"/></text:span><text:span text:style-name="T6">for</text:span><text:span text:style-name="T13"> i </text:span><text:span text:style-name="T6">in</text:span><text:span text:style-name="T13"> </text:span><text:span text:style-name="T31">1</text:span><text:span text:style-name="T13"> </text:span><text:span text:style-name="T6">to</text:span><text:span text:style-name="T13"> </text:span><text:span text:style-name="T31">10</text:span><text:span text:style-name="T13"> </text:span><text:span text:style-name="T6">loop</text:span><text:span text:style-name="T13"> </text:span><text:span text:style-name="T36">-- run 10 clocks</text:span></text:p>
      <text:p text:style-name="P15"><text:span text:style-name="T13"><text:s text:c="12"/></text:span><text:span text:style-name="T6">wait</text:span><text:span text:style-name="T13"> </text:span><text:span text:style-name="T6">until</text:span><text:span text:style-name="T13"> falling_edge(clk);</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36">--other wait conditions</text:span></text:p>
      <text:p text:style-name="P15"><text:span text:style-name="T13"><text:s text:c="8"/></text:span><text:span text:style-name="T36">--continue until q=2</text:span></text:p>
      <text:p text:style-name="P16"/>
      <text:p text:style-name="P15"><text:span text:style-name="T13"><text:s text:c="8"/></text:span><text:span text:style-name="T36">-- wait until a special condition</text:span></text:p>
      <text:p text:style-name="P15"><text:soft-page-break/><text:span text:style-name="T13"><text:s text:c="8"/></text:span><text:span text:style-name="T6">wait</text:span><text:span text:style-name="T13"> </text:span><text:span text:style-name="T6">until</text:span><text:span text:style-name="T13"> q = </text:span><text:span text:style-name="T34">"010"</text:span><text:span text:style-name="T13">;</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up &lt;= </text:span><text:span text:style-name="T34">'1'</text:span><text:span text:style-name="T13">;</text:span></text:p>
      <text:p text:style-name="P15"><text:span text:style-name="T13"><text:s text:c="8"/></text:span><text:span text:style-name="T36">--continue until min_tick changes value</text:span></text:p>
      <text:p text:style-name="P16"/>
      <text:p text:style-name="P15"><text:span text:style-name="T13"><text:s text:c="8"/></text:span><text:span text:style-name="T36">--wait until a signal changes</text:span></text:p>
      <text:p text:style-name="P15"><text:span text:style-name="T13"><text:s text:c="8"/></text:span><text:span text:style-name="T6">wait</text:span><text:span text:style-name="T13"> </text:span><text:span text:style-name="T6">on</text:span><text:span text:style-name="T13"> min_tick;</text:span></text:p>
      <text:p text:style-name="P15"><text:span text:style-name="T13"><text:s text:c="8"/></text:span><text:span text:style-name="T6">wait</text:span><text:span text:style-name="T13"> </text:span><text:span text:style-name="T6">until</text:span><text:span text:style-name="T13"> falling_edge(clk);</text:span></text:p>
      <text:p text:style-name="P15"><text:span text:style-name="T13"><text:s text:c="8"/>up &lt;= </text:span><text:span text:style-name="T34">'0'</text:span><text:span text:style-name="T13">;</text:span></text:p>
      <text:p text:style-name="P15"><text:span text:style-name="T13"><text:s text:c="8"/></text:span><text:span text:style-name="T6">wait</text:span><text:span text:style-name="T13"> </text:span><text:span text:style-name="T6">for</text:span><text:span text:style-name="T13"> </text:span><text:span text:style-name="T31">4</text:span><text:span text:style-name="T14">*</text:span><text:span text:style-name="T13">t; </text:span><text:span text:style-name="T36">--wait for 80ns</text:span></text:p>
      <text:p text:style-name="P15"><text:span text:style-name="T13"><text:s text:c="8"/>en &lt;= </text:span><text:span text:style-name="T34">'0'</text:span><text:span text:style-name="T13">;</text:span></text:p>
      <text:p text:style-name="P15"><text:span text:style-name="T13"><text:s text:c="8"/></text:span><text:span text:style-name="T6">wait</text:span><text:span text:style-name="T13"> </text:span><text:span text:style-name="T6">for</text:span><text:span text:style-name="T13"> </text:span><text:span text:style-name="T31">4</text:span><text:span text:style-name="T14">*</text:span><text:span text:style-name="T13">t;</text:span></text:p>
      <text:p text:style-name="P15"><text:span text:style-name="T13"><text:s text:c="8"/></text:span><text:span text:style-name="T36">--terminate simulation</text:span></text:p>
      <text:p text:style-name="P15"><text:span text:style-name="T13"><text:s text:c="8"/></text:span><text:span text:style-name="T36">--an additional assertion statement is added to the end of the process. </text:span></text:p>
      <text:p text:style-name="P15"><text:span text:style-name="T13"><text:s text:c="8"/></text:span><text:span text:style-name="T36">--It generates an " artificial failure" and stops the simulation</text:span></text:p>
      <text:p text:style-name="P15"><text:span text:style-name="T13"><text:s text:c="8"/></text:span><text:span text:style-name="T6">assert</text:span><text:span text:style-name="T13"> false</text:span></text:p>
      <text:p text:style-name="P15"><text:span text:style-name="T13"><text:s text:c="12"/></text:span><text:span text:style-name="T6">report</text:span><text:span text:style-name="T13"> </text:span><text:span text:style-name="T34">"Simulation Completed"</text:span></text:p>
      <text:p text:style-name="P15"><text:span text:style-name="T13"><text:s text:c="12"/></text:span><text:span text:style-name="T6">severity</text:span><text:span text:style-name="T13"> failure;</text:span></text:p>
      <text:p text:style-name="P16"/>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arch;</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DIPLAY MUX - TESTBENCH</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math_real</text:span><text:span text:style-name="T13">.</text:span><text:span text:style-name="T6">all</text:span><text:span text:style-name="T13">;</text:span></text:p>
      <text:p text:style-name="P16"/>
      <text:p text:style-name="P15"><text:span text:style-name="T6">entity</text:span><text:span text:style-name="T13"> </text:span><text:span text:style-name="T22">disp_mux_tb</text:span><text:span text:style-name="T13"> </text:span><text:span text:style-name="T6">i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disp_mux_tb</text:span><text:span text:style-name="T13"> </text:span><text:span text:style-name="T6">is</text:span></text:p>
      <text:p text:style-name="P16"/>
      <text:p text:style-name="P15"><text:span text:style-name="T13"><text:s text:c="4"/></text:span><text:span text:style-name="T6">constant</text:span><text:span text:style-name="T13"> </text:span><text:span text:style-name="T7">t</text:span><text:span text:style-name="T13"> : </text:span><text:span text:style-name="T28">time</text:span><text:span text:style-name="T13"> := </text:span><text:span text:style-name="T31">1302.083333</text:span><text:span text:style-name="T13"> </text:span><text:span text:style-name="T7">ns</text:span><text:span text:style-name="T13">;</text:span></text:p>
      <text:p text:style-name="P15"><text:span text:style-name="T13"><text:s text:c="4"/></text:span><text:span text:style-name="T6">signal</text:span><text:span text:style-name="T13"> </text:span><text:span text:style-name="T39">clk</text:span><text:span text:style-name="T13">, </text:span><text:span text:style-name="T39">reset</text:span><text:span text:style-name="T13">: <text:s/></text:span><text:span text:style-name="T28">std_logic</text:span><text:span text:style-name="T13">;</text:span></text:p>
      <text:p text:style-name="P15"><text:span text:style-name="T13"><text:s text:c="4"/></text:span><text:span text:style-name="T6">signal</text:span><text:span text:style-name="T13"> </text:span><text:span text:style-name="T39">in3</text:span><text:span text:style-name="T13">, </text:span><text:span text:style-name="T39">in2</text:span><text:span text:style-name="T13">, </text:span><text:span text:style-name="T39">in1</text:span><text:span text:style-name="T13">, </text:span><text:span text:style-name="T39">in0</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an</text:span><text:span text:style-name="T13"> :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text:span><text:span text:style-name="T39">sseg</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38">uut</text:span><text:span text:style-name="T13">: </text:span><text:span text:style-name="T6">entity</text:span><text:span text:style-name="T13"> </text:span><text:span text:style-name="T22">work</text:span><text:span text:style-name="T13">.</text:span><text:span text:style-name="T22">disp_mux</text:span><text:span text:style-name="T13">(</text:span><text:span text:style-name="T22">arch</text:span><text:span text:style-name="T13">)</text:span></text:p>
      <text:p text:style-name="P15"><text:span text:style-name="T13"><text:s text:c="8"/></text:span><text:span text:style-name="T6">port</text:span><text:span text:style-name="T13"> </text:span><text:span text:style-name="T6">map</text:span><text:span text:style-name="T13"> ( <text:s text:c="3"/></text:span><text:span text:style-name="T26">clk</text:span><text:span text:style-name="T13"> =&gt; </text:span><text:span text:style-name="T39">clk</text:span><text:span text:style-name="T13">, </text:span><text:span text:style-name="T26">reset</text:span><text:span text:style-name="T13"> =&gt; </text:span><text:span text:style-name="T39">reset</text:span><text:span text:style-name="T13">, </text:span><text:span text:style-name="T26">in3</text:span><text:span text:style-name="T13"> =&gt; </text:span><text:span text:style-name="T39">in3</text:span><text:span text:style-name="T13">, </text:span></text:p>
      <text:p text:style-name="P15"><text:span text:style-name="T13"><text:s text:c="22"/></text:span><text:span text:style-name="T26">in2</text:span><text:span text:style-name="T13"> =&gt; </text:span><text:span text:style-name="T39">in2</text:span><text:span text:style-name="T13">, </text:span><text:span text:style-name="T26">in1</text:span><text:span text:style-name="T13"> =&gt; </text:span><text:span text:style-name="T39">in1</text:span><text:span text:style-name="T13">, </text:span><text:span text:style-name="T26">in0</text:span><text:span text:style-name="T13"> =&gt; </text:span><text:span text:style-name="T39">in0</text:span><text:span text:style-name="T13">, </text:span><text:span text:style-name="T26">an</text:span><text:span text:style-name="T13"> =&gt; </text:span><text:span text:style-name="T39">an</text:span><text:span text:style-name="T13">, </text:span><text:span text:style-name="T26">sseg</text:span><text:span text:style-name="T13"> =&gt; </text:span><text:span text:style-name="T39">sseg</text:span><text:span text:style-name="T13">);</text:span></text:p>
      <text:p text:style-name="P16"/>
      <text:p text:style-name="P15"><text:span text:style-name="T13"><text:s text:c="4"/></text:span><text:span text:style-name="T6">process</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0'</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4">/</text:span><text:span text:style-name="T31">2</text:span><text:span text:style-name="T13">;</text:span></text:p>
      <text:p text:style-name="P15"><text:span text:style-name="T13"><text:s text:c="8"/></text:span><text:span text:style-name="T39">clk</text:span><text:span text:style-name="T13"> &lt;= </text:span><text:span text:style-name="T34">'1'</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4">/</text:span><text:span text:style-name="T31">2</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p>
      <text:p text:style-name="P15"><text:span text:style-name="T13"><text:s text:c="4"/></text:span><text:span text:style-name="T6">begin</text:span></text:p>
      <text:p text:style-name="P15"><text:span text:style-name="T13"><text:s text:c="8"/></text:span><text:span text:style-name="T39">reset</text:span><text:span text:style-name="T13"> &lt;= </text:span><text:span text:style-name="T34">'1'</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3"> </text:span><text:span text:style-name="T14">*</text:span><text:span text:style-name="T31">2</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3"> </text:span><text:span text:style-name="T14">*</text:span><text:span text:style-name="T31">2</text:span><text:span text:style-name="T13">;</text:span></text:p>
      <text:p text:style-name="P15"><text:span text:style-name="T13"><text:s text:c="8"/></text:span><text:span text:style-name="T39">reset</text:span><text:span text:style-name="T13"> &lt;= </text:span><text:span text:style-name="T34">'0'</text:span><text:span text:style-name="T13">;</text:span></text:p>
      <text:p text:style-name="P16"/>
      <text:p text:style-name="P15"><text:span text:style-name="T13"><text:s text:c="8"/></text:span><text:span text:style-name="T6">wait</text:span><text:span text:style-name="T13"> </text:span><text:span text:style-name="T6">until</text:span><text:span text:style-name="T13"> </text:span><text:span text:style-name="T39">an</text:span><text:span text:style-name="T13"> = </text:span><text:span text:style-name="T34">"0111"</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3"> </text:span><text:span text:style-name="T14">*</text:span><text:span text:style-name="T31">2</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3"> </text:span><text:span text:style-name="T14">*</text:span><text:span text:style-name="T31">2</text:span><text:span text:style-name="T13">;</text:span></text:p>
      <text:p text:style-name="P15"><text:span text:style-name="T13"><text:s text:c="8"/></text:span><text:span text:style-name="T6">wait</text:span><text:span text:style-name="T13"> </text:span><text:span text:style-name="T6">until</text:span><text:span text:style-name="T13"> </text:span><text:span text:style-name="T39">an</text:span><text:span text:style-name="T13"> = </text:span><text:span text:style-name="T34">"0111"</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3"> </text:span><text:span text:style-name="T14">*</text:span><text:span text:style-name="T31">2</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3"> </text:span><text:span text:style-name="T14">*</text:span><text:span text:style-name="T31">2</text:span><text:span text:style-name="T13">;</text:span></text:p>
      <text:p text:style-name="P16"/>
      <text:p text:style-name="P15"><text:span text:style-name="T13"><text:s text:c="8"/></text:span><text:span text:style-name="T6">assert</text:span><text:span text:style-name="T13"> </text:span><text:span text:style-name="T7">false</text:span></text:p>
      <text:p text:style-name="P15"><text:span text:style-name="T13"><text:s text:c="12"/></text:span><text:span text:style-name="T6">report</text:span><text:span text:style-name="T13"> </text:span><text:span text:style-name="T34">"Simulation Completed"</text:span></text:p>
      <text:p text:style-name="P15"><text:span text:style-name="T13"><text:s text:c="12"/></text:span><text:span text:style-name="T6">severity</text:span><text:span text:style-name="T13"> </text:span><text:span text:style-name="T7">failure</text:span><text:span text:style-name="T13">;</text:span></text:p>
      <text:p text:style-name="P16"/>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6">end</text:span><text:span text:style-name="T13"> </text:span><text:span text:style-name="T22">arch</text:span><text:span text:style-name="T13">;</text:span></text:p>
      <text:p text:style-name="P16"><text:soft-page-break/></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disp_mux_tes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btn</text:span><text:span text:style-name="T13">: </text:span><text:span text:style-name="T6">in</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w</text:span><text:span text:style-name="T13">: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an</text:span><text:span text:style-name="T13">: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disp_mux_test</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disp_mux_test</text:span><text:span text:style-name="T13"> </text:span><text:span text:style-name="T6">is</text:span></text:p>
      <text:p text:style-name="P15"><text:span text:style-name="T13"><text:s text:c="4"/></text:span><text:span text:style-name="T6">signal</text:span><text:span text:style-name="T13"> </text:span><text:span text:style-name="T39">d3_reg</text:span><text:span text:style-name="T13">, </text:span><text:span text:style-name="T39">d2_reg</text:span><text:span text:style-name="T13">, </text:span><text:span text:style-name="T39">d1_reg</text:span><text:span text:style-name="T13">, </text:span><text:span text:style-name="T39">d0_reg</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38">disp_unit</text:span><text:span text:style-name="T13"> : </text:span><text:span text:style-name="T6">entity</text:span><text:span text:style-name="T13"> </text:span><text:span text:style-name="T22">work</text:span><text:span text:style-name="T13">.</text:span><text:span text:style-name="T22">disp_mux</text:span><text:span text:style-name="T13"> </text:span></text:p>
      <text:p text:style-name="P15"><text:span text:style-name="T13"><text:s text:c="8"/></text:span><text:span text:style-name="T6">port</text:span><text:span text:style-name="T13"> </text:span><text:span text:style-name="T6">map</text:span><text:span text:style-name="T13"> ( <text:s/></text:span><text:span text:style-name="T26">clk</text:span><text:span text:style-name="T13"> =&gt; </text:span><text:span text:style-name="T26">clk</text:span><text:span text:style-name="T13">, </text:span><text:span text:style-name="T26">reset</text:span><text:span text:style-name="T13"> =&gt; </text:span><text:span text:style-name="T34">'0'</text:span><text:span text:style-name="T13">, </text:span><text:span text:style-name="T26">in3</text:span><text:span text:style-name="T13"> =&gt; </text:span><text:span text:style-name="T39">d3_reg</text:span><text:span text:style-name="T13">, </text:span><text:span text:style-name="T26">in2</text:span><text:span text:style-name="T13"> =&gt; </text:span><text:span text:style-name="T39">d2_reg</text:span><text:span text:style-name="T13">,</text:span></text:p>
      <text:p text:style-name="P15"><text:span text:style-name="T13"><text:s text:c="20"/></text:span><text:span text:style-name="T26">in1</text:span><text:span text:style-name="T13"> =&gt; </text:span><text:span text:style-name="T39">d1_reg</text:span><text:span text:style-name="T13">, </text:span><text:span text:style-name="T26">in0</text:span><text:span text:style-name="T13"> =&gt; </text:span><text:span text:style-name="T39">d0_reg</text:span><text:span text:style-name="T13">, </text:span><text:span text:style-name="T26">an</text:span><text:span text:style-name="T13"> =&gt; </text:span><text:span text:style-name="T26">an</text:span><text:span text:style-name="T13">, </text:span><text:span text:style-name="T26">sseg</text:span><text:span text:style-name="T13"> =&gt; </text:span><text:span text:style-name="T26">sseg</text:span><text:span text:style-name="T13">);</text:span></text:p>
      <text:p text:style-name="P15"><text:span text:style-name="T13"><text:s text:c="4"/></text:span><text:span text:style-name="T36">--registers for 4 led patterns</text:span></text:p>
      <text:p text:style-name="P16"/>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btn</text:span><text:span text:style-name="T13">(</text:span><text:span text:style-name="T31">3</text:span><text:span text:style-name="T13">) = </text:span><text:span text:style-name="T34">'1'</text:span><text:span text:style-name="T13"> </text:span><text:span text:style-name="T6">then</text:span></text:p>
      <text:p text:style-name="P15"><text:span text:style-name="T13"><text:s text:c="16"/></text:span><text:span text:style-name="T39">d3_reg</text:span><text:span text:style-name="T13"> &lt;= </text:span><text:span text:style-name="T26">sw</text:span><text:span text:style-name="T13">;</text:span></text:p>
      <text:p text:style-name="P15"><text:span text:style-name="T13"><text:s text:c="12"/></text:span><text:span text:style-name="T6">end</text:span><text:span text:style-name="T13"> </text:span><text:span text:style-name="T6">if</text:span><text:span text:style-name="T13">;</text:span></text:p>
      <text:p text:style-name="P16"/>
      <text:p text:style-name="P15"><text:span text:style-name="T13"><text:s text:c="12"/></text:span><text:span text:style-name="T6">if</text:span><text:span text:style-name="T13"> </text:span><text:span text:style-name="T26">btn</text:span><text:span text:style-name="T13">(</text:span><text:span text:style-name="T31">2</text:span><text:span text:style-name="T13">) = </text:span><text:span text:style-name="T34">'1'</text:span><text:span text:style-name="T13"> </text:span><text:span text:style-name="T6">then</text:span></text:p>
      <text:p text:style-name="P15"><text:span text:style-name="T13"><text:s text:c="16"/></text:span><text:span text:style-name="T39">d2_reg</text:span><text:span text:style-name="T13"> &lt;= </text:span><text:span text:style-name="T26">sw</text:span><text:span text:style-name="T13">;</text:span></text:p>
      <text:p text:style-name="P15"><text:span text:style-name="T13"><text:s text:c="12"/></text:span><text:span text:style-name="T6">end</text:span><text:span text:style-name="T13"> </text:span><text:span text:style-name="T6">if</text:span><text:span text:style-name="T13">;</text:span></text:p>
      <text:p text:style-name="P16"/>
      <text:p text:style-name="P15"><text:span text:style-name="T13"><text:s text:c="12"/></text:span><text:span text:style-name="T6">if</text:span><text:span text:style-name="T13"> </text:span><text:span text:style-name="T26">btn</text:span><text:span text:style-name="T13">(</text:span><text:span text:style-name="T31">1</text:span><text:span text:style-name="T13">) = </text:span><text:span text:style-name="T34">'1'</text:span><text:span text:style-name="T13"> </text:span><text:span text:style-name="T6">then</text:span></text:p>
      <text:p text:style-name="P15"><text:span text:style-name="T13"><text:s text:c="16"/></text:span><text:span text:style-name="T39">d1_reg</text:span><text:span text:style-name="T13"> &lt;= </text:span><text:span text:style-name="T26">sw</text:span><text:span text:style-name="T13">;</text:span></text:p>
      <text:p text:style-name="P15"><text:span text:style-name="T13"><text:s text:c="12"/></text:span><text:span text:style-name="T6">end</text:span><text:span text:style-name="T13"> </text:span><text:span text:style-name="T6">if</text:span><text:span text:style-name="T13">;</text:span></text:p>
      <text:p text:style-name="P16"/>
      <text:p text:style-name="P15"><text:span text:style-name="T13"><text:s text:c="12"/></text:span><text:span text:style-name="T6">if</text:span><text:span text:style-name="T13"> </text:span><text:span text:style-name="T26">btn</text:span><text:span text:style-name="T13">(</text:span><text:span text:style-name="T31">0</text:span><text:span text:style-name="T13">) = </text:span><text:span text:style-name="T34">'1'</text:span><text:span text:style-name="T13"> </text:span><text:span text:style-name="T6">then</text:span></text:p>
      <text:p text:style-name="P15"><text:span text:style-name="T13"><text:s text:c="16"/></text:span><text:span text:style-name="T39">d0_reg</text:span><text:span text:style-name="T13"> &lt;= </text:span><text:span text:style-name="T26">sw</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text:soft-page-break/><text:span text:style-name="T3">DISPLAY HEX MUX</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disp_hex_mux</text:span><text:span text:style-name="T13"> </text:span><text:span text:style-name="T6">is</text:span><text:span text:style-name="T13"> </text:span><text:span text:style-name="T6">port</text:span><text:span text:style-name="T13">( </text:span></text:p>
      <text:p text:style-name="P15"><text:span text:style-name="T13"><text:s text:c="4"/></text:span><text:span text:style-name="T26">clk</text:span><text:span text:style-name="T13">, </text:span><text:span text:style-name="T26">rst</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hex3</text:span><text:span text:style-name="T13">, </text:span><text:span text:style-name="T26">hex2</text:span><text:span text:style-name="T13">, </text:span><text:span text:style-name="T26">hex1</text:span><text:span text:style-name="T13">, </text:span><text:span text:style-name="T26">hex0</text:span><text:span text:style-name="T13"> : </text:span><text:span text:style-name="T6">in</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dp_in</text:span><text:span text:style-name="T13">: </text:span><text:span text:style-name="T6">in</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an</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6"/>
      <text:p text:style-name="P15"><text:span text:style-name="T6">end</text:span><text:span text:style-name="T13"> </text:span><text:span text:style-name="T22">disp_hex_mux</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disp_hex_mux</text:span><text:span text:style-name="T13"> </text:span><text:span text:style-name="T6">is</text:span></text:p>
      <text:p text:style-name="P15"><text:span text:style-name="T13"><text:s text:c="4"/></text:span><text:span text:style-name="T36">--each 7-seg led enabled (2^18/4) * 25 ns (40 ms)</text:span></text:p>
      <text:p text:style-name="P15"><text:span text:style-name="T13"><text:s text:c="4"/></text:span><text:span text:style-name="T6">constant</text:span><text:span text:style-name="T13"> </text:span><text:span text:style-name="T7">n</text:span><text:span text:style-name="T13">: </text:span><text:span text:style-name="T28">integer</text:span><text:span text:style-name="T13"> := </text:span><text:span text:style-name="T31">18</text:span><text:span text:style-name="T13">;</text:span></text:p>
      <text:p text:style-name="P15"><text:span text:style-name="T13"><text:s text:c="4"/></text:span><text:span text:style-name="T6">signal</text:span><text:span text:style-name="T13"> </text:span><text:span text:style-name="T39">q_reg</text:span><text:span text:style-name="T13">, </text:span><text:span text:style-name="T39">q_next</text:span><text:span text:style-name="T13">: </text:span><text:span text:style-name="T28">unsigned</text:span><text:span text:style-name="T13"> (</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sel</text:span><text:span text:style-name="T13">: </text:span><text:span text:style-name="T28">std_logic_vector</text:span><text:span text:style-name="T13">(</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hex</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dp</text:span><text:span text:style-name="T13">: </text:span><text:span text:style-name="T28">std_logic</text:span><text:span text:style-name="T13">;</text:span></text:p>
      <text:p text:style-name="P23">begin</text:p>
      <text:p text:style-name="P15"><text:span text:style-name="T13"><text:s text:c="4"/></text:span><text:span text:style-name="T36">--register</text:span></text:p>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q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q_reg</text:span><text:span text:style-name="T13"> &lt;= </text:span><text:span text:style-name="T39">q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next state logic for the conter</text:span></text:p>
      <text:p text:style-name="P15"><text:span text:style-name="T13"><text:s text:c="4"/></text:span><text:span text:style-name="T39">q_next</text:span><text:span text:style-name="T13"> &lt;= </text:span><text:span text:style-name="T39">q_reg</text:span><text:span text:style-name="T13"> </text:span><text:span text:style-name="T14">+</text:span><text:span text:style-name="T31">1</text:span><text:span text:style-name="T13">;</text:span></text:p>
      <text:p text:style-name="P16"/>
      <text:p text:style-name="P15"><text:span text:style-name="T13"><text:s text:c="4"/></text:span><text:span text:style-name="T36">--2 MSBs of counter to control 4-to-1 muxing</text:span></text:p>
      <text:p text:style-name="P15"><text:span text:style-name="T13"><text:s text:c="4"/></text:span><text:span text:style-name="T39">sel</text:span><text:span text:style-name="T13"> &lt;= </text:span><text:span text:style-name="T28">std_logic_vector</text:span><text:span text:style-name="T13">(</text:span><text:span text:style-name="T39">q_reg</text:span><text:span text:style-name="T13">(</text:span><text:span text:style-name="T7">n</text:span><text:span text:style-name="T14">-</text:span><text:span text:style-name="T31">1</text:span><text:span text:style-name="T13"> </text:span><text:span text:style-name="T6">downto</text:span><text:span text:style-name="T13"> </text:span><text:span text:style-name="T7">n</text:span><text:span text:style-name="T14">-</text:span><text:span text:style-name="T31">2</text:span><text:span text:style-name="T13">));</text:span></text:p>
      <text:p text:style-name="P16"/>
      <text:p text:style-name="P15"><text:span text:style-name="T13"><text:s text:c="4"/></text:span><text:span text:style-name="T6">process</text:span><text:span text:style-name="T13">(</text:span><text:span text:style-name="T39">sel</text:span><text:span text:style-name="T13">)</text:span><text:span text:style-name="T36">--, hex0, hex1, hex2, hex3, dp_in)</text:span></text:p>
      <text:p text:style-name="P15"><text:span text:style-name="T13"><text:s text:c="4"/></text:span><text:span text:style-name="T6">begin</text:span></text:p>
      <text:p text:style-name="P15"><text:span text:style-name="T13"><text:s text:c="8"/></text:span><text:span text:style-name="T6">case</text:span><text:span text:style-name="T13"> </text:span><text:span text:style-name="T39">sel</text:span><text:span text:style-name="T13"> </text:span><text:span text:style-name="T6">is</text:span></text:p>
      <text:p text:style-name="P15"><text:span text:style-name="T13"><text:s text:c="12"/></text:span><text:span text:style-name="T6">when</text:span><text:span text:style-name="T13"> </text:span><text:span text:style-name="T34">"00"</text:span><text:span text:style-name="T13"> =&gt;</text:span></text:p>
      <text:p text:style-name="P15"><text:span text:style-name="T13"><text:s text:c="16"/></text:span><text:span text:style-name="T26">an</text:span><text:span text:style-name="T13"> &lt;= </text:span><text:span text:style-name="T34">"1110"</text:span><text:span text:style-name="T13">;</text:span></text:p>
      <text:p text:style-name="P15"><text:span text:style-name="T13"><text:s text:c="16"/></text:span><text:span text:style-name="T39">hex</text:span><text:span text:style-name="T13"> &lt;= </text:span><text:span text:style-name="T26">hex0</text:span><text:span text:style-name="T13">;</text:span></text:p>
      <text:p text:style-name="P15"><text:span text:style-name="T13"><text:s text:c="16"/></text:span><text:span text:style-name="T39">dp</text:span><text:span text:style-name="T13"> &lt;= </text:span><text:span text:style-name="T26">dp_in</text:span><text:span text:style-name="T13">(</text:span><text:span text:style-name="T31">0</text:span><text:span text:style-name="T13">);</text:span></text:p>
      <text:p text:style-name="P15"><text:span text:style-name="T13"><text:s text:c="12"/></text:span><text:span text:style-name="T6">when</text:span><text:span text:style-name="T13"> </text:span><text:span text:style-name="T34">"01"</text:span><text:span text:style-name="T13"> =&gt;</text:span></text:p>
      <text:p text:style-name="P15"><text:span text:style-name="T13"><text:s text:c="16"/></text:span><text:span text:style-name="T26">an</text:span><text:span text:style-name="T13"> &lt;= </text:span><text:span text:style-name="T34">"1101"</text:span><text:span text:style-name="T13">;</text:span></text:p>
      <text:p text:style-name="P15"><text:span text:style-name="T13"><text:s text:c="16"/></text:span><text:span text:style-name="T39">hex</text:span><text:span text:style-name="T13"> &lt;= </text:span><text:span text:style-name="T26">hex1</text:span><text:span text:style-name="T13">;</text:span></text:p>
      <text:p text:style-name="P15"><text:span text:style-name="T13"><text:s text:c="16"/></text:span><text:span text:style-name="T39">dp</text:span><text:span text:style-name="T13"> &lt;= </text:span><text:span text:style-name="T26">dp_in</text:span><text:span text:style-name="T13">(</text:span><text:span text:style-name="T31">1</text:span><text:span text:style-name="T13">);</text:span></text:p>
      <text:p text:style-name="P15"><text:span text:style-name="T13"><text:s text:c="12"/></text:span><text:span text:style-name="T6">when</text:span><text:span text:style-name="T13"> </text:span><text:span text:style-name="T34">"10"</text:span><text:span text:style-name="T13"> =&gt;</text:span></text:p>
      <text:p text:style-name="P15"><text:soft-page-break/><text:span text:style-name="T13"><text:s text:c="16"/></text:span><text:span text:style-name="T26">an</text:span><text:span text:style-name="T13"> &lt;= </text:span><text:span text:style-name="T34">"1011"</text:span><text:span text:style-name="T13">;</text:span></text:p>
      <text:p text:style-name="P15"><text:span text:style-name="T13"><text:s text:c="16"/></text:span><text:span text:style-name="T39">hex</text:span><text:span text:style-name="T13"> &lt;= </text:span><text:span text:style-name="T26">hex2</text:span><text:span text:style-name="T13">;</text:span></text:p>
      <text:p text:style-name="P15"><text:span text:style-name="T13"><text:s text:c="16"/></text:span><text:span text:style-name="T39">dp</text:span><text:span text:style-name="T13"> &lt;= </text:span><text:span text:style-name="T26">dp_in</text:span><text:span text:style-name="T13">(</text:span><text:span text:style-name="T31">2</text:span><text:span text:style-name="T13">);</text:span></text:p>
      <text:p text:style-name="P15"><text:span text:style-name="T13"><text:s text:c="12"/></text:span><text:span text:style-name="T6">when</text:span><text:span text:style-name="T13"> </text:span><text:span text:style-name="T34">"11"</text:span><text:span text:style-name="T13"> =&gt;</text:span></text:p>
      <text:p text:style-name="P15"><text:span text:style-name="T13"><text:s text:c="16"/></text:span><text:span text:style-name="T26">an</text:span><text:span text:style-name="T13"> &lt;= </text:span><text:span text:style-name="T34">"0111"</text:span><text:span text:style-name="T13">;</text:span></text:p>
      <text:p text:style-name="P15"><text:span text:style-name="T13"><text:s text:c="16"/></text:span><text:span text:style-name="T39">hex</text:span><text:span text:style-name="T13"> &lt;= </text:span><text:span text:style-name="T26">hex3</text:span><text:span text:style-name="T13">;</text:span></text:p>
      <text:p text:style-name="P15"><text:span text:style-name="T13"><text:s text:c="16"/></text:span><text:span text:style-name="T39">dp</text:span><text:span text:style-name="T13"> &lt;= </text:span><text:span text:style-name="T26">dp_in</text:span><text:span text:style-name="T13">(</text:span><text:span text:style-name="T31">3</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 hex to 7 segment led decoding</text:span></text:p>
      <text:p text:style-name="P15"><text:span text:style-name="T13"><text:s text:c="4"/></text:span><text:span text:style-name="T6">with</text:span><text:span text:style-name="T13"> </text:span><text:span text:style-name="T39">hex</text:span><text:span text:style-name="T13"> </text:span><text:span text:style-name="T6">select</text:span></text:p>
      <text:p text:style-name="P15"><text:span text:style-name="T13"><text:s text:c="4"/></text:span><text:span text:style-name="T26">sseg</text:span><text:span text:style-name="T13">(</text:span><text:span text:style-name="T31">6</text:span><text:span text:style-name="T13"> </text:span><text:span text:style-name="T6">downto</text:span><text:span text:style-name="T13"> </text:span><text:span text:style-name="T31">0</text:span><text:span text:style-name="T13">) &lt;= </text:span></text:p>
      <text:p text:style-name="P15"><text:span text:style-name="T13"><text:s text:c="4"/></text:span><text:span text:style-name="T34">"0000001"</text:span><text:span text:style-name="T13"> </text:span><text:span text:style-name="T6">when</text:span><text:span text:style-name="T13"> </text:span><text:span text:style-name="T34">"0000"</text:span><text:span text:style-name="T13">,</text:span></text:p>
      <text:p text:style-name="P15"><text:span text:style-name="T13"><text:s text:c="4"/></text:span><text:span text:style-name="T34">"1001111"</text:span><text:span text:style-name="T13"> </text:span><text:span text:style-name="T6">when</text:span><text:span text:style-name="T13"> </text:span><text:span text:style-name="T34">"0001"</text:span><text:span text:style-name="T13">,</text:span></text:p>
      <text:p text:style-name="P15"><text:span text:style-name="T13"><text:s text:c="4"/></text:span><text:span text:style-name="T34">"0010010"</text:span><text:span text:style-name="T13"> </text:span><text:span text:style-name="T6">when</text:span><text:span text:style-name="T13"> </text:span><text:span text:style-name="T34">"0010"</text:span><text:span text:style-name="T13">,</text:span></text:p>
      <text:p text:style-name="P15"><text:span text:style-name="T13"><text:s text:c="4"/></text:span><text:span text:style-name="T34">"0000110"</text:span><text:span text:style-name="T13"> </text:span><text:span text:style-name="T6">when</text:span><text:span text:style-name="T13"> </text:span><text:span text:style-name="T34">"0011"</text:span><text:span text:style-name="T13">,</text:span></text:p>
      <text:p text:style-name="P15"><text:span text:style-name="T13"><text:s text:c="4"/></text:span><text:span text:style-name="T34">"0000110"</text:span><text:span text:style-name="T13"> </text:span><text:span text:style-name="T6">when</text:span><text:span text:style-name="T13"> </text:span><text:span text:style-name="T34">"0100"</text:span><text:span text:style-name="T13">,</text:span></text:p>
      <text:p text:style-name="P15"><text:span text:style-name="T13"><text:s text:c="4"/></text:span><text:span text:style-name="T34">"1001100"</text:span><text:span text:style-name="T13"> </text:span><text:span text:style-name="T6">when</text:span><text:span text:style-name="T13"> </text:span><text:span text:style-name="T34">"0101"</text:span><text:span text:style-name="T13">,</text:span></text:p>
      <text:p text:style-name="P15"><text:span text:style-name="T13"><text:s text:c="4"/></text:span><text:span text:style-name="T34">"0100100"</text:span><text:span text:style-name="T13"> </text:span><text:span text:style-name="T6">when</text:span><text:span text:style-name="T13"> </text:span><text:span text:style-name="T34">"0110"</text:span><text:span text:style-name="T13">,</text:span></text:p>
      <text:p text:style-name="P15"><text:span text:style-name="T13"><text:s text:c="4"/></text:span><text:span text:style-name="T34">"0100000"</text:span><text:span text:style-name="T13"> </text:span><text:span text:style-name="T6">when</text:span><text:span text:style-name="T13"> </text:span><text:span text:style-name="T34">"0111"</text:span><text:span text:style-name="T13">,</text:span></text:p>
      <text:p text:style-name="P15"><text:span text:style-name="T13"><text:s text:c="4"/></text:span><text:span text:style-name="T34">"0001111"</text:span><text:span text:style-name="T13"> </text:span><text:span text:style-name="T6">when</text:span><text:span text:style-name="T13"> </text:span><text:span text:style-name="T34">"1000"</text:span><text:span text:style-name="T13">,</text:span></text:p>
      <text:p text:style-name="P15"><text:span text:style-name="T13"><text:s text:c="4"/></text:span><text:span text:style-name="T34">"0000000"</text:span><text:span text:style-name="T13"> </text:span><text:span text:style-name="T6">when</text:span><text:span text:style-name="T13"> </text:span><text:span text:style-name="T34">"1001"</text:span><text:span text:style-name="T13">,</text:span></text:p>
      <text:p text:style-name="P15"><text:span text:style-name="T13"><text:s text:c="4"/></text:span><text:span text:style-name="T34">"0000100"</text:span><text:span text:style-name="T13"> </text:span><text:span text:style-name="T6">when</text:span><text:span text:style-name="T13"> </text:span><text:span text:style-name="T34">"1010"</text:span><text:span text:style-name="T13">,</text:span></text:p>
      <text:p text:style-name="P15"><text:span text:style-name="T13"><text:s text:c="4"/></text:span><text:span text:style-name="T34">"0001000"</text:span><text:span text:style-name="T13"> </text:span><text:span text:style-name="T6">when</text:span><text:span text:style-name="T13"> </text:span><text:span text:style-name="T34">"1011"</text:span><text:span text:style-name="T13">, <text:s text:c="11"/></text:span></text:p>
      <text:p text:style-name="P15"><text:span text:style-name="T13"><text:s text:c="4"/></text:span><text:span text:style-name="T34">"1100000"</text:span><text:span text:style-name="T13"> </text:span><text:span text:style-name="T6">when</text:span><text:span text:style-name="T13"> </text:span><text:span text:style-name="T34">"1100"</text:span><text:span text:style-name="T13">,</text:span></text:p>
      <text:p text:style-name="P15"><text:span text:style-name="T13"><text:s text:c="4"/></text:span><text:span text:style-name="T34">"0110001"</text:span><text:span text:style-name="T13"> </text:span><text:span text:style-name="T6">when</text:span><text:span text:style-name="T13"> </text:span><text:span text:style-name="T34">"1101"</text:span><text:span text:style-name="T13">,</text:span></text:p>
      <text:p text:style-name="P15"><text:span text:style-name="T13"><text:s text:c="4"/></text:span><text:span text:style-name="T34">"0110000"</text:span><text:span text:style-name="T13"> </text:span><text:span text:style-name="T6">when</text:span><text:span text:style-name="T13"> </text:span><text:span text:style-name="T34">"1110"</text:span><text:span text:style-name="T13">,</text:span></text:p>
      <text:p text:style-name="P15"><text:span text:style-name="T13"><text:s text:c="4"/></text:span><text:span text:style-name="T34">"0111000"</text:span><text:span text:style-name="T13"> </text:span><text:span text:style-name="T6">when</text:span><text:span text:style-name="T13"> </text:span><text:span text:style-name="T6">others</text:span><text:span text:style-name="T13">;</text:span></text:p>
      <text:p text:style-name="P15"><text:span text:style-name="T13"><text:s text:c="4"/></text:span><text:span text:style-name="T36">-- decimal point</text:span></text:p>
      <text:p text:style-name="P15"><text:span text:style-name="T13"><text:s text:c="4"/></text:span><text:span text:style-name="T26">sseg</text:span><text:span text:style-name="T13">(</text:span><text:span text:style-name="T31">7</text:span><text:span text:style-name="T13">) &lt;= </text:span><text:span text:style-name="T39">dp</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HEX MUX TESTBENCH</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hex_mux_tes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sw</text:span><text:span text:style-name="T13">: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an</text:span><text:span text:style-name="T13">: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hex_mux_test</text:span><text:span text:style-name="T13"> </text:span><text:span text:style-name="T6">is</text:span></text:p>
      <text:p text:style-name="P15"><text:span text:style-name="T13"><text:s text:c="4"/></text:span><text:span text:style-name="T6">signal</text:span><text:span text:style-name="T13"> </text:span><text:span text:style-name="T39">a</text:span><text:span text:style-name="T13">, </text:span><text:span text:style-name="T39">b</text:span><text:span text:style-name="T13">: </text:span><text:span text:style-name="T28">unsigned</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sum</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8">disp_unit</text:span><text:span text:style-name="T13">: </text:span><text:span text:style-name="T6">entity</text:span><text:span text:style-name="T13"> </text:span><text:span text:style-name="T22">work</text:span><text:span text:style-name="T13">.</text:span><text:span text:style-name="T22">disp_hex_mux</text:span></text:p>
      <text:p text:style-name="P15"><text:span text:style-name="T13"><text:s text:c="8"/></text:span><text:span text:style-name="T6">port</text:span><text:span text:style-name="T13"> </text:span><text:span text:style-name="T6">map</text:span><text:span text:style-name="T13">( </text:span><text:span text:style-name="T26">clk</text:span><text:span text:style-name="T13"> =&gt; </text:span><text:span text:style-name="T26">clk</text:span><text:span text:style-name="T13">, </text:span><text:span text:style-name="T26">rst</text:span><text:span text:style-name="T13"> =&gt; </text:span><text:span text:style-name="T34">'0'</text:span><text:span text:style-name="T13">, </text:span></text:p>
      <text:p text:style-name="P15"><text:span text:style-name="T13"><text:s text:c="18"/></text:span><text:span text:style-name="T26">hex3</text:span><text:span text:style-name="T13"> =&gt; </text:span><text:span text:style-name="T39">sum</text:span><text:span text:style-name="T13">(</text:span><text:span text:style-name="T31">7</text:span><text:span text:style-name="T13"> </text:span><text:span text:style-name="T6">downto</text:span><text:span text:style-name="T13"> </text:span><text:span text:style-name="T31">4</text:span><text:span text:style-name="T13">), </text:span><text:span text:style-name="T26">hex2</text:span><text:span text:style-name="T13"> =&gt; </text:span><text:span text:style-name="T39">sum</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18"/></text:span><text:span text:style-name="T26">hex1</text:span><text:span text:style-name="T13"> =&gt; </text:span><text:span text:style-name="T26">sw</text:span><text:span text:style-name="T13">(</text:span><text:span text:style-name="T31">7</text:span><text:span text:style-name="T13"> </text:span><text:span text:style-name="T6">downto</text:span><text:span text:style-name="T13"> </text:span><text:span text:style-name="T31">4</text:span><text:span text:style-name="T13">), </text:span><text:span text:style-name="T26">hex0</text:span><text:span text:style-name="T13"> =&gt; </text:span><text:span text:style-name="T26">sw</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18"/></text:span><text:span text:style-name="T26">dp_in</text:span><text:span text:style-name="T13"> =&gt; </text:span><text:span text:style-name="T34">"1011"</text:span><text:span text:style-name="T13">, </text:span><text:span text:style-name="T26">an</text:span><text:span text:style-name="T13"> =&gt; </text:span><text:span text:style-name="T26">an</text:span><text:span text:style-name="T13">, </text:span><text:span text:style-name="T26">sseg</text:span><text:span text:style-name="T13"> =&gt; </text:span><text:span text:style-name="T26">sseg</text:span><text:span text:style-name="T13">);</text:span></text:p>
      <text:p text:style-name="P16"/>
      <text:p text:style-name="P15"><text:span text:style-name="T13"><text:s text:c="4"/></text:span><text:span text:style-name="T39">a</text:span><text:span text:style-name="T13"> &lt;= </text:span><text:span text:style-name="T34">"0000"</text:span><text:span text:style-name="T13"> </text:span><text:span text:style-name="T14">&amp;</text:span><text:span text:style-name="T13"> </text:span><text:span text:style-name="T28">unsigned</text:span><text:span text:style-name="T13">(</text:span><text:span text:style-name="T26">sw</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39">b</text:span><text:span text:style-name="T13"> &lt;= </text:span><text:span text:style-name="T34">"0000"</text:span><text:span text:style-name="T13"> </text:span><text:span text:style-name="T14">&amp;</text:span><text:span text:style-name="T13"> </text:span><text:span text:style-name="T28">unsigned</text:span><text:span text:style-name="T13">(</text:span><text:span text:style-name="T26">sw</text:span><text:span text:style-name="T13">(</text:span><text:span text:style-name="T31">7</text:span><text:span text:style-name="T13"> </text:span><text:span text:style-name="T6">downto</text:span><text:span text:style-name="T13"> </text:span><text:span text:style-name="T31">4</text:span><text:span text:style-name="T13">));</text:span></text:p>
      <text:p text:style-name="P15"><text:span text:style-name="T13"><text:s text:c="4"/></text:span><text:span text:style-name="T39">sum</text:span><text:span text:style-name="T13">&lt;= </text:span><text:span text:style-name="T28">std_logic_vector</text:span><text:span text:style-name="T13">(</text:span><text:span text:style-name="T39">a</text:span><text:span text:style-name="T13"> </text:span><text:span text:style-name="T14">+</text:span><text:span text:style-name="T13"> </text:span><text:span text:style-name="T39">b</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STOP WATCH</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stopwatch</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go</text:span><text:span text:style-name="T13">, </text:span><text:span text:style-name="T26">clr</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d2</text:span><text:span text:style-name="T13">, </text:span><text:span text:style-name="T26">d1</text:span><text:span text:style-name="T13">, </text:span><text:span text:style-name="T26">d0</text:span><text:span text:style-name="T13">: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stopwatch</text:span><text:span text:style-name="T13">;</text:span></text:p>
      <text:p text:style-name="P16"/>
      <text:p text:style-name="P15"><text:span text:style-name="T6">architecture</text:span><text:span text:style-name="T13"> </text:span><text:span text:style-name="T22">cascade_arch</text:span><text:span text:style-name="T13"> </text:span><text:span text:style-name="T6">of</text:span><text:span text:style-name="T13"> </text:span><text:span text:style-name="T22">stopwatch</text:span><text:span text:style-name="T13"> </text:span><text:span text:style-name="T6">is</text:span></text:p>
      <text:p text:style-name="P15"><text:span text:style-name="T13"><text:s text:c="4"/></text:span><text:span text:style-name="T6">constant</text:span><text:span text:style-name="T13"> </text:span><text:span text:style-name="T7">dvsr</text:span><text:span text:style-name="T13"> : </text:span><text:span text:style-name="T28">integer</text:span><text:span text:style-name="T13"> := </text:span><text:span text:style-name="T31">5000000</text:span><text:span text:style-name="T13">;</text:span></text:p>
      <text:p text:style-name="P15"><text:span text:style-name="T13"><text:s text:c="4"/></text:span><text:span text:style-name="T6">signal</text:span><text:span text:style-name="T13"> </text:span><text:span text:style-name="T39">ms_reg</text:span><text:span text:style-name="T13">, </text:span><text:span text:style-name="T39">ms_next</text:span><text:span text:style-name="T13">: </text:span><text:span text:style-name="T28">unsigned</text:span><text:span text:style-name="T13">(</text:span><text:span text:style-name="T31">22</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d2_reg</text:span><text:span text:style-name="T13">, </text:span><text:span text:style-name="T39">d1_reg</text:span><text:span text:style-name="T13">, </text:span><text:span text:style-name="T39">d0_reg</text:span><text:span text:style-name="T13">: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d2_next</text:span><text:span text:style-name="T13">, </text:span><text:span text:style-name="T39">d1_next</text:span><text:span text:style-name="T13">, </text:span><text:span text:style-name="T39">d0_next</text:span><text:span text:style-name="T13">: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d1_en</text:span><text:span text:style-name="T13">, </text:span><text:span text:style-name="T39">d2_en</text:span><text:span text:style-name="T13">, </text:span><text:span text:style-name="T39">d0_en</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ms_tick</text:span><text:span text:style-name="T13">, </text:span><text:span text:style-name="T39">d0_tick</text:span><text:span text:style-name="T13">, </text:span><text:span text:style-name="T39">d1_tick</text:span><text:span text:style-name="T13">: </text:span><text:span text:style-name="T28">std_logic</text:span><text:span text:style-name="T13">;</text:span></text:p>
      <text:p text:style-name="P23">begin</text:p>
      <text:p text:style-name="P15"><text:span text:style-name="T13"><text:s text:c="4"/></text:span><text:span text:style-name="T36">--register</text:span></text:p>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ms_reg</text:span><text:span text:style-name="T13"> &lt;= </text:span><text:span text:style-name="T39">ms_next</text:span><text:span text:style-name="T13">;</text:span></text:p>
      <text:p text:style-name="P15"><text:span text:style-name="T13"><text:s text:c="12"/></text:span><text:span text:style-name="T39">d2_reg</text:span><text:span text:style-name="T13"> &lt;= </text:span><text:span text:style-name="T39">d2_next</text:span><text:span text:style-name="T13">;</text:span></text:p>
      <text:p text:style-name="P15"><text:span text:style-name="T13"><text:s text:c="12"/></text:span><text:span text:style-name="T39">d1_reg</text:span><text:span text:style-name="T13"> &lt;= </text:span><text:span text:style-name="T39">d1_next</text:span><text:span text:style-name="T13">;</text:span></text:p>
      <text:p text:style-name="P15"><text:span text:style-name="T13"><text:s text:c="12"/></text:span><text:span text:style-name="T39">d0_reg</text:span><text:span text:style-name="T13"> &lt;= </text:span><text:span text:style-name="T39">d0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next-state logic</text:span></text:p>
      <text:p text:style-name="P15"><text:span text:style-name="T13"><text:s text:c="4"/></text:span><text:span text:style-name="T36">--0.1 sec tick generator: mod-5000000</text:span></text:p>
      <text:p text:style-name="P16"/>
      <text:p text:style-name="P15"><text:span text:style-name="T13"><text:s text:c="4"/></text:span><text:span text:style-name="T39">ms_next</text:span><text:span text:style-name="T13"> &lt;= (</text:span><text:span text:style-name="T6">others</text:span><text:span text:style-name="T13"> =&gt; </text:span><text:span text:style-name="T34">'0'</text:span><text:span text:style-name="T13">) </text:span><text:span text:style-name="T6">when</text:span><text:span text:style-name="T13"> </text:span><text:span text:style-name="T26">clr</text:span><text:span text:style-name="T13"> = </text:span><text:span text:style-name="T34">'1'</text:span><text:span text:style-name="T13"> </text:span><text:span text:style-name="T6">or</text:span><text:span text:style-name="T13"> (</text:span><text:span text:style-name="T39">ms_reg</text:span><text:span text:style-name="T13"> = </text:span><text:span text:style-name="T7">dvsr</text:span><text:span text:style-name="T13"> </text:span><text:span text:style-name="T6">and</text:span><text:span text:style-name="T13"> </text:span><text:span text:style-name="T26">go</text:span><text:span text:style-name="T13"> = </text:span><text:span text:style-name="T34">'1'</text:span><text:span text:style-name="T13">) </text:span><text:span text:style-name="T6">else</text:span></text:p>
      <text:p text:style-name="P15"><text:span text:style-name="T13"><text:s text:c="8"/></text:span><text:span text:style-name="T39">ms_reg</text:span><text:span text:style-name="T13"> </text:span><text:span text:style-name="T14">+</text:span><text:span text:style-name="T13"> </text:span><text:span text:style-name="T31">1</text:span><text:span text:style-name="T13"> </text:span><text:span text:style-name="T6">when</text:span><text:span text:style-name="T13"> </text:span><text:span text:style-name="T26">go</text:span><text:span text:style-name="T13"> = </text:span><text:span text:style-name="T34">'1'</text:span><text:span text:style-name="T13"> </text:span><text:span text:style-name="T6">else</text:span></text:p>
      <text:p text:style-name="P15"><text:span text:style-name="T13"><text:s text:c="12"/></text:span><text:span text:style-name="T39">ms_reg</text:span><text:span text:style-name="T13">;</text:span></text:p>
      <text:p text:style-name="P16"/>
      <text:p text:style-name="P15"><text:span text:style-name="T13"><text:s text:c="12"/></text:span><text:span text:style-name="T39">ms_tick</text:span><text:span text:style-name="T13"> &lt;= </text:span><text:span text:style-name="T34">'1'</text:span><text:span text:style-name="T13"> </text:span><text:span text:style-name="T6">when</text:span><text:span text:style-name="T13"> </text:span><text:span text:style-name="T39">ms_reg</text:span><text:span text:style-name="T13"> = </text:span><text:span text:style-name="T7">dvsr</text:span><text:span text:style-name="T13"> </text:span><text:span text:style-name="T6">else</text:span><text:span text:style-name="T13"> </text:span><text:span text:style-name="T34">'0'</text:span><text:span text:style-name="T13">;</text:span></text:p>
      <text:p text:style-name="P16"/>
      <text:p text:style-name="P15"><text:span text:style-name="T13"><text:s text:c="4"/></text:span><text:span text:style-name="T36">--0.1 sec counter</text:span></text:p>
      <text:p text:style-name="P15"><text:span text:style-name="T13"><text:s text:c="4"/></text:span><text:span text:style-name="T39">d0_en</text:span><text:span text:style-name="T13"> &lt;= </text:span><text:span text:style-name="T34">'1'</text:span><text:span text:style-name="T13"> </text:span><text:span text:style-name="T6">when</text:span><text:span text:style-name="T13"> </text:span><text:span text:style-name="T39">ms_tick</text:span><text:span text:style-name="T13"> = </text:span><text:span text:style-name="T34">'1'</text:span><text:span text:style-name="T13"> </text:span><text:span text:style-name="T6">else</text:span><text:span text:style-name="T13"> </text:span><text:span text:style-name="T34">'0'</text:span><text:span text:style-name="T13">;</text:span></text:p>
      <text:p text:style-name="P15"><text:span text:style-name="T13"><text:s text:c="4"/></text:span><text:span text:style-name="T39">d0_next</text:span><text:span text:style-name="T13"> &lt;= </text:span><text:span text:style-name="T34">"0000"</text:span><text:span text:style-name="T13"> </text:span><text:span text:style-name="T6">when</text:span><text:span text:style-name="T13"> (</text:span><text:span text:style-name="T26">clr</text:span><text:span text:style-name="T13"> = </text:span><text:span text:style-name="T34">'1'</text:span><text:span text:style-name="T13">) </text:span><text:span text:style-name="T6">or</text:span><text:span text:style-name="T13"> (</text:span><text:span text:style-name="T39">d0_en</text:span><text:span text:style-name="T13"> = </text:span><text:span text:style-name="T34">'1'</text:span><text:span text:style-name="T13"> </text:span><text:span text:style-name="T6">and</text:span><text:span text:style-name="T13"> </text:span><text:span text:style-name="T39">d0_reg</text:span><text:span text:style-name="T13"> = </text:span><text:span text:style-name="T31">9</text:span><text:span text:style-name="T13">) </text:span><text:span text:style-name="T6">else</text:span></text:p>
      <text:p text:style-name="P15"><text:span text:style-name="T13"><text:s text:c="8"/></text:span><text:span text:style-name="T39">d0_reg</text:span><text:span text:style-name="T13"> </text:span><text:span text:style-name="T14">+</text:span><text:span text:style-name="T13"> </text:span><text:span text:style-name="T31">1</text:span><text:span text:style-name="T13"> </text:span><text:span text:style-name="T6">when</text:span><text:span text:style-name="T13"> </text:span><text:span text:style-name="T39">d0_en</text:span><text:span text:style-name="T13"> = </text:span><text:span text:style-name="T34">'1'</text:span><text:span text:style-name="T13"> </text:span><text:span text:style-name="T6">else</text:span><text:span text:style-name="T13"> </text:span><text:span text:style-name="T39">d0_reg</text:span><text:span text:style-name="T13">;</text:span></text:p>
      <text:p text:style-name="P16"/>
      <text:p text:style-name="P15"><text:span text:style-name="T13"><text:s text:c="8"/></text:span><text:span text:style-name="T39">d0_tick</text:span><text:span text:style-name="T13"> &lt;= </text:span><text:span text:style-name="T34">'1'</text:span><text:span text:style-name="T13"> </text:span><text:span text:style-name="T6">when</text:span><text:span text:style-name="T13"> </text:span><text:span text:style-name="T39">d0_reg</text:span><text:span text:style-name="T13"> = </text:span><text:span text:style-name="T31">9</text:span><text:span text:style-name="T13"> </text:span><text:span text:style-name="T6">else</text:span><text:span text:style-name="T13"> </text:span><text:span text:style-name="T34">'0'</text:span><text:span text:style-name="T13">;</text:span></text:p>
      <text:p text:style-name="P16"/>
      <text:p text:style-name="P15"><text:span text:style-name="T13"><text:s text:c="4"/></text:span><text:span text:style-name="T36">--1 sec counter</text:span></text:p>
      <text:p text:style-name="P15"><text:span text:style-name="T13"><text:s text:c="4"/></text:span><text:span text:style-name="T39">d1_en</text:span><text:span text:style-name="T13"> &lt;= </text:span><text:span text:style-name="T34">'1'</text:span><text:span text:style-name="T13"> </text:span><text:span text:style-name="T6">when</text:span><text:span text:style-name="T13"> </text:span><text:span text:style-name="T39">ms_tick</text:span><text:span text:style-name="T13"> = </text:span><text:span text:style-name="T34">'1'</text:span><text:span text:style-name="T13"> </text:span><text:span text:style-name="T6">and</text:span><text:span text:style-name="T13"> </text:span><text:span text:style-name="T39">d0_tick</text:span><text:span text:style-name="T13"> = </text:span><text:span text:style-name="T34">'1'</text:span><text:span text:style-name="T13"> </text:span><text:span text:style-name="T6">else</text:span><text:span text:style-name="T13"> </text:span><text:span text:style-name="T34">'0'</text:span><text:span text:style-name="T13">;</text:span></text:p>
      <text:p text:style-name="P15"><text:span text:style-name="T13"><text:s text:c="4"/></text:span><text:span text:style-name="T39">d1_next</text:span><text:span text:style-name="T13"> &lt;= </text:span><text:span text:style-name="T34">"0000"</text:span><text:span text:style-name="T13"> </text:span><text:span text:style-name="T6">when</text:span><text:span text:style-name="T13"> (</text:span><text:span text:style-name="T26">clr</text:span><text:span text:style-name="T13"> = </text:span><text:span text:style-name="T34">'1'</text:span><text:span text:style-name="T13">) </text:span><text:span text:style-name="T6">or</text:span><text:span text:style-name="T13"> (</text:span><text:span text:style-name="T39">d1_en</text:span><text:span text:style-name="T13"> = </text:span><text:span text:style-name="T34">'1'</text:span><text:span text:style-name="T13"> </text:span><text:span text:style-name="T6">and</text:span><text:span text:style-name="T13"> </text:span><text:span text:style-name="T39">d1_reg</text:span><text:span text:style-name="T13"> = </text:span><text:span text:style-name="T31">9</text:span><text:span text:style-name="T13">) </text:span><text:span text:style-name="T6">else</text:span></text:p>
      <text:p text:style-name="P15"><text:span text:style-name="T13"><text:s text:c="8"/></text:span><text:span text:style-name="T39">d1_reg</text:span><text:span text:style-name="T13"> </text:span><text:span text:style-name="T14">+</text:span><text:span text:style-name="T13"> </text:span><text:span text:style-name="T31">1</text:span><text:span text:style-name="T13"> </text:span><text:span text:style-name="T6">when</text:span><text:span text:style-name="T13"> </text:span><text:span text:style-name="T39">d1_en</text:span><text:span text:style-name="T13"> = </text:span><text:span text:style-name="T34">'1'</text:span><text:span text:style-name="T13"> </text:span><text:span text:style-name="T6">else</text:span><text:span text:style-name="T13"> </text:span><text:span text:style-name="T39">d1_reg</text:span><text:span text:style-name="T13">;</text:span></text:p>
      <text:p text:style-name="P16"><text:soft-page-break/></text:p>
      <text:p text:style-name="P15"><text:span text:style-name="T13"><text:s text:c="8"/></text:span><text:span text:style-name="T39">d1_tick</text:span><text:span text:style-name="T13"> &lt;= </text:span><text:span text:style-name="T34">'1'</text:span><text:span text:style-name="T13"> </text:span><text:span text:style-name="T6">when</text:span><text:span text:style-name="T13"> </text:span><text:span text:style-name="T39">d1_reg</text:span><text:span text:style-name="T13"> = </text:span><text:span text:style-name="T31">9</text:span><text:span text:style-name="T13"> </text:span><text:span text:style-name="T6">else</text:span><text:span text:style-name="T13"> </text:span><text:span text:style-name="T34">'0'</text:span><text:span text:style-name="T13">;</text:span></text:p>
      <text:p text:style-name="P16"/>
      <text:p text:style-name="P15"><text:span text:style-name="T13"><text:s text:c="4"/></text:span><text:span text:style-name="T36">--10 sec counter</text:span></text:p>
      <text:p text:style-name="P15"><text:span text:style-name="T13"><text:s text:c="4"/></text:span><text:span text:style-name="T39">d2_en</text:span><text:span text:style-name="T13"> &lt;= </text:span><text:span text:style-name="T34">'1'</text:span><text:span text:style-name="T13"> </text:span><text:span text:style-name="T6">when</text:span><text:span text:style-name="T13"> </text:span><text:span text:style-name="T39">ms_tick</text:span><text:span text:style-name="T13"> = </text:span><text:span text:style-name="T34">'1'</text:span><text:span text:style-name="T13"> </text:span><text:span text:style-name="T6">and</text:span><text:span text:style-name="T13"> </text:span><text:span text:style-name="T39">d1_tick</text:span><text:span text:style-name="T13"> = </text:span><text:span text:style-name="T34">'1'</text:span><text:span text:style-name="T13"> </text:span><text:span text:style-name="T6">else</text:span><text:span text:style-name="T13"> </text:span><text:span text:style-name="T34">'0'</text:span><text:span text:style-name="T13">;</text:span></text:p>
      <text:p text:style-name="P15"><text:span text:style-name="T13"><text:s text:c="4"/></text:span><text:span text:style-name="T39">d2_next</text:span><text:span text:style-name="T13"> &lt;= </text:span><text:span text:style-name="T34">"0000"</text:span><text:span text:style-name="T13"> </text:span><text:span text:style-name="T6">when</text:span><text:span text:style-name="T13"> (</text:span><text:span text:style-name="T26">clr</text:span><text:span text:style-name="T13"> = </text:span><text:span text:style-name="T34">'1'</text:span><text:span text:style-name="T13">) </text:span><text:span text:style-name="T6">or</text:span><text:span text:style-name="T13"> (</text:span><text:span text:style-name="T39">d2_en</text:span><text:span text:style-name="T13"> = </text:span><text:span text:style-name="T34">'1'</text:span><text:span text:style-name="T13"> </text:span><text:span text:style-name="T6">and</text:span><text:span text:style-name="T13"> </text:span><text:span text:style-name="T39">d2_reg</text:span><text:span text:style-name="T13"> = </text:span><text:span text:style-name="T31">9</text:span><text:span text:style-name="T13">) </text:span><text:span text:style-name="T6">else</text:span></text:p>
      <text:p text:style-name="P15"><text:span text:style-name="T13"><text:s text:c="8"/></text:span><text:span text:style-name="T39">d2_reg</text:span><text:span text:style-name="T13"> </text:span><text:span text:style-name="T14">+</text:span><text:span text:style-name="T13"> </text:span><text:span text:style-name="T31">1</text:span><text:span text:style-name="T13"> </text:span><text:span text:style-name="T6">when</text:span><text:span text:style-name="T13"> </text:span><text:span text:style-name="T39">d2_en</text:span><text:span text:style-name="T13"> = </text:span><text:span text:style-name="T34">'1'</text:span><text:span text:style-name="T13"> </text:span><text:span text:style-name="T6">else</text:span><text:span text:style-name="T13"> </text:span><text:span text:style-name="T39">d2_reg</text:span><text:span text:style-name="T13">;</text:span></text:p>
      <text:p text:style-name="P16"/>
      <text:p text:style-name="P15"><text:span text:style-name="T13"><text:s text:c="4"/></text:span><text:span text:style-name="T36">--output logic</text:span></text:p>
      <text:p text:style-name="P15"><text:span text:style-name="T13"><text:s text:c="4"/></text:span><text:span text:style-name="T26">d0</text:span><text:span text:style-name="T13"> &lt;= </text:span><text:span text:style-name="T28">std_logic_vector</text:span><text:span text:style-name="T13">(</text:span><text:span text:style-name="T39">d0_reg</text:span><text:span text:style-name="T13">);</text:span></text:p>
      <text:p text:style-name="P15"><text:span text:style-name="T13"><text:s text:c="4"/></text:span><text:span text:style-name="T26">d2</text:span><text:span text:style-name="T13"> &lt;= </text:span><text:span text:style-name="T28">std_logic_vector</text:span><text:span text:style-name="T13">(</text:span><text:span text:style-name="T39">d2_reg</text:span><text:span text:style-name="T13">);</text:span></text:p>
      <text:p text:style-name="P15"><text:span text:style-name="T13"><text:s text:c="4"/></text:span><text:span text:style-name="T26">d1</text:span><text:span text:style-name="T13"> &lt;= </text:span><text:span text:style-name="T28">std_logic_vector</text:span><text:span text:style-name="T13">(</text:span><text:span text:style-name="T39">d1_reg</text:span><text:span text:style-name="T13">);</text:span></text:p>
      <text:p text:style-name="P15"><text:span text:style-name="T6">end</text:span><text:span text:style-name="T13"> </text:span><text:span text:style-name="T22">cascade_arch</text:span><text:span text:style-name="T13">;</text:span></text:p>
      <text:p text:style-name="P16"/>
      <text:p text:style-name="P24">--architecture if_arch of stopwatch is</text:p>
      <text:p text:style-name="P24">-- <text:s text:c="3"/>constant dvsr : integer := 5000000;</text:p>
      <text:p text:style-name="P24">-- <text:s text:c="3"/>signal ms_reg, ms_next: unsigned (22 downto 0);</text:p>
      <text:p text:style-name="P24">-- <text:s text:c="3"/>signal d2_reg, d1_reg, d0_reg: unsigned(3 downto 0);</text:p>
      <text:p text:style-name="P24">-- <text:s text:c="3"/>signal d2_next, d1_next, d0_next: unsigned(3 downto 0);</text:p>
      <text:p text:style-name="P24">-- <text:s text:c="3"/>signal ms_tick: std_logic;</text:p>
      <text:p text:style-name="P24">--begin</text:p>
      <text:p text:style-name="P24">-- <text:s text:c="3"/>--register</text:p>
      <text:p text:style-name="P24">-- <text:s text:c="3"/>process(clk)</text:p>
      <text:p text:style-name="P24">-- <text:s text:c="3"/>begin</text:p>
      <text:p text:style-name="P24">-- <text:s text:c="7"/>if rising_edge(clk) then</text:p>
      <text:p text:style-name="P24">-- <text:s text:c="11"/>ms_reg &lt;= ms_next;</text:p>
      <text:p text:style-name="P24">-- <text:s text:c="11"/>d2_reg &lt;= d2_next;</text:p>
      <text:p text:style-name="P24">-- <text:s text:c="11"/>d1_reg &lt;= d1_next;</text:p>
      <text:p text:style-name="P24">-- <text:s text:c="11"/>d0_reg &lt;= d0_next;</text:p>
      <text:p text:style-name="P24">-- <text:s text:c="7"/>end if;</text:p>
      <text:p text:style-name="P24">-- <text:s text:c="3"/>end process; <text:s text:c="11"/></text:p>
      <text:p text:style-name="P24">-- <text:s text:c="3"/></text:p>
      <text:p text:style-name="P24">-- <text:s text:c="3"/>ms_next &lt;= (others =&gt; '0') when clr = '1' or (ms_reg = dvsr and go = '1') else</text:p>
      <text:p text:style-name="P24">-- <text:s text:c="19"/>ms_reg + 1 when go = '1' else</text:p>
      <text:p text:style-name="P24">-- <text:s text:c="19"/>ms_reg;</text:p>
      <text:p text:style-name="P24">-- <text:s text:c="3"/></text:p>
      <text:p text:style-name="P24">-- <text:s text:c="3"/>ms_tick &lt;= '1' when ms_reg = dvsr else '0';</text:p>
      <text:p text:style-name="P24">-- <text:s text:c="3"/></text:p>
      <text:p text:style-name="P24">-- <text:s text:c="3"/>--3-digit incrementor</text:p>
      <text:p text:style-name="P24">-- <text:s text:c="3"/>process(d0_reg, d1_reg, d2_reg, ms_tick, clr)</text:p>
      <text:p text:style-name="P24">-- <text:s text:c="3"/>begin <text:s text:c="3"/></text:p>
      <text:p text:style-name="P24">-- <text:s text:c="7"/>--default</text:p>
      <text:p text:style-name="P24">-- <text:s text:c="7"/>d0_next &lt;= d0_reg;</text:p>
      <text:p text:style-name="P24">-- <text:s text:c="7"/>d1_next &lt;= d1_reg;</text:p>
      <text:p text:style-name="P24">-- <text:s text:c="7"/>d2_next &lt;= d2_reg;</text:p>
      <text:p text:style-name="P24">-- <text:s text:c="7"/>if clr = '1' then</text:p>
      <text:p text:style-name="P24">-- <text:s text:c="11"/>d0_next &lt;= "0000";</text:p>
      <text:p text:style-name="P24">-- <text:s text:c="11"/>d0_next &lt;= "0000";</text:p>
      <text:p text:style-name="P24">-- <text:s text:c="11"/>d0_next &lt;= "0000";</text:p>
      <text:p text:style-name="P24">-- <text:s text:c="7"/>elsif ms_tick = '1' then</text:p>
      <text:p text:style-name="P24"><text:soft-page-break/>-- <text:s text:c="11"/>if(d0_reg /= 9) then</text:p>
      <text:p text:style-name="P24">-- <text:s text:c="15"/>d0_next &lt;= d0_reg + 1;</text:p>
      <text:p text:style-name="P24">-- <text:s text:c="11"/>else -- reach XX9</text:p>
      <text:p text:style-name="P24">-- <text:s text:c="15"/>d0_next &lt;= "0000";</text:p>
      <text:p text:style-name="P24">-- <text:s text:c="11"/>if(d1_reg /= 9) then</text:p>
      <text:p text:style-name="P24">-- <text:s text:c="15"/>d1_next &lt;= d1_reg + 1;</text:p>
      <text:p text:style-name="P24">-- <text:s text:c="11"/>else -- reach X99</text:p>
      <text:p text:style-name="P24">-- <text:s text:c="15"/>d1_next &lt;= "0000";</text:p>
      <text:p text:style-name="P24">-- <text:s text:c="15"/>if(d2_reg /= 9) then</text:p>
      <text:p text:style-name="P24">-- <text:s text:c="19"/>d2_next &lt;= d2_reg + 1;</text:p>
      <text:p text:style-name="P24">-- <text:s text:c="15"/>else -- reach 999</text:p>
      <text:p text:style-name="P24">-- <text:s text:c="19"/>d2_next &lt;= "0000";</text:p>
      <text:p text:style-name="P24">-- <text:s text:c="15"/>end if;</text:p>
      <text:p text:style-name="P24">-- <text:s text:c="11"/>end if;</text:p>
      <text:p text:style-name="P24">-- <text:s text:c="11"/>end if;</text:p>
      <text:p text:style-name="P24">-- <text:s text:c="7"/>end if;</text:p>
      <text:p text:style-name="P24">-- <text:s text:c="3"/>end process;</text:p>
      <text:p text:style-name="P24">-- <text:s text:c="3"/></text:p>
      <text:p text:style-name="P24">-- <text:s text:c="3"/>--output logic</text:p>
      <text:p text:style-name="P24">-- <text:s text:c="3"/>d0 &lt;= std_logic_vector(d0_reg);</text:p>
      <text:p text:style-name="P24">-- <text:s text:c="3"/>d2 &lt;= std_logic_vector(d2_reg);</text:p>
      <text:p text:style-name="P24">-- <text:s text:c="3"/>d1 &lt;= std_logic_vector(d1_reg);</text:p>
      <text:p text:style-name="P24">--end if_arch; <text:s text:c="3"/></text:p>
      <text:p text:style-name="P24">-- <text:s text:c="7"/></text:p>
      <text:p text:style-name="P24">-- <text:s text:c="15"/></text:p>
      <text:p text:style-name="P24">-- <text:s text:c="3"/></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oft-page-break/><text:span text:style-name="T3">FIFO</text:span></text:p>
      <text:p text:style-name="P24">--A FIFO buffer is an elastic storage between two subsystems. It has two control </text:p>
      <text:p text:style-name="P24">--signals, wr and rd for write and read operations. When wr is asserted, the input</text:p>
      <text:p text:style-name="P24">--data is written into the buffer. The head of the FIFO buffer is normally always</text:p>
      <text:p text:style-name="P24">--available to read at any time. The rd signal actually acts a remove signal. When</text:p>
      <text:p text:style-name="P24">--it is asserted the first item is removed of the buffer and the next item becomes</text:p>
      <text:p text:style-name="P24">--available. </text:p>
      <text:p text:style-name="P24">-- </text:p>
      <text:p text:style-name="P24">--The registers in the register file are arranges as a circular queue with two pointers. </text:p>
      <text:p text:style-name="P24">--The write pointer points to the head of the queue, and the read pointer points to the </text:p>
      <text:p text:style-name="P24">--tail of the queue. The pointer advances one position for each write or read operation. </text:p>
      <text:p text:style-name="P24">--Two status signals, full and empty, are used to indicate the buffer is full and cant be</text:p>
      <text:p text:style-name="P24">--written or empty and cant be read. One of the two conditions occurs when both signals </text:p>
      <text:p text:style-name="P24">--are equal. </text:p>
      <text:p text:style-name="P24">-- </text:p>
      <text:p text:style-name="P24">--One scheme to distinguish between conditions is to use two ffs to keep track of the empty </text:p>
      <text:p text:style-name="P24">--and full statuses. These ffs are set to '1' and '0' during system initialization and <text:s/>then </text:p>
      <text:p text:style-name="P24">--modified in each clock cycle according to the values of the wr and rd signals. </text:p>
      <text:p text:style-name="P24">--</text:p>
      <text:p text:style-name="P24">--The code is divided into a register file and a fifo controller. Considering the ???10??? case, </text:p>
      <text:p text:style-name="P24">--which implies that only a write operation occurs. The status ff is checked first to ensure </text:p>
      <text:p text:style-name="P24">--that the buffer is not full. If the condition is met, we advance the write pointer by one </text:p>
      <text:p text:style-name="P24">--position and clear the empty status ff. Storing one extra word to the buffer may make it full. </text:p>
      <text:p text:style-name="P24">--This happens if the new write pointer ???catches??? the read pointer, which is expressed by the </text:p>
      <text:p text:style-name="P24">--w_ptr_succ = r_ptr_reg expression. </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fifo</text:span><text:span text:style-name="T13"> </text:span><text:span text:style-name="T6">is</text:span><text:span text:style-name="T13"> </text:span></text:p>
      <text:p text:style-name="P15"><text:span text:style-name="T13"><text:s text:c="4"/></text:span><text:span text:style-name="T6">generic</text:span><text:span text:style-name="T13">( </text:span><text:span text:style-name="T7">b</text:span><text:span text:style-name="T13">: </text:span><text:span text:style-name="T28">natural</text:span><text:span text:style-name="T13"> := </text:span><text:span text:style-name="T31">8</text:span><text:span text:style-name="T13">; </text:span><text:span text:style-name="T36">-- number of bits</text:span></text:p>
      <text:p text:style-name="P15"><text:span text:style-name="T13"><text:s text:c="16"/></text:span><text:span text:style-name="T7">w</text:span><text:span text:style-name="T13">: </text:span><text:span text:style-name="T28">natural</text:span><text:span text:style-name="T13"> := </text:span><text:span text:style-name="T31">4</text:span><text:span text:style-name="T13">); </text:span><text:span text:style-name="T36">-- number of address bits</text:span></text:p>
      <text:p text:style-name="P15"><text:span text:style-name="T13"><text:s text:c="4"/></text:span><text:span text:style-name="T6">port</text:span><text:span text:style-name="T13">( </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12"/></text:span><text:span text:style-name="T26">rd</text:span><text:span text:style-name="T13">, </text:span><text:span text:style-name="T26">wr</text:span><text:span text:style-name="T13">: </text:span><text:span text:style-name="T6">in</text:span><text:span text:style-name="T13"> </text:span><text:span text:style-name="T28">std_logic</text:span><text:span text:style-name="T13">;</text:span></text:p>
      <text:p text:style-name="P15"><text:span text:style-name="T13"><text:s text:c="12"/></text:span><text:span text:style-name="T26">w_data</text:span><text:span text:style-name="T13">: </text:span><text:span text:style-name="T6">in</text:span><text:span text:style-name="T13"> </text:span><text:span text:style-name="T28">std_logic_vector</text:span><text:span text:style-name="T13">(</text:span><text:span text:style-name="T7">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2"/></text:span><text:span text:style-name="T26">r_data</text:span><text:span text:style-name="T13">: </text:span><text:span text:style-name="T6">out</text:span><text:span text:style-name="T13"> </text:span><text:span text:style-name="T28">std_logic_vector</text:span><text:span text:style-name="T13">(</text:span><text:span text:style-name="T7">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2"/></text:span><text:span text:style-name="T26">empty</text:span><text:span text:style-name="T13">, </text:span><text:span text:style-name="T26">full</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fifo</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fifo</text:span><text:span text:style-name="T13"> </text:span><text:span text:style-name="T6">is</text:span><text:span text:style-name="T13"> </text:span></text:p>
      <text:p text:style-name="P15"><text:span text:style-name="T13"><text:s text:c="4"/></text:span><text:span text:style-name="T6">type</text:span><text:span text:style-name="T13"> </text:span><text:span text:style-name="T28">reg_file_type</text:span><text:span text:style-name="T13"> </text:span><text:span text:style-name="T6">is</text:span><text:span text:style-name="T13"> </text:span><text:span text:style-name="T6">array</text:span><text:span text:style-name="T13"> (</text:span><text:span text:style-name="T31">2</text:span><text:span text:style-name="T14">**</text:span><text:span text:style-name="T7">w</text:span><text:span text:style-name="T13"> </text:span><text:span text:style-name="T14">-</text:span><text:span text:style-name="T31">1</text:span><text:span text:style-name="T13"> </text:span><text:span text:style-name="T6">downto</text:span><text:span text:style-name="T13"> </text:span><text:span text:style-name="T31">0</text:span><text:span text:style-name="T13">) </text:span><text:span text:style-name="T6">of</text:span><text:span text:style-name="T13"> </text:span><text:span text:style-name="T28">std_logic_vector</text:span><text:span text:style-name="T13">(</text:span><text:span text:style-name="T7">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array_reg</text:span><text:span text:style-name="T13"> : </text:span><text:span text:style-name="T28">reg_file_type</text:span><text:span text:style-name="T13">;</text:span></text:p>
      <text:p text:style-name="P15"><text:span text:style-name="T13"><text:s text:c="4"/></text:span><text:span text:style-name="T6">signal</text:span><text:span text:style-name="T13"> </text:span><text:span text:style-name="T39">w_ptr_reg</text:span><text:span text:style-name="T13">, </text:span><text:span text:style-name="T39">w_ptr_next</text:span><text:span text:style-name="T13">, </text:span><text:span text:style-name="T39">w_ptr_succ</text:span><text:span text:style-name="T13"> : </text:span><text:span text:style-name="T28">std_logic_vector</text:span><text:span text:style-name="T13"> (</text:span><text:span text:style-name="T7">w</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r_ptr_reg</text:span><text:span text:style-name="T13">, </text:span><text:span text:style-name="T39">r_ptr_next</text:span><text:span text:style-name="T13">, </text:span><text:span text:style-name="T39">r_ptr_succ</text:span><text:span text:style-name="T13"> : </text:span><text:span text:style-name="T28">std_logic_vector</text:span><text:span text:style-name="T13"> (</text:span><text:span text:style-name="T7">w</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full_reg</text:span><text:span text:style-name="T13">, </text:span><text:span text:style-name="T39">empty_reg</text:span><text:span text:style-name="T13">, </text:span><text:span text:style-name="T39">full_next</text:span><text:span text:style-name="T13">, </text:span><text:span text:style-name="T39">empty_next</text:span><text:span text:style-name="T13">, </text:span><text:span text:style-name="T39">wr_en</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wr_op</text:span><text:span text:style-name="T13">: </text:span><text:span text:style-name="T28">std_logic_vector</text:span><text:span text:style-name="T13">(</text:span><text:span text:style-name="T31">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6">--register file</text:span></text:p>
      <text:p text:style-name="P15"><text:soft-page-break/><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array_reg</text:span><text:span text:style-name="T13"> &lt;= (</text:span><text:span text:style-name="T6">others</text:span><text:span text:style-name="T13"> =&g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wr_en</text:span><text:span text:style-name="T13"> = </text:span><text:span text:style-name="T34">'1'</text:span><text:span text:style-name="T13"> </text:span><text:span text:style-name="T6">then</text:span></text:p>
      <text:p text:style-name="P15"><text:span text:style-name="T13"><text:s text:c="16"/></text:span><text:span text:style-name="T39">array_reg</text:span><text:span text:style-name="T13">(</text:span><text:span text:style-name="T14">to_integer</text:span><text:span text:style-name="T13">(</text:span><text:span text:style-name="T28">unsigned</text:span><text:span text:style-name="T13">(</text:span><text:span text:style-name="T39">w_ptr_reg</text:span><text:span text:style-name="T13">))) &lt;= </text:span><text:span text:style-name="T26">w_data</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read port</text:span></text:p>
      <text:p text:style-name="P15"><text:span text:style-name="T13"><text:s text:c="4"/></text:span><text:span text:style-name="T26">r_data</text:span><text:span text:style-name="T13"> &lt;= </text:span><text:span text:style-name="T39">array_reg</text:span><text:span text:style-name="T13">(</text:span><text:span text:style-name="T14">to_integer</text:span><text:span text:style-name="T13">(</text:span><text:span text:style-name="T28">unsigned</text:span><text:span text:style-name="T13">(</text:span><text:span text:style-name="T39">r_ptr_reg</text:span><text:span text:style-name="T13">)));</text:span></text:p>
      <text:p text:style-name="P15"><text:span text:style-name="T13"><text:s text:c="4"/></text:span><text:span text:style-name="T36">--write enabled only when fifo is not full</text:span></text:p>
      <text:p text:style-name="P15"><text:span text:style-name="T13"><text:s text:c="4"/></text:span><text:span text:style-name="T39">wr_en</text:span><text:span text:style-name="T13"> &lt;= </text:span><text:span text:style-name="T26">wr</text:span><text:span text:style-name="T13"> </text:span><text:span text:style-name="T6">and</text:span><text:span text:style-name="T13"> (</text:span><text:span text:style-name="T6">not</text:span><text:span text:style-name="T13"> </text:span><text:span text:style-name="T39">full_reg</text:span><text:span text:style-name="T13">);</text:span></text:p>
      <text:p text:style-name="P16"/>
      <text:p text:style-name="P15"><text:span text:style-name="T13"><text:s text:c="4"/></text:span><text:span text:style-name="T36">--fifo control logic</text:span></text:p>
      <text:p text:style-name="P15"><text:span text:style-name="T13"><text:s text:c="4"/></text:span><text:span text:style-name="T36">--register for read and write pointers</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text:span><text:span text:style-name="T26">rst</text:span><text:span text:style-name="T13"> = </text:span><text:span text:style-name="T34">'1'</text:span><text:span text:style-name="T13">)</text:span><text:span text:style-name="T6">then</text:span></text:p>
      <text:p text:style-name="P15"><text:span text:style-name="T13"><text:s text:c="12"/></text:span><text:span text:style-name="T39">w_ptr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r_ptr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full_reg</text:span><text:span text:style-name="T13"> &lt;= </text:span><text:span text:style-name="T34">'0'</text:span><text:span text:style-name="T13">;</text:span></text:p>
      <text:p text:style-name="P15"><text:span text:style-name="T13"><text:s text:c="12"/></text:span><text:span text:style-name="T39">empty_reg</text:span><text:span text:style-name="T13"> &lt;= </text:span><text:span text:style-name="T34">'1'</text:span><text:span text:style-name="T13">;</text:span></text:p>
      <text:p text:style-name="P16"/>
      <text:p text:style-name="P15"><text:span text:style-name="T13"><text:s text:c="8"/></text:span><text:span text:style-name="T6">elsif</text:span><text:span text:style-name="T13"> </text:span><text:span text:style-name="T14">rising_edge</text:span><text:span text:style-name="T13">(</text:span><text:span text:style-name="T26">clk</text:span><text:span text:style-name="T13">)</text:span><text:span text:style-name="T6">then</text:span></text:p>
      <text:p text:style-name="P15"><text:span text:style-name="T13"><text:s text:c="12"/></text:span><text:span text:style-name="T39">w_ptr_reg</text:span><text:span text:style-name="T13"> &lt;= </text:span><text:span text:style-name="T39">w_ptr_next</text:span><text:span text:style-name="T13">;</text:span></text:p>
      <text:p text:style-name="P15"><text:span text:style-name="T13"><text:s text:c="12"/></text:span><text:span text:style-name="T39">r_ptr_reg</text:span><text:span text:style-name="T13"> &lt;= </text:span><text:span text:style-name="T39">r_ptr_next</text:span><text:span text:style-name="T13">;</text:span></text:p>
      <text:p text:style-name="P15"><text:span text:style-name="T13"><text:s text:c="12"/></text:span><text:span text:style-name="T39">full_reg</text:span><text:span text:style-name="T13"> &lt;= </text:span><text:span text:style-name="T39">full_next</text:span><text:span text:style-name="T13">;</text:span></text:p>
      <text:p text:style-name="P15"><text:span text:style-name="T13"><text:s text:c="12"/></text:span><text:span text:style-name="T39">empty_reg</text:span><text:span text:style-name="T13"> &lt;= </text:span><text:span text:style-name="T39">empty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successive pointer values</text:span></text:p>
      <text:p text:style-name="P15"><text:span text:style-name="T13"><text:s text:c="4"/></text:span><text:span text:style-name="T39">w_ptr_succ</text:span><text:span text:style-name="T13"> &lt;= </text:span><text:span text:style-name="T28">std_logic_vector</text:span><text:span text:style-name="T13">(</text:span><text:span text:style-name="T28">unsigned</text:span><text:span text:style-name="T13">(</text:span><text:span text:style-name="T39">w_ptr_reg</text:span><text:span text:style-name="T13">) </text:span><text:span text:style-name="T14">+</text:span><text:span text:style-name="T13"> </text:span><text:span text:style-name="T31">1</text:span><text:span text:style-name="T13">);</text:span></text:p>
      <text:p text:style-name="P15"><text:span text:style-name="T13"><text:s text:c="4"/></text:span><text:span text:style-name="T39">r_ptr_succ</text:span><text:span text:style-name="T13"> &lt;= </text:span><text:span text:style-name="T28">std_logic_vector</text:span><text:span text:style-name="T13">(</text:span><text:span text:style-name="T28">unsigned</text:span><text:span text:style-name="T13">(</text:span><text:span text:style-name="T39">r_ptr_reg</text:span><text:span text:style-name="T13">) </text:span><text:span text:style-name="T14">+</text:span><text:span text:style-name="T13"> </text:span><text:span text:style-name="T31">1</text:span><text:span text:style-name="T13">);</text:span></text:p>
      <text:p text:style-name="P16"/>
      <text:p text:style-name="P15"><text:span text:style-name="T13"><text:s text:c="4"/></text:span><text:span text:style-name="T36">--next state logic for read and write pointers</text:span></text:p>
      <text:p text:style-name="P15"><text:span text:style-name="T13"><text:s text:c="4"/></text:span><text:span text:style-name="T39">wr_op</text:span><text:span text:style-name="T13"> &lt;= </text:span><text:span text:style-name="T26">wr</text:span><text:span text:style-name="T13"> </text:span><text:span text:style-name="T14">&amp;</text:span><text:span text:style-name="T13"> </text:span><text:span text:style-name="T26">rd</text:span><text:span text:style-name="T13">;</text:span></text:p>
      <text:p text:style-name="P15"><text:span text:style-name="T13"><text:s text:c="4"/></text:span><text:span text:style-name="T6">process</text:span><text:span text:style-name="T13">(</text:span><text:span text:style-name="T39">w_ptr_reg</text:span><text:span text:style-name="T13">, </text:span><text:span text:style-name="T39">w_ptr_succ</text:span><text:span text:style-name="T13">, </text:span><text:span text:style-name="T39">r_ptr_reg</text:span><text:span text:style-name="T13">, </text:span><text:span text:style-name="T39">r_ptr_succ</text:span><text:span text:style-name="T13">, </text:span><text:span text:style-name="T39">wr_op</text:span><text:span text:style-name="T13">, </text:span><text:span text:style-name="T39">empty_reg</text:span><text:span text:style-name="T13">, </text:span><text:span text:style-name="T39">full_reg</text:span><text:span text:style-name="T13">)</text:span></text:p>
      <text:p text:style-name="P15"><text:span text:style-name="T13"><text:s text:c="4"/></text:span><text:span text:style-name="T6">begin</text:span></text:p>
      <text:p text:style-name="P15"><text:span text:style-name="T13"><text:s text:c="8"/></text:span><text:span text:style-name="T39">w_ptr_next</text:span><text:span text:style-name="T13"> &lt;= </text:span><text:span text:style-name="T39">w_ptr_reg</text:span><text:span text:style-name="T13">;</text:span></text:p>
      <text:p text:style-name="P15"><text:span text:style-name="T13"><text:s text:c="8"/></text:span><text:span text:style-name="T39">r_ptr_next</text:span><text:span text:style-name="T13"> &lt;= </text:span><text:span text:style-name="T39">r_ptr_reg</text:span><text:span text:style-name="T13">;</text:span></text:p>
      <text:p text:style-name="P15"><text:span text:style-name="T13"><text:s text:c="8"/></text:span><text:span text:style-name="T39">full_next</text:span><text:span text:style-name="T13"> &lt;= </text:span><text:span text:style-name="T39">full_reg</text:span><text:span text:style-name="T13">;</text:span></text:p>
      <text:p text:style-name="P15"><text:span text:style-name="T13"><text:s text:c="8"/></text:span><text:span text:style-name="T39">empty_next</text:span><text:span text:style-name="T13"> &lt;= </text:span><text:span text:style-name="T39">empty_reg</text:span><text:span text:style-name="T13">;</text:span></text:p>
      <text:p text:style-name="P16"/>
      <text:p text:style-name="P15"><text:span text:style-name="T13"><text:s text:c="8"/></text:span><text:span text:style-name="T6">case</text:span><text:span text:style-name="T13"> </text:span><text:span text:style-name="T39">wr_op</text:span><text:span text:style-name="T13"> </text:span><text:span text:style-name="T6">is</text:span></text:p>
      <text:p text:style-name="P15"><text:span text:style-name="T13"><text:s text:c="12"/></text:span><text:span text:style-name="T6">when</text:span><text:span text:style-name="T13"> </text:span><text:span text:style-name="T34">"00"</text:span><text:span text:style-name="T13"> =&gt; </text:span><text:span text:style-name="T36">--no op</text:span></text:p>
      <text:p text:style-name="P15"><text:span text:style-name="T13"><text:s text:c="12"/></text:span><text:span text:style-name="T6">when</text:span><text:span text:style-name="T13"> </text:span><text:span text:style-name="T34">"01"</text:span><text:span text:style-name="T13"> =&gt; </text:span><text:span text:style-name="T36">--read</text:span></text:p>
      <text:p text:style-name="P15"><text:soft-page-break/><text:span text:style-name="T13"><text:s text:c="16"/></text:span><text:span text:style-name="T6">if</text:span><text:span text:style-name="T13">(</text:span><text:span text:style-name="T39">empty_reg</text:span><text:span text:style-name="T13"> /= </text:span><text:span text:style-name="T34">'1'</text:span><text:span text:style-name="T13">) </text:span><text:span text:style-name="T6">then</text:span><text:span text:style-name="T13"> </text:span><text:span text:style-name="T36">--not empty</text:span></text:p>
      <text:p text:style-name="P15"><text:span text:style-name="T13"><text:s text:c="20"/></text:span><text:span text:style-name="T39">r_ptr_next</text:span><text:span text:style-name="T13"> &lt;= </text:span><text:span text:style-name="T39">r_ptr_succ</text:span><text:span text:style-name="T13">;</text:span></text:p>
      <text:p text:style-name="P15"><text:span text:style-name="T13"><text:s text:c="20"/></text:span><text:span text:style-name="T39">full_next</text:span><text:span text:style-name="T13"> &lt;= </text:span><text:span text:style-name="T34">'0'</text:span><text:span text:style-name="T13">;</text:span></text:p>
      <text:p text:style-name="P15"><text:span text:style-name="T13"><text:s text:c="20"/></text:span><text:span text:style-name="T6">if</text:span><text:span text:style-name="T13">(</text:span><text:span text:style-name="T39">r_ptr_succ</text:span><text:span text:style-name="T13"> = </text:span><text:span text:style-name="T39">w_ptr_succ</text:span><text:span text:style-name="T13">) </text:span><text:span text:style-name="T6">then</text:span></text:p>
      <text:p text:style-name="P15"><text:span text:style-name="T13"><text:s text:c="24"/></text:span><text:span text:style-name="T39">empty_next</text:span><text:span text:style-name="T13"> &lt;= </text:span><text:span text:style-name="T34">'1'</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when</text:span><text:span text:style-name="T13"> </text:span><text:span text:style-name="T34">"10"</text:span><text:span text:style-name="T13"> =&gt; </text:span><text:span text:style-name="T36">-- write</text:span></text:p>
      <text:p text:style-name="P15"><text:span text:style-name="T13"><text:s text:c="16"/></text:span><text:span text:style-name="T6">if</text:span><text:span text:style-name="T13">(</text:span><text:span text:style-name="T39">full_reg</text:span><text:span text:style-name="T13"> /= </text:span><text:span text:style-name="T34">'1'</text:span><text:span text:style-name="T13">) </text:span><text:span text:style-name="T6">then</text:span><text:span text:style-name="T13"> </text:span><text:span text:style-name="T36">--not full</text:span></text:p>
      <text:p text:style-name="P15"><text:span text:style-name="T13"><text:s text:c="20"/></text:span><text:span text:style-name="T39">w_ptr_next</text:span><text:span text:style-name="T13"> &lt;= </text:span><text:span text:style-name="T39">w_ptr_succ</text:span><text:span text:style-name="T13">;</text:span></text:p>
      <text:p text:style-name="P15"><text:span text:style-name="T13"><text:s text:c="20"/></text:span><text:span text:style-name="T39">empty_next</text:span><text:span text:style-name="T13"> &lt;= </text:span><text:span text:style-name="T34">'0'</text:span><text:span text:style-name="T13">;</text:span></text:p>
      <text:p text:style-name="P15"><text:span text:style-name="T13"><text:s text:c="20"/></text:span><text:span text:style-name="T6">if</text:span><text:span text:style-name="T13"> (</text:span><text:span text:style-name="T39">w_ptr_succ</text:span><text:span text:style-name="T13"> = </text:span><text:span text:style-name="T39">r_ptr_reg</text:span><text:span text:style-name="T13">) </text:span><text:span text:style-name="T6">then</text:span></text:p>
      <text:p text:style-name="P15"><text:span text:style-name="T13"><text:s text:c="24"/></text:span><text:span text:style-name="T39">full_next</text:span><text:span text:style-name="T13"> &lt;= </text:span><text:span text:style-name="T34">'1'</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when</text:span><text:span text:style-name="T13"> </text:span><text:span text:style-name="T6">others</text:span><text:span text:style-name="T13"> =&gt; </text:span><text:span text:style-name="T36">-- write/read</text:span></text:p>
      <text:p text:style-name="P15"><text:span text:style-name="T13"><text:s text:c="16"/></text:span><text:span text:style-name="T39">w_ptr_next</text:span><text:span text:style-name="T13"> &lt;= </text:span><text:span text:style-name="T39">w_ptr_succ</text:span><text:span text:style-name="T13">;</text:span></text:p>
      <text:p text:style-name="P15"><text:span text:style-name="T13"><text:s text:c="16"/></text:span><text:span text:style-name="T39">r_ptr_next</text:span><text:span text:style-name="T13"> &lt;= </text:span><text:span text:style-name="T39">r_ptr_succ</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output</text:span></text:p>
      <text:p text:style-name="P15"><text:span text:style-name="T13"><text:s text:c="4"/></text:span><text:span text:style-name="T26">full</text:span><text:span text:style-name="T13"> &lt;= </text:span><text:span text:style-name="T39">full_reg</text:span><text:span text:style-name="T13">;</text:span></text:p>
      <text:p text:style-name="P15"><text:span text:style-name="T13"><text:s text:c="4"/></text:span><text:span text:style-name="T26">empty</text:span><text:span text:style-name="T13"> &lt;= </text:span><text:span text:style-name="T39">empty_reg</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text:span text:style-name="T3">FIFO -TESTBENCH</text:span></text:p>
      <text:p text:style-name="P16"><text:span text:style-name="T11">library</text:span> <text:span text:style-name="T21">ieee</text:span>;</text:p>
      <text:p text:style-name="P15"><text:span text:style-name="T13"><text:s text:c="4"/></text:span><text:span text:style-name="T6">use</text:span><text:span text:style-name="T13"> </text:span><text:span text:style-name="T22">ieee</text:span><text:span text:style-name="T13">. </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fifo_tb</text:span><text:span text:style-name="T13"> </text:span><text:span text:style-name="T6">is</text:span></text:p>
      <text:p text:style-name="P15"><text:span text:style-name="T13"><text:s text:c="4"/></text:span><text:span text:style-name="T6">generic</text:span><text:span text:style-name="T13">( </text:span><text:span text:style-name="T7">b</text:span><text:span text:style-name="T13">: </text:span><text:span text:style-name="T28">natural</text:span><text:span text:style-name="T13"> := </text:span><text:span text:style-name="T31">8</text:span><text:span text:style-name="T13">; </text:span><text:span text:style-name="T36">-- number of bits</text:span></text:p>
      <text:p text:style-name="P15"><text:span text:style-name="T13"><text:s text:c="13"/></text:span><text:span text:style-name="T7">w</text:span><text:span text:style-name="T13">: </text:span><text:span text:style-name="T28">natural</text:span><text:span text:style-name="T13"> := </text:span><text:span text:style-name="T31">4</text:span><text:span text:style-name="T13">); </text:span><text:span text:style-name="T36">-- number of address bit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_tb</text:span><text:span text:style-name="T13"> </text:span><text:span text:style-name="T6">of</text:span><text:span text:style-name="T13"> </text:span><text:span text:style-name="T22">fifo_tb</text:span><text:span text:style-name="T13"> </text:span><text:span text:style-name="T6">is</text:span></text:p>
      <text:p text:style-name="P15"><text:span text:style-name="T13"><text:s text:c="4"/></text:span><text:span text:style-name="T6">signal</text:span><text:span text:style-name="T13"> </text:span><text:span text:style-name="T39">clk</text:span><text:span text:style-name="T13">, </text:span><text:span text:style-name="T39">rst</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rd</text:span><text:span text:style-name="T13">, </text:span><text:span text:style-name="T39">wr</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w_data</text:span><text:span text:style-name="T13">: </text:span><text:span text:style-name="T28">std_logic_vector</text:span><text:span text:style-name="T13">(</text:span><text:span text:style-name="T7">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r_data</text:span><text:span text:style-name="T13">: </text:span><text:span text:style-name="T28">std_logic_vector</text:span><text:span text:style-name="T13">(</text:span><text:span text:style-name="T7">b</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empty</text:span><text:span text:style-name="T13">, </text:span><text:span text:style-name="T39">full</text:span><text:span text:style-name="T13">: </text:span><text:span text:style-name="T28">std_logic</text:span><text:span text:style-name="T13">;</text:span></text:p>
      <text:p text:style-name="P15"><text:span text:style-name="T13"><text:s text:c="4"/></text:span><text:span text:style-name="T6">constant</text:span><text:span text:style-name="T13"> </text:span><text:span text:style-name="T7">t</text:span><text:span text:style-name="T13"> : </text:span><text:span text:style-name="T28">time</text:span><text:span text:style-name="T13"> := </text:span><text:span text:style-name="T31">100</text:span><text:span text:style-name="T13"> </text:span><text:span text:style-name="T7">ps</text:span><text:span text:style-name="T13">;</text:span></text:p>
      <text:p text:style-name="P23">begin</text:p>
      <text:p text:style-name="P15"><text:span text:style-name="T13"><text:s text:c="4"/></text:span><text:span text:style-name="T38">fifo_unit</text:span><text:span text:style-name="T13">: </text:span><text:span text:style-name="T6">entity</text:span><text:span text:style-name="T13"> </text:span><text:span text:style-name="T22">work</text:span><text:span text:style-name="T13">.</text:span><text:span text:style-name="T22">fifo</text:span><text:span text:style-name="T13">(</text:span><text:span text:style-name="T22">arch</text:span><text:span text:style-name="T13">)</text:span></text:p>
      <text:p text:style-name="P15"><text:span text:style-name="T13"><text:s text:c="8"/></text:span><text:span text:style-name="T6">port</text:span><text:span text:style-name="T13"> </text:span><text:span text:style-name="T6">map</text:span><text:span text:style-name="T13">( </text:span><text:span text:style-name="T26">clk</text:span><text:span text:style-name="T13"> =&gt; </text:span><text:span text:style-name="T39">clk</text:span><text:span text:style-name="T13">, </text:span><text:span text:style-name="T26">rst</text:span><text:span text:style-name="T13"> =&gt; </text:span><text:span text:style-name="T39">rst</text:span><text:span text:style-name="T13">, </text:span><text:span text:style-name="T26">rd</text:span><text:span text:style-name="T13"> =&gt; </text:span><text:span text:style-name="T39">rd</text:span><text:span text:style-name="T13">, </text:span><text:span text:style-name="T26">wr</text:span><text:span text:style-name="T13"> =&gt; </text:span><text:span text:style-name="T39">wr</text:span><text:span text:style-name="T13">, </text:span></text:p>
      <text:p text:style-name="P15"><text:span text:style-name="T13"><text:s text:c="18"/></text:span><text:span text:style-name="T26">w_data</text:span><text:span text:style-name="T13"> =&gt; </text:span><text:span text:style-name="T39">w_data</text:span><text:span text:style-name="T13">, </text:span><text:span text:style-name="T26">r_data</text:span><text:span text:style-name="T13"> =&gt; </text:span><text:span text:style-name="T39">r_data</text:span><text:span text:style-name="T13">, </text:span><text:span text:style-name="T26">empty</text:span><text:span text:style-name="T13"> =&gt; </text:span><text:span text:style-name="T39">empty</text:span><text:span text:style-name="T13">,</text:span></text:p>
      <text:p text:style-name="P15"><text:span text:style-name="T13"><text:s text:c="18"/></text:span><text:span text:style-name="T26">full</text:span><text:span text:style-name="T13"> =&gt; </text:span><text:span text:style-name="T39">full</text:span><text:span text:style-name="T13">);</text:span></text:p>
      <text:p text:style-name="P15"><text:soft-page-break/><text:span text:style-name="T13"><text:s text:c="4"/></text:span><text:span text:style-name="T6">process</text:span><text:span text:style-name="T13"> </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1'</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4">/</text:span><text:span text:style-name="T31">2</text:span><text:span text:style-name="T13">;</text:span></text:p>
      <text:p text:style-name="P15"><text:span text:style-name="T13"><text:s text:c="8"/></text:span><text:span text:style-name="T39">clk</text:span><text:span text:style-name="T13"> &lt;= </text:span><text:span text:style-name="T34">'0'</text:span><text:span text:style-name="T13">;</text:span></text:p>
      <text:p text:style-name="P15"><text:span text:style-name="T13"><text:s text:c="8"/></text:span><text:span text:style-name="T6">wait</text:span><text:span text:style-name="T13"> </text:span><text:span text:style-name="T6">for</text:span><text:span text:style-name="T13"> </text:span><text:span text:style-name="T7">t</text:span><text:span text:style-name="T14">/</text:span><text:span text:style-name="T31">2</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p>
      <text:p text:style-name="P15"><text:span text:style-name="T13"><text:s text:c="4"/></text:span><text:span text:style-name="T6">begin</text:span></text:p>
      <text:p text:style-name="P16"/>
      <text:p text:style-name="P15"><text:span text:style-name="T13"><text:s text:c="8"/></text:span><text:span text:style-name="T39">rst</text:span><text:span text:style-name="T13"> &lt;= </text:span><text:span text:style-name="T34">'1'</text:span><text:span text:style-name="T13">;</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rst</text:span><text:span text:style-name="T13"> &lt;= </text:span><text:span text:style-name="T34">'0'</text:span><text:span text:style-name="T13">;</text:span></text:p>
      <text:p text:style-name="P16"/>
      <text:p text:style-name="P15"><text:span text:style-name="T13"><text:s text:c="8"/></text:span><text:span text:style-name="T39">wr</text:span><text:span text:style-name="T13"> &lt;= </text:span><text:span text:style-name="T34">'1'</text:span><text:span text:style-name="T13">;</text:span></text:p>
      <text:p text:style-name="P15"><text:span text:style-name="T13"><text:s text:c="8"/></text:span><text:span text:style-name="T39">rd</text:span><text:span text:style-name="T13"> &lt;= </text:span><text:span text:style-name="T34">'0'</text:span><text:span text:style-name="T13">;</text:span></text:p>
      <text:p text:style-name="P15"><text:span text:style-name="T13"><text:s text:c="8"/></text:span><text:span text:style-name="T39">w_data</text:span><text:span text:style-name="T13"> &lt;= </text:span><text:span text:style-name="T34">"00010010"</text:span><text:span text:style-name="T13">; </text:span><text:span text:style-name="T36">--18</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0010100"</text:span><text:span text:style-name="T13">; </text:span><text:span text:style-name="T36">--20</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0000100"</text:span><text:span text:style-name="T13">; </text:span><text:span text:style-name="T36">--4</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6">-- <text:s text:c="7"/>wr &lt;= '0';</text:span></text:p>
      <text:p text:style-name="P15"><text:span text:style-name="T13"><text:s text:c="8"/></text:span><text:span text:style-name="T36">-- <text:s text:c="7"/>rd &lt;= '1';</text:span></text:p>
      <text:p text:style-name="P15"><text:span text:style-name="T13"><text:s text:c="8"/></text:span><text:span text:style-name="T36">-- <text:s text:c="7"/>wait until falling_edge(clk);</text:span></text:p>
      <text:p text:style-name="P15"><text:span text:style-name="T13"><text:s text:c="8"/></text:span><text:span text:style-name="T36">-- <text:s text:c="7"/>wait until falling_edge(clk);</text:span></text:p>
      <text:p text:style-name="P15"><text:span text:style-name="T13"><text:s text:c="8"/></text:span><text:span text:style-name="T36">-- <text:s text:c="7"/>rd &lt;= '0';</text:span></text:p>
      <text:p text:style-name="P15"><text:span text:style-name="T13"><text:s text:c="8"/></text:span><text:span text:style-name="T36">-- <text:s text:c="7"/>wr &lt;= '1';</text:span></text:p>
      <text:p text:style-name="P15"><text:span text:style-name="T13"><text:s text:c="8"/></text:span><text:span text:style-name="T39">w_data</text:span><text:span text:style-name="T13"> &lt;= </text:span><text:span text:style-name="T34">"00001100"</text:span><text:span text:style-name="T13">; </text:span><text:span text:style-name="T36">--12</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0010011"</text:span><text:span text:style-name="T13">; </text:span><text:span text:style-name="T36">--19</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0010110"</text:span><text:span text:style-name="T13">; </text:span><text:span text:style-name="T36">--22</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0100011"</text:span><text:span text:style-name="T13">; </text:span><text:span text:style-name="T36">--35</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0111111"</text:span><text:span text:style-name="T13">; </text:span><text:span text:style-name="T36">--63</text:span></text:p>
      <text:p text:style-name="P15"><text:span text:style-name="T13"><text:s text:c="8"/></text:span><text:span text:style-name="T36">-- <text:s text:c="7"/>rd &lt;= '1';</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1001110"</text:span><text:span text:style-name="T13">; </text:span><text:span text:style-name="T36">--78</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1010001"</text:span><text:span text:style-name="T13">; </text:span><text:span text:style-name="T36">--81</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0000101"</text:span><text:span text:style-name="T13">; </text:span><text:span text:style-name="T36">--5</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1011101"</text:span><text:span text:style-name="T13">; </text:span><text:span text:style-name="T36">--93</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1100011"</text:span><text:span text:style-name="T13">; </text:span><text:span text:style-name="T36">--99</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oft-page-break/><text:span text:style-name="T13"><text:s text:c="8"/></text:span><text:span text:style-name="T39">w_data</text:span><text:span text:style-name="T13"> &lt;= </text:span><text:span text:style-name="T34">"01101110"</text:span><text:span text:style-name="T13">; </text:span><text:span text:style-name="T36">--110</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1010101"</text:span><text:span text:style-name="T13">; </text:span><text:span text:style-name="T36">--84</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10000101"</text:span><text:span text:style-name="T13">; </text:span><text:span text:style-name="T36">--133</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11011101"</text:span><text:span text:style-name="T13">; </text:span><text:span text:style-name="T36">--221</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39">w_data</text:span><text:span text:style-name="T13"> &lt;= </text:span><text:span text:style-name="T34">"01101011"</text:span><text:span text:style-name="T13">; </text:span><text:span text:style-name="T36">--107</text:span></text:p>
      <text:p text:style-name="P15"><text:span text:style-name="T13"><text:s text:c="8"/></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6"/>
      <text:p text:style-name="P15"><text:span text:style-name="T13"><text:s text:c="8"/></text:span><text:span text:style-name="T6">assert</text:span><text:span text:style-name="T13"> </text:span><text:span text:style-name="T7">false</text:span></text:p>
      <text:p text:style-name="P15"><text:span text:style-name="T13"><text:s text:c="12"/></text:span><text:span text:style-name="T6">report</text:span><text:span text:style-name="T13"> </text:span><text:span text:style-name="T34">"simulation completed"</text:span></text:p>
      <text:p text:style-name="P15"><text:span text:style-name="T13"><text:s text:c="12"/></text:span><text:span text:style-name="T6">severity</text:span><text:span text:style-name="T13"> </text:span><text:span text:style-name="T7">failur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_tb</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FSM</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g_fsm</text:span><text:span text:style-name="T13"> </text:span><text:span text:style-name="T6">is</text:span><text:span text:style-name="T13"> </text:span><text:span text:style-name="T6">port</text:span><text:span text:style-name="T13">(</text:span></text:p>
      <text:p text:style-name="P15"><text:span text:style-name="T13"><text:s text:c="4"/></text:span><text:span text:style-name="T26">a</text:span><text:span text:style-name="T13">, </text:span><text:span text:style-name="T26">b</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y0</text:span><text:span text:style-name="T13">, </text:span><text:span text:style-name="T26">y1</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eg_fsm</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eg_fsm</text:span><text:span text:style-name="T13"> </text:span><text:span text:style-name="T6">is</text:span></text:p>
      <text:p text:style-name="P15"><text:span text:style-name="T13"><text:s text:c="4"/></text:span><text:span text:style-name="T6">type</text:span><text:span text:style-name="T13"> </text:span><text:span text:style-name="T28">fsm</text:span><text:span text:style-name="T13"> </text:span><text:span text:style-name="T6">is</text:span><text:span text:style-name="T13"> (</text:span><text:span text:style-name="T7">s0</text:span><text:span text:style-name="T13">, </text:span><text:span text:style-name="T7">s1</text:span><text:span text:style-name="T13">, </text:span><text:span text:style-name="T7">s2</text:span><text:span text:style-name="T13">);</text:span></text:p>
      <text:p text:style-name="P15"><text:span text:style-name="T13"><text:s text:c="4"/></text:span><text:span text:style-name="T6">signal</text:span><text:span text:style-name="T13"> </text:span><text:span text:style-name="T39">state_reg</text:span><text:span text:style-name="T13">, </text:span><text:span text:style-name="T39">state_next</text:span><text:span text:style-name="T13">: </text:span><text:span text:style-name="T28">fsm</text:span><text:span text:style-name="T13">;</text:span></text:p>
      <text:p text:style-name="P23">begin</text:p>
      <text:p text:style-name="P15"><text:span text:style-name="T13"><text:s text:c="4"/></text:span><text:span text:style-name="T36">--state register <text:s text:c="3"/></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state_reg</text:span><text:span text:style-name="T13"> &lt;= </text:span><text:span text:style-name="T7">s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state_reg</text:span><text:span text:style-name="T13"> &lt;= </text:span><text:span text:style-name="T39">state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next state logic</text:span></text:p>
      <text:p text:style-name="P15"><text:span text:style-name="T13"><text:s text:c="4"/></text:span><text:span text:style-name="T6">process</text:span><text:span text:style-name="T13">(</text:span><text:span text:style-name="T39">state_reg</text:span><text:span text:style-name="T13">, </text:span><text:span text:style-name="T26">a</text:span><text:span text:style-name="T13">, </text:span><text:span text:style-name="T26">b</text:span><text:span text:style-name="T13">)</text:span></text:p>
      <text:p text:style-name="P15"><text:span text:style-name="T13"><text:s text:c="4"/></text:span><text:span text:style-name="T6">begin</text:span></text:p>
      <text:p text:style-name="P15"><text:span text:style-name="T13"><text:s text:c="8"/></text:span><text:span text:style-name="T6">case</text:span><text:span text:style-name="T13"> </text:span><text:span text:style-name="T39">state_reg</text:span><text:span text:style-name="T13"> </text:span><text:span text:style-name="T6">is</text:span></text:p>
      <text:p text:style-name="P15"><text:span text:style-name="T13"><text:s text:c="12"/></text:span><text:span text:style-name="T6">when</text:span><text:span text:style-name="T13"> </text:span><text:span text:style-name="T7">s0</text:span><text:span text:style-name="T13"> =&gt; </text:span></text:p>
      <text:p text:style-name="P15"><text:span text:style-name="T13"><text:s text:c="16"/></text:span><text:span text:style-name="T6">if</text:span><text:span text:style-name="T13"> </text:span><text:span text:style-name="T26">a</text:span><text:span text:style-name="T13"> = </text:span><text:span text:style-name="T34">'1'</text:span><text:span text:style-name="T13"> </text:span><text:span text:style-name="T6">then</text:span><text:span text:style-name="T13"> </text:span></text:p>
      <text:p text:style-name="P15"><text:span text:style-name="T13"><text:s text:c="20"/></text:span><text:span text:style-name="T6">if</text:span><text:span text:style-name="T13"> </text:span><text:span text:style-name="T26">b</text:span><text:span text:style-name="T13"> = </text:span><text:span text:style-name="T34">'1'</text:span><text:span text:style-name="T13"> </text:span><text:span text:style-name="T6">then</text:span></text:p>
      <text:p text:style-name="P15"><text:span text:style-name="T13"><text:s text:c="24"/></text:span><text:span text:style-name="T39">state_next</text:span><text:span text:style-name="T13"> &lt;= </text:span><text:span text:style-name="T7">s2</text:span><text:span text:style-name="T13">;</text:span></text:p>
      <text:p text:style-name="P15"><text:span text:style-name="T13"><text:s text:c="20"/></text:span><text:span text:style-name="T6">else</text:span><text:span text:style-name="T13"> </text:span><text:span text:style-name="T39">state_next</text:span><text:span text:style-name="T13"> &lt;= </text:span><text:span text:style-name="T7">s1</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lse</text:span><text:span text:style-name="T13"> </text:span><text:span text:style-name="T39">state_next</text:span><text:span text:style-name="T13"> &lt;= </text:span><text:span text:style-name="T7">s0</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when</text:span><text:span text:style-name="T13"> </text:span><text:span text:style-name="T7">s1</text:span><text:span text:style-name="T13"> =&gt;</text:span></text:p>
      <text:p text:style-name="P15"><text:span text:style-name="T13"><text:s text:c="8"/></text:span><text:span text:style-name="T6">if</text:span><text:span text:style-name="T13"> </text:span><text:span text:style-name="T26">a</text:span><text:span text:style-name="T13"> = </text:span><text:span text:style-name="T34">'1'</text:span><text:span text:style-name="T13"> </text:span><text:span text:style-name="T6">then</text:span></text:p>
      <text:p text:style-name="P15"><text:span text:style-name="T13"><text:s text:c="12"/></text:span><text:span text:style-name="T39">state_next</text:span><text:span text:style-name="T13"> &lt;= </text:span><text:span text:style-name="T7">s0</text:span><text:span text:style-name="T13">;</text:span></text:p>
      <text:p text:style-name="P15"><text:span text:style-name="T13"><text:s text:c="8"/></text:span><text:span text:style-name="T6">else</text:span><text:span text:style-name="T13"> </text:span></text:p>
      <text:p text:style-name="P15"><text:span text:style-name="T13"><text:s text:c="12"/></text:span><text:span text:style-name="T39">state_next</text:span><text:span text:style-name="T13"> &lt;= </text:span><text:span text:style-name="T7">s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when</text:span><text:span text:style-name="T13"> </text:span><text:span text:style-name="T7">s2</text:span><text:span text:style-name="T13"> =&gt; </text:span></text:p>
      <text:p text:style-name="P15"><text:span text:style-name="T13"><text:s text:c="8"/></text:span><text:span text:style-name="T39">state_next</text:span><text:span text:style-name="T13"> &lt;= </text:span><text:span text:style-name="T7">s0</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moore output logic</text:span></text:p>
      <text:p text:style-name="P15"><text:span text:style-name="T13"><text:s text:c="4"/></text:span><text:span text:style-name="T6">process</text:span><text:span text:style-name="T13">(</text:span><text:span text:style-name="T39">state_reg</text:span><text:span text:style-name="T13">)</text:span></text:p>
      <text:p text:style-name="P15"><text:span text:style-name="T13"><text:s text:c="4"/></text:span><text:span text:style-name="T6">begin</text:span></text:p>
      <text:p text:style-name="P15"><text:soft-page-break/><text:span text:style-name="T13"><text:s text:c="8"/></text:span><text:span text:style-name="T6">case</text:span><text:span text:style-name="T13"> </text:span><text:span text:style-name="T39">state_reg</text:span><text:span text:style-name="T13"> </text:span><text:span text:style-name="T6">is</text:span></text:p>
      <text:p text:style-name="P15"><text:span text:style-name="T13"><text:s text:c="12"/></text:span><text:span text:style-name="T6">when</text:span><text:span text:style-name="T13"> </text:span><text:span text:style-name="T7">s0</text:span><text:span text:style-name="T13"> | </text:span><text:span text:style-name="T7">s2</text:span><text:span text:style-name="T13"> <text:s/>=&gt; <text:s text:c="4"/></text:span><text:span text:style-name="T26">y1</text:span><text:span text:style-name="T13"> &lt;= </text:span><text:span text:style-name="T34">'0'</text:span><text:span text:style-name="T13">;</text:span></text:p>
      <text:p text:style-name="P15"><text:span text:style-name="T13"><text:s text:c="12"/></text:span><text:span text:style-name="T6">when</text:span><text:span text:style-name="T13"> </text:span><text:span text:style-name="T7">s1</text:span><text:span text:style-name="T13"> =&gt; </text:span><text:span text:style-name="T26">y1</text:span><text:span text:style-name="T13"> &lt;= </text:span><text:span text:style-name="T34">'1'</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mealy output logic</text:span></text:p>
      <text:p text:style-name="P15"><text:span text:style-name="T13"><text:s text:c="4"/></text:span><text:span text:style-name="T6">process</text:span><text:span text:style-name="T13">(</text:span><text:span text:style-name="T39">state_reg</text:span><text:span text:style-name="T13">, </text:span><text:span text:style-name="T26">a</text:span><text:span text:style-name="T13">, </text:span><text:span text:style-name="T26">b</text:span><text:span text:style-name="T13">)</text:span></text:p>
      <text:p text:style-name="P15"><text:span text:style-name="T13"><text:s text:c="4"/></text:span><text:span text:style-name="T6">begin</text:span></text:p>
      <text:p text:style-name="P15"><text:span text:style-name="T13"><text:s text:c="8"/></text:span><text:span text:style-name="T6">case</text:span><text:span text:style-name="T13"> </text:span><text:span text:style-name="T39">state_reg</text:span><text:span text:style-name="T13"> </text:span><text:span text:style-name="T6">is</text:span></text:p>
      <text:p text:style-name="P15"><text:span text:style-name="T13"><text:s text:c="12"/></text:span><text:span text:style-name="T6">when</text:span><text:span text:style-name="T13"> </text:span><text:span text:style-name="T7">s0</text:span><text:span text:style-name="T13"> =&gt; </text:span></text:p>
      <text:p text:style-name="P15"><text:span text:style-name="T13"><text:s text:c="16"/></text:span><text:span text:style-name="T6">if</text:span><text:span text:style-name="T13"> (</text:span><text:span text:style-name="T26">a</text:span><text:span text:style-name="T13"> = </text:span><text:span text:style-name="T34">'1'</text:span><text:span text:style-name="T13">) </text:span><text:span text:style-name="T6">and</text:span><text:span text:style-name="T13"> (</text:span><text:span text:style-name="T26">b</text:span><text:span text:style-name="T13"> = </text:span><text:span text:style-name="T34">'1'</text:span><text:span text:style-name="T13">) </text:span><text:span text:style-name="T6">then</text:span></text:p>
      <text:p text:style-name="P15"><text:span text:style-name="T13"><text:s text:c="20"/></text:span><text:span text:style-name="T26">y0</text:span><text:span text:style-name="T13"> &lt;= </text:span><text:span text:style-name="T34">'1'</text:span><text:span text:style-name="T13">;</text:span></text:p>
      <text:p text:style-name="P15"><text:span text:style-name="T13"><text:s text:c="16"/></text:span><text:span text:style-name="T6">else</text:span><text:span text:style-name="T13"> </text:span><text:span text:style-name="T26">y0</text:span><text:span text:style-name="T13"> &lt;= </text:span><text:span text:style-name="T34">'0'</text:span><text:span text:style-name="T13">;</text:span></text:p>
      <text:p text:style-name="P15"><text:span text:style-name="T13"><text:s text:c="12"/></text:span><text:span text:style-name="T6">end</text:span><text:span text:style-name="T13"> </text:span><text:span text:style-name="T6">if</text:span><text:span text:style-name="T13">; <text:s text:c="15"/></text:span></text:p>
      <text:p text:style-name="P15"><text:span text:style-name="T13"><text:s text:c="8"/></text:span><text:span text:style-name="T6">when</text:span><text:span text:style-name="T13"> </text:span><text:span text:style-name="T7">s1</text:span><text:span text:style-name="T13"> | </text:span><text:span text:style-name="T7">s2</text:span><text:span text:style-name="T13"> =&gt; </text:span><text:span text:style-name="T26">y0</text:span><text:span text:style-name="T13"> &lt;= </text:span><text:span text:style-name="T34">'0'</text:span><text:span text:style-name="T13">; <text:s text:c="11"/></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text:span><text:span text:style-name="T13">;</text:span></text:p>
      <text:p text:style-name="P24">--The key part is the next-state logic. it uses a case statement with </text:p>
      <text:p text:style-name="P24">--the state_reg signal as the selection expressiom. The next state signal </text:p>
      <text:p text:style-name="P24">--is determined by the current state and external input.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two_eg_fsm</text:span><text:span text:style-name="T13"> </text:span><text:span text:style-name="T6">is</text:span><text:span text:style-name="T13"> </text:span><text:span text:style-name="T6">port</text:span><text:span text:style-name="T13">(</text:span></text:p>
      <text:p text:style-name="P15"><text:span text:style-name="T13"><text:s text:c="4"/></text:span><text:span text:style-name="T26">a</text:span><text:span text:style-name="T13">, </text:span><text:span text:style-name="T26">b</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y0</text:span><text:span text:style-name="T13">, </text:span><text:span text:style-name="T26">y1</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two_eg_fsm</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two_eg_fsm</text:span><text:span text:style-name="T13"> </text:span><text:span text:style-name="T6">is</text:span></text:p>
      <text:p text:style-name="P15"><text:span text:style-name="T13"><text:s text:c="4"/></text:span><text:span text:style-name="T6">type</text:span><text:span text:style-name="T13"> </text:span><text:span text:style-name="T28">fsm</text:span><text:span text:style-name="T13"> </text:span><text:span text:style-name="T6">is</text:span><text:span text:style-name="T13"> (</text:span><text:span text:style-name="T7">s0</text:span><text:span text:style-name="T13">, </text:span><text:span text:style-name="T7">s1</text:span><text:span text:style-name="T13">, </text:span><text:span text:style-name="T7">s2</text:span><text:span text:style-name="T13">);</text:span></text:p>
      <text:p text:style-name="P15"><text:span text:style-name="T13"><text:s text:c="4"/></text:span><text:span text:style-name="T6">signal</text:span><text:span text:style-name="T13"> </text:span><text:span text:style-name="T39">state_reg</text:span><text:span text:style-name="T13">, </text:span><text:span text:style-name="T39">state_next</text:span><text:span text:style-name="T13">: </text:span><text:span text:style-name="T28">fsm</text:span><text:span text:style-name="T13">;</text:span></text:p>
      <text:p text:style-name="P23">begin</text:p>
      <text:p text:style-name="P15"><text:span text:style-name="T13"><text:s text:c="4"/></text:span><text:span text:style-name="T36">--state register</text:span></text:p>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state_reg</text:span><text:span text:style-name="T13"> &lt;= </text:span><text:span text:style-name="T7">s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state_reg</text:span><text:span text:style-name="T13"> &lt;= </text:span><text:span text:style-name="T39">state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next-state / output logic</text:span></text:p>
      <text:p text:style-name="P15"><text:span text:style-name="T13"><text:s text:c="4"/></text:span><text:span text:style-name="T6">process</text:span><text:span text:style-name="T13">(</text:span><text:span text:style-name="T39">state_reg</text:span><text:span text:style-name="T13">, </text:span><text:span text:style-name="T26">a</text:span><text:span text:style-name="T13">, </text:span><text:span text:style-name="T26">b</text:span><text:span text:style-name="T13">)</text:span></text:p>
      <text:p text:style-name="P15"><text:span text:style-name="T13"><text:s text:c="4"/></text:span><text:span text:style-name="T6">begin</text:span></text:p>
      <text:p text:style-name="P15"><text:span text:style-name="T13"><text:s text:c="8"/></text:span><text:span text:style-name="T39">state_next</text:span><text:span text:style-name="T13"> &lt;= </text:span><text:span text:style-name="T39">state_reg</text:span><text:span text:style-name="T13">; </text:span><text:span text:style-name="T36">-- default back to same state;</text:span></text:p>
      <text:p text:style-name="P15"><text:span text:style-name="T13"><text:s text:c="8"/></text:span><text:span text:style-name="T26">y0</text:span><text:span text:style-name="T13"> &lt;= </text:span><text:span text:style-name="T34">'0'</text:span><text:span text:style-name="T13">; </text:span><text:span text:style-name="T36">-- defailts 0</text:span></text:p>
      <text:p text:style-name="P15"><text:span text:style-name="T13"><text:s text:c="8"/></text:span><text:span text:style-name="T26">y1</text:span><text:span text:style-name="T13"> &lt;= </text:span><text:span text:style-name="T34">'0'</text:span><text:span text:style-name="T13">;</text:span></text:p>
      <text:p text:style-name="P16"/>
      <text:p text:style-name="P15"><text:span text:style-name="T13"><text:s text:c="8"/></text:span><text:span text:style-name="T6">case</text:span><text:span text:style-name="T13"> </text:span><text:span text:style-name="T39">state_reg</text:span><text:span text:style-name="T13"> </text:span><text:span text:style-name="T6">is</text:span></text:p>
      <text:p text:style-name="P15"><text:span text:style-name="T13"><text:s text:c="12"/></text:span><text:span text:style-name="T6">when</text:span><text:span text:style-name="T13"> </text:span><text:span text:style-name="T7">s0</text:span><text:span text:style-name="T13"> =&gt; </text:span></text:p>
      <text:p text:style-name="P15"><text:span text:style-name="T13"><text:s text:c="16"/></text:span><text:span text:style-name="T6">if</text:span><text:span text:style-name="T13"> </text:span><text:span text:style-name="T26">a</text:span><text:span text:style-name="T13"> = </text:span><text:span text:style-name="T34">'1'</text:span><text:span text:style-name="T13"> </text:span><text:span text:style-name="T6">then</text:span></text:p>
      <text:p text:style-name="P15"><text:span text:style-name="T13"><text:s text:c="20"/></text:span><text:span text:style-name="T6">if</text:span><text:span text:style-name="T13"> </text:span><text:span text:style-name="T26">b</text:span><text:span text:style-name="T13"> = </text:span><text:span text:style-name="T34">'1'</text:span><text:span text:style-name="T13"> </text:span><text:span text:style-name="T6">then</text:span></text:p>
      <text:p text:style-name="P15"><text:span text:style-name="T13"><text:s text:c="24"/></text:span><text:span text:style-name="T39">state_next</text:span><text:span text:style-name="T13"> &lt;= </text:span><text:span text:style-name="T7">s2</text:span><text:span text:style-name="T13">;</text:span></text:p>
      <text:p text:style-name="P15"><text:span text:style-name="T13"><text:s text:c="24"/></text:span><text:span text:style-name="T26">y0</text:span><text:span text:style-name="T13"> &lt;= </text:span><text:span text:style-name="T34">'1'</text:span><text:span text:style-name="T13">;</text:span></text:p>
      <text:p text:style-name="P15"><text:span text:style-name="T13"><text:s text:c="20"/></text:span><text:span text:style-name="T6">else</text:span><text:span text:style-name="T13"> </text:span><text:span text:style-name="T39">state_next</text:span><text:span text:style-name="T13"> &lt;= </text:span><text:span text:style-name="T7">s1</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6"/></text:span><text:span text:style-name="T36">--no else branch</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when</text:span><text:span text:style-name="T13"> </text:span><text:span text:style-name="T7">s1</text:span><text:span text:style-name="T13"> =&gt; </text:span><text:span text:style-name="T26">y1</text:span><text:span text:style-name="T13"> &lt;= </text:span><text:span text:style-name="T34">'1'</text:span><text:span text:style-name="T13">;</text:span></text:p>
      <text:p text:style-name="P15"><text:span text:style-name="T13"><text:s text:c="8"/></text:span><text:span text:style-name="T6">if</text:span><text:span text:style-name="T13"> </text:span><text:span text:style-name="T26">a</text:span><text:span text:style-name="T13"> = </text:span><text:span text:style-name="T34">'1'</text:span><text:span text:style-name="T13"> </text:span><text:span text:style-name="T6">then</text:span><text:span text:style-name="T13"> </text:span></text:p>
      <text:p text:style-name="P15"><text:span text:style-name="T13"><text:s text:c="12"/></text:span><text:span text:style-name="T39">state_next</text:span><text:span text:style-name="T13"> &lt;= </text:span><text:span text:style-name="T7">s0</text:span><text:span text:style-name="T13">;</text:span></text:p>
      <text:p text:style-name="P15"><text:span text:style-name="T13"><text:s text:c="12"/></text:span><text:span text:style-name="T36">-- no else branch</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when</text:span><text:span text:style-name="T13"> </text:span><text:span text:style-name="T7">s2</text:span><text:span text:style-name="T13"> =&gt; </text:span><text:span text:style-name="T39">state_next</text:span><text:span text:style-name="T13"> &lt;= </text:span><text:span text:style-name="T7">s0</text:span><text:span text:style-name="T13">;</text:span></text:p>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text:span><text:span text:style-name="T13">;</text:span></text:p>
      <text:p text:style-name="P16"/>
      <text:p text:style-name="P16"><text:soft-page-break/><text:span text:style-name="T3">EDGE DETECT</text:span></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dge_detec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level</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tick</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edge_detect</text:span><text:span text:style-name="T13">;</text:span></text:p>
      <text:p text:style-name="P16"/>
      <text:p text:style-name="P24">--moore architecture</text:p>
      <text:p text:style-name="P26">--architecture moore_arch of edge_detect is</text:p>
      <text:p text:style-name="P26">-- <text:s text:c="3"/>type fsm is (zero, edge, one);</text:p>
      <text:p text:style-name="P26">-- <text:s text:c="3"/>signal state_reg, state_next: fsm;</text:p>
      <text:p text:style-name="P18"/>
      <text:p text:style-name="P26">--mealy architecture</text:p>
      <text:p text:style-name="P15"><text:span text:style-name="T6">architecture</text:span><text:span text:style-name="T13"> </text:span><text:span text:style-name="T22">moore_arch</text:span><text:span text:style-name="T13"> </text:span><text:span text:style-name="T6">of</text:span><text:span text:style-name="T13"> edge_detect </text:span><text:span text:style-name="T6">is</text:span></text:p>
      <text:p text:style-name="P15"><text:span text:style-name="T13"><text:s text:c="4"/></text:span><text:span text:style-name="T6">type</text:span><text:span text:style-name="T13"> </text:span><text:span text:style-name="T28">fsm</text:span><text:span text:style-name="T13"> </text:span><text:span text:style-name="T6">is</text:span><text:span text:style-name="T13"> (</text:span><text:span text:style-name="T7">zero</text:span><text:span text:style-name="T13">, </text:span><text:span text:style-name="T7">one</text:span><text:span text:style-name="T13">);</text:span></text:p>
      <text:p text:style-name="P15"><text:span text:style-name="T13"><text:s text:c="4"/></text:span><text:span text:style-name="T6">signal</text:span><text:span text:style-name="T13"> </text:span><text:span text:style-name="T39">state_reg</text:span><text:span text:style-name="T13">, </text:span><text:span text:style-name="T39">state_next</text:span><text:span text:style-name="T13">: </text:span><text:span text:style-name="T28">fsm</text:span><text:span text:style-name="T13">;</text:span></text:p>
      <text:p text:style-name="P15"><text:span text:style-name="T13"><text:s text:c="4"/></text:span><text:span text:style-name="T6">signal</text:span><text:span text:style-name="T13"> </text:span><text:span text:style-name="T39">q</text:span><text:span text:style-name="T13">, </text:span><text:span text:style-name="T39">z</text:span><text:span text:style-name="T13">: </text:span><text:span text:style-name="T28">std_logic</text:span><text:span text:style-name="T13">;</text:span></text:p>
      <text:p text:style-name="P23">begi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state_reg</text:span><text:span text:style-name="T13"> &lt;= </text:span><text:span text:style-name="T7">zero</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state_reg</text:span><text:span text:style-name="T13"> &lt;= </text:span><text:span text:style-name="T39">state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 <text:s text:c="3"/>--moore machine <text:s text:c="3"/></text:span></text:p>
      <text:p text:style-name="P15"><text:span text:style-name="T13"><text:s text:c="4"/></text:span><text:span text:style-name="T36">-- <text:s text:c="3"/>process(state_reg, level)</text:span></text:p>
      <text:p text:style-name="P15"><text:span text:style-name="T13"><text:s text:c="4"/></text:span><text:span text:style-name="T36">-- <text:s text:c="3"/>begin</text:span></text:p>
      <text:p text:style-name="P15"><text:span text:style-name="T13"><text:s text:c="4"/></text:span><text:span text:style-name="T36">-- <text:s text:c="3"/>-- <text:s text:c="3"/>state_next &lt;= state_reg; --stay in the current state until utherwise told</text:span></text:p>
      <text:p text:style-name="P15"><text:span text:style-name="T13"><text:s text:c="4"/></text:span><text:span text:style-name="T36">-- <text:s text:c="7"/>tick &lt;= '0';</text:span></text:p>
      <text:p text:style-name="P15"><text:span text:style-name="T13"><text:s text:c="4"/></text:span><text:span text:style-name="T36">-- <text:s text:c="7"/>-- tick goes one when level is one and clock is rising edge</text:span></text:p>
      <text:p text:style-name="P15"><text:span text:style-name="T13"><text:s text:c="4"/></text:span><text:span text:style-name="T36">-- <text:s text:c="3"/>case state_reg is</text:span></text:p>
      <text:p text:style-name="P15"><text:span text:style-name="T13"><text:s text:c="4"/></text:span><text:span text:style-name="T36">-- <text:s text:c="7"/>when zero =&gt; </text:span></text:p>
      <text:p text:style-name="P15"><text:span text:style-name="T13"><text:s text:c="4"/></text:span><text:span text:style-name="T36">-- <text:s text:c="11"/>if level = '1' then</text:span></text:p>
      <text:p text:style-name="P15"><text:span text:style-name="T13"><text:s text:c="4"/></text:span><text:span text:style-name="T36">-- <text:s text:c="15"/>state_next &lt;= edge;</text:span></text:p>
      <text:p text:style-name="P15"><text:span text:style-name="T13"><text:s text:c="4"/></text:span><text:span text:style-name="T36">-- <text:s text:c="11"/>end if;</text:span></text:p>
      <text:p text:style-name="P15"><text:span text:style-name="T13"><text:s text:c="4"/></text:span><text:span text:style-name="T36">-- <text:s text:c="7"/>when edge =&gt; tick &lt;= '1';</text:span></text:p>
      <text:p text:style-name="P15"><text:span text:style-name="T13"><text:s text:c="4"/></text:span><text:span text:style-name="T36">-- <text:s text:c="11"/>if level = '1' then </text:span></text:p>
      <text:p text:style-name="P15"><text:span text:style-name="T13"><text:s text:c="4"/></text:span><text:span text:style-name="T36">-- <text:s text:c="15"/>state_next &lt;= one;</text:span></text:p>
      <text:p text:style-name="P15"><text:span text:style-name="T13"><text:s text:c="4"/></text:span><text:span text:style-name="T36">-- <text:s text:c="11"/>else state_next &lt;= zero;</text:span></text:p>
      <text:p text:style-name="P15"><text:span text:style-name="T13"><text:s text:c="4"/></text:span><text:span text:style-name="T36">-- <text:s text:c="11"/>end if;</text:span></text:p>
      <text:p text:style-name="P15"><text:span text:style-name="T13"><text:s text:c="4"/></text:span><text:span text:style-name="T36">-- <text:s text:c="7"/>when one =&gt;</text:span></text:p>
      <text:p text:style-name="P15"><text:span text:style-name="T13"><text:s text:c="4"/></text:span><text:span text:style-name="T36">-- <text:s text:c="11"/>if level = '0' then</text:span></text:p>
      <text:p text:style-name="P15"><text:span text:style-name="T13"><text:s text:c="4"/></text:span><text:span text:style-name="T36">-- <text:s text:c="15"/>state_next &lt;= zero;</text:span></text:p>
      <text:p text:style-name="P15"><text:span text:style-name="T13"><text:s text:c="4"/></text:span><text:span text:style-name="T36">-- <text:s text:c="11"/>end if;</text:span></text:p>
      <text:p text:style-name="P15"><text:soft-page-break/><text:span text:style-name="T13"><text:s text:c="4"/></text:span><text:span text:style-name="T36">-- <text:s text:c="3"/>end case;</text:span></text:p>
      <text:p text:style-name="P15"><text:span text:style-name="T13"><text:s text:c="4"/></text:span><text:span text:style-name="T36">-- <text:s text:c="3"/>end process;</text:span></text:p>
      <text:p text:style-name="P16"/>
      <text:p text:style-name="P15"><text:span text:style-name="T13"><text:s text:c="4"/></text:span><text:span text:style-name="T36">--mealy machine</text:span></text:p>
      <text:p text:style-name="P15"><text:span text:style-name="T13"><text:s text:c="4"/></text:span><text:span text:style-name="T36">-- <text:s text:c="3"/>process(state_reg, level)</text:span></text:p>
      <text:p text:style-name="P15"><text:span text:style-name="T13"><text:s text:c="4"/></text:span><text:span text:style-name="T36">-- <text:s text:c="3"/>begin</text:span></text:p>
      <text:p text:style-name="P15"><text:span text:style-name="T13"><text:s text:c="4"/></text:span><text:span text:style-name="T36">-- <text:s text:c="7"/>state_next &lt;= state_reg;</text:span></text:p>
      <text:p text:style-name="P15"><text:span text:style-name="T13"><text:s text:c="4"/></text:span><text:span text:style-name="T36">-- <text:s text:c="7"/>tick &lt;= '0';</text:span></text:p>
      <text:p text:style-name="P15"><text:span text:style-name="T13"><text:s text:c="4"/></text:span><text:span text:style-name="T36">-- <text:s text:c="7"/></text:span></text:p>
      <text:p text:style-name="P15"><text:span text:style-name="T13"><text:s text:c="4"/></text:span><text:span text:style-name="T36">-- <text:s text:c="7"/>case state_reg is</text:span></text:p>
      <text:p text:style-name="P15"><text:span text:style-name="T13"><text:s text:c="4"/></text:span><text:span text:style-name="T36">-- <text:s text:c="11"/>when zero =&gt; </text:span></text:p>
      <text:p text:style-name="P15"><text:span text:style-name="T13"><text:s text:c="4"/></text:span><text:span text:style-name="T36">-- <text:s text:c="15"/>if level = '1' then</text:span></text:p>
      <text:p text:style-name="P15"><text:span text:style-name="T13"><text:s text:c="4"/></text:span><text:span text:style-name="T36">-- <text:s text:c="19"/>state_next &lt;= one;</text:span></text:p>
      <text:p text:style-name="P15"><text:span text:style-name="T13"><text:s text:c="4"/></text:span><text:span text:style-name="T36">-- <text:s text:c="19"/>tick &lt;= '1';</text:span></text:p>
      <text:p text:style-name="P15"><text:span text:style-name="T13"><text:s text:c="4"/></text:span><text:span text:style-name="T36">-- <text:s text:c="15"/>end if;</text:span></text:p>
      <text:p text:style-name="P15"><text:span text:style-name="T13"><text:s text:c="4"/></text:span><text:span text:style-name="T36">-- <text:s text:c="11"/>when one =&gt; </text:span></text:p>
      <text:p text:style-name="P15"><text:span text:style-name="T13"><text:s text:c="4"/></text:span><text:span text:style-name="T36">-- <text:s text:c="15"/>if level = '0' then</text:span></text:p>
      <text:p text:style-name="P15"><text:span text:style-name="T13"><text:s text:c="4"/></text:span><text:span text:style-name="T36">-- <text:s text:c="19"/>state_next &lt;= zero;</text:span></text:p>
      <text:p text:style-name="P15"><text:span text:style-name="T13"><text:s text:c="4"/></text:span><text:span text:style-name="T36">-- <text:s text:c="15"/>end if;</text:span></text:p>
      <text:p text:style-name="P15"><text:span text:style-name="T13"><text:s text:c="4"/></text:span><text:span text:style-name="T36">-- <text:s text:c="7"/>end case;</text:span></text:p>
      <text:p text:style-name="P15"><text:span text:style-name="T13"><text:s text:c="4"/></text:span><text:span text:style-name="T36">-- <text:s text:c="3"/>end process;</text:span></text:p>
      <text:p text:style-name="P16"/>
      <text:p text:style-name="P15"><text:span text:style-name="T13"><text:s text:c="4"/></text:span><text:span text:style-name="T36">-- gate level implementaion of an edge detector</text:span></text:p>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q</text:span><text:span text:style-name="T13"> &lt;= </text:span><text:span text:style-name="T26">level</text:span><text:span text:style-name="T13">;</text:span></text:p>
      <text:p text:style-name="P15"><text:span text:style-name="T13"><text:s text:c="12"/></text:span><text:span text:style-name="T39">z</text:span><text:span text:style-name="T13"> &lt;= (</text:span><text:span text:style-name="T6">not</text:span><text:span text:style-name="T13"> </text:span><text:span text:style-name="T39">q</text:span><text:span text:style-name="T13">) </text:span><text:span text:style-name="T6">and</text:span><text:span text:style-name="T13"> </text:span><text:span text:style-name="T26">level</text:span><text:span text:style-name="T13">;</text:span></text:p>
      <text:p text:style-name="P15"><text:span text:style-name="T13"><text:s text:c="8"/></text:span><text:span text:style-name="T6">end</text:span><text:span text:style-name="T13"> </text:span><text:span text:style-name="T6">if</text:span><text:span text:style-name="T13">;</text:span></text:p>
      <text:p text:style-name="P16"/>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tick</text:span><text:span text:style-name="T13"> &lt;= </text:span><text:span text:style-name="T39">z</text:span><text:span text:style-name="T13">;</text:span></text:p>
      <text:p text:style-name="P15"><text:span text:style-name="T6">end</text:span><text:span text:style-name="T13"> </text:span><text:span text:style-name="T22">moore_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delay_increment</text:span><text:span text:style-name="T13"> </text:span><text:span text:style-name="T6">is</text:span></text:p>
      <text:p text:style-name="P15"><text:span text:style-name="T13"><text:s text:c="4"/></text:span><text:span text:style-name="T6">generic</text:span><text:span text:style-name="T13"> ( </text:span><text:span text:style-name="T7">delay_ports</text:span><text:span text:style-name="T13"> : </text:span><text:span text:style-name="T28">natural</text:span><text:span text:style-name="T13"> := </text:span><text:span text:style-name="T31">3</text:span><text:span text:style-name="T13">;</text:span></text:p>
      <text:p text:style-name="P15"><text:span text:style-name="T13"><text:s text:c="14"/></text:span><text:span text:style-name="T7">width_ports</text:span><text:span text:style-name="T13"> : </text:span><text:span text:style-name="T28">natural</text:span><text:span text:style-name="T13"> := </text:span><text:span text:style-name="T31">3</text:span><text:span text:style-name="T13">);</text:span></text:p>
      <text:p text:style-name="P15"><text:span text:style-name="T13"><text:s text:c="4"/></text:span><text:span text:style-name="T6">port</text:span><text:span text:style-name="T13"> ( </text:span><text:span text:style-name="T26">clk</text:span><text:span text:style-name="T13">,</text:span><text:span text:style-name="T26">reset</text:span><text:span text:style-name="T13">: </text:span><text:span text:style-name="T6">in</text:span><text:span text:style-name="T13"> </text:span><text:span text:style-name="T28">STD_LOGIC</text:span><text:span text:style-name="T13">;</text:span></text:p>
      <text:p text:style-name="P15"><text:span text:style-name="T13"><text:s text:c="11"/></text:span><text:span text:style-name="T26">update</text:span><text:span text:style-name="T13"> : </text:span><text:span text:style-name="T6">in</text:span><text:span text:style-name="T13"> </text:span><text:span text:style-name="T28">STD_LOGIC</text:span><text:span text:style-name="T13">;</text:span></text:p>
      <text:p text:style-name="P15"><text:span text:style-name="T13"><text:s text:c="11"/></text:span><text:span text:style-name="T26">in_data</text:span><text:span text:style-name="T13"> : </text:span><text:span text:style-name="T6">in</text:span><text:span text:style-name="T13"> <text:s/></text:span><text:span text:style-name="T28">STD_LOGIC_VECTOR</text:span><text:span text:style-name="T13"> (</text:span><text:span text:style-name="T31">7</text:span><text:span text:style-name="T13"> </text:span><text:span text:style-name="T6">downto</text:span><text:span text:style-name="T13"> </text:span><text:span text:style-name="T31">0</text:span><text:span text:style-name="T13">);</text:span></text:p>
      <text:p text:style-name="P15"><text:span text:style-name="T13"><text:s text:c="11"/></text:span><text:span text:style-name="T26">led</text:span><text:span text:style-name="T13"> : </text:span><text:span text:style-name="T6">out</text:span><text:span text:style-name="T13"> </text:span><text:span text:style-name="T28">STD_LOGIC_VECTOR</text:span><text:span text:style-name="T13"> (</text:span><text:span text:style-name="T31">2</text:span><text:span text:style-name="T13"> </text:span><text:span text:style-name="T6">downto</text:span><text:span text:style-name="T13"> </text:span><text:span text:style-name="T31">0</text:span><text:span text:style-name="T13">);</text:span></text:p>
      <text:p text:style-name="P15"><text:span text:style-name="T13"><text:s text:c="11"/></text:span><text:span text:style-name="T26">out_data</text:span><text:span text:style-name="T13"> : </text:span><text:span text:style-name="T6">out</text:span><text:span text:style-name="T13"> <text:s/></text:span><text:span text:style-name="T28">STD_LOGIC_VECTOR</text:span><text:span text:style-name="T13"> (</text:span><text:span text:style-name="T31">7</text:span><text:span text:style-name="T13"> </text:span><text:span text:style-name="T6">downto</text:span><text:span text:style-name="T13"> </text:span><text:span text:style-name="T31">0</text:span><text:span text:style-name="T13">);</text:span></text:p>
      <text:p text:style-name="P15"><text:span text:style-name="T13"><text:s text:c="11"/></text:span><text:span text:style-name="T26">d_big</text:span><text:span text:style-name="T13">,</text:span><text:span text:style-name="T26">d_mini</text:span><text:span text:style-name="T13">,</text:span><text:span text:style-name="T26">d_opo</text:span><text:span text:style-name="T13"> : </text:span><text:span text:style-name="T6">out</text:span><text:span text:style-name="T13"> </text:span><text:span text:style-name="T28">STD_LOGIC_VECTOR</text:span><text:span text:style-name="T13"> (</text:span><text:span text:style-name="T31">25</text:span><text:span text:style-name="T13"> </text:span><text:span text:style-name="T6">downto</text:span><text:span text:style-name="T13"> </text:span><text:span text:style-name="T31">0</text:span><text:span text:style-name="T13">);</text:span></text:p>
      <text:p text:style-name="P15"><text:span text:style-name="T13"><text:s text:c="11"/></text:span><text:span text:style-name="T26">w_big</text:span><text:span text:style-name="T13">,</text:span><text:span text:style-name="T26">w_mini</text:span><text:span text:style-name="T13">,</text:span><text:span text:style-name="T26">w_opo</text:span><text:span text:style-name="T13"> : </text:span><text:span text:style-name="T6">out</text:span><text:span text:style-name="T13"> </text:span><text:span text:style-name="T28">STD_LOGIC_VECTOR</text:span><text:span text:style-name="T13"> (</text:span><text:span text:style-name="T31">25</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delay_increment</text:span><text:span text:style-name="T13">;</text:span></text:p>
      <text:p text:style-name="P16"/>
      <text:p text:style-name="P15"><text:span text:style-name="T6">architecture</text:span><text:span text:style-name="T13"> </text:span><text:span text:style-name="T22">fsm_arch</text:span><text:span text:style-name="T13"> </text:span><text:span text:style-name="T6">of</text:span><text:span text:style-name="T13"> </text:span><text:span text:style-name="T22">delay_increment</text:span><text:span text:style-name="T13"> </text:span><text:span text:style-name="T6">is</text:span></text:p>
      <text:p text:style-name="P15"><text:span text:style-name="T13"><text:s text:c="4"/></text:span><text:span text:style-name="T6">type</text:span><text:span text:style-name="T13"> </text:span><text:span text:style-name="T28">state_type</text:span><text:span text:style-name="T13"> </text:span><text:span text:style-name="T6">is</text:span><text:span text:style-name="T13"> (</text:span><text:span text:style-name="T7">idle</text:span><text:span text:style-name="T13">,</text:span><text:span text:style-name="T7">channel</text:span><text:span text:style-name="T13">,</text:span><text:span text:style-name="T7">d_or_w</text:span><text:span text:style-name="T13">,</text:span><text:span text:style-name="T7">delay_channel</text:span><text:span text:style-name="T13">,</text:span><text:span text:style-name="T7">delay_channel_inc</text:span><text:span text:style-name="T13">,</text:span><text:span text:style-name="T7">width_channel</text:span><text:span text:style-name="T13">,</text:span><text:span text:style-name="T7">width_channel_inc</text:span><text:span text:style-name="T13">);</text:span></text:p>
      <text:p text:style-name="P15"><text:span text:style-name="T13"><text:s text:c="4"/></text:span><text:span text:style-name="T6">type</text:span><text:span text:style-name="T13"> </text:span><text:span text:style-name="T28">delay_file_type</text:span><text:span text:style-name="T13"> </text:span><text:span text:style-name="T6">is</text:span><text:span text:style-name="T13"> </text:span><text:span text:style-name="T6">array</text:span><text:span text:style-name="T13"> (</text:span><text:span text:style-name="T7">delay_ports</text:span><text:span text:style-name="T14">-</text:span><text:span text:style-name="T31">1</text:span><text:span text:style-name="T13"> </text:span><text:span text:style-name="T6">downto</text:span><text:span text:style-name="T13"> </text:span><text:span text:style-name="T31">0</text:span><text:span text:style-name="T13">) </text:span><text:span text:style-name="T6">of</text:span><text:span text:style-name="T13"> </text:span><text:span text:style-name="T28">unsigned</text:span><text:span text:style-name="T13"> (</text:span><text:span text:style-name="T31">25</text:span><text:span text:style-name="T13"> </text:span><text:span text:style-name="T6">downto</text:span><text:span text:style-name="T13"> </text:span><text:span text:style-name="T31">0</text:span><text:span text:style-name="T13">);</text:span></text:p>
      <text:p text:style-name="P15"><text:span text:style-name="T13"><text:s text:c="4"/></text:span><text:span text:style-name="T6">type</text:span><text:span text:style-name="T13"> </text:span><text:span text:style-name="T28">width_file_type</text:span><text:span text:style-name="T13"> </text:span><text:span text:style-name="T6">is</text:span><text:span text:style-name="T13"> </text:span><text:span text:style-name="T6">array</text:span><text:span text:style-name="T13">(</text:span><text:span text:style-name="T7">width_ports</text:span><text:span text:style-name="T14">-</text:span><text:span text:style-name="T31">1</text:span><text:span text:style-name="T13"> </text:span><text:span text:style-name="T6">downto</text:span><text:span text:style-name="T13"> </text:span><text:span text:style-name="T31">0</text:span><text:span text:style-name="T13">) </text:span><text:span text:style-name="T6">of</text:span><text:span text:style-name="T13"> </text:span><text:span text:style-name="T28">unsigned</text:span><text:span text:style-name="T13"> (</text:span><text:span text:style-name="T31">25</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d_reg</text:span><text:span text:style-name="T13">, </text:span><text:span text:style-name="T39">d_succ</text:span><text:span text:style-name="T13">: </text:span><text:span text:style-name="T28">delay_file_type</text:span><text:span text:style-name="T13">;</text:span></text:p>
      <text:p text:style-name="P15"><text:span text:style-name="T13"><text:s text:c="4"/></text:span><text:span text:style-name="T6">signal</text:span><text:span text:style-name="T13"> </text:span><text:span text:style-name="T39">w_reg</text:span><text:span text:style-name="T13">, </text:span><text:span text:style-name="T39">w_succ</text:span><text:span text:style-name="T13">: </text:span><text:span text:style-name="T28">width_file_type</text:span><text:span text:style-name="T13">;</text:span></text:p>
      <text:p text:style-name="P15"><text:span text:style-name="T13"><text:s text:c="4"/></text:span><text:span text:style-name="T6">signal</text:span><text:span text:style-name="T13"> </text:span><text:span text:style-name="T39">state_reg</text:span><text:span text:style-name="T13"> : </text:span><text:span text:style-name="T28">state_type</text:span><text:span text:style-name="T13">;</text:span></text:p>
      <text:p text:style-name="P15"><text:span text:style-name="T13"><text:s text:c="4"/></text:span><text:span text:style-name="T6">signal</text:span><text:span text:style-name="T13"> </text:span><text:span text:style-name="T39">which_channel</text:span><text:span text:style-name="T13"> : </text:span><text:span text:style-name="T28">natural</text:span><text:span text:style-name="T13">;</text:span></text:p>
      <text:p text:style-name="P16"/>
      <text:p text:style-name="P15"><text:span text:style-name="T13"><text:s text:c="4"/></text:span><text:span text:style-name="T6">function</text:span><text:span text:style-name="T13"> </text:span><text:span text:style-name="T14">to_slv</text:span><text:span text:style-name="T13">(</text:span><text:span text:style-name="T26">C</text:span><text:span text:style-name="T13"> : </text:span><text:span text:style-name="T28">Character</text:span><text:span text:style-name="T13">) </text:span><text:span text:style-name="T6">return</text:span><text:span text:style-name="T13"> </text:span><text:span text:style-name="T28">STD_LOGIC_VECTOR</text:span><text:span text:style-name="T13"> </text:span><text:span text:style-name="T6">is</text:span></text:p>
      <text:p text:style-name="P15"><text:span text:style-name="T13"><text:s text:c="4"/></text:span><text:span text:style-name="T6">begin</text:span></text:p>
      <text:p text:style-name="P15"><text:span text:style-name="T13"><text:s text:c="8"/></text:span><text:span text:style-name="T6">return</text:span><text:span text:style-name="T13"> </text:span><text:span text:style-name="T28">STD_LOGIC_VECTOR</text:span><text:span text:style-name="T13">(</text:span><text:span text:style-name="T14">to_unsigned</text:span><text:span text:style-name="T13">(</text:span><text:span text:style-name="T28">Character</text:span><text:span text:style-name="T33">'pos</text:span><text:span text:style-name="T13">(</text:span><text:span text:style-name="T26">c</text:span><text:span text:style-name="T13">),</text:span><text:span text:style-name="T31">8</text:span><text:span text:style-name="T13">));</text:span></text:p>
      <text:p text:style-name="P15"><text:span text:style-name="T13"><text:s text:c="4"/></text:span><text:span text:style-name="T6">end</text:span><text:span text:style-name="T13"> </text:span><text:span text:style-name="T14">to_slv</text:span><text:span text:style-name="T13">;</text:span></text:p>
      <text:p text:style-name="P16"/>
      <text:p text:style-name="P15"><text:span text:style-name="T13"><text:s text:c="4"/></text:span><text:span text:style-name="T6">function</text:span><text:span text:style-name="T13"> </text:span><text:span text:style-name="T34">"="</text:span><text:span text:style-name="T13"> (</text:span><text:span text:style-name="T26">A</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text:span><text:span text:style-name="T26">B</text:span><text:span text:style-name="T13"> : </text:span><text:span text:style-name="T28">Character</text:span><text:span text:style-name="T13">) </text:span></text:p>
      <text:p text:style-name="P15"><text:span text:style-name="T13"><text:s text:c="8"/></text:span><text:span text:style-name="T6">return</text:span><text:span text:style-name="T13"> </text:span><text:span text:style-name="T28">boolean</text:span><text:span text:style-name="T13"> </text:span><text:span text:style-name="T6">is</text:span></text:p>
      <text:p text:style-name="P15"><text:span text:style-name="T13"><text:s text:c="4"/></text:span><text:span text:style-name="T6">begin</text:span></text:p>
      <text:p text:style-name="P15"><text:span text:style-name="T13"><text:s text:c="8"/></text:span><text:span text:style-name="T6">return</text:span><text:span text:style-name="T13"> (</text:span><text:span text:style-name="T26">A</text:span><text:span text:style-name="T13"> = </text:span><text:span text:style-name="T14">to_slv</text:span><text:span text:style-name="T13">(</text:span><text:span text:style-name="T26">B</text:span><text:span text:style-name="T13">));</text:span></text:p>
      <text:p text:style-name="P15"><text:span text:style-name="T13"><text:s text:c="4"/></text:span><text:span text:style-name="T6">end</text:span><text:span text:style-name="T13"> </text:span><text:span text:style-name="T6">function</text:span><text:span text:style-name="T13"> </text:span><text:span text:style-name="T34">"="</text:span><text:span text:style-name="T13">;</text:span></text:p>
      <text:p text:style-name="P16"/>
      <text:p text:style-name="P23">begin</text:p>
      <text:p text:style-name="P16"/>
      <text:p text:style-name="P15"><text:span text:style-name="T13"><text:s text:c="4"/></text:span><text:span text:style-name="T36">--------------------------------------</text:span></text:p>
      <text:p text:style-name="P15"><text:span text:style-name="T13"><text:s text:c="4"/></text:span><text:span text:style-name="T36">--State Machine</text:span></text:p>
      <text:p text:style-name="P15"><text:span text:style-name="T13"><text:s text:c="4"/></text:span><text:span text:style-name="T36">--------------------------------------</text:span></text:p>
      <text:p text:style-name="P15"><text:span text:style-name="T13"><text:s text:c="4"/></text:span><text:span text:style-name="T6">process</text:span><text:span text:style-name="T13">(</text:span><text:span text:style-name="T26">clk</text:span><text:span text:style-name="T13">,</text:span><text:span text:style-name="T26">rese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eset</text:span><text:span text:style-name="T13">=</text:span><text:span text:style-name="T34">'1'</text:span><text:span text:style-name="T13"> </text:span><text:span text:style-name="T6">then</text:span></text:p>
      <text:p text:style-name="P15"><text:span text:style-name="T13"><text:s text:c="12"/></text:span><text:span text:style-name="T39">state_reg</text:span><text:span text:style-name="T13"> &lt;= </text:span><text:span text:style-name="T7">idle</text:span><text:span text:style-name="T13">;</text:span></text:p>
      <text:p text:style-name="P15"><text:span text:style-name="T13"><text:s text:c="12"/></text:span><text:span text:style-name="T39">d_reg</text:span><text:span text:style-name="T13"> &lt;= (</text:span><text:span text:style-name="T6">others</text:span><text:span text:style-name="T13"> =&gt; (</text:span><text:span text:style-name="T6">others</text:span><text:span text:style-name="T13"> =&gt; </text:span><text:span text:style-name="T34">'0'</text:span><text:span text:style-name="T13">));</text:span></text:p>
      <text:p text:style-name="P15"><text:span text:style-name="T13"><text:s text:c="12"/></text:span><text:span text:style-name="T39">w_reg</text:span><text:span text:style-name="T13"> &lt;= (</text:span><text:span text:style-name="T6">others</text:span><text:span text:style-name="T13"> =&gt; (</text:span><text:span text:style-name="T6">others</text:span><text:span text:style-name="T13"> =&gt; </text:span><text:span text:style-name="T34">'0'</text:span><text:span text:style-name="T13">));</text:span></text:p>
      <text:p text:style-name="P15"><text:span text:style-name="T13"><text:s text:c="12"/></text:span><text:span text:style-name="T39">which_channel</text:span><text:span text:style-name="T13"> &lt;= </text:span><text:span text:style-name="T31">0</text:span><text:span text:style-name="T13">;</text:span></text:p>
      <text:p text:style-name="P15"><text:soft-page-break/><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6">-- default actions ... update if asked</text:span></text:p>
      <text:p text:style-name="P15"><text:span text:style-name="T13"><text:s text:c="12"/></text:span><text:span text:style-name="T6">if</text:span><text:span text:style-name="T13"> </text:span><text:span text:style-name="T26">update</text:span><text:span text:style-name="T13"> =</text:span><text:span text:style-name="T34">'1'</text:span><text:span text:style-name="T13"> </text:span><text:span text:style-name="T6">then</text:span></text:p>
      <text:p text:style-name="P15"><text:span text:style-name="T13"><text:s text:c="16"/></text:span><text:span text:style-name="T39">d_reg</text:span><text:span text:style-name="T13"> &lt;= </text:span><text:span text:style-name="T39">d_succ</text:span><text:span text:style-name="T13">;</text:span></text:p>
      <text:p text:style-name="P15"><text:span text:style-name="T13"><text:s text:c="16"/></text:span><text:span text:style-name="T39">w_reg</text:span><text:span text:style-name="T13"> &lt;= </text:span><text:span text:style-name="T39">w_succ</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case</text:span><text:span text:style-name="T13"> </text:span><text:span text:style-name="T39">state_reg</text:span><text:span text:style-name="T13"> </text:span><text:span text:style-name="T6">is</text:span></text:p>
      <text:p text:style-name="P15"><text:span text:style-name="T13"><text:s text:c="16"/></text:span><text:span text:style-name="T6">when</text:span><text:span text:style-name="T13"> </text:span><text:span text:style-name="T7">idle</text:span><text:span text:style-name="T13"> =&gt;</text:span></text:p>
      <text:p text:style-name="P15"><text:span text:style-name="T13"><text:s text:c="20"/></text:span><text:span text:style-name="T6">if</text:span><text:span text:style-name="T13"> </text:span><text:span text:style-name="T26">in_data</text:span><text:span text:style-name="T13"> = </text:span><text:span text:style-name="T34">'c'</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channel</text:span><text:span text:style-name="T13">;</text:span></text:p>
      <text:p text:style-name="P15"><text:span text:style-name="T13"><text:s text:c="24"/></text:span><text:span text:style-name="T39">which_channel</text:span><text:span text:style-name="T13"> &lt;= </text:span><text:span text:style-name="T31">0</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when</text:span><text:span text:style-name="T13"> </text:span><text:span text:style-name="T7">channel</text:span><text:span text:style-name="T13"> =&gt;</text:span></text:p>
      <text:p text:style-name="P15"><text:span text:style-name="T13"><text:s text:c="20"/></text:span><text:span text:style-name="T6">if</text:span><text:span text:style-name="T13"> (</text:span><text:span text:style-name="T28">Character</text:span><text:span text:style-name="T33">'pos</text:span><text:span text:style-name="T13">(</text:span><text:span text:style-name="T34">'0'</text:span><text:span text:style-name="T13">) &lt;= </text:span><text:span text:style-name="T28">unsigned</text:span><text:span text:style-name="T13">(</text:span><text:span text:style-name="T26">in_data</text:span><text:span text:style-name="T13">)) </text:span><text:span text:style-name="T6">and</text:span><text:span text:style-name="T13"> (</text:span><text:span text:style-name="T28">unsigned</text:span><text:span text:style-name="T13">(</text:span><text:span text:style-name="T26">in_data</text:span><text:span text:style-name="T13">)&lt;= </text:span><text:span text:style-name="T28">Character</text:span><text:span text:style-name="T33">'pos</text:span><text:span text:style-name="T13">(</text:span><text:span text:style-name="T34">'9'</text:span><text:span text:style-name="T13">)) </text:span><text:span text:style-name="T6">then</text:span></text:p>
      <text:p text:style-name="P15"><text:span text:style-name="T13"><text:s text:c="24"/></text:span><text:span text:style-name="T39">which_channel</text:span><text:span text:style-name="T13"> &lt;= (</text:span><text:span text:style-name="T14">to_integer</text:span><text:span text:style-name="T13">(</text:span><text:span text:style-name="T28">unsigned</text:span><text:span text:style-name="T13">(</text:span><text:span text:style-name="T26">in_data</text:span><text:span text:style-name="T13">)) </text:span><text:span text:style-name="T14">-</text:span><text:span text:style-name="T13"> </text:span><text:span text:style-name="T28">Character</text:span><text:span text:style-name="T33">'pos</text:span><text:span text:style-name="T13">(</text:span><text:span text:style-name="T34">'0'</text:span><text:span text:style-name="T13">));</text:span></text:p>
      <text:p text:style-name="P15"><text:span text:style-name="T13"><text:s text:c="24"/></text:span><text:span text:style-name="T39">state_reg</text:span><text:span text:style-name="T13"> &lt;= </text:span><text:span text:style-name="T7">d_or_w</text:span><text:span text:style-name="T13">;</text:span></text:p>
      <text:p text:style-name="P15"><text:span text:style-name="T13"><text:s text:c="20"/></text:span><text:span text:style-name="T6">elsif</text:span><text:span text:style-name="T13"> </text:span><text:span text:style-name="T26">in_data</text:span><text:span text:style-name="T13"> = </text:span><text:span text:style-name="T34">'#'</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4"/></text:span><text:span text:style-name="T39">which_channel</text:span><text:span text:style-name="T13"> &lt;= </text:span><text:span text:style-name="T39">which_channel</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when</text:span><text:span text:style-name="T13"> </text:span><text:span text:style-name="T7">d_or_w</text:span><text:span text:style-name="T13"> =&gt;</text:span></text:p>
      <text:p text:style-name="P15"><text:span text:style-name="T13"><text:s text:c="20"/></text:span><text:span text:style-name="T6">if</text:span><text:span text:style-name="T13"> </text:span><text:span text:style-name="T26">in_data</text:span><text:span text:style-name="T13"> = </text:span><text:span text:style-name="T34">'d'</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delay_channel</text:span><text:span text:style-name="T13">;</text:span></text:p>
      <text:p text:style-name="P15"><text:span text:style-name="T13"><text:s text:c="20"/></text:span><text:span text:style-name="T6">elsif</text:span><text:span text:style-name="T13"> </text:span><text:span text:style-name="T26">in_data</text:span><text:span text:style-name="T13"> = </text:span><text:span text:style-name="T34">'w'</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width_channel</text:span><text:span text:style-name="T13">;</text:span></text:p>
      <text:p text:style-name="P15"><text:span text:style-name="T13"><text:s text:c="20"/></text:span><text:span text:style-name="T6">elsif</text:span><text:span text:style-name="T13"> </text:span><text:span text:style-name="T26">in_data</text:span><text:span text:style-name="T13"> = </text:span><text:span text:style-name="T34">'#'</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when</text:span><text:span text:style-name="T13"> </text:span><text:span text:style-name="T7">delay_channel</text:span><text:span text:style-name="T13"> =&gt;</text:span></text:p>
      <text:p text:style-name="P15"><text:span text:style-name="T13"><text:s text:c="20"/></text:span><text:span text:style-name="T6">if</text:span><text:span text:style-name="T13"> </text:span><text:span text:style-name="T26">in_data</text:span><text:span text:style-name="T13"> = </text:span><text:span text:style-name="T34">'i'</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delay_channel_inc</text:span><text:span text:style-name="T13">;</text:span></text:p>
      <text:p text:style-name="P15"><text:span text:style-name="T13"><text:s text:c="20"/></text:span><text:span text:style-name="T6">elsif</text:span><text:span text:style-name="T13"> </text:span><text:span text:style-name="T26">in_data</text:span><text:span text:style-name="T13"> = </text:span><text:span text:style-name="T34">'#'</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when</text:span><text:span text:style-name="T13"> </text:span><text:span text:style-name="T7">delay_channel_inc</text:span><text:span text:style-name="T13"> =&gt;</text:span></text:p>
      <text:p text:style-name="P15"><text:span text:style-name="T13"><text:s text:c="20"/></text:span><text:span text:style-name="T6">if</text:span><text:span text:style-name="T13"> </text:span><text:span text:style-name="T26">in_data</text:span><text:span text:style-name="T13"> = </text:span><text:span text:style-name="T34">'u'</text:span><text:span text:style-name="T13"> </text:span><text:span text:style-name="T6">then</text:span><text:span text:style-name="T13"> </text:span></text:p>
      <text:p text:style-name="P15"><text:span text:style-name="T13"><text:s text:c="24"/></text:span><text:span text:style-name="T39">d_succ</text:span><text:span text:style-name="T13">(</text:span><text:span text:style-name="T39">which_channel</text:span><text:span text:style-name="T13">) &lt;= </text:span><text:span text:style-name="T39">d_reg</text:span><text:span text:style-name="T13">(</text:span><text:span text:style-name="T39">which_channel</text:span><text:span text:style-name="T13">) </text:span><text:span text:style-name="T14">+</text:span><text:span text:style-name="T13"> </text:span><text:span text:style-name="T31">250</text:span><text:span text:style-name="T13">;</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lsif</text:span><text:span text:style-name="T13"> </text:span><text:span text:style-name="T26">in_data</text:span><text:span text:style-name="T13"> = </text:span><text:span text:style-name="T34">'d'</text:span><text:span text:style-name="T13"> </text:span><text:span text:style-name="T6">then</text:span><text:span text:style-name="T13"> </text:span></text:p>
      <text:p text:style-name="P15"><text:span text:style-name="T13"><text:s text:c="24"/></text:span><text:span text:style-name="T39">d_succ</text:span><text:span text:style-name="T13">(</text:span><text:span text:style-name="T39">which_channel</text:span><text:span text:style-name="T13">) &lt;= </text:span><text:span text:style-name="T39">d_reg</text:span><text:span text:style-name="T13">(</text:span><text:span text:style-name="T39">which_channel</text:span><text:span text:style-name="T13">) </text:span><text:span text:style-name="T14">-</text:span><text:span text:style-name="T13"> </text:span><text:span text:style-name="T31">250</text:span><text:span text:style-name="T13">;</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lse</text:span></text:p>
      <text:p text:style-name="P15"><text:span text:style-name="T13"><text:s text:c="24"/></text:span><text:span text:style-name="T39">d_succ</text:span><text:span text:style-name="T13">(</text:span><text:span text:style-name="T39">which_channel</text:span><text:span text:style-name="T13">) &lt;= </text:span><text:span text:style-name="T39">d_reg</text:span><text:span text:style-name="T13">(</text:span><text:span text:style-name="T39">which_channel</text:span><text:span text:style-name="T13">); </text:span><text:span text:style-name="T36">-- wait for any of 'u', 'd', '#'</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20"/></text:span><text:span text:style-name="T6">if</text:span><text:span text:style-name="T13"> </text:span><text:span text:style-name="T26">in_data</text:span><text:span text:style-name="T13"> = </text:span><text:span text:style-name="T34">'#'</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when</text:span><text:span text:style-name="T13"> </text:span><text:span text:style-name="T7">width_channel</text:span><text:span text:style-name="T13"> =&gt;</text:span></text:p>
      <text:p text:style-name="P15"><text:span text:style-name="T13"><text:s text:c="20"/></text:span><text:span text:style-name="T6">if</text:span><text:span text:style-name="T13"> </text:span><text:span text:style-name="T26">in_data</text:span><text:span text:style-name="T13"> = </text:span><text:span text:style-name="T34">'i'</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width_channel_inc</text:span><text:span text:style-name="T13">;</text:span></text:p>
      <text:p text:style-name="P15"><text:soft-page-break/><text:span text:style-name="T13"><text:s text:c="20"/></text:span><text:span text:style-name="T6">elsif</text:span><text:span text:style-name="T13"> </text:span><text:span text:style-name="T26">in_data</text:span><text:span text:style-name="T13"> = </text:span><text:span text:style-name="T34">'#'</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when</text:span><text:span text:style-name="T13"> </text:span><text:span text:style-name="T7">width_channel_inc</text:span><text:span text:style-name="T13"> =&gt;</text:span></text:p>
      <text:p text:style-name="P15"><text:span text:style-name="T13"><text:s text:c="20"/></text:span><text:span text:style-name="T6">if</text:span><text:span text:style-name="T13"> </text:span><text:span text:style-name="T26">in_data</text:span><text:span text:style-name="T13"> = </text:span><text:span text:style-name="T34">'u'</text:span><text:span text:style-name="T13"> </text:span><text:span text:style-name="T6">then</text:span><text:span text:style-name="T13"> </text:span></text:p>
      <text:p text:style-name="P15"><text:span text:style-name="T13"><text:s text:c="24"/></text:span><text:span text:style-name="T39">w_succ</text:span><text:span text:style-name="T13">(</text:span><text:span text:style-name="T39">which_channel</text:span><text:span text:style-name="T13">) &lt;= </text:span><text:span text:style-name="T39">w_reg</text:span><text:span text:style-name="T13">(</text:span><text:span text:style-name="T39">which_channel</text:span><text:span text:style-name="T13">) </text:span><text:span text:style-name="T14">+</text:span><text:span text:style-name="T13"> </text:span><text:span text:style-name="T31">250</text:span><text:span text:style-name="T13">;</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lsif</text:span><text:span text:style-name="T13"> </text:span><text:span text:style-name="T26">in_data</text:span><text:span text:style-name="T13"> = </text:span><text:span text:style-name="T34">'d'</text:span><text:span text:style-name="T13"> </text:span><text:span text:style-name="T6">then</text:span><text:span text:style-name="T13"> </text:span></text:p>
      <text:p text:style-name="P15"><text:span text:style-name="T13"><text:s text:c="24"/></text:span><text:span text:style-name="T39">w_succ</text:span><text:span text:style-name="T13">(</text:span><text:span text:style-name="T39">which_channel</text:span><text:span text:style-name="T13">) &lt;= </text:span><text:span text:style-name="T39">w_reg</text:span><text:span text:style-name="T13">(</text:span><text:span text:style-name="T39">which_channel</text:span><text:span text:style-name="T13">) </text:span><text:span text:style-name="T14">-</text:span><text:span text:style-name="T13"> </text:span><text:span text:style-name="T31">250</text:span><text:span text:style-name="T13">;</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lse</text:span></text:p>
      <text:p text:style-name="P15"><text:span text:style-name="T13"><text:s text:c="24"/></text:span><text:span text:style-name="T39">w_succ</text:span><text:span text:style-name="T13">(</text:span><text:span text:style-name="T39">which_channel</text:span><text:span text:style-name="T13">) &lt;= </text:span><text:span text:style-name="T39">w_reg</text:span><text:span text:style-name="T13">(</text:span><text:span text:style-name="T39">which_channel</text:span><text:span text:style-name="T13">); </text:span><text:span text:style-name="T36">-- wait for any of 'u', 'd', '#'</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20"/></text:span><text:span text:style-name="T6">if</text:span><text:span text:style-name="T13"> </text:span><text:span text:style-name="T26">in_data</text:span><text:span text:style-name="T13"> = </text:span><text:span text:style-name="T34">'#'</text:span><text:span text:style-name="T13"> </text:span><text:span text:style-name="T6">then</text:span><text:span text:style-name="T13"> </text:span></text:p>
      <text:p text:style-name="P15"><text:span text:style-name="T13"><text:s text:c="24"/></text:span><text:span text:style-name="T39">state_reg</text:span><text:span text:style-name="T13"> &lt;= </text:span><text:span text:style-name="T7">idle</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case</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text:span></text:p>
      <text:p text:style-name="P15"><text:span text:style-name="T13"><text:s text:c="4"/></text:span><text:span text:style-name="T36">--Output Logic</text:span></text:p>
      <text:p text:style-name="P15"><text:span text:style-name="T13"><text:s text:c="4"/></text:span><text:span text:style-name="T36">--------------------------------------</text:span></text:p>
      <text:p text:style-name="P15"><text:span text:style-name="T13"><text:s text:c="4"/></text:span><text:span text:style-name="T26">d_big</text:span><text:span text:style-name="T13"> <text:s/>&lt;= </text:span><text:span text:style-name="T28">std_logic_vector</text:span><text:span text:style-name="T13">(</text:span><text:span text:style-name="T39">d_reg</text:span><text:span text:style-name="T13">(</text:span><text:span text:style-name="T31">0</text:span><text:span text:style-name="T13">));</text:span></text:p>
      <text:p text:style-name="P15"><text:span text:style-name="T13"><text:s text:c="4"/></text:span><text:span text:style-name="T26">d_mini</text:span><text:span text:style-name="T13"> &lt;= </text:span><text:span text:style-name="T28">std_logic_vector</text:span><text:span text:style-name="T13">(</text:span><text:span text:style-name="T39">d_reg</text:span><text:span text:style-name="T13">(</text:span><text:span text:style-name="T31">1</text:span><text:span text:style-name="T13">));</text:span></text:p>
      <text:p text:style-name="P15"><text:span text:style-name="T13"><text:s text:c="4"/></text:span><text:span text:style-name="T26">d_opo</text:span><text:span text:style-name="T13"> <text:s/>&lt;= </text:span><text:span text:style-name="T28">std_logic_vector</text:span><text:span text:style-name="T13">(</text:span><text:span text:style-name="T39">d_reg</text:span><text:span text:style-name="T13">(</text:span><text:span text:style-name="T31">2</text:span><text:span text:style-name="T13">));</text:span></text:p>
      <text:p text:style-name="P15"><text:span text:style-name="T13"><text:s text:c="4"/></text:span><text:span text:style-name="T26">w_big</text:span><text:span text:style-name="T13"> <text:s/>&lt;= </text:span><text:span text:style-name="T28">std_logic_vector</text:span><text:span text:style-name="T13">(</text:span><text:span text:style-name="T39">w_reg</text:span><text:span text:style-name="T13">(</text:span><text:span text:style-name="T31">0</text:span><text:span text:style-name="T13">));</text:span></text:p>
      <text:p text:style-name="P15"><text:span text:style-name="T13"><text:s text:c="4"/></text:span><text:span text:style-name="T26">w_mini</text:span><text:span text:style-name="T13"> &lt;= </text:span><text:span text:style-name="T28">std_logic_vector</text:span><text:span text:style-name="T13">(</text:span><text:span text:style-name="T39">w_reg</text:span><text:span text:style-name="T13">(</text:span><text:span text:style-name="T31">1</text:span><text:span text:style-name="T13">));</text:span></text:p>
      <text:p text:style-name="P15"><text:span text:style-name="T13"><text:s text:c="4"/></text:span><text:span text:style-name="T26">w_opo</text:span><text:span text:style-name="T13"> <text:s/>&lt;= </text:span><text:span text:style-name="T28">std_logic_vector</text:span><text:span text:style-name="T13">(</text:span><text:span text:style-name="T39">w_reg</text:span><text:span text:style-name="T13">(</text:span><text:span text:style-name="T31">2</text:span><text:span text:style-name="T13">));</text:span></text:p>
      <text:p text:style-name="P15"><text:span text:style-name="T6">end</text:span><text:span text:style-name="T13"> </text:span><text:span text:style-name="T22">fsm_arch</text:span><text:span text:style-name="T13">;</text:span></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db_fsm</text:span><text:span text:style-name="T13"> </text:span><text:span text:style-name="T6">is</text:span><text:span text:style-name="T13"> </text:span><text:span text:style-name="T6">port</text:span><text:span text:style-name="T13">(</text:span></text:p>
      <text:p text:style-name="P15"><text:span text:style-name="T13"><text:s text:c="4"/></text:span><text:span text:style-name="T26">sw</text:span><text:span text:style-name="T13">, </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db</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db_fsm</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db_fsm</text:span><text:span text:style-name="T13"> </text:span><text:span text:style-name="T6">is</text:span></text:p>
      <text:p text:style-name="P15"><text:span text:style-name="T13"><text:s text:c="4"/></text:span><text:span text:style-name="T6">type</text:span><text:span text:style-name="T13"> </text:span><text:span text:style-name="T28">fsm</text:span><text:span text:style-name="T13"> </text:span><text:span text:style-name="T6">is</text:span><text:span text:style-name="T13"> (</text:span><text:span text:style-name="T7">zero</text:span><text:span text:style-name="T13">, </text:span><text:span text:style-name="T7">one</text:span><text:span text:style-name="T13">, </text:span><text:span text:style-name="T7">wait0_1</text:span><text:span text:style-name="T13">, </text:span><text:span text:style-name="T7">wait0_2</text:span><text:span text:style-name="T13">, </text:span><text:span text:style-name="T7">wait0_3</text:span><text:span text:style-name="T13">, </text:span><text:span text:style-name="T7">wait1_1</text:span><text:span text:style-name="T13">, </text:span><text:span text:style-name="T7">wait1_2</text:span><text:span text:style-name="T13">, </text:span><text:span text:style-name="T7">wait1_3</text:span><text:span text:style-name="T13">);</text:span></text:p>
      <text:p text:style-name="P15"><text:span text:style-name="T13"><text:s text:c="4"/></text:span><text:span text:style-name="T6">signal</text:span><text:span text:style-name="T13"> </text:span><text:span text:style-name="T39">state_reg</text:span><text:span text:style-name="T13">, </text:span><text:span text:style-name="T39">state_next</text:span><text:span text:style-name="T13">: </text:span><text:span text:style-name="T28">fsm</text:span><text:span text:style-name="T13">;</text:span></text:p>
      <text:p text:style-name="P15"><text:span text:style-name="T13"><text:s text:c="4"/></text:span><text:span text:style-name="T6">signal</text:span><text:span text:style-name="T13"> </text:span><text:span text:style-name="T39">m_tick</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count_reg</text:span><text:span text:style-name="T13">, </text:span><text:span text:style-name="T39">count_next</text:span><text:span text:style-name="T13">: </text:span><text:span text:style-name="T28">unsigned</text:span><text:span text:style-name="T13">(</text:span><text:span text:style-name="T31">18</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oft-page-break/><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state_reg</text:span><text:span text:style-name="T13"> &lt;= </text:span><text:span text:style-name="T7">zero</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state_reg</text:span><text:span text:style-name="T13"> &lt;= </text:span><text:span text:style-name="T39">state_next</text:span><text:span text:style-name="T13">;</text:span></text:p>
      <text:p text:style-name="P15"><text:span text:style-name="T13"><text:s text:c="12"/></text:span><text:span text:style-name="T39">count_reg</text:span><text:span text:style-name="T13"> &lt;= </text:span><text:span text:style-name="T39">count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count_next</text:span><text:span text:style-name="T13"> &lt;= </text:span><text:span text:style-name="T39">count_reg</text:span><text:span text:style-name="T13"> </text:span><text:span text:style-name="T14">+</text:span><text:span text:style-name="T31">1</text:span><text:span text:style-name="T13">;</text:span></text:p>
      <text:p text:style-name="P15"><text:span text:style-name="T13"><text:s text:c="4"/></text:span><text:span text:style-name="T39">m_tick</text:span><text:span text:style-name="T13"> &lt;= </text:span><text:span text:style-name="T34">'1'</text:span><text:span text:style-name="T13"> </text:span><text:span text:style-name="T6">when</text:span><text:span text:style-name="T13"> </text:span><text:span text:style-name="T39">count_reg</text:span><text:span text:style-name="T13"> = </text:span><text:span text:style-name="T31">0</text:span><text:span text:style-name="T13"> </text:span><text:span text:style-name="T6">else</text:span><text:span text:style-name="T13"> </text:span><text:span text:style-name="T34">'0'</text:span><text:span text:style-name="T13">;</text:span></text:p>
      <text:p text:style-name="P16"/>
      <text:p text:style-name="P15"><text:span text:style-name="T13"><text:s text:c="4"/></text:span><text:span text:style-name="T6">process</text:span><text:span text:style-name="T13">(</text:span><text:span text:style-name="T39">state_reg</text:span><text:span text:style-name="T13">, </text:span><text:span text:style-name="T26">sw</text:span><text:span text:style-name="T13">, </text:span><text:span text:style-name="T39">m_tick</text:span><text:span text:style-name="T13">)</text:span></text:p>
      <text:p text:style-name="P15"><text:span text:style-name="T13"><text:s text:c="4"/></text:span><text:span text:style-name="T6">begin</text:span></text:p>
      <text:p text:style-name="P15"><text:span text:style-name="T13"><text:s text:c="8"/></text:span><text:span text:style-name="T39">state_next</text:span><text:span text:style-name="T13"> &lt;= </text:span><text:span text:style-name="T39">state_reg</text:span><text:span text:style-name="T13">;</text:span></text:p>
      <text:p text:style-name="P15"><text:span text:style-name="T13"><text:s text:c="8"/></text:span><text:span text:style-name="T26">db</text:span><text:span text:style-name="T13"> &lt;= </text:span><text:span text:style-name="T34">'0'</text:span><text:span text:style-name="T13">;</text:span></text:p>
      <text:p text:style-name="P16"/>
      <text:p text:style-name="P15"><text:span text:style-name="T13"><text:s text:c="8"/></text:span><text:span text:style-name="T6">case</text:span><text:span text:style-name="T13"> </text:span><text:span text:style-name="T39">state_reg</text:span><text:span text:style-name="T13"> </text:span><text:span text:style-name="T6">is</text:span></text:p>
      <text:p text:style-name="P15"><text:span text:style-name="T13"><text:s text:c="12"/></text:span><text:span text:style-name="T6">when</text:span><text:span text:style-name="T13"> </text:span><text:span text:style-name="T7">zero</text:span><text:span text:style-name="T13"> =&gt; </text:span></text:p>
      <text:p text:style-name="P15"><text:span text:style-name="T13"><text:s text:c="16"/></text:span><text:span text:style-name="T6">if</text:span><text:span text:style-name="T13"> </text:span><text:span text:style-name="T26">sw</text:span><text:span text:style-name="T13"> = </text:span><text:span text:style-name="T34">'1'</text:span><text:span text:style-name="T13"> </text:span><text:span text:style-name="T6">then</text:span></text:p>
      <text:p text:style-name="P15"><text:span text:style-name="T13"><text:s text:c="20"/></text:span><text:span text:style-name="T39">state_next</text:span><text:span text:style-name="T13"> &lt;= </text:span><text:span text:style-name="T7">wait1_1</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when</text:span><text:span text:style-name="T13"> </text:span><text:span text:style-name="T7">wait1_1</text:span><text:span text:style-name="T13"> =&gt; </text:span></text:p>
      <text:p text:style-name="P15"><text:span text:style-name="T13"><text:s text:c="16"/></text:span><text:span text:style-name="T6">if</text:span><text:span text:style-name="T13"> </text:span><text:span text:style-name="T26">sw</text:span><text:span text:style-name="T13"> = </text:span><text:span text:style-name="T34">'1'</text:span><text:span text:style-name="T13"> </text:span><text:span text:style-name="T6">then</text:span></text:p>
      <text:p text:style-name="P15"><text:span text:style-name="T13"><text:s text:c="20"/></text:span><text:span text:style-name="T6">if</text:span><text:span text:style-name="T13"> </text:span><text:span text:style-name="T39">m_tick</text:span><text:span text:style-name="T13"> = </text:span><text:span text:style-name="T34">'1'</text:span><text:span text:style-name="T13"> </text:span><text:span text:style-name="T6">then</text:span></text:p>
      <text:p text:style-name="P15"><text:span text:style-name="T13"><text:s text:c="24"/></text:span><text:span text:style-name="T39">state_next</text:span><text:span text:style-name="T13"> &lt;= </text:span><text:span text:style-name="T7">wait1_2</text:span><text:span text:style-name="T13">;</text:span></text:p>
      <text:p text:style-name="P15"><text:span text:style-name="T13"><text:s text:c="20"/></text:span><text:span text:style-name="T6">else</text:span><text:span text:style-name="T13"> </text:span><text:span text:style-name="T39">state_next</text:span><text:span text:style-name="T13"> &lt;= </text:span><text:span text:style-name="T7">wait1_1</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lse</text:span><text:span text:style-name="T13"> </text:span><text:span text:style-name="T39">state_next</text:span><text:span text:style-name="T13"> &lt;= </text:span><text:span text:style-name="T7">zero</text:span><text:span text:style-name="T13">;</text:span></text:p>
      <text:p text:style-name="P15"><text:span text:style-name="T13"><text:s text:c="8"/></text:span><text:span text:style-name="T6">end</text:span><text:span text:style-name="T13"> </text:span><text:span text:style-name="T6">if</text:span><text:span text:style-name="T13">;</text:span></text:p>
      <text:p text:style-name="P16"/>
      <text:p text:style-name="P15"><text:span text:style-name="T13"><text:s text:c="4"/></text:span><text:span text:style-name="T6">when</text:span><text:span text:style-name="T13"> </text:span><text:span text:style-name="T7">wait1_2</text:span><text:span text:style-name="T13"> =&gt; </text:span></text:p>
      <text:p text:style-name="P15"><text:span text:style-name="T13"><text:s text:c="8"/></text:span><text:span text:style-name="T6">if</text:span><text:span text:style-name="T13"> </text:span><text:span text:style-name="T26">sw</text:span><text:span text:style-name="T13"> = </text:span><text:span text:style-name="T34">'1'</text:span><text:span text:style-name="T13"> </text:span><text:span text:style-name="T6">then</text:span></text:p>
      <text:p text:style-name="P15"><text:span text:style-name="T13"><text:s text:c="12"/></text:span><text:span text:style-name="T6">if</text:span><text:span text:style-name="T13"> </text:span><text:span text:style-name="T39">m_tick</text:span><text:span text:style-name="T13"> = </text:span><text:span text:style-name="T34">'1'</text:span><text:span text:style-name="T13"> </text:span><text:span text:style-name="T6">then</text:span></text:p>
      <text:p text:style-name="P15"><text:span text:style-name="T13"><text:s text:c="16"/></text:span><text:span text:style-name="T39">state_next</text:span><text:span text:style-name="T13"> &lt;= </text:span><text:span text:style-name="T7">wait1_3</text:span><text:span text:style-name="T13">;</text:span></text:p>
      <text:p text:style-name="P15"><text:span text:style-name="T13"><text:s text:c="12"/></text:span><text:span text:style-name="T6">else</text:span><text:span text:style-name="T13"> </text:span><text:span text:style-name="T39">state_next</text:span><text:span text:style-name="T13"> &lt;= </text:span><text:span text:style-name="T7">wait1_2</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lse</text:span><text:span text:style-name="T13"> </text:span><text:span text:style-name="T39">state_next</text:span><text:span text:style-name="T13"> &lt;= </text:span><text:span text:style-name="T7">zero</text:span><text:span text:style-name="T13">;</text:span></text:p>
      <text:p text:style-name="P15"><text:span text:style-name="T6">end</text:span><text:span text:style-name="T13"> </text:span><text:span text:style-name="T6">if</text:span><text:span text:style-name="T13">; <text:s text:c="3"/></text:span></text:p>
      <text:p text:style-name="P16"/>
      <text:p text:style-name="P15"><text:span text:style-name="T6">when</text:span><text:span text:style-name="T13"> </text:span><text:span text:style-name="T7">wait1_3</text:span><text:span text:style-name="T13"> =&gt; </text:span></text:p>
      <text:p text:style-name="P15"><text:span text:style-name="T13"><text:s text:c="4"/></text:span><text:span text:style-name="T6">if</text:span><text:span text:style-name="T13"> </text:span><text:span text:style-name="T26">sw</text:span><text:span text:style-name="T13"> = </text:span><text:span text:style-name="T34">'1'</text:span><text:span text:style-name="T13"> </text:span><text:span text:style-name="T6">then</text:span></text:p>
      <text:p text:style-name="P15"><text:span text:style-name="T13"><text:s text:c="8"/></text:span><text:span text:style-name="T6">if</text:span><text:span text:style-name="T13"> </text:span><text:span text:style-name="T39">m_tick</text:span><text:span text:style-name="T13"> = </text:span><text:span text:style-name="T34">'1'</text:span><text:span text:style-name="T13"> </text:span><text:span text:style-name="T6">then</text:span></text:p>
      <text:p text:style-name="P15"><text:span text:style-name="T13"><text:s text:c="12"/></text:span><text:span text:style-name="T39">state_next</text:span><text:span text:style-name="T13"> &lt;= </text:span><text:span text:style-name="T7">one</text:span><text:span text:style-name="T13">;</text:span></text:p>
      <text:p text:style-name="P15"><text:span text:style-name="T13"><text:s text:c="8"/></text:span><text:span text:style-name="T6">else</text:span><text:span text:style-name="T13"> </text:span><text:span text:style-name="T39">state_next</text:span><text:span text:style-name="T13"> &lt;= </text:span><text:span text:style-name="T7">wait1_3</text:span><text:span text:style-name="T13">;</text:span></text:p>
      <text:p text:style-name="P15"><text:span text:style-name="T13"><text:s text:c="4"/></text:span><text:span text:style-name="T6">end</text:span><text:span text:style-name="T13"> </text:span><text:span text:style-name="T6">if</text:span><text:span text:style-name="T13">;</text:span></text:p>
      <text:p text:style-name="P15"><text:span text:style-name="T6">else</text:span><text:span text:style-name="T13"> </text:span><text:span text:style-name="T39">state_next</text:span><text:span text:style-name="T13"> &lt;= </text:span><text:span text:style-name="T7">zero</text:span><text:span text:style-name="T13">;</text:span></text:p>
      <text:p text:style-name="P15"><text:span text:style-name="T6">end</text:span><text:span text:style-name="T13"> </text:span><text:span text:style-name="T6">if</text:span><text:span text:style-name="T13">;</text:span></text:p>
      <text:p text:style-name="P16"/>
      <text:p text:style-name="P15"><text:span text:style-name="T6">when</text:span><text:span text:style-name="T13"> </text:span><text:span text:style-name="T7">one</text:span><text:span text:style-name="T13"> =&gt; </text:span><text:span text:style-name="T26">db</text:span><text:span text:style-name="T13"> &lt;= </text:span><text:span text:style-name="T34">'1'</text:span><text:span text:style-name="T13">;</text:span></text:p>
      <text:p text:style-name="P15"><text:soft-page-break/><text:span text:style-name="T6">if</text:span><text:span text:style-name="T13"> </text:span><text:span text:style-name="T26">sw</text:span><text:span text:style-name="T13"> = </text:span><text:span text:style-name="T34">'0'</text:span><text:span text:style-name="T13"> </text:span><text:span text:style-name="T6">then</text:span></text:p>
      <text:p text:style-name="P15"><text:span text:style-name="T13"><text:s text:c="4"/></text:span><text:span text:style-name="T39">state_next</text:span><text:span text:style-name="T13"> &lt;= </text:span><text:span text:style-name="T7">wait0_1</text:span><text:span text:style-name="T13">;</text:span></text:p>
      <text:p text:style-name="P15"><text:span text:style-name="T6">end</text:span><text:span text:style-name="T13"> </text:span><text:span text:style-name="T6">if</text:span><text:span text:style-name="T13">;</text:span></text:p>
      <text:p text:style-name="P16"/>
      <text:p text:style-name="P15"><text:span text:style-name="T6">when</text:span><text:span text:style-name="T13"> </text:span><text:span text:style-name="T7">wait0_1</text:span><text:span text:style-name="T13"> =&gt; </text:span><text:span text:style-name="T26">db</text:span><text:span text:style-name="T13"> &lt;= </text:span><text:span text:style-name="T34">'1'</text:span><text:span text:style-name="T13">;</text:span></text:p>
      <text:p text:style-name="P15"><text:span text:style-name="T6">if</text:span><text:span text:style-name="T13"> </text:span><text:span text:style-name="T26">sw</text:span><text:span text:style-name="T13"> = </text:span><text:span text:style-name="T34">'0'</text:span><text:span text:style-name="T13"> </text:span><text:span text:style-name="T6">then</text:span></text:p>
      <text:p text:style-name="P15"><text:span text:style-name="T13"><text:s text:c="4"/></text:span><text:span text:style-name="T6">if</text:span><text:span text:style-name="T13"> </text:span><text:span text:style-name="T39">m_tick</text:span><text:span text:style-name="T13"> = </text:span><text:span text:style-name="T34">'1'</text:span><text:span text:style-name="T13"> </text:span><text:span text:style-name="T6">then</text:span></text:p>
      <text:p text:style-name="P15"><text:span text:style-name="T13"><text:s text:c="8"/></text:span><text:span text:style-name="T39">state_next</text:span><text:span text:style-name="T13"> &lt;= </text:span><text:span text:style-name="T7">wait0_2</text:span><text:span text:style-name="T13">;</text:span></text:p>
      <text:p text:style-name="P15"><text:span text:style-name="T13"><text:s text:c="4"/></text:span><text:span text:style-name="T6">else</text:span><text:span text:style-name="T13"> </text:span><text:span text:style-name="T39">state_next</text:span><text:span text:style-name="T13"> &lt;= </text:span><text:span text:style-name="T7">wait0_1</text:span><text:span text:style-name="T13">;</text:span></text:p>
      <text:p text:style-name="P15"><text:span text:style-name="T6">end</text:span><text:span text:style-name="T13"> </text:span><text:span text:style-name="T6">if</text:span><text:span text:style-name="T13">;</text:span></text:p>
      <text:p text:style-name="P15"><text:span text:style-name="T6">else</text:span><text:span text:style-name="T13"> </text:span><text:span text:style-name="T39">state_next</text:span><text:span text:style-name="T13"> &lt;= </text:span><text:span text:style-name="T7">one</text:span><text:span text:style-name="T13">;</text:span></text:p>
      <text:p text:style-name="P15"><text:span text:style-name="T6">end</text:span><text:span text:style-name="T13"> </text:span><text:span text:style-name="T6">if</text:span><text:span text:style-name="T13">;</text:span></text:p>
      <text:p text:style-name="P16"/>
      <text:p text:style-name="P15"><text:span text:style-name="T6">when</text:span><text:span text:style-name="T13"> </text:span><text:span text:style-name="T7">wait0_2</text:span><text:span text:style-name="T13"> =&gt; </text:span><text:span text:style-name="T26">db</text:span><text:span text:style-name="T13"> &lt;= </text:span><text:span text:style-name="T34">'1'</text:span><text:span text:style-name="T13">;</text:span></text:p>
      <text:p text:style-name="P15"><text:span text:style-name="T6">if</text:span><text:span text:style-name="T13"> </text:span><text:span text:style-name="T26">sw</text:span><text:span text:style-name="T13"> = </text:span><text:span text:style-name="T34">'0'</text:span><text:span text:style-name="T13"> </text:span><text:span text:style-name="T6">then</text:span></text:p>
      <text:p text:style-name="P15"><text:span text:style-name="T13"><text:s text:c="4"/></text:span><text:span text:style-name="T6">if</text:span><text:span text:style-name="T13"> </text:span><text:span text:style-name="T39">m_tick</text:span><text:span text:style-name="T13"> = </text:span><text:span text:style-name="T34">'1'</text:span><text:span text:style-name="T13"> </text:span><text:span text:style-name="T6">then</text:span></text:p>
      <text:p text:style-name="P15"><text:span text:style-name="T13"><text:s text:c="8"/></text:span><text:span text:style-name="T39">state_next</text:span><text:span text:style-name="T13"> &lt;= </text:span><text:span text:style-name="T7">wait0_3</text:span><text:span text:style-name="T13">;</text:span></text:p>
      <text:p text:style-name="P15"><text:span text:style-name="T13"><text:s text:c="4"/></text:span><text:span text:style-name="T6">else</text:span><text:span text:style-name="T13"> </text:span><text:span text:style-name="T39">state_next</text:span><text:span text:style-name="T13"> &lt;= </text:span><text:span text:style-name="T7">wait0_2</text:span><text:span text:style-name="T13">;</text:span></text:p>
      <text:p text:style-name="P15"><text:span text:style-name="T6">end</text:span><text:span text:style-name="T13"> </text:span><text:span text:style-name="T6">if</text:span><text:span text:style-name="T13">;</text:span></text:p>
      <text:p text:style-name="P15"><text:span text:style-name="T6">else</text:span><text:span text:style-name="T13"> </text:span><text:span text:style-name="T39">state_next</text:span><text:span text:style-name="T13"> &lt;= </text:span><text:span text:style-name="T7">one</text:span><text:span text:style-name="T13">; <text:s text:c="15"/></text:span></text:p>
      <text:p text:style-name="P15"><text:span text:style-name="T6">end</text:span><text:span text:style-name="T13"> </text:span><text:span text:style-name="T6">if</text:span><text:span text:style-name="T13">;</text:span></text:p>
      <text:p text:style-name="P16"/>
      <text:p text:style-name="P15"><text:span text:style-name="T6">when</text:span><text:span text:style-name="T13"> </text:span><text:span text:style-name="T7">wait0_3</text:span><text:span text:style-name="T13"> =&gt; </text:span><text:span text:style-name="T26">db</text:span><text:span text:style-name="T13"> &lt;= </text:span><text:span text:style-name="T34">'1'</text:span><text:span text:style-name="T13">;</text:span></text:p>
      <text:p text:style-name="P15"><text:span text:style-name="T6">if</text:span><text:span text:style-name="T13"> </text:span><text:span text:style-name="T26">sw</text:span><text:span text:style-name="T13"> = </text:span><text:span text:style-name="T34">'0'</text:span><text:span text:style-name="T13"> </text:span><text:span text:style-name="T6">then</text:span></text:p>
      <text:p text:style-name="P15"><text:span text:style-name="T13"><text:s text:c="4"/></text:span><text:span text:style-name="T6">if</text:span><text:span text:style-name="T13"> </text:span><text:span text:style-name="T39">m_tick</text:span><text:span text:style-name="T13"> = </text:span><text:span text:style-name="T34">'1'</text:span><text:span text:style-name="T13"> </text:span><text:span text:style-name="T6">then</text:span></text:p>
      <text:p text:style-name="P15"><text:span text:style-name="T13"><text:s text:c="8"/></text:span><text:span text:style-name="T39">state_next</text:span><text:span text:style-name="T13"> &lt;= </text:span><text:span text:style-name="T7">zero</text:span><text:span text:style-name="T13">;</text:span></text:p>
      <text:p text:style-name="P15"><text:span text:style-name="T13"><text:s text:c="4"/></text:span><text:span text:style-name="T6">else</text:span><text:span text:style-name="T13"> </text:span><text:span text:style-name="T39">state_next</text:span><text:span text:style-name="T13"> &lt;= </text:span><text:span text:style-name="T7">wait0_3</text:span><text:span text:style-name="T13">;</text:span></text:p>
      <text:p text:style-name="P15"><text:span text:style-name="T6">end</text:span><text:span text:style-name="T13"> </text:span><text:span text:style-name="T6">if</text:span><text:span text:style-name="T13">;</text:span></text:p>
      <text:p text:style-name="P15"><text:span text:style-name="T6">else</text:span><text:span text:style-name="T13"> </text:span><text:span text:style-name="T39">state_next</text:span><text:span text:style-name="T13"> &lt;= </text:span><text:span text:style-name="T7">one</text:span><text:span text:style-name="T13">;</text:span></text:p>
      <text:p text:style-name="P15"><text:span text:style-name="T6">end</text:span><text:span text:style-name="T13"> </text:span><text:span text:style-name="T6">if</text:span><text:span text:style-name="T13">;</text:span></text:p>
      <text:p text:style-name="P16"/>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arch</text:span><text:span text:style-name="T13">; <text:s text:c="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24">--library ieee; </text:p>
      <text:p text:style-name="P24">--</text:p>
      <text:p text:style-name="P24">--use ieee.std_logic_1164.all;</text:p>
      <text:p text:style-name="P24">--</text:p>
      <text:p text:style-name="P24">--entity SReg is</text:p>
      <text:p text:style-name="P24">--</text:p>
      <text:p text:style-name="P24">--generic ( n : integer := 4);</text:p>
      <text:p text:style-name="P24">--</text:p>
      <text:p text:style-name="P24">--port( clk: in std_logic; </text:p>
      <text:p text:style-name="P24">-- <text:s text:c="5"/>reset: in std_logic; </text:p>
      <text:p text:style-name="P24">-- <text:s text:c="5"/>enable: in std_logic; --enables shifting </text:p>
      <text:p text:style-name="P24">-- <text:s text:c="5"/>parallel_in: in std_logic_vector(n-1 downto 0); </text:p>
      <text:p text:style-name="P24">-- <text:s text:c="5"/>s_in: in std_logic; --serial input </text:p>
      <text:p text:style-name="P24">-- <text:s text:c="5"/>s_out: out std_logic --serial output</text:p>
      <text:p text:style-name="P24">--</text:p>
      <text:p text:style-name="P24">--);</text:p>
      <text:p text:style-name="P24">--end SReg;</text:p>
      <text:p text:style-name="P24">--</text:p>
      <text:p text:style-name="P24">--architecture behavioral of SReg is</text:p>
      <text:p text:style-name="P24">--</text:p>
      <text:p text:style-name="P24">--signal temp_reg: std_logic_vector(n-1 downto 0) := (Others =&gt; '0');</text:p>
      <text:p text:style-name="P24">--TYPE POSSIBLE_STATES IS (waiting, shifting);</text:p>
      <text:p text:style-name="P24">--signal state : POSSIBLE_STATES;</text:p>
      <text:p text:style-name="P24">--begin</text:p>
      <text:p text:style-name="P24">--</text:p>
      <text:p text:style-name="P24">--process(clk,reset)</text:p>
      <text:p text:style-name="P24">-- <text:s text:c="3"/>variable shift_clkdiver: integer := 0;</text:p>
      <text:p text:style-name="P24">--begin</text:p>
      <text:p text:style-name="P24">--</text:p>
      <text:p text:style-name="P24">-- <text:s text:c="2"/>if(reset = '1') then</text:p>
      <text:p text:style-name="P24">-- <text:s text:c="5"/>temp_reg &lt;= (others =&gt; '0'); <text:s text:c="2"/></text:p>
      <text:p text:style-name="P24">-- <text:s text:c="5"/>state &lt;= waiting;</text:p>
      <text:p text:style-name="P24">-- <text:s text:c="5"/>shift_clkdiver := 0;</text:p>
      <text:p text:style-name="P24">-- <text:s text:c="2"/>elsif(clk'event and clk='1') then</text:p>
      <text:p text:style-name="P24">-- <text:s text:c="7"/>case state is</text:p>
      <text:p text:style-name="P24">-- <text:s text:c="11"/>when waiting =&gt;</text:p>
      <text:p text:style-name="P24">-- <text:s text:c="15"/>shift_clkdiver := 0;</text:p>
      <text:p text:style-name="P24">-- <text:s text:c="15"/>temp_reg &lt;= parallel_in;</text:p>
      <text:p text:style-name="P24">-- <text:s text:c="15"/>s_out &lt;= '0';</text:p>
      <text:p text:style-name="P24">-- <text:s text:c="15"/>if(enable = '1') then</text:p>
      <text:p text:style-name="P24">-- <text:s text:c="19"/>state &lt;= shifting;</text:p>
      <text:p text:style-name="P24">-- <text:s text:c="15"/>else</text:p>
      <text:p text:style-name="P24">-- <text:s text:c="19"/>state &lt;= waiting;</text:p>
      <text:p text:style-name="P24">-- <text:s text:c="15"/>end if;</text:p>
      <text:p text:style-name="P24">-- <text:s text:c="11"/>when shifting =&gt;</text:p>
      <text:p text:style-name="P24">-- <text:s text:c="15"/>shift_clkdiver := shift_clkdiver + 1;</text:p>
      <text:p text:style-name="P24">-- <text:s text:c="15"/>s_out &lt;= temp_reg(0);</text:p>
      <text:p text:style-name="P24">-- <text:s text:c="15"/>temp_reg &lt;= s_in &amp; temp_reg(n-1 downto 1);</text:p>
      <text:p text:style-name="P24"><text:soft-page-break/>-- <text:s text:c="15"/>if (shift_clkdiver &gt;= n-1) then</text:p>
      <text:p text:style-name="P24">-- <text:s text:c="19"/>state &lt;= waiting;</text:p>
      <text:p text:style-name="P24">-- <text:s text:c="15"/>else</text:p>
      <text:p text:style-name="P24">-- <text:s text:c="19"/>state &lt;= shifting;</text:p>
      <text:p text:style-name="P24">-- <text:s text:c="15"/>end if; </text:p>
      <text:p text:style-name="P24">-- <text:s text:c="7"/>end case;</text:p>
      <text:p text:style-name="P24">-- <text:s text:c="3"/>end if;</text:p>
      <text:p text:style-name="P24">--end process;</text:p>
      <text:p text:style-name="P24">--</text:p>
      <text:p text:style-name="P24">--end behavioral;</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sreg</text:span><text:span text:style-name="T13"> </text:span><text:span text:style-name="T6">is</text:span><text:span text:style-name="T13"> </text:span><text:span text:style-name="T6">port</text:span><text:span text:style-name="T13">(</text:span></text:p>
      <text:p text:style-name="P15"><text:span text:style-name="T13"><text:s text:c="4"/></text:span><text:span text:style-name="T26">d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load</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dout</text:span><text:span text:style-name="T13">, </text:span><text:span text:style-name="T26">tx_busy</text:span><text:span text:style-name="T13"> : </text:span><text:span text:style-name="T6">out</text:span><text:span text:style-name="T13"> </text:span><text:span text:style-name="T28">std_logic</text:span><text:span text:style-name="T13">;</text:span></text:p>
      <text:p text:style-name="P15"><text:span text:style-name="T13"><text:s text:c="4"/></text:span><text:span text:style-name="T26">clk</text:span><text:span text:style-name="T13">, </text:span><text:span text:style-name="T26">rst</text:span><text:span text:style-name="T13"> : </text:span><text:span text:style-name="T6">in</text:span><text:span text:style-name="T13"> </text:span><text:span text:style-name="T28">std_logic</text:span><text:span text:style-name="T13">);</text:span></text:p>
      <text:p text:style-name="P15"><text:span text:style-name="T6">end</text:span><text:span text:style-name="T13"> </text:span><text:span text:style-name="T22">sreg</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sreg</text:span><text:span text:style-name="T13"> </text:span><text:span text:style-name="T6">is</text:span></text:p>
      <text:p text:style-name="P15"><text:span text:style-name="T13"><text:s text:c="4"/></text:span><text:span text:style-name="T6">constant</text:span><text:span text:style-name="T13"> </text:span><text:span text:style-name="T7">width_1</text:span><text:span text:style-name="T13"> : </text:span><text:span text:style-name="T28">natural</text:span><text:span text:style-name="T13"> := </text:span><text:span text:style-name="T31">8</text:span><text:span text:style-name="T13">; <text:s text:c="3"/></text:span></text:p>
      <text:p text:style-name="P15"><text:span text:style-name="T13"><text:s text:c="4"/></text:span><text:span text:style-name="T6">constant</text:span><text:span text:style-name="T13"> </text:span><text:span text:style-name="T7">width_2</text:span><text:span text:style-name="T13"> : </text:span><text:span text:style-name="T28">natural</text:span><text:span text:style-name="T13"> := </text:span><text:span text:style-name="T31">3</text:span><text:span text:style-name="T13">;</text:span></text:p>
      <text:p text:style-name="P16"/>
      <text:p text:style-name="P15"><text:span text:style-name="T13"><text:s text:c="4"/></text:span><text:span text:style-name="T6">signal</text:span><text:span text:style-name="T13"> </text:span><text:span text:style-name="T39">clkdiv</text:span><text:span text:style-name="T13"> <text:s text:c="12"/>: </text:span><text:span text:style-name="T28">unsigned</text:span><text:span text:style-name="T13">(</text:span><text:span text:style-name="T7">width_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clkdiv_sum</text:span><text:span text:style-name="T13"> <text:s text:c="4"/>: </text:span><text:span text:style-name="T28">unsigned</text:span><text:span text:style-name="T13">(</text:span><text:span text:style-name="T7">width_1</text:span><text:span text:style-name="T13"> </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ticktx</text:span><text:span text:style-name="T13"> <text:s text:c="11"/>: </text:span><text:span text:style-name="T28">std_logic</text:span><text:span text:style-name="T13">;</text:span></text:p>
      <text:p text:style-name="P15"><text:span text:style-name="T13"><text:s text:c="4"/></text:span><text:span text:style-name="T6">signal</text:span><text:span text:style-name="T13"> </text:span><text:span text:style-name="T39">tickbit</text:span><text:span text:style-name="T13"> <text:s text:c="11"/>: </text:span><text:span text:style-name="T28">std_logic</text:span><text:span text:style-name="T13">;</text:span></text:p>
      <text:p text:style-name="P15"><text:span text:style-name="T13"><text:s text:c="4"/></text:span><text:span text:style-name="T6">signal</text:span><text:span text:style-name="T13"> </text:span><text:span text:style-name="T39">load_bitcount</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bitcount</text:span><text:span text:style-name="T13"> <text:s text:c="8"/>: </text:span><text:span text:style-name="T28">unsigned</text:span><text:span text:style-name="T13">(</text:span><text:span text:style-name="T7">width_2</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bitcount_sum</text:span><text:span text:style-name="T13"> <text:s text:c="4"/>: </text:span><text:span text:style-name="T28">unsigned</text:span><text:span text:style-name="T13">(</text:span><text:span text:style-name="T7">width_2</text:span><text:span text:style-name="T13"> </text:span><text:span text:style-name="T14">+</text:span><text:span text:style-name="T31">1</text:span><text:span text:style-name="T13"> </text:span><text:span text:style-name="T6">downto</text:span><text:span text:style-name="T13"> </text:span><text:span text:style-name="T31">0</text:span><text:span text:style-name="T13">);</text:span></text:p>
      <text:p text:style-name="P16"/>
      <text:p text:style-name="P15"><text:span text:style-name="T13"><text:s text:c="4"/></text:span><text:span text:style-name="T6">signal</text:span><text:span text:style-name="T13"> </text:span><text:span text:style-name="T39">data_shift</text:span><text:span text:style-name="T13"> : </text:span><text:span text:style-name="T28">std_logic_vector</text:span><text:span text:style-name="T13">(</text:span><text:span text:style-name="T31">9</text:span><text:span text:style-name="T13"> </text:span><text:span text:style-name="T6">downto</text:span><text:span text:style-name="T13"> </text:span><text:span text:style-name="T31">0</text:span><text:span text:style-name="T13">);</text:span></text:p>
      <text:p text:style-name="P23">begin</text:p>
      <text:p text:style-name="P16"/>
      <text:p text:style-name="P15"><text:span text:style-name="T13"><text:s text:c="4"/></text:span><text:span text:style-name="T39">clkdiv_sum</text:span><text:span text:style-name="T13"> &lt;= </text:span><text:span text:style-name="T14">resize</text:span><text:span text:style-name="T13">(</text:span><text:span text:style-name="T39">clkdiv</text:span><text:span text:style-name="T13">,</text:span><text:span text:style-name="T7">width_1</text:span><text:span text:style-name="T13"> </text:span><text:span text:style-name="T14">+</text:span><text:span text:style-name="T31">2</text:span><text:span text:style-name="T13">) </text:span><text:span text:style-name="T14">-</text:span><text:span text:style-name="T31">1</text:span><text:span text:style-name="T13">; <text:s text:c="3"/></text:span></text:p>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text:span><text:span text:style-name="T39">clkdiv</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ticktx</text:span><text:span text:style-name="T13"> = </text:span><text:span text:style-name="T34">'1'</text:span><text:span text:style-name="T13"> </text:span><text:span text:style-name="T6">then</text:span></text:p>
      <text:p text:style-name="P15"><text:span text:style-name="T13"><text:s text:c="16"/></text:span><text:span text:style-name="T39">clkdiv</text:span><text:span text:style-name="T13"> &lt;= </text:span><text:span text:style-name="T34">"110110010"</text:span><text:span text:style-name="T13">;</text:span></text:p>
      <text:p text:style-name="P15"><text:span text:style-name="T13"><text:s text:c="12"/></text:span><text:span text:style-name="T6">else</text:span></text:p>
      <text:p text:style-name="P15"><text:span text:style-name="T13"><text:s text:c="16"/></text:span><text:span text:style-name="T39">clkdiv</text:span><text:span text:style-name="T13"> &lt;= </text:span><text:span text:style-name="T39">clkdiv_sum</text:span><text:span text:style-name="T13">(</text:span><text:span text:style-name="T7">width_1</text:span><text:span text:style-name="T13"> </text:span><text:span text:style-name="T6">downto</text:span><text:span text:style-name="T13"> </text:span><text:span text:style-name="T31">0</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oft-page-break/><text:span text:style-name="T13"><text:s text:c="4"/></text:span><text:span text:style-name="T6">end</text:span><text:span text:style-name="T13"> </text:span><text:span text:style-name="T6">process</text:span><text:span text:style-name="T13">; <text:s text:c="3"/></text:span></text:p>
      <text:p text:style-name="P15"><text:span text:style-name="T13"><text:s text:c="4"/></text:span><text:span text:style-name="T39">ticktx</text:span><text:span text:style-name="T13"> &lt;= </text:span><text:span text:style-name="T39">clkdiv_sum</text:span><text:span text:style-name="T13">(</text:span><text:span text:style-name="T7">width_1</text:span><text:span text:style-name="T13"> </text:span><text:span text:style-name="T14">+</text:span><text:span text:style-name="T31">1</text:span><text:span text:style-name="T13">);</text:span></text:p>
      <text:p text:style-name="P16"/>
      <text:p text:style-name="P15"><text:span text:style-name="T13"><text:s text:c="4"/></text:span><text:span text:style-name="T39">bitcount_sum</text:span><text:span text:style-name="T13"> &lt;= </text:span><text:span text:style-name="T14">resize</text:span><text:span text:style-name="T13">(</text:span><text:span text:style-name="T39">bitcount</text:span><text:span text:style-name="T13">, </text:span><text:span text:style-name="T7">width_2</text:span><text:span text:style-name="T13"> </text:span><text:span text:style-name="T14">+</text:span><text:span text:style-name="T31">2</text:span><text:span text:style-name="T13">) </text:span><text:span text:style-name="T14">-</text:span><text:span text:style-name="T31">1</text:span><text:span text:style-name="T13">;</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text:span><text:span text:style-name="T39">bitcount</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ticktx</text:span><text:span text:style-name="T13"> = </text:span><text:span text:style-name="T34">'1'</text:span><text:span text:style-name="T13"> </text:span><text:span text:style-name="T6">then</text:span><text:span text:style-name="T13"> </text:span><text:span text:style-name="T36">--enable</text:span></text:p>
      <text:p text:style-name="P15"><text:span text:style-name="T13"><text:s text:c="16"/></text:span><text:span text:style-name="T6">if</text:span><text:span text:style-name="T13"> </text:span><text:span text:style-name="T39">tickbit</text:span><text:span text:style-name="T13"> = </text:span><text:span text:style-name="T34">'1'</text:span><text:span text:style-name="T13"> </text:span><text:span text:style-name="T6">then</text:span></text:p>
      <text:p text:style-name="P15"><text:span text:style-name="T13"><text:s text:c="20"/></text:span><text:span text:style-name="T39">bitcount</text:span><text:span text:style-name="T13"> &lt;= </text:span><text:span text:style-name="T34">"1001"</text:span><text:span text:style-name="T13">;</text:span></text:p>
      <text:p text:style-name="P15"><text:span text:style-name="T13"><text:s text:c="16"/></text:span><text:span text:style-name="T6">else</text:span><text:span text:style-name="T13"> </text:span></text:p>
      <text:p text:style-name="P15"><text:span text:style-name="T13"><text:s text:c="20"/></text:span><text:span text:style-name="T39">bitcount</text:span><text:span text:style-name="T13"> &lt;= </text:span><text:span text:style-name="T39">bitcount_sum</text:span><text:span text:style-name="T13">(</text:span><text:span text:style-name="T7">width_2</text:span><text:span text:style-name="T13"> </text:span><text:span text:style-name="T6">downto</text:span><text:span text:style-name="T13"> </text:span><text:span text:style-name="T31">0</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9">tickbit</text:span><text:span text:style-name="T13"> &lt;= </text:span><text:span text:style-name="T39">bitcount_sum</text:span><text:span text:style-name="T13">(</text:span><text:span text:style-name="T7">width_2</text:span><text:span text:style-name="T13"> </text:span><text:span text:style-name="T14">+</text:span><text:span text:style-name="T31">1</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text:span><text:span text:style-name="T39">data_shift</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26">tx_busy</text:span><text:span text:style-name="T13"> &lt;= </text:span><text:span text:style-name="T34">'0'</text:span><text:span text:style-name="T13">;</text:span></text:p>
      <text:p text:style-name="P15"><text:span text:style-name="T13"><text:s text:c="12"/></text:span><text:span text:style-name="T6">if</text:span><text:span text:style-name="T13"> </text:span><text:span text:style-name="T39">ticktx</text:span><text:span text:style-name="T13"> = </text:span><text:span text:style-name="T34">'1'</text:span><text:span text:style-name="T13"> </text:span><text:span text:style-name="T6">then</text:span><text:span text:style-name="T13"> </text:span></text:p>
      <text:p text:style-name="P15"><text:span text:style-name="T13"><text:s text:c="16"/></text:span><text:span text:style-name="T6">if</text:span><text:span text:style-name="T13"> </text:span><text:span text:style-name="T26">load</text:span><text:span text:style-name="T13"> = </text:span><text:span text:style-name="T34">'1'</text:span><text:span text:style-name="T13"> </text:span><text:span text:style-name="T6">and</text:span><text:span text:style-name="T13"> </text:span><text:span text:style-name="T39">tickbit</text:span><text:span text:style-name="T13"> = </text:span><text:span text:style-name="T34">'1'</text:span><text:span text:style-name="T13"> </text:span><text:span text:style-name="T6">then</text:span></text:p>
      <text:p text:style-name="P15"><text:span text:style-name="T13"><text:s text:c="20"/></text:span><text:span text:style-name="T39">data_shift</text:span><text:span text:style-name="T13"> &lt;= </text:span><text:span text:style-name="T34">'1'</text:span><text:span text:style-name="T13"> </text:span><text:span text:style-name="T14">&amp;</text:span><text:span text:style-name="T13"> </text:span><text:span text:style-name="T26">din</text:span><text:span text:style-name="T13"> </text:span><text:span text:style-name="T14">&amp;</text:span><text:span text:style-name="T13"> </text:span><text:span text:style-name="T34">'0'</text:span><text:span text:style-name="T13">; </text:span><text:span text:style-name="T36">--stop bit &amp; data &amp; start bit</text:span></text:p>
      <text:p text:style-name="P15"><text:span text:style-name="T13"><text:s text:c="20"/></text:span><text:span text:style-name="T36">-- <text:s text:c="19"/>load_bitcount &lt;= '1';</text:span></text:p>
      <text:p text:style-name="P15"><text:span text:style-name="T13"><text:s text:c="20"/></text:span><text:span text:style-name="T36">-- <text:s text:c="15"/>elsif tickbit = '1' then</text:span></text:p>
      <text:p text:style-name="P15"><text:span text:style-name="T13"><text:s text:c="16"/></text:span><text:span text:style-name="T6">else</text:span></text:p>
      <text:p text:style-name="P15"><text:span text:style-name="T13"><text:s text:c="20"/></text:span><text:span text:style-name="T39">data_shift</text:span><text:span text:style-name="T13"> &lt;= </text:span><text:span text:style-name="T34">'1'</text:span><text:span text:style-name="T13"> </text:span><text:span text:style-name="T14">&amp;</text:span><text:span text:style-name="T13"> </text:span><text:span text:style-name="T39">data_shift</text:span><text:span text:style-name="T13">(</text:span><text:span text:style-name="T39">data_shift</text:span><text:span text:style-name="T33">'high</text:span><text:span text:style-name="T13"> </text:span><text:span text:style-name="T6">downto</text:span><text:span text:style-name="T13"> </text:span><text:span text:style-name="T31">1</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dout</text:span><text:span text:style-name="T13"> &lt;= </text:span><text:span text:style-name="T39">data_shift</text:span><text:span text:style-name="T13">(</text:span><text:span text:style-name="T31">0</text:span><text:span text:style-name="T13">);</text:span></text:p>
      <text:p text:style-name="P16"/>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text:soft-page-break/></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6"/>
      <text:p text:style-name="P15"><text:span text:style-name="T6">entity</text:span><text:span text:style-name="T13"> </text:span><text:span text:style-name="T22">random_uniform</text:span><text:span text:style-name="T13"> </text:span><text:span text:style-name="T6">is</text:span></text:p>
      <text:p text:style-name="P15"><text:span text:style-name="T13"><text:s text:c="4"/></text:span><text:span text:style-name="T6">generic</text:span><text:span text:style-name="T13"> ( </text:span><text:span text:style-name="T7">SEED</text:span><text:span text:style-name="T13"> : </text:span><text:span text:style-name="T28">STD_LOGIC_VECTOR</text:span><text:span text:style-name="T13">(</text:span><text:span text:style-name="T31">30</text:span><text:span text:style-name="T13"> </text:span><text:span text:style-name="T6">downto</text:span><text:span text:style-name="T13"> </text:span><text:span text:style-name="T31">0</text:span><text:span text:style-name="T13">):= (</text:span><text:span text:style-name="T6">others</text:span><text:span text:style-name="T13"> =&gt; </text:span><text:span text:style-name="T34">'0'</text:span><text:span text:style-name="T13">);</text:span></text:p>
      <text:p text:style-name="P15"><text:span text:style-name="T13"><text:s text:c="14"/></text:span><text:span text:style-name="T7">OUT_WIDTH</text:span><text:span text:style-name="T13"> : </text:span><text:span text:style-name="T28">integer</text:span><text:span text:style-name="T13"> := </text:span><text:span text:style-name="T31">11</text:span><text:span text:style-name="T13">);</text:span></text:p>
      <text:p text:style-name="P15"><text:span text:style-name="T13"><text:s text:c="4"/></text:span><text:span text:style-name="T6">port</text:span><text:span text:style-name="T13"> ( </text:span><text:span text:style-name="T26">clk</text:span><text:span text:style-name="T13"> : </text:span><text:span text:style-name="T6">in</text:span><text:span text:style-name="T13"> <text:s/></text:span><text:span text:style-name="T28">STD_LOGIC</text:span><text:span text:style-name="T13">;</text:span></text:p>
      <text:p text:style-name="P15"><text:span text:style-name="T13"><text:s text:c="11"/></text:span><text:span text:style-name="T26">random</text:span><text:span text:style-name="T13"> : </text:span><text:span text:style-name="T6">out</text:span><text:span text:style-name="T13"> <text:s/></text:span><text:span text:style-name="T28">STD_LOGIC_VECTOR</text:span><text:span text:style-name="T13"> (</text:span><text:span text:style-name="T7">OUT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1"/></text:span><text:span text:style-name="T26">reset</text:span><text:span text:style-name="T13"> : </text:span><text:span text:style-name="T6">in</text:span><text:span text:style-name="T13"> <text:s/></text:span><text:span text:style-name="T28">STD_LOGIC</text:span><text:span text:style-name="T13">);</text:span></text:p>
      <text:p text:style-name="P15"><text:span text:style-name="T6">end</text:span><text:span text:style-name="T13"> </text:span><text:span text:style-name="T22">random_uniform</text:span><text:span text:style-name="T13">;</text:span></text:p>
      <text:p text:style-name="P16"/>
      <text:p text:style-name="P15"><text:span text:style-name="T6">architecture</text:span><text:span text:style-name="T13"> </text:span><text:span text:style-name="T22">Behavioral</text:span><text:span text:style-name="T13"> </text:span><text:span text:style-name="T6">of</text:span><text:span text:style-name="T13"> </text:span><text:span text:style-name="T22">random_uniform</text:span><text:span text:style-name="T13"> </text:span><text:span text:style-name="T6">is</text:span></text:p>
      <text:p text:style-name="P16"/>
      <text:p text:style-name="P15"><text:span text:style-name="T13"><text:s text:c="4"/></text:span><text:span text:style-name="T6">signal</text:span><text:span text:style-name="T13"> </text:span><text:span text:style-name="T39">rand</text:span><text:span text:style-name="T13"> : </text:span><text:span text:style-name="T28">std_logic_vector</text:span><text:span text:style-name="T13">(</text:span><text:span text:style-name="T31">30</text:span><text:span text:style-name="T13"> </text:span><text:span text:style-name="T6">downto</text:span><text:span text:style-name="T13"> </text:span><text:span text:style-name="T31">0</text:span><text:span text:style-name="T13">) := </text:span><text:span text:style-name="T7">SEED</text:span><text:span text:style-name="T13">;</text:span></text:p>
      <text:p text:style-name="P15"><text:span text:style-name="T13"><text:s text:c="4"/></text:span><text:span text:style-name="T6">signal</text:span><text:span text:style-name="T13"> </text:span><text:span text:style-name="T39">feedback</text:span><text:span text:style-name="T13"> : </text:span><text:span text:style-name="T28">std_logic</text:span><text:span text:style-name="T13">;</text:span></text:p>
      <text:p text:style-name="P16"/>
      <text:p text:style-name="P23">begin</text:p>
      <text:p text:style-name="P16"/>
      <text:p text:style-name="P15"><text:span text:style-name="T13"><text:s text:c="4"/></text:span><text:span text:style-name="T39">feedback</text:span><text:span text:style-name="T13"> &lt;= </text:span><text:span text:style-name="T6">not</text:span><text:span text:style-name="T13">((</text:span><text:span text:style-name="T39">rand</text:span><text:span text:style-name="T13">(</text:span><text:span text:style-name="T31">0</text:span><text:span text:style-name="T13">) </text:span><text:span text:style-name="T6">xor</text:span><text:span text:style-name="T13"> </text:span><text:span text:style-name="T39">rand</text:span><text:span text:style-name="T13">(</text:span><text:span text:style-name="T31">3</text:span><text:span text:style-name="T13">)));</text:span></text:p>
      <text:p text:style-name="P16"/>
      <text:p text:style-name="P15"><text:span text:style-name="T13"><text:s text:c="4"/></text:span><text:span text:style-name="T6">process</text:span><text:span text:style-name="T13">(</text:span><text:span text:style-name="T26">clk</text:span><text:span text:style-name="T13">,</text:span><text:span text:style-name="T26">rese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eset</text:span><text:span text:style-name="T13"> = </text:span><text:span text:style-name="T34">'1'</text:span><text:span text:style-name="T13"> </text:span><text:span text:style-name="T6">then</text:span></text:p>
      <text:p text:style-name="P15"><text:span text:style-name="T13"><text:s text:c="12"/></text:span><text:span text:style-name="T39">rand</text:span><text:span text:style-name="T13"> &lt;= </text:span><text:span text:style-name="T7">SEED</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rand</text:span><text:span text:style-name="T13"> &lt;= </text:span><text:span text:style-name="T39">feedback</text:span><text:span text:style-name="T14">&amp;</text:span><text:span text:style-name="T39">rand</text:span><text:span text:style-name="T13">(</text:span><text:span text:style-name="T31">30</text:span><text:span text:style-name="T13"> </text:span><text:span text:style-name="T6">downto</text:span><text:span text:style-name="T13"> </text:span><text:span text:style-name="T31">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random</text:span><text:span text:style-name="T13"> &lt;= </text:span><text:span text:style-name="T39">rand</text:span><text:span text:style-name="T13">(</text:span><text:span text:style-name="T7">OUT_WIDTH</text:span><text:span text:style-name="T14">-</text:span><text:span text:style-name="T31">1</text:span><text:span text:style-name="T13"> </text:span><text:span text:style-name="T6">downto</text:span><text:span text:style-name="T13"> </text:span><text:span text:style-name="T31">0</text:span><text:span text:style-name="T13">);</text:span></text:p>
      <text:p text:style-name="P16"/>
      <text:p text:style-name="P15"><text:span text:style-name="T6">end</text:span><text:span text:style-name="T13"> </text:span><text:span text:style-name="T22">Behavioral</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math_real</text:span><text:span text:style-name="T13">.</text:span><text:span text:style-name="T6">all</text:span><text:span text:style-name="T13">;</text:span></text:p>
      <text:p text:style-name="P16"/>
      <text:p text:style-name="P15"><text:span text:style-name="T6">entity</text:span><text:span text:style-name="T13"> </text:span><text:span text:style-name="T22">rand_gen</text:span><text:span text:style-name="T13"> </text:span><text:span text:style-name="T6">is</text:span></text:p>
      <text:p text:style-name="P15"><text:span text:style-name="T6">end</text:span><text:span text:style-name="T13"> </text:span><text:span text:style-name="T22">rand_gen</text:span><text:span text:style-name="T13">;</text:span></text:p>
      <text:p text:style-name="P16"/>
      <text:p text:style-name="P15"><text:span text:style-name="T6">architecture</text:span><text:span text:style-name="T13"> </text:span><text:span text:style-name="T22">behavior</text:span><text:span text:style-name="T13"> </text:span><text:span text:style-name="T6">of</text:span><text:span text:style-name="T13"> </text:span><text:span text:style-name="T22">rand_gen</text:span><text:span text:style-name="T13"> </text:span><text:span text:style-name="T6">is</text:span><text:span text:style-name="T13"> </text:span></text:p>
      <text:p text:style-name="P16"/>
      <text:p text:style-name="P15"><text:span text:style-name="T13"><text:s text:c="4"/></text:span><text:span text:style-name="T6">signal</text:span><text:span text:style-name="T13"> </text:span><text:span text:style-name="T39">rand_num</text:span><text:span text:style-name="T13"> : </text:span><text:span text:style-name="T28">integer</text:span><text:span text:style-name="T13"> := </text:span><text:span text:style-name="T31">0</text:span><text:span text:style-name="T13">;</text:span></text:p>
      <text:p text:style-name="P16"/>
      <text:p text:style-name="P23">begin</text:p>
      <text:p text:style-name="P16"/>
      <text:p text:style-name="P15"><text:span text:style-name="T13"><text:s text:c="4"/></text:span><text:span text:style-name="T6">process</text:span></text:p>
      <text:p text:style-name="P15"><text:span text:style-name="T13"><text:s text:c="8"/></text:span><text:span text:style-name="T6">variable</text:span><text:span text:style-name="T13"> </text:span><text:span text:style-name="T30">seed1</text:span><text:span text:style-name="T13">, </text:span><text:span text:style-name="T30">seed2</text:span><text:span text:style-name="T13">: </text:span><text:span text:style-name="T28">positive</text:span><text:span text:style-name="T13">; <text:s text:c="14"/></text:span><text:span text:style-name="T36">-- seed values for random generator</text:span></text:p>
      <text:p text:style-name="P15"><text:span text:style-name="T13"><text:s text:c="8"/></text:span><text:span text:style-name="T6">variable</text:span><text:span text:style-name="T13"> </text:span><text:span text:style-name="T30">rand</text:span><text:span text:style-name="T13">: </text:span><text:span text:style-name="T28">real</text:span><text:span text:style-name="T13">; <text:s text:c="2"/></text:span><text:span text:style-name="T36">-- random real-number value in range 0 to 1.0 <text:s/></text:span></text:p>
      <text:p text:style-name="P15"><text:span text:style-name="T13"><text:s text:c="8"/></text:span><text:span text:style-name="T6">variable</text:span><text:span text:style-name="T13"> </text:span><text:span text:style-name="T30">range_of_rand</text:span><text:span text:style-name="T13"> : </text:span><text:span text:style-name="T28">real</text:span><text:span text:style-name="T13"> := </text:span><text:span text:style-name="T31">250.0</text:span><text:span text:style-name="T13">; <text:s text:c="3"/></text:span><text:span text:style-name="T36">-- the range of random values created will be 0 to +1000.</text:span></text:p>
      <text:p text:style-name="P15"><text:span text:style-name="T13"><text:s text:c="4"/></text:span><text:span text:style-name="T6">begin</text:span></text:p>
      <text:p text:style-name="P15"><text:span text:style-name="T13"><text:s text:c="8"/></text:span><text:span text:style-name="T14">uniform</text:span><text:span text:style-name="T13">(</text:span><text:span text:style-name="T30">seed1</text:span><text:span text:style-name="T13">, </text:span><text:span text:style-name="T30">seed2</text:span><text:span text:style-name="T13">, </text:span><text:span text:style-name="T30">rand</text:span><text:span text:style-name="T13">); <text:s text:c="2"/></text:span><text:span text:style-name="T36">-- generate random number</text:span></text:p>
      <text:p text:style-name="P15"><text:span text:style-name="T13"><text:s text:c="8"/></text:span><text:span text:style-name="T39">rand_num</text:span><text:span text:style-name="T13"> &lt;= </text:span><text:span text:style-name="T28">integer</text:span><text:span text:style-name="T13">(</text:span><text:span text:style-name="T30">rand</text:span><text:span text:style-name="T14">*</text:span><text:span text:style-name="T30">range_of_rand</text:span><text:span text:style-name="T13">); <text:s/></text:span><text:span text:style-name="T36">-- rescale to 0..1000, convert integer part </text:span></text:p>
      <text:p text:style-name="P15"><text:span text:style-name="T13"><text:s text:c="8"/></text:span><text:span text:style-name="T6">wait</text:span><text:span text:style-name="T13"> </text:span><text:span text:style-name="T6">for</text:span><text:span text:style-name="T13"> </text:span><text:span text:style-name="T31">10</text:span><text:span text:style-name="T13"> </text:span><text:span text:style-name="T7">ns</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6">end</text:span><text:span text:style-name="T13"> </text:span><text:span text:style-name="T22">behavior</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signed</text:span><text:span text:style-name="T13">.</text:span><text:span text:style-name="T6">all</text:span><text:span text:style-name="T13">;</text:span></text:p>
      <text:p text:style-name="P16"/>
      <text:p text:style-name="P16"/>
      <text:p text:style-name="P15"><text:span text:style-name="T6">entity</text:span><text:span text:style-name="T13"> </text:span><text:span text:style-name="T22">example</text:span><text:span text:style-name="T13"> </text:span><text:span text:style-name="T6">is</text:span></text:p>
      <text:p text:style-name="P15"><text:span text:style-name="T13"><text:s text:c="4"/></text:span><text:span text:style-name="T6">port</text:span><text:span text:style-name="T13"> ( </text:span><text:span text:style-name="T26">clock_50</text:span><text:span text:style-name="T13">, </text:span><text:span text:style-name="T26">read_s</text:span><text:span text:style-name="T13"> : </text:span><text:span text:style-name="T6">in</text:span><text:span text:style-name="T13"> </text:span><text:span text:style-name="T28">std_logic</text:span><text:span text:style-name="T13">;</text:span></text:p>
      <text:p text:style-name="P15"><text:span text:style-name="T13"><text:s text:c="11"/></text:span><text:span text:style-name="T26">noise</text:span><text:span text:style-name="T13"> : </text:span><text:span text:style-name="T6">out</text:span><text:span text:style-name="T13"> </text:span><text:span text:style-name="T28">std_logic_vector</text:span><text:span text:style-name="T13">(</text:span><text:span text:style-name="T31">2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example</text:span><text:span text:style-name="T13">;</text:span></text:p>
      <text:p text:style-name="P16"/>
      <text:p text:style-name="P15"><text:span text:style-name="T6">architecture</text:span><text:span text:style-name="T13"> </text:span><text:span text:style-name="T22">behavior</text:span><text:span text:style-name="T13"> </text:span><text:span text:style-name="T6">of</text:span><text:span text:style-name="T13"> </text:span><text:span text:style-name="T22">example</text:span><text:span text:style-name="T13"> </text:span><text:span text:style-name="T6">is</text:span></text:p>
      <text:p text:style-name="P15"><text:span text:style-name="T13"><text:s text:c="4"/></text:span><text:span text:style-name="T6">signal</text:span><text:span text:style-name="T13"> </text:span><text:span text:style-name="T39">counter</text:span><text:span text:style-name="T13"> : </text:span><text:span text:style-name="T28">std_logic_vector</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q</text:span><text:span text:style-name="T13"> : </text:span><text:span text:style-name="T28">std_logic_vector</text:span><text:span text:style-name="T13">(</text:span><text:span text:style-name="T31">9</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6">process</text:span><text:span text:style-name="T13"> (</text:span><text:span text:style-name="T26">clock_50</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ock_50</text:span><text:span text:style-name="T13">) </text:span><text:span text:style-name="T6">then</text:span></text:p>
      <text:p text:style-name="P15"><text:span text:style-name="T13"><text:s text:c="12"/></text:span><text:span text:style-name="T6">if</text:span><text:span text:style-name="T13"> (</text:span><text:span text:style-name="T26">read_s</text:span><text:span text:style-name="T13"> = </text:span><text:span text:style-name="T34">'1'</text:span><text:span text:style-name="T13">) </text:span><text:span text:style-name="T6">then</text:span></text:p>
      <text:p text:style-name="P15"><text:span text:style-name="T13"><text:s text:c="16"/></text:span><text:span text:style-name="T39">counter</text:span><text:span text:style-name="T13"> &lt;= </text:span><text:span text:style-name="T39">counter</text:span><text:span text:style-name="T13"> </text:span><text:span text:style-name="T14">+</text:span><text:span text:style-name="T13"> </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9">q</text:span><text:span text:style-name="T13"> &lt;= (</text:span><text:span text:style-name="T6">others</text:span><text:span text:style-name="T13"> =&gt; </text:span><text:span text:style-name="T39">counter</text:span><text:span text:style-name="T13">(</text:span><text:span text:style-name="T31">2</text:span><text:span text:style-name="T13">));</text:span></text:p>
      <text:p text:style-name="P15"><text:span text:style-name="T13"><text:s text:c="4"/></text:span><text:span text:style-name="T26">noise</text:span><text:span text:style-name="T13"> &lt;= </text:span><text:span text:style-name="T39">q</text:span><text:span text:style-name="T13"> </text:span><text:span text:style-name="T14">&amp;</text:span><text:span text:style-name="T13"> </text:span><text:span text:style-name="T39">counter</text:span><text:span text:style-name="T13"> </text:span><text:span text:style-name="T14">&amp;</text:span><text:span text:style-name="T13"> </text:span><text:span text:style-name="T34">"00000000000"</text:span><text:span text:style-name="T13">;</text:span></text:p>
      <text:p text:style-name="P15"><text:span text:style-name="T6">end</text:span><text:span text:style-name="T13"> </text:span><text:span text:style-name="T22">behavior</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i2s_tx_48</text:span><text:span text:style-name="T13"> </text:span><text:span text:style-name="T6">is</text:span><text:span text:style-name="T13"> </text:span></text:p>
      <text:p text:style-name="P15"><text:span text:style-name="T13"><text:s text:c="4"/></text:span><text:span text:style-name="T6">port</text:span><text:span text:style-name="T13">( </text:span><text:span text:style-name="T26">clk</text:span><text:span text:style-name="T13">: </text:span><text:span text:style-name="T6">in</text:span><text:span text:style-name="T13"> </text:span><text:span text:style-name="T28">std_logic</text:span><text:span text:style-name="T13">;</text:span></text:p>
      <text:p text:style-name="P15"><text:span text:style-name="T13"><text:s text:c="10"/></text:span><text:span text:style-name="T26">fall_edge</text:span><text:span text:style-name="T13">, </text:span><text:span text:style-name="T26">rise_edge</text:span><text:span text:style-name="T13">: </text:span><text:span text:style-name="T6">in</text:span><text:span text:style-name="T13"> </text:span><text:span text:style-name="T28">std_logic</text:span><text:span text:style-name="T13">;</text:span></text:p>
      <text:p text:style-name="P15"><text:span text:style-name="T13"><text:s text:c="10"/></text:span><text:span text:style-name="T26">rst</text:span><text:span text:style-name="T13">: </text:span><text:span text:style-name="T6">in</text:span><text:span text:style-name="T13"> </text:span><text:span text:style-name="T28">boolean</text:span><text:span text:style-name="T13">;</text:span></text:p>
      <text:p text:style-name="P15"><text:span text:style-name="T13"><text:s text:c="10"/></text:span><text:span text:style-name="T26">it_sel</text:span><text:span text:style-name="T13">, </text:span><text:span text:style-name="T26">clk_sel</text:span><text:span text:style-name="T13">: </text:span><text:span text:style-name="T6">in</text:span><text:span text:style-name="T13"> </text:span><text:span text:style-name="T28">std_logic_vector</text:span><text:span text:style-name="T13">(</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it_data</text:span><text:span text:style-name="T13">: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it_ws</text:span><text:span text:style-name="T13">, </text:span><text:span text:style-name="T26">it_sclk</text:span><text:span text:style-name="T13">, </text:span><text:span text:style-name="T26">it_sd</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i2s_tx_48</text:span><text:span text:style-name="T13"> </text:span><text:span text:style-name="T6">is</text:span></text:p>
      <text:p text:style-name="P16"/>
      <text:p text:style-name="P15"><text:span text:style-name="T13"><text:s text:c="4"/></text:span><text:span text:style-name="T6">signal</text:span><text:span text:style-name="T13"> </text:span><text:span text:style-name="T39">ssclk</text:span><text:span text:style-name="T13">, </text:span><text:span text:style-name="T39">s_ws</text:span><text:span text:style-name="T13">, </text:span><text:span text:style-name="T39">sel</text:span><text:span text:style-name="T13">, </text:span><text:span text:style-name="T39">lr_edge</text:span><text:span text:style-name="T13">, </text:span><text:span text:style-name="T39">sel_rise</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count_reg</text:span><text:span text:style-name="T13">: </text:span><text:span text:style-name="T28">unsigned</text:span><text:span text:style-name="T13">(</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bit_count</text:span><text:span text:style-name="T13">: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6"/>
      <text:p text:style-name="P15"><text:span text:style-name="T13"><text:s text:c="4"/></text:span><text:span text:style-name="T6">signal</text:span><text:span text:style-name="T13"> </text:span><text:span text:style-name="T39">shift</text:span><text:span text:style-name="T13">, <text:s/></text:span><text:span text:style-name="T39">shift_nxt</text:span><text:span text:style-name="T13">: </text:span><text:span text:style-name="T28">std_logic_vector</text:span><text:span text:style-name="T13">(</text:span><text:span text:style-name="T31">15</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shift_lft</text:span><text:span text:style-name="T13">, </text:span><text:span text:style-name="T39">shift_rh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int_rise_e</text:span><text:span text:style-name="T13">, </text:span><text:span text:style-name="T39">int_fall_e</text:span><text:span text:style-name="T13">, </text:span><text:span text:style-name="T39">int_edge_reg</text:span><text:span text:style-name="T13">: </text:span><text:span text:style-name="T28">std_logic</text:span><text:span text:style-name="T13">;</text:span></text:p>
      <text:p text:style-name="P16"/>
      <text:p text:style-name="P23">begin</text:p>
      <text:p text:style-name="P16"/>
      <text:p text:style-name="P15"><text:span text:style-name="T13"><text:s text:c="4"/></text:span><text:span text:style-name="T39">sel</text:span><text:span text:style-name="T13"> &lt;= </text:span><text:span text:style-name="T26">it_sel</text:span><text:span text:style-name="T13">(</text:span><text:span text:style-name="T31">0</text:span><text:span text:style-name="T13">) </text:span><text:span text:style-name="T6">and</text:span><text:span text:style-name="T13"> </text:span><text:span text:style-name="T26">it_sel</text:span><text:span text:style-name="T13">(</text:span><text:span text:style-name="T31">1</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lr_edge</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lr_edge</text:span><text:span text:style-name="T13"> &lt;= </text:span><text:span text:style-name="T39">sel</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text:span><text:span text:style-name="T39">sel_rise</text:span><text:span text:style-name="T13"> &lt;= </text:span><text:span text:style-name="T39">sel</text:span><text:span text:style-name="T13"> </text:span><text:span text:style-name="T6">and</text:span><text:span text:style-name="T13"> (</text:span><text:span text:style-name="T6">not</text:span><text:span text:style-name="T13"> </text:span><text:span text:style-name="T39">lr_edge</text:span><text:span text:style-name="T13">);</text:span></text:p>
      <text:p text:style-name="P16"/>
      <text:p text:style-name="P16"/>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 </text:span><text:span text:style-name="T39">sel_rise</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or</text:span><text:span text:style-name="T13"> </text:span><text:span text:style-name="T39">sel_rise</text:span><text:span text:style-name="T13"> = </text:span><text:span text:style-name="T34">'1'</text:span><text:span text:style-name="T13"> </text:span><text:span text:style-name="T6">then</text:span></text:p>
      <text:p text:style-name="P15"><text:span text:style-name="T13"><text:s text:c="12"/></text:span><text:span text:style-name="T39">count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ssclk</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rise_edge</text:span><text:span text:style-name="T13"> = </text:span><text:span text:style-name="T34">'1'</text:span><text:span text:style-name="T13"> </text:span><text:span text:style-name="T6">then</text:span></text:p>
      <text:p text:style-name="P15"><text:soft-page-break/><text:span text:style-name="T13"><text:s text:c="16"/></text:span><text:span text:style-name="T39">count_reg</text:span><text:span text:style-name="T13"> &lt;= </text:span><text:span text:style-name="T39">count_reg</text:span><text:span text:style-name="T13"> </text:span><text:span text:style-name="T14">+</text:span><text:span text:style-name="T31">1</text:span><text:span text:style-name="T13">;</text:span></text:p>
      <text:p text:style-name="P16"/>
      <text:p text:style-name="P15"><text:span text:style-name="T13"><text:s text:c="16"/></text:span><text:span text:style-name="T6">if</text:span><text:span text:style-name="T13"> </text:span><text:span text:style-name="T39">count_reg</text:span><text:span text:style-name="T13"> = </text:span><text:span text:style-name="T31">3</text:span><text:span text:style-name="T13"> </text:span><text:span text:style-name="T6">then</text:span></text:p>
      <text:p text:style-name="P15"><text:span text:style-name="T13"><text:s text:c="20"/></text:span><text:span text:style-name="T39">ssclk</text:span><text:span text:style-name="T13"> &lt;= </text:span><text:span text:style-name="T6">not</text:span><text:span text:style-name="T13"> </text:span><text:span text:style-name="T39">ssclk</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 <text:s text:c="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int_edge_reg</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int_edge_reg</text:span><text:span text:style-name="T13"> &lt;= </text:span><text:span text:style-name="T39">ssclk</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int_fall_e</text:span><text:span text:style-name="T13"> &lt;= (</text:span><text:span text:style-name="T6">not</text:span><text:span text:style-name="T13"> </text:span><text:span text:style-name="T39">int_edge_reg</text:span><text:span text:style-name="T13">) </text:span><text:span text:style-name="T6">nor</text:span><text:span text:style-name="T13"> </text:span><text:span text:style-name="T39">ssclk</text:span><text:span text:style-name="T13">;</text:span></text:p>
      <text:p text:style-name="P15"><text:span text:style-name="T13"><text:s text:c="4"/></text:span><text:span text:style-name="T39">int_rise_e</text:span><text:span text:style-name="T13"> &lt;= (</text:span><text:span text:style-name="T6">not</text:span><text:span text:style-name="T13"> </text:span><text:span text:style-name="T39">int_edge_reg</text:span><text:span text:style-name="T13">) </text:span><text:span text:style-name="T6">and</text:span><text:span text:style-name="T13"> </text:span><text:span text:style-name="T39">ssclk</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 </text:span><text:span text:style-name="T26">it_sel</text:span><text:span text:style-name="T13">, </text:span><text:span text:style-name="T26">clk_sel</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or</text:span><text:span text:style-name="T13"> (</text:span><text:span text:style-name="T26">it_sel</text:span><text:span text:style-name="T13"> = </text:span><text:span text:style-name="T34">"11"</text:span><text:span text:style-name="T13"> </text:span><text:span text:style-name="T6">and</text:span><text:span text:style-name="T13"> </text:span><text:span text:style-name="T26">clk_sel</text:span><text:span text:style-name="T13"> = </text:span><text:span text:style-name="T34">"00"</text:span><text:span text:style-name="T13">) </text:span><text:span text:style-name="T6">then</text:span></text:p>
      <text:p text:style-name="P15"><text:span text:style-name="T13"><text:s text:c="12"/></text:span><text:span text:style-name="T39">bit_count</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s_ws</text:span><text:span text:style-name="T13"> &lt;= </text:span><text:span text:style-name="T34">'0'</text:span><text:span text:style-name="T13">;</text:span></text:p>
      <text:p text:style-name="P15"><text:span text:style-name="T13"><text:s text:c="8"/></text:span><text:span text:style-name="T6">elsif</text:span><text:span text:style-name="T13"> <text:s text:c="3"/></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int_fall_e</text:span><text:span text:style-name="T13"> = </text:span><text:span text:style-name="T34">'1'</text:span><text:span text:style-name="T13"> </text:span><text:span text:style-name="T6">then</text:span></text:p>
      <text:p text:style-name="P15"><text:span text:style-name="T13"><text:s text:c="16"/></text:span><text:span text:style-name="T39">bit_count</text:span><text:span text:style-name="T13"> &lt;= </text:span><text:span text:style-name="T39">bit_count</text:span><text:span text:style-name="T13"> </text:span><text:span text:style-name="T14">+</text:span><text:span text:style-name="T31">1</text:span><text:span text:style-name="T13">;</text:span></text:p>
      <text:p text:style-name="P16"/>
      <text:p text:style-name="P15"><text:span text:style-name="T13"><text:s text:c="16"/></text:span><text:span text:style-name="T6">if</text:span><text:span text:style-name="T13"> </text:span><text:span text:style-name="T39">bit_count</text:span><text:span text:style-name="T13"> = </text:span><text:span text:style-name="T31">6</text:span><text:span text:style-name="T13"> </text:span><text:span text:style-name="T6">or</text:span><text:span text:style-name="T13"> </text:span><text:span text:style-name="T39">bit_count</text:span><text:span text:style-name="T13"> = </text:span><text:span text:style-name="T31">14</text:span><text:span text:style-name="T13"> </text:span><text:span text:style-name="T6">then</text:span></text:p>
      <text:p text:style-name="P15"><text:span text:style-name="T13"><text:s text:c="20"/></text:span><text:span text:style-name="T39">s_ws</text:span><text:span text:style-name="T13"> &lt;= </text:span><text:span text:style-name="T6">not</text:span><text:span text:style-name="T13"> </text:span><text:span text:style-name="T39">s_ws</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text:span><text:span text:style-name="T26">it_sclk</text:span><text:span text:style-name="T13"> &lt;= </text:span><text:span text:style-name="T39">ssclk</text:span><text:span text:style-name="T13">;</text:span></text:p>
      <text:p text:style-name="P15"><text:span text:style-name="T13"><text:s text:c="4"/></text:span><text:span text:style-name="T26">it_ws</text:span><text:span text:style-name="T13"> &lt;= </text:span><text:span text:style-name="T39">s_ws</text:span><text:span text:style-name="T13">;</text:span></text:p>
      <text:p text:style-name="P16"/>
      <text:p text:style-name="P16"/>
      <text:p text:style-name="P15"><text:span text:style-name="T13"><text:s text:c="4"/></text:span><text:span text:style-name="T36">--main shift register</text:span></text:p>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 </text:span><text:span text:style-name="T6">then</text:span><text:span text:style-name="T13"> <text:s text:c="11"/></text:span></text:p>
      <text:p text:style-name="P15"><text:span text:style-name="T13"><text:s text:c="12"/></text:span><text:span text:style-name="T36">--shift &lt;= shift_nxt; <text:s text:c="11"/></text:span></text:p>
      <text:p text:style-name="P15"><text:span text:style-name="T13"><text:s text:c="12"/></text:span><text:span text:style-name="T6">if</text:span><text:span text:style-name="T13"> </text:span><text:span text:style-name="T39">int_fall_e</text:span><text:span text:style-name="T13"> = </text:span><text:span text:style-name="T34">'1'</text:span><text:span text:style-name="T13"> </text:span><text:span text:style-name="T6">then</text:span></text:p>
      <text:p text:style-name="P15"><text:span text:style-name="T13"><text:s text:c="16"/></text:span><text:span text:style-name="T39">shift</text:span><text:span text:style-name="T13"> &lt;= </text:span><text:span text:style-name="T39">shift</text:span><text:span text:style-name="T13">(</text:span><text:span text:style-name="T31">14</text:span><text:span text:style-name="T13"> </text:span><text:span text:style-name="T6">downto</text:span><text:span text:style-name="T13"> </text:span><text:span text:style-name="T31">0</text:span><text:span text:style-name="T13">) </text:span><text:span text:style-name="T14">&amp;</text:span><text:span text:style-name="T13"> </text:span><text:span text:style-name="T34">'0'</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oft-page-break/><text:span text:style-name="T13"><text:s text:c="12"/></text:span><text:span text:style-name="T6">if</text:span><text:span text:style-name="T13"> </text:span><text:span text:style-name="T39">bit_count</text:span><text:span text:style-name="T13"> = </text:span><text:span text:style-name="T31">0</text:span><text:span text:style-name="T13"> </text:span><text:span text:style-name="T6">and</text:span><text:span text:style-name="T13"> </text:span><text:span text:style-name="T39">int_rise_e</text:span><text:span text:style-name="T13"> = </text:span><text:span text:style-name="T34">'1'</text:span><text:span text:style-name="T13"> </text:span><text:span text:style-name="T6">then</text:span></text:p>
      <text:p text:style-name="P15"><text:span text:style-name="T13"><text:s text:c="16"/></text:span><text:span text:style-name="T39">shift</text:span><text:span text:style-name="T13">(</text:span><text:span text:style-name="T31">7</text:span><text:span text:style-name="T13"> </text:span><text:span text:style-name="T6">downto</text:span><text:span text:style-name="T13"> </text:span><text:span text:style-name="T31">0</text:span><text:span text:style-name="T13">) &lt;= </text:span><text:span text:style-name="T39">shift_lft</text:span><text:span text:style-name="T13">;</text:span></text:p>
      <text:p text:style-name="P15"><text:span text:style-name="T13"><text:s text:c="12"/></text:span><text:span text:style-name="T6">end</text:span><text:span text:style-name="T13"> </text:span><text:span text:style-name="T6">if</text:span><text:span text:style-name="T13">;</text:span></text:p>
      <text:p text:style-name="P16"/>
      <text:p text:style-name="P15"><text:span text:style-name="T13"><text:s text:c="12"/></text:span><text:span text:style-name="T6">if</text:span><text:span text:style-name="T13"> </text:span><text:span text:style-name="T39">bit_count</text:span><text:span text:style-name="T13"> = </text:span><text:span text:style-name="T31">8</text:span><text:span text:style-name="T13"> </text:span><text:span text:style-name="T6">and</text:span><text:span text:style-name="T13"> </text:span><text:span text:style-name="T26">fall_edge</text:span><text:span text:style-name="T13"> = </text:span><text:span text:style-name="T34">'1'</text:span><text:span text:style-name="T13"> </text:span><text:span text:style-name="T6">then</text:span></text:p>
      <text:p text:style-name="P15"><text:span text:style-name="T13"><text:s text:c="16"/></text:span><text:span text:style-name="T39">shift</text:span><text:span text:style-name="T13">(</text:span><text:span text:style-name="T31">7</text:span><text:span text:style-name="T13"> </text:span><text:span text:style-name="T6">downto</text:span><text:span text:style-name="T13"> </text:span><text:span text:style-name="T31">0</text:span><text:span text:style-name="T13">) &lt;= </text:span><text:span text:style-name="T39">shift_rht</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6">-- <text:s text:c="3"/>shift_nxt &lt;= shift(14 downto 0) &amp; '0' when int_fall_e = '1' else </text:span></text:p>
      <text:p text:style-name="P15"><text:span text:style-name="T13"><text:s text:c="4"/></text:span><text:span text:style-name="T36">-- <text:s text:c="20"/>shift_lft when bit_count = 0 and int_rise_e = '1' else </text:span></text:p>
      <text:p text:style-name="P15"><text:span text:style-name="T13"><text:s text:c="4"/></text:span><text:span text:style-name="T36">-- <text:s text:c="20"/>shift_rht when bit_count = 8 and fall_edge = '1' else <text:s/>-- change to bit_count 7 and int fall</text:span></text:p>
      <text:p text:style-name="P15"><text:span text:style-name="T13"><text:s text:c="4"/></text:span><text:span text:style-name="T36">-- <text:s text:c="20"/>shift;</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span text:style-name="T13"> </text:span></text:p>
      <text:p text:style-name="P15"><text:span text:style-name="T13"><text:s text:c="12"/></text:span><text:span text:style-name="T39">shift_lft</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shift_rht</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it_sel</text:span><text:span text:style-name="T13"> = </text:span><text:span text:style-name="T34">"11"</text:span><text:span text:style-name="T13"> </text:span><text:span text:style-name="T6">and</text:span><text:span text:style-name="T13"> </text:span><text:span text:style-name="T26">clk_sel</text:span><text:span text:style-name="T13"> = </text:span><text:span text:style-name="T34">"00"</text:span><text:span text:style-name="T13"> </text:span><text:span text:style-name="T6">then</text:span></text:p>
      <text:p text:style-name="P15"><text:span text:style-name="T13"><text:s text:c="16"/></text:span><text:span text:style-name="T39">shift_lft</text:span><text:span text:style-name="T13"> &lt;= </text:span><text:span text:style-name="T26">it_data</text:span><text:span text:style-name="T13">;</text:span></text:p>
      <text:p text:style-name="P15"><text:span text:style-name="T13"><text:s text:c="12"/></text:span><text:span text:style-name="T6">end</text:span><text:span text:style-name="T13"> </text:span><text:span text:style-name="T6">if</text:span><text:span text:style-name="T13">;</text:span></text:p>
      <text:p text:style-name="P16"/>
      <text:p text:style-name="P15"><text:span text:style-name="T13"><text:s text:c="12"/></text:span><text:span text:style-name="T6">if</text:span><text:span text:style-name="T13"> </text:span><text:span text:style-name="T26">it_sel</text:span><text:span text:style-name="T13"> = </text:span><text:span text:style-name="T34">"11"</text:span><text:span text:style-name="T13"> </text:span><text:span text:style-name="T6">and</text:span><text:span text:style-name="T13"> </text:span><text:span text:style-name="T26">clk_sel</text:span><text:span text:style-name="T13"> = </text:span><text:span text:style-name="T34">"01"</text:span><text:span text:style-name="T13"> </text:span><text:span text:style-name="T6">then</text:span></text:p>
      <text:p text:style-name="P15"><text:span text:style-name="T13"><text:s text:c="16"/></text:span><text:span text:style-name="T39">shift_rht</text:span><text:span text:style-name="T13"> &lt;= </text:span><text:span text:style-name="T26">it_data</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text:span><text:span text:style-name="T26">it_sd</text:span><text:span text:style-name="T13"> &lt;= </text:span><text:span text:style-name="T39">shift</text:span><text:span text:style-name="T13">(</text:span><text:span text:style-name="T31">15</text:span><text:span text:style-name="T13">);</text:span></text:p>
      <text:p text:style-name="P16"/>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i2s_tx_48_2</text:span><text:span text:style-name="T13"> </text:span><text:span text:style-name="T6">is</text:span><text:span text:style-name="T13"> </text:span></text:p>
      <text:p text:style-name="P15"><text:span text:style-name="T13"><text:s text:c="4"/></text:span><text:span text:style-name="T6">port</text:span><text:span text:style-name="T13">( </text:span><text:span text:style-name="T26">clk</text:span><text:span text:style-name="T13">: </text:span><text:span text:style-name="T6">in</text:span><text:span text:style-name="T13"> </text:span><text:span text:style-name="T28">std_logic</text:span><text:span text:style-name="T13">;</text:span></text:p>
      <text:p text:style-name="P15"><text:span text:style-name="T13"><text:s text:c="10"/></text:span><text:span text:style-name="T26">fall_edge</text:span><text:span text:style-name="T13">, </text:span><text:span text:style-name="T26">rise_edge</text:span><text:span text:style-name="T13">: </text:span><text:span text:style-name="T6">in</text:span><text:span text:style-name="T13"> </text:span><text:span text:style-name="T28">std_logic</text:span><text:span text:style-name="T13">;</text:span></text:p>
      <text:p text:style-name="P15"><text:span text:style-name="T13"><text:s text:c="10"/></text:span><text:span text:style-name="T26">rst</text:span><text:span text:style-name="T13">: </text:span><text:span text:style-name="T6">in</text:span><text:span text:style-name="T13"> </text:span><text:span text:style-name="T28">boolean</text:span><text:span text:style-name="T13">;</text:span></text:p>
      <text:p text:style-name="P15"><text:span text:style-name="T13"><text:s text:c="10"/></text:span><text:span text:style-name="T26">it_sel</text:span><text:span text:style-name="T13">, </text:span><text:span text:style-name="T26">clk_sel</text:span><text:span text:style-name="T13">: </text:span><text:span text:style-name="T6">in</text:span><text:span text:style-name="T13"> </text:span><text:span text:style-name="T28">std_logic_vector</text:span><text:span text:style-name="T13">(</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it_data</text:span><text:span text:style-name="T13">: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it_ws</text:span><text:span text:style-name="T13">, </text:span><text:span text:style-name="T26">it_sclk</text:span><text:span text:style-name="T13">, </text:span><text:span text:style-name="T26">it_sd</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i2s_tx_48_2</text:span><text:span text:style-name="T13"> </text:span><text:span text:style-name="T6">is</text:span></text:p>
      <text:p text:style-name="P16"/>
      <text:p text:style-name="P15"><text:span text:style-name="T13"><text:s text:c="4"/></text:span><text:span text:style-name="T6">signal</text:span><text:span text:style-name="T13"> </text:span><text:span text:style-name="T39">ssclk</text:span><text:span text:style-name="T13">, </text:span><text:span text:style-name="T39">s_ws</text:span><text:span text:style-name="T13">, </text:span><text:span text:style-name="T39">sel</text:span><text:span text:style-name="T13">, </text:span><text:span text:style-name="T39">lr_edge</text:span><text:span text:style-name="T13">, </text:span><text:span text:style-name="T39">sel_rise</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count_reg</text:span><text:span text:style-name="T13">: </text:span><text:span text:style-name="T28">unsigned</text:span><text:span text:style-name="T13">(</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bit_count</text:span><text:span text:style-name="T13">: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6"/>
      <text:p text:style-name="P15"><text:span text:style-name="T13"><text:s text:c="4"/></text:span><text:span text:style-name="T6">signal</text:span><text:span text:style-name="T13"> </text:span><text:span text:style-name="T39">shift</text:span><text:span text:style-name="T13">, <text:s/></text:span><text:span text:style-name="T39">shift_nxt</text:span><text:span text:style-name="T13">, </text:span><text:span text:style-name="T39">shift_lft</text:span><text:span text:style-name="T13">, </text:span><text:span text:style-name="T39">shift_rh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int_rise_e</text:span><text:span text:style-name="T13">, </text:span><text:span text:style-name="T39">int_fall_e</text:span><text:span text:style-name="T13">, </text:span><text:span text:style-name="T39">int_edge_reg</text:span><text:span text:style-name="T13">: </text:span><text:span text:style-name="T28">std_logic</text:span><text:span text:style-name="T13">;</text:span></text:p>
      <text:p text:style-name="P16"/>
      <text:p text:style-name="P23">begin</text:p>
      <text:p text:style-name="P16"/>
      <text:p text:style-name="P15"><text:span text:style-name="T13"><text:s text:c="4"/></text:span><text:span text:style-name="T39">sel</text:span><text:span text:style-name="T13"> &lt;= </text:span><text:span text:style-name="T26">it_sel</text:span><text:span text:style-name="T13">(</text:span><text:span text:style-name="T31">0</text:span><text:span text:style-name="T13">) </text:span><text:span text:style-name="T6">and</text:span><text:span text:style-name="T13"> </text:span><text:span text:style-name="T26">it_sel</text:span><text:span text:style-name="T13">(</text:span><text:span text:style-name="T31">1</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lr_edge</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lr_edge</text:span><text:span text:style-name="T13"> &lt;= </text:span><text:span text:style-name="T39">sel</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text:span><text:span text:style-name="T39">sel_rise</text:span><text:span text:style-name="T13"> &lt;= </text:span><text:span text:style-name="T39">sel</text:span><text:span text:style-name="T13"> </text:span><text:span text:style-name="T6">and</text:span><text:span text:style-name="T13"> (</text:span><text:span text:style-name="T6">not</text:span><text:span text:style-name="T13"> </text:span><text:span text:style-name="T39">lr_edge</text:span><text:span text:style-name="T13">);</text:span></text:p>
      <text:p text:style-name="P16"/>
      <text:p text:style-name="P16"/>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 </text:span><text:span text:style-name="T39">sel_rise</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or</text:span><text:span text:style-name="T13"> </text:span><text:span text:style-name="T39">sel_rise</text:span><text:span text:style-name="T13"> = </text:span><text:span text:style-name="T34">'1'</text:span><text:span text:style-name="T13"> </text:span><text:span text:style-name="T6">then</text:span></text:p>
      <text:p text:style-name="P15"><text:span text:style-name="T13"><text:s text:c="12"/></text:span><text:span text:style-name="T39">count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ssclk</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rise_edge</text:span><text:span text:style-name="T13"> = </text:span><text:span text:style-name="T34">'1'</text:span><text:span text:style-name="T13"> </text:span><text:span text:style-name="T6">then</text:span></text:p>
      <text:p text:style-name="P15"><text:span text:style-name="T13"><text:s text:c="16"/></text:span><text:span text:style-name="T39">count_reg</text:span><text:span text:style-name="T13"> &lt;= </text:span><text:span text:style-name="T39">count_reg</text:span><text:span text:style-name="T13"> </text:span><text:span text:style-name="T14">+</text:span><text:span text:style-name="T31">1</text:span><text:span text:style-name="T13">;</text:span></text:p>
      <text:p text:style-name="P16"/>
      <text:p text:style-name="P15"><text:soft-page-break/><text:span text:style-name="T13"><text:s text:c="16"/></text:span><text:span text:style-name="T6">if</text:span><text:span text:style-name="T13"> </text:span><text:span text:style-name="T39">count_reg</text:span><text:span text:style-name="T13"> = </text:span><text:span text:style-name="T31">3</text:span><text:span text:style-name="T13"> </text:span><text:span text:style-name="T6">then</text:span></text:p>
      <text:p text:style-name="P15"><text:span text:style-name="T13"><text:s text:c="20"/></text:span><text:span text:style-name="T39">ssclk</text:span><text:span text:style-name="T13"> &lt;= </text:span><text:span text:style-name="T6">not</text:span><text:span text:style-name="T13"> </text:span><text:span text:style-name="T39">ssclk</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 <text:s text:c="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then</text:span></text:p>
      <text:p text:style-name="P15"><text:span text:style-name="T13"><text:s text:c="12"/></text:span><text:span text:style-name="T39">int_edge_reg</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int_edge_reg</text:span><text:span text:style-name="T13"> &lt;= </text:span><text:span text:style-name="T39">ssclk</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int_fall_e</text:span><text:span text:style-name="T13"> &lt;= (</text:span><text:span text:style-name="T6">not</text:span><text:span text:style-name="T13"> </text:span><text:span text:style-name="T39">int_edge_reg</text:span><text:span text:style-name="T13">) </text:span><text:span text:style-name="T6">nor</text:span><text:span text:style-name="T13"> </text:span><text:span text:style-name="T39">ssclk</text:span><text:span text:style-name="T13">;</text:span></text:p>
      <text:p text:style-name="P15"><text:span text:style-name="T13"><text:s text:c="4"/></text:span><text:span text:style-name="T39">int_rise_e</text:span><text:span text:style-name="T13"> &lt;= (</text:span><text:span text:style-name="T6">not</text:span><text:span text:style-name="T13"> </text:span><text:span text:style-name="T39">int_edge_reg</text:span><text:span text:style-name="T13">) </text:span><text:span text:style-name="T6">and</text:span><text:span text:style-name="T13"> </text:span><text:span text:style-name="T39">ssclk</text:span><text:span text:style-name="T13">;</text:spa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 </text:span><text:span text:style-name="T26">it_sel</text:span><text:span text:style-name="T13">, </text:span><text:span text:style-name="T26">clk_sel</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text:span><text:span text:style-name="T6">or</text:span><text:span text:style-name="T13"> (</text:span><text:span text:style-name="T26">it_sel</text:span><text:span text:style-name="T13"> = </text:span><text:span text:style-name="T34">"11"</text:span><text:span text:style-name="T13"> </text:span><text:span text:style-name="T6">and</text:span><text:span text:style-name="T13"> </text:span><text:span text:style-name="T26">clk_sel</text:span><text:span text:style-name="T13"> = </text:span><text:span text:style-name="T34">"10"</text:span><text:span text:style-name="T13">) </text:span><text:span text:style-name="T6">then</text:span></text:p>
      <text:p text:style-name="P15"><text:span text:style-name="T13"><text:s text:c="12"/></text:span><text:span text:style-name="T39">bit_count</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s_ws</text:span><text:span text:style-name="T13"> &lt;= </text:span><text:span text:style-name="T34">'0'</text:span><text:span text:style-name="T13">;</text:span></text:p>
      <text:p text:style-name="P15"><text:span text:style-name="T13"><text:s text:c="8"/></text:span><text:span text:style-name="T6">elsif</text:span><text:span text:style-name="T13"> <text:s text:c="3"/></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int_fall_e</text:span><text:span text:style-name="T13"> = </text:span><text:span text:style-name="T34">'1'</text:span><text:span text:style-name="T13"> </text:span><text:span text:style-name="T6">then</text:span></text:p>
      <text:p text:style-name="P15"><text:span text:style-name="T13"><text:s text:c="16"/></text:span><text:span text:style-name="T39">bit_count</text:span><text:span text:style-name="T13"> &lt;= </text:span><text:span text:style-name="T39">bit_count</text:span><text:span text:style-name="T13"> </text:span><text:span text:style-name="T14">+</text:span><text:span text:style-name="T31">1</text:span><text:span text:style-name="T13">;</text:span></text:p>
      <text:p text:style-name="P16"/>
      <text:p text:style-name="P15"><text:span text:style-name="T13"><text:s text:c="16"/></text:span><text:span text:style-name="T6">if</text:span><text:span text:style-name="T13"> </text:span><text:span text:style-name="T39">bit_count</text:span><text:span text:style-name="T13"> = </text:span><text:span text:style-name="T31">6</text:span><text:span text:style-name="T13"> </text:span><text:span text:style-name="T6">or</text:span><text:span text:style-name="T13"> </text:span><text:span text:style-name="T39">bit_count</text:span><text:span text:style-name="T13"> = </text:span><text:span text:style-name="T31">14</text:span><text:span text:style-name="T13"> </text:span><text:span text:style-name="T6">then</text:span></text:p>
      <text:p text:style-name="P15"><text:span text:style-name="T13"><text:s text:c="20"/></text:span><text:span text:style-name="T39">s_ws</text:span><text:span text:style-name="T13"> &lt;= </text:span><text:span text:style-name="T6">not</text:span><text:span text:style-name="T13"> </text:span><text:span text:style-name="T39">s_ws</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text:span><text:span text:style-name="T26">it_sclk</text:span><text:span text:style-name="T13"> &lt;= </text:span><text:span text:style-name="T39">ssclk</text:span><text:span text:style-name="T13">;</text:span></text:p>
      <text:p text:style-name="P15"><text:span text:style-name="T13"><text:s text:c="4"/></text:span><text:span text:style-name="T26">it_ws</text:span><text:span text:style-name="T13"> &lt;= </text:span><text:span text:style-name="T39">s_ws</text:span><text:span text:style-name="T13">;</text:span></text:p>
      <text:p text:style-name="P16"/>
      <text:p text:style-name="P16"/>
      <text:p text:style-name="P15"><text:span text:style-name="T13"><text:s text:c="4"/></text:span><text:span text:style-name="T36">--main shift register</text:span></text:p>
      <text:p text:style-name="P15"><text:span text:style-name="T13"><text:s text:c="4"/></text:span><text:span text:style-name="T6">process</text:span><text:span text:style-name="T13">(</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14">rising_edge</text:span><text:span text:style-name="T13">(</text:span><text:span text:style-name="T26">clk</text:span><text:span text:style-name="T13">) </text:span><text:span text:style-name="T6">then</text:span><text:span text:style-name="T13"> <text:s text:c="11"/></text:span></text:p>
      <text:p text:style-name="P15"><text:span text:style-name="T13"><text:s text:c="12"/></text:span><text:span text:style-name="T39">shift</text:span><text:span text:style-name="T13"> &lt;= </text:span><text:span text:style-name="T39">shift_nxt</text:span><text:span text:style-name="T13">; <text:s text:c="11"/></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shift_nxt</text:span><text:span text:style-name="T13"> &lt;= </text:span><text:span text:style-name="T39">shift</text:span><text:span text:style-name="T13">(</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34">'0'</text:span><text:span text:style-name="T13"> </text:span><text:span text:style-name="T6">when</text:span><text:span text:style-name="T13"> </text:span><text:span text:style-name="T39">int_fall_e</text:span><text:span text:style-name="T13"> = </text:span><text:span text:style-name="T34">'1'</text:span><text:span text:style-name="T13"> </text:span><text:span text:style-name="T6">else</text:span><text:span text:style-name="T13"> </text:span></text:p>
      <text:p text:style-name="P15"><text:span text:style-name="T13"><text:s text:c="8"/></text:span><text:span text:style-name="T39">shift_lft</text:span><text:span text:style-name="T13"> </text:span><text:span text:style-name="T6">when</text:span><text:span text:style-name="T13"> </text:span><text:span text:style-name="T39">bit_count</text:span><text:span text:style-name="T13"> = </text:span><text:span text:style-name="T31">0</text:span><text:span text:style-name="T13"> </text:span><text:span text:style-name="T6">and</text:span><text:span text:style-name="T13"> </text:span><text:span text:style-name="T39">int_rise_e</text:span><text:span text:style-name="T13"> = </text:span><text:span text:style-name="T34">'1'</text:span><text:span text:style-name="T13"> </text:span><text:span text:style-name="T6">else</text:span><text:span text:style-name="T13"> </text:span></text:p>
      <text:p text:style-name="P15"><text:soft-page-break/><text:span text:style-name="T13"><text:s text:c="12"/></text:span><text:span text:style-name="T39">shift_rht</text:span><text:span text:style-name="T13"> </text:span><text:span text:style-name="T6">when</text:span><text:span text:style-name="T13"> </text:span><text:span text:style-name="T39">bit_count</text:span><text:span text:style-name="T13"> = </text:span><text:span text:style-name="T31">8</text:span><text:span text:style-name="T13"> </text:span><text:span text:style-name="T6">and</text:span><text:span text:style-name="T13"> </text:span><text:span text:style-name="T39">int_rise_e</text:span><text:span text:style-name="T13"> = </text:span><text:span text:style-name="T34">'1'</text:span><text:span text:style-name="T13"> </text:span><text:span text:style-name="T6">else</text:span><text:span text:style-name="T13"> <text:s/></text:span><text:span text:style-name="T36">-- change to bit_count 7 and int fall</text:span></text:p>
      <text:p text:style-name="P15"><text:span text:style-name="T13"><text:s text:c="16"/></text:span><text:span text:style-name="T39">shift</text:span><text:span text:style-name="T13">;</text:span></text:p>
      <text:p text:style-name="P16"/>
      <text:p text:style-name="P15"><text:span text:style-name="T13"><text:s text:c="16"/></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16"/></text:span><text:span text:style-name="T6">begin</text:span></text:p>
      <text:p text:style-name="P15"><text:span text:style-name="T13"><text:s text:c="20"/></text:span><text:span text:style-name="T6">if</text:span><text:span text:style-name="T13"> </text:span><text:span text:style-name="T26">rst</text:span><text:span text:style-name="T13"> </text:span><text:span text:style-name="T6">then</text:span><text:span text:style-name="T13"> </text:span></text:p>
      <text:p text:style-name="P15"><text:span text:style-name="T13"><text:s text:c="24"/></text:span><text:span text:style-name="T39">shift_lft</text:span><text:span text:style-name="T13"> &lt;= (</text:span><text:span text:style-name="T6">others</text:span><text:span text:style-name="T13"> =&gt; </text:span><text:span text:style-name="T34">'0'</text:span><text:span text:style-name="T13">);</text:span></text:p>
      <text:p text:style-name="P15"><text:span text:style-name="T13"><text:s text:c="24"/></text:span><text:span text:style-name="T39">shift_rht</text:span><text:span text:style-name="T13"> &lt;= (</text:span><text:span text:style-name="T6">others</text:span><text:span text:style-name="T13"> =&gt; </text:span><text:span text:style-name="T34">'0'</text:span><text:span text:style-name="T13">);</text:span></text:p>
      <text:p text:style-name="P15"><text:span text:style-name="T13"><text:s text:c="20"/></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24"/></text:span><text:span text:style-name="T6">if</text:span><text:span text:style-name="T13"> </text:span><text:span text:style-name="T26">it_sel</text:span><text:span text:style-name="T13"> = </text:span><text:span text:style-name="T34">"11"</text:span><text:span text:style-name="T13"> </text:span><text:span text:style-name="T6">and</text:span><text:span text:style-name="T13"> </text:span><text:span text:style-name="T26">clk_sel</text:span><text:span text:style-name="T13"> = </text:span><text:span text:style-name="T34">"10"</text:span><text:span text:style-name="T13"> </text:span><text:span text:style-name="T6">then</text:span></text:p>
      <text:p text:style-name="P15"><text:span text:style-name="T13"><text:s text:c="28"/></text:span><text:span text:style-name="T39">shift_lft</text:span><text:span text:style-name="T13"> &lt;= </text:span><text:span text:style-name="T26">it_data</text:span><text:span text:style-name="T13">;</text:span></text:p>
      <text:p text:style-name="P15"><text:span text:style-name="T13"><text:s text:c="24"/></text:span><text:span text:style-name="T6">end</text:span><text:span text:style-name="T13"> </text:span><text:span text:style-name="T6">if</text:span><text:span text:style-name="T13">;</text:span></text:p>
      <text:p text:style-name="P16"/>
      <text:p text:style-name="P15"><text:span text:style-name="T13"><text:s text:c="24"/></text:span><text:span text:style-name="T6">if</text:span><text:span text:style-name="T13"> </text:span><text:span text:style-name="T26">it_sel</text:span><text:span text:style-name="T13"> = </text:span><text:span text:style-name="T34">"11"</text:span><text:span text:style-name="T13"> </text:span><text:span text:style-name="T6">and</text:span><text:span text:style-name="T13"> </text:span><text:span text:style-name="T26">clk_sel</text:span><text:span text:style-name="T13"> = </text:span><text:span text:style-name="T34">"11"</text:span><text:span text:style-name="T13"> </text:span><text:span text:style-name="T6">then</text:span></text:p>
      <text:p text:style-name="P15"><text:span text:style-name="T13"><text:s text:c="28"/></text:span><text:span text:style-name="T39">shift_rht</text:span><text:span text:style-name="T13"> &lt;= </text:span><text:span text:style-name="T26">it_data</text:span><text:span text:style-name="T13">;</text:span></text:p>
      <text:p text:style-name="P15"><text:span text:style-name="T13"><text:s text:c="24"/></text:span><text:span text:style-name="T6">end</text:span><text:span text:style-name="T13"> </text:span><text:span text:style-name="T6">if</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process</text:span><text:span text:style-name="T13">;</text:span></text:p>
      <text:p text:style-name="P16"/>
      <text:p text:style-name="P16"/>
      <text:p text:style-name="P15"><text:span text:style-name="T13"><text:s text:c="16"/></text:span><text:span text:style-name="T26">it_sd</text:span><text:span text:style-name="T13"> &lt;= </text:span><text:span text:style-name="T39">shift</text:span><text:span text:style-name="T13">(</text:span><text:span text:style-name="T31">7</text:span><text:span text:style-name="T13">);</text:span></text:p>
      <text:p text:style-name="P16"/>
      <text:p text:style-name="P15"><text:span text:style-name="T13"><text:s text:c="12"/></text:span><text:span text:style-name="T6">end</text:span><text:span text:style-name="T13"> </text:span><text:span text:style-name="T22">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pwm_mod</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text:span><text:span text:style-name="T13"> : </text:span><text:span text:style-name="T28">std_logic</text:span><text:span text:style-name="T13">; <text:s text:c="3"/></text:span></text:p>
      <text:p text:style-name="P15"><text:span text:style-name="T13"><text:s text:c="4"/></text:span><text:span text:style-name="T26">led0</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pwm_mod</text:span><text:span text:style-name="T13"> </text:span><text:span text:style-name="T6">is</text:span></text:p>
      <text:p text:style-name="P15"><text:span text:style-name="T13"><text:s text:c="4"/></text:span><text:span text:style-name="T6">signal</text:span><text:span text:style-name="T13"> </text:span><text:span text:style-name="T39">clk_div_reg</text:span><text:span text:style-name="T13">, </text:span><text:span text:style-name="T39">clk_div_next</text:span><text:span text:style-name="T13"> : </text:span><text:span text:style-name="T28">unsigned</text:span><text:span text:style-name="T13"> (</text:span><text:span text:style-name="T31">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pwm0_reg</text:span><text:span text:style-name="T13">, </text:span><text:span text:style-name="T39">pwm0_next</text:span><text:span text:style-name="T13">, </text:span><text:span text:style-name="T39">pwm1_reg</text:span><text:span text:style-name="T13">, </text:span><text:span text:style-name="T39">pwm1_next</text:span><text:span text:style-name="T13"> : </text:span><text:span text:style-name="T28">unsigned</text:span><text:span text:style-name="T13"> (</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led_inv_0</text:span><text:span text:style-name="T13">, </text:span><text:span text:style-name="T39">led_inv_1</text:span><text:span text:style-name="T13">, </text:span><text:span text:style-name="T39">clk_div</text:span><text:span text:style-name="T13"> : </text:span><text:span text:style-name="T28">std_logic</text:span><text:span text:style-name="T13">;</text:span></text:p>
      <text:p text:style-name="P23">begin</text:p>
      <text:p text:style-name="P16"/>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text:span><text:span text:style-name="T39">clk_div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clk_div_reg</text:span><text:span text:style-name="T13"> &lt;= </text:span><text:span text:style-name="T39">clk_div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clk_div_next</text:span><text:span text:style-name="T13"> &lt;= (</text:span><text:span text:style-name="T6">others</text:span><text:span text:style-name="T13"> =&gt; </text:span><text:span text:style-name="T34">'0'</text:span><text:span text:style-name="T13">) </text:span><text:span text:style-name="T6">when</text:span><text:span text:style-name="T13"> </text:span><text:span text:style-name="T39">clk_div_reg</text:span><text:span text:style-name="T13"> = </text:span><text:span text:style-name="T31">5000</text:span><text:span text:style-name="T13"> </text:span><text:span text:style-name="T6">else</text:span><text:span text:style-name="T13"> </text:span><text:span text:style-name="T39">clk_div_reg</text:span><text:span text:style-name="T13"> </text:span><text:span text:style-name="T14">+</text:span><text:span text:style-name="T13"> </text:span><text:span text:style-name="T31">1</text:span><text:span text:style-name="T13">;</text:span></text:p>
      <text:p text:style-name="P16"/>
      <text:p text:style-name="P15"><text:span text:style-name="T13"><text:s text:c="4"/></text:span><text:span text:style-name="T39">clk_div</text:span><text:span text:style-name="T13"> &lt;= </text:span><text:span text:style-name="T34">'1'</text:span><text:span text:style-name="T13"> </text:span><text:span text:style-name="T6">when</text:span><text:span text:style-name="T13"> </text:span><text:span text:style-name="T39">clk_div_reg</text:span><text:span text:style-name="T13"> = </text:span><text:span text:style-name="T31">5000</text:span><text:span text:style-name="T13"> </text:span><text:span text:style-name="T6">else</text:span><text:span text:style-name="T13"> </text:span><text:span text:style-name="T34">'0'</text:span><text:span text:style-name="T13">;</text:span></text:p>
      <text:p text:style-name="P16"/>
      <text:p text:style-name="P16"/>
      <text:p text:style-name="P15"><text:span text:style-name="T13"><text:s text:c="4"/></text:span><text:span text:style-name="T6">process</text:span><text:span text:style-name="T13">(</text:span><text:span text:style-name="T39">clk_div</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0'</text:span><text:span text:style-name="T13"> </text:span><text:span text:style-name="T6">then</text:span></text:p>
      <text:p text:style-name="P15"><text:span text:style-name="T13"><text:s text:c="12"/></text:span><text:span text:style-name="T39">pwm0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pwm1_reg</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39">clk_div</text:span><text:span text:style-name="T13">) </text:span><text:span text:style-name="T6">then</text:span></text:p>
      <text:p text:style-name="P15"><text:span text:style-name="T13"><text:s text:c="12"/></text:span><text:span text:style-name="T39">pwm0_reg</text:span><text:span text:style-name="T13"> &lt;= </text:span><text:span text:style-name="T39">pwm0_next</text:span><text:span text:style-name="T13">;</text:span></text:p>
      <text:p text:style-name="P15"><text:span text:style-name="T13"><text:s text:c="12"/></text:span><text:span text:style-name="T39">pwm1_reg</text:span><text:span text:style-name="T13"> &lt;= </text:span><text:span text:style-name="T39">pwm1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pwm0_next</text:span><text:span text:style-name="T13"> &lt;= (</text:span><text:span text:style-name="T6">others</text:span><text:span text:style-name="T13"> =&gt; </text:span><text:span text:style-name="T34">'0'</text:span><text:span text:style-name="T13">) </text:span><text:span text:style-name="T6">when</text:span><text:span text:style-name="T13"> </text:span><text:span text:style-name="T39">pwm0_reg</text:span><text:span text:style-name="T13"> = </text:span><text:span text:style-name="T31">254</text:span><text:span text:style-name="T13"> </text:span><text:span text:style-name="T6">else</text:span><text:span text:style-name="T13"> </text:span><text:span text:style-name="T39">pwm0_reg</text:span><text:span text:style-name="T13"> </text:span><text:span text:style-name="T14">+</text:span><text:span text:style-name="T13"> </text:span><text:span text:style-name="T31">1</text:span><text:span text:style-name="T13">;</text:span></text:p>
      <text:p text:style-name="P15"><text:span text:style-name="T13"><text:s text:c="4"/></text:span><text:span text:style-name="T39">pwm1_next</text:span><text:span text:style-name="T13"> &lt;= (</text:span><text:span text:style-name="T6">others</text:span><text:span text:style-name="T13"> =&gt; </text:span><text:span text:style-name="T34">'0'</text:span><text:span text:style-name="T13">) </text:span><text:span text:style-name="T6">when</text:span><text:span text:style-name="T13"> </text:span><text:span text:style-name="T39">pwm1_reg</text:span><text:span text:style-name="T13"> = </text:span><text:span text:style-name="T31">252</text:span><text:span text:style-name="T13"> </text:span><text:span text:style-name="T6">else</text:span><text:span text:style-name="T13"> </text:span><text:span text:style-name="T39">pwm1_reg</text:span><text:span text:style-name="T13"> </text:span><text:span text:style-name="T14">+</text:span><text:span text:style-name="T13"> </text:span><text:span text:style-name="T31">1</text:span><text:span text:style-name="T13">;</text:span></text:p>
      <text:p text:style-name="P16"/>
      <text:p text:style-name="P15"><text:span text:style-name="T13"><text:s text:c="4"/></text:span><text:span text:style-name="T39">led_inv_0</text:span><text:span text:style-name="T13"> &lt;= </text:span><text:span text:style-name="T34">'1'</text:span><text:span text:style-name="T13"> </text:span><text:span text:style-name="T6">when</text:span><text:span text:style-name="T13"> </text:span><text:span text:style-name="T39">pwm0_reg</text:span><text:span text:style-name="T13"> </text:span><text:span text:style-name="T14">&gt;</text:span><text:span text:style-name="T13"> </text:span><text:span text:style-name="T31">127</text:span><text:span text:style-name="T13"> </text:span><text:span text:style-name="T6">else</text:span><text:span text:style-name="T13"> </text:span><text:span text:style-name="T34">'0'</text:span><text:span text:style-name="T13">;</text:span></text:p>
      <text:p text:style-name="P15"><text:span text:style-name="T13"><text:s text:c="4"/></text:span><text:span text:style-name="T39">led_inv_1</text:span><text:span text:style-name="T13"> &lt;= </text:span><text:span text:style-name="T34">'1'</text:span><text:span text:style-name="T13"> </text:span><text:span text:style-name="T6">when</text:span><text:span text:style-name="T13"> </text:span><text:span text:style-name="T39">pwm1_reg</text:span><text:span text:style-name="T13"> </text:span><text:span text:style-name="T14">&gt;</text:span><text:span text:style-name="T13"> </text:span><text:span text:style-name="T31">126</text:span><text:span text:style-name="T13"> </text:span><text:span text:style-name="T6">else</text:span><text:span text:style-name="T13"> </text:span><text:span text:style-name="T34">'0'</text:span><text:span text:style-name="T13">;</text:span></text:p>
      <text:p text:style-name="P15"><text:span text:style-name="T13"><text:s text:c="4"/></text:span><text:span text:style-name="T26">led0</text:span><text:span text:style-name="T13"> &lt;= </text:span><text:span text:style-name="T39">led_inv_0</text:span><text:span text:style-name="T13"> </text:span><text:span text:style-name="T6">xor</text:span><text:span text:style-name="T13"> </text:span><text:span text:style-name="T39">led_inv_1</text:span><text:span text:style-name="T13">; <text:s text:c="3"/></text:span></text:p>
      <text:p text:style-name="P16"/>
      <text:p text:style-name="P15"><text:span text:style-name="T6">end</text:span><text:span text:style-name="T13"> </text:span><text:span text:style-name="T22">arch</text:span><text:span text:style-name="T13">;</text:span></text:p>
      <text:p text:style-name="P16"><text:soft-page-break/></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flag_buf</text:span><text:span text:style-name="T13"> </text:span><text:span text:style-name="T6">is</text:span><text:span text:style-name="T13"> </text:span></text:p>
      <text:p text:style-name="P15"><text:span text:style-name="T13"><text:s text:c="4"/></text:span><text:span text:style-name="T6">generic</text:span><text:span text:style-name="T13">(</text:span><text:span text:style-name="T7">w</text:span><text:span text:style-name="T13">: </text:span><text:span text:style-name="T28">integer</text:span><text:span text:style-name="T13"> := </text:span><text:span text:style-name="T31">8</text:span><text:span text:style-name="T13">);</text:span></text:p>
      <text:p text:style-name="P15"><text:span text:style-name="T13"><text:s text:c="4"/></text:span><text:span text:style-name="T6">port</text:span><text:span text:style-name="T13">(</text:span></text:p>
      <text:p text:style-name="P15"><text:span text:style-name="T13"><text:s text:c="8"/></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clr_flag</text:span><text:span text:style-name="T13">, </text:span><text:span text:style-name="T26">set_flag</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din</text:span><text:span text:style-name="T13">: </text:span><text:span text:style-name="T6">in</text:span><text:span text:style-name="T13"> </text:span><text:span text:style-name="T28">std_logic_vector</text:span><text:span text:style-name="T13">(</text:span><text:span text:style-name="T7">w</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dout</text:span><text:span text:style-name="T13">: </text:span><text:span text:style-name="T6">out</text:span><text:span text:style-name="T13"> </text:span><text:span text:style-name="T28">std_logic_vector</text:span><text:span text:style-name="T13">(</text:span><text:span text:style-name="T7">w</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flag</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22">flag_buf</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flag_buf</text:span><text:span text:style-name="T13"> </text:span><text:span text:style-name="T6">is</text:span></text:p>
      <text:p text:style-name="P15"><text:span text:style-name="T13"><text:s text:c="4"/></text:span><text:span text:style-name="T6">signal</text:span><text:span text:style-name="T13"> </text:span><text:span text:style-name="T39">buf_reg</text:span><text:span text:style-name="T13">, </text:span><text:span text:style-name="T39">buf_next</text:span><text:span text:style-name="T13">: </text:span><text:span text:style-name="T28">std_logic_vector</text:span><text:span text:style-name="T13">(</text:span><text:span text:style-name="T7">w</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flag_reg</text:span><text:span text:style-name="T13">, </text:span><text:span text:style-name="T39">flag_next</text:span><text:span text:style-name="T13">: </text:span><text:span text:style-name="T28">std_logic</text:span><text:span text:style-name="T13">;</text:span></text:p>
      <text:p text:style-name="P23">begin</text:p>
      <text:p text:style-name="P15"><text:span text:style-name="T13"><text:s text:c="4"/></text:span><text:span text:style-name="T36">--ff &amp; register</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buf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flag_reg</text:span><text:span text:style-name="T13"> &lt;= </text:span><text:span text:style-name="T34">'0'</text:span><text:span text:style-name="T13">;</text:span></text:p>
      <text:p text:style-name="P15"><text:span text:style-name="T13"><text:s text:c="8"/></text:span><text:span text:style-name="T6">elsif</text:span><text:span text:style-name="T13">(</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buf_reg</text:span><text:span text:style-name="T13"> &lt;= </text:span><text:span text:style-name="T39">buf_next</text:span><text:span text:style-name="T13">;</text:span></text:p>
      <text:p text:style-name="P15"><text:span text:style-name="T13"><text:s text:c="12"/></text:span><text:span text:style-name="T39">flag_reg</text:span><text:span text:style-name="T13"> &lt;= </text:span><text:span text:style-name="T39">flag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next-state logic</text:span></text:p>
      <text:p text:style-name="P15"><text:span text:style-name="T13"><text:s text:c="4"/></text:span><text:span text:style-name="T6">process</text:span><text:span text:style-name="T13">(</text:span><text:span text:style-name="T39">buf_reg</text:span><text:span text:style-name="T13">, </text:span><text:span text:style-name="T39">flag_reg</text:span><text:span text:style-name="T13">, </text:span><text:span text:style-name="T26">set_flag</text:span><text:span text:style-name="T13">, </text:span><text:span text:style-name="T26">clr_flag</text:span><text:span text:style-name="T13">, </text:span><text:span text:style-name="T26">din</text:span><text:span text:style-name="T13">)</text:span></text:p>
      <text:p text:style-name="P15"><text:span text:style-name="T13"><text:s text:c="4"/></text:span><text:span text:style-name="T6">begin</text:span></text:p>
      <text:p text:style-name="P15"><text:span text:style-name="T13"><text:s text:c="8"/></text:span><text:span text:style-name="T39">buf_next</text:span><text:span text:style-name="T13"> &lt;= </text:span><text:span text:style-name="T39">buf_reg</text:span><text:span text:style-name="T13">;</text:span></text:p>
      <text:p text:style-name="P15"><text:span text:style-name="T13"><text:s text:c="8"/></text:span><text:span text:style-name="T39">flag_next</text:span><text:span text:style-name="T13"> &lt;= </text:span><text:span text:style-name="T39">flag_reg</text:span><text:span text:style-name="T13">;</text:span></text:p>
      <text:p text:style-name="P15"><text:span text:style-name="T13"><text:s text:c="8"/></text:span><text:span text:style-name="T6">if</text:span><text:span text:style-name="T13"> (</text:span><text:span text:style-name="T26">set_flag</text:span><text:span text:style-name="T13"> = </text:span><text:span text:style-name="T34">'1'</text:span><text:span text:style-name="T13">) </text:span><text:span text:style-name="T6">then</text:span></text:p>
      <text:p text:style-name="P15"><text:span text:style-name="T13"><text:s text:c="12"/></text:span><text:span text:style-name="T39">buf_next</text:span><text:span text:style-name="T13"> &lt;= </text:span><text:span text:style-name="T26">din</text:span><text:span text:style-name="T13">;</text:span></text:p>
      <text:p text:style-name="P15"><text:span text:style-name="T13"><text:s text:c="12"/></text:span><text:span text:style-name="T39">flag_next</text:span><text:span text:style-name="T13"> &lt;= </text:span><text:span text:style-name="T34">'1'</text:span><text:span text:style-name="T13">;</text:span></text:p>
      <text:p text:style-name="P15"><text:span text:style-name="T13"><text:s text:c="8"/></text:span><text:span text:style-name="T6">elsif</text:span><text:span text:style-name="T13"> (</text:span><text:span text:style-name="T26">clr_flag</text:span><text:span text:style-name="T13"> = </text:span><text:span text:style-name="T34">'1'</text:span><text:span text:style-name="T13">) </text:span><text:span text:style-name="T6">then</text:span></text:p>
      <text:p text:style-name="P15"><text:span text:style-name="T13"><text:s text:c="12"/></text:span><text:span text:style-name="T39">flag_next</text:span><text:span text:style-name="T13"> &lt;= </text:span><text:span text:style-name="T34">'0'</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output logic</text:span></text:p>
      <text:p text:style-name="P15"><text:span text:style-name="T13"><text:s text:c="4"/></text:span><text:span text:style-name="T26">dout</text:span><text:span text:style-name="T13"> &lt;= </text:span><text:span text:style-name="T39">buf_reg</text:span><text:span text:style-name="T13">;</text:span></text:p>
      <text:p text:style-name="P15"><text:span text:style-name="T13"><text:s text:c="4"/></text:span><text:span text:style-name="T26">flag</text:span><text:span text:style-name="T13"> &lt;= </text:span><text:span text:style-name="T39">flag_reg</text:span><text:span text:style-name="T13">;</text:span></text:p>
      <text:p text:style-name="P15"><text:span text:style-name="T6">end</text:span><text:span text:style-name="T13"> </text:span><text:span text:style-name="T22">arch</text:span><text:span text:style-name="T13">;</text:span></text:p>
      <text:p text:style-name="P16"/>
      <text:p text:style-name="P16"/>
      <text:p text:style-name="P16"/>
      <text:p text:style-name="P16"/>
      <text:p text:style-name="P16"><text:soft-page-break/></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 </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uart_tx</text:span><text:span text:style-name="T13"> </text:span><text:span text:style-name="T6">is</text:span></text:p>
      <text:p text:style-name="P15"><text:span text:style-name="T13"><text:s text:c="4"/></text:span><text:span text:style-name="T6">generic</text:span><text:span text:style-name="T13">( <text:s text:c="3"/></text:span></text:p>
      <text:p text:style-name="P15"><text:span text:style-name="T13"><text:s text:c="8"/></text:span><text:span text:style-name="T7">dbit</text:span><text:span text:style-name="T13">: </text:span><text:span text:style-name="T28">integer</text:span><text:span text:style-name="T13"> := </text:span><text:span text:style-name="T31">8</text:span><text:span text:style-name="T13">; </text:span><text:span text:style-name="T36">--# data bits</text:span></text:p>
      <text:p text:style-name="P15"><text:span text:style-name="T13"><text:s text:c="8"/></text:span><text:span text:style-name="T7">sb_tick</text:span><text:span text:style-name="T13">: </text:span><text:span text:style-name="T28">integer</text:span><text:span text:style-name="T13"> := </text:span><text:span text:style-name="T31">16</text:span><text:span text:style-name="T13">); </text:span><text:span text:style-name="T36">--# ticks for stop bits</text:span></text:p>
      <text:p text:style-name="P15"><text:span text:style-name="T13"><text:s text:c="4"/></text:span><text:span text:style-name="T6">port</text:span><text:span text:style-name="T13">(</text:span></text:p>
      <text:p text:style-name="P15"><text:span text:style-name="T13"><text:s text:c="8"/></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tx_start</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s_tick</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din</text:span><text:span text:style-name="T13">: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8"/></text:span><text:span text:style-name="T26">tx_done_tick</text:span><text:span text:style-name="T13">: </text:span><text:span text:style-name="T6">out</text:span><text:span text:style-name="T13"> </text:span><text:span text:style-name="T28">std_logic</text:span><text:span text:style-name="T13">;</text:span></text:p>
      <text:p text:style-name="P15"><text:span text:style-name="T13"><text:s text:c="8"/></text:span><text:span text:style-name="T26">tx</text:span><text:span text:style-name="T13">: </text:span><text:span text:style-name="T6">out</text:span><text:span text:style-name="T13"> </text:span><text:span text:style-name="T28">std_logic</text:span><text:span text:style-name="T13">);</text:span></text:p>
      <text:p text:style-name="P16"/>
      <text:p text:style-name="P15"><text:span text:style-name="T6">end</text:span><text:span text:style-name="T13"> </text:span><text:span text:style-name="T22">uart_tx</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uart_tx</text:span><text:span text:style-name="T13"> </text:span><text:span text:style-name="T6">is</text:span></text:p>
      <text:p text:style-name="P15"><text:span text:style-name="T13"><text:s text:c="4"/></text:span><text:span text:style-name="T6">type</text:span><text:span text:style-name="T13"> </text:span><text:span text:style-name="T28">state_type</text:span><text:span text:style-name="T13"> </text:span><text:span text:style-name="T6">is</text:span><text:span text:style-name="T13">(</text:span><text:span text:style-name="T7">idle</text:span><text:span text:style-name="T13">, </text:span><text:span text:style-name="T7">start</text:span><text:span text:style-name="T13">, </text:span><text:span text:style-name="T7">data</text:span><text:span text:style-name="T13">, </text:span><text:span text:style-name="T7">stop</text:span><text:span text:style-name="T13">);</text:span></text:p>
      <text:p text:style-name="P15"><text:span text:style-name="T13"><text:s text:c="4"/></text:span><text:span text:style-name="T6">signal</text:span><text:span text:style-name="T13"> </text:span><text:span text:style-name="T39">state_reg</text:span><text:span text:style-name="T13">, </text:span><text:span text:style-name="T39">state_next</text:span><text:span text:style-name="T13">: </text:span><text:span text:style-name="T28">state_type</text:span><text:span text:style-name="T13">;</text:span></text:p>
      <text:p text:style-name="P15"><text:span text:style-name="T13"><text:s text:c="4"/></text:span><text:span text:style-name="T6">signal</text:span><text:span text:style-name="T13"> </text:span><text:span text:style-name="T39">s_reg</text:span><text:span text:style-name="T13">, </text:span><text:span text:style-name="T39">s_next</text:span><text:span text:style-name="T13">: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n_reg</text:span><text:span text:style-name="T13">, </text:span><text:span text:style-name="T39">n_next</text:span><text:span text:style-name="T13">: </text:span><text:span text:style-name="T28">unsigned</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b_reg</text:span><text:span text:style-name="T13">, </text:span><text:span text:style-name="T39">b_nex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tx_reg</text:span><text:span text:style-name="T13">, </text:span><text:span text:style-name="T39">tx_next</text:span><text:span text:style-name="T13">: </text:span><text:span text:style-name="T28">std_logic</text:span><text:span text:style-name="T13">;</text:span></text:p>
      <text:p text:style-name="P23">begin</text:p>
      <text:p text:style-name="P15"><text:span text:style-name="T13"><text:s text:c="4"/></text:span><text:span text:style-name="T36">--FSMD state &amp; data registers</text:span></text:p>
      <text:p text:style-name="P15"><text:span text:style-name="T13"><text:s text:c="4"/></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text:span><text:span text:style-name="T13"> = </text:span><text:span text:style-name="T34">'1'</text:span><text:span text:style-name="T13"> </text:span><text:span text:style-name="T6">then</text:span></text:p>
      <text:p text:style-name="P15"><text:span text:style-name="T13"><text:s text:c="12"/></text:span><text:span text:style-name="T39">state_reg</text:span><text:span text:style-name="T13"> &lt;= </text:span><text:span text:style-name="T7">idle</text:span><text:span text:style-name="T13">;</text:span></text:p>
      <text:p text:style-name="P15"><text:span text:style-name="T13"><text:s text:c="12"/></text:span><text:span text:style-name="T39">s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n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b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tx_reg</text:span><text:span text:style-name="T13"> &lt;= </text:span><text:span text:style-name="T34">'1'</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span text:style-name="T13"> </text:span></text:p>
      <text:p text:style-name="P15"><text:span text:style-name="T13"><text:s text:c="12"/></text:span><text:span text:style-name="T39">state_reg</text:span><text:span text:style-name="T13"> &lt;= </text:span><text:span text:style-name="T39">state_next</text:span><text:span text:style-name="T13">;</text:span></text:p>
      <text:p text:style-name="P15"><text:span text:style-name="T13"><text:s text:c="12"/></text:span><text:span text:style-name="T39">s_reg</text:span><text:span text:style-name="T13"> &lt;= </text:span><text:span text:style-name="T39">s_next</text:span><text:span text:style-name="T13">;</text:span></text:p>
      <text:p text:style-name="P15"><text:span text:style-name="T13"><text:s text:c="12"/></text:span><text:span text:style-name="T39">n_reg</text:span><text:span text:style-name="T13"> &lt;= </text:span><text:span text:style-name="T39">n_next</text:span><text:span text:style-name="T13">;</text:span></text:p>
      <text:p text:style-name="P15"><text:span text:style-name="T13"><text:s text:c="12"/></text:span><text:span text:style-name="T39">b_reg</text:span><text:span text:style-name="T13"> &lt;= </text:span><text:span text:style-name="T39">b_next</text:span><text:span text:style-name="T13">;</text:span></text:p>
      <text:p text:style-name="P15"><text:span text:style-name="T13"><text:s text:c="12"/></text:span><text:span text:style-name="T39">tx_reg</text:span><text:span text:style-name="T13"> &lt;= </text:span><text:span text:style-name="T39">tx_nex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6">--next-state logic &amp; data path function units/routing</text:span></text:p>
      <text:p text:style-name="P15"><text:span text:style-name="T13"><text:s text:c="4"/></text:span><text:span text:style-name="T6">process</text:span><text:span text:style-name="T13">(</text:span><text:span text:style-name="T39">state_reg</text:span><text:span text:style-name="T13">, </text:span><text:span text:style-name="T39">s_reg</text:span><text:span text:style-name="T13">, </text:span><text:span text:style-name="T39">n_reg</text:span><text:span text:style-name="T13">, </text:span><text:span text:style-name="T39">b_reg</text:span><text:span text:style-name="T13">, </text:span><text:span text:style-name="T26">s_tick</text:span><text:span text:style-name="T13">, </text:span><text:span text:style-name="T39">tx_reg</text:span><text:span text:style-name="T13">, </text:span><text:span text:style-name="T26">tx_start</text:span><text:span text:style-name="T13">, </text:span><text:span text:style-name="T26">din</text:span><text:span text:style-name="T13">)</text:span></text:p>
      <text:p text:style-name="P15"><text:span text:style-name="T13"><text:s text:c="4"/></text:span><text:span text:style-name="T6">begin</text:span></text:p>
      <text:p text:style-name="P15"><text:span text:style-name="T13"><text:s text:c="8"/></text:span><text:span text:style-name="T39">state_next</text:span><text:span text:style-name="T13"> &lt;= </text:span><text:span text:style-name="T39">state_reg</text:span><text:span text:style-name="T13">;</text:span></text:p>
      <text:p text:style-name="P15"><text:span text:style-name="T13"><text:s text:c="8"/></text:span><text:span text:style-name="T39">s_next</text:span><text:span text:style-name="T13"> &lt;= </text:span><text:span text:style-name="T39">s_reg</text:span><text:span text:style-name="T13">;</text:span></text:p>
      <text:p text:style-name="P15"><text:soft-page-break/><text:span text:style-name="T13"><text:s text:c="8"/></text:span><text:span text:style-name="T39">n_next</text:span><text:span text:style-name="T13"> &lt;= </text:span><text:span text:style-name="T39">n_reg</text:span><text:span text:style-name="T13">;</text:span></text:p>
      <text:p text:style-name="P15"><text:span text:style-name="T13"><text:s text:c="8"/></text:span><text:span text:style-name="T39">b_next</text:span><text:span text:style-name="T13"> &lt;= </text:span><text:span text:style-name="T39">b_reg</text:span><text:span text:style-name="T13">;</text:span></text:p>
      <text:p text:style-name="P15"><text:span text:style-name="T13"><text:s text:c="8"/></text:span><text:span text:style-name="T39">tx_next</text:span><text:span text:style-name="T13"> &lt;= </text:span><text:span text:style-name="T39">tx_reg</text:span><text:span text:style-name="T13">;</text:span></text:p>
      <text:p text:style-name="P15"><text:span text:style-name="T13"><text:s text:c="8"/></text:span><text:span text:style-name="T26">tx_done_tick</text:span><text:span text:style-name="T13"> &lt;= </text:span><text:span text:style-name="T34">'0'</text:span><text:span text:style-name="T13">;</text:span></text:p>
      <text:p text:style-name="P16"/>
      <text:p text:style-name="P15"><text:span text:style-name="T13"><text:s text:c="8"/></text:span><text:span text:style-name="T6">case</text:span><text:span text:style-name="T13"> </text:span><text:span text:style-name="T39">state_reg</text:span><text:span text:style-name="T13"> </text:span><text:span text:style-name="T6">is</text:span></text:p>
      <text:p text:style-name="P15"><text:span text:style-name="T13"><text:s text:c="12"/></text:span><text:span text:style-name="T6">when</text:span><text:span text:style-name="T13"> </text:span><text:span text:style-name="T7">idle</text:span><text:span text:style-name="T13"> =&gt; </text:span></text:p>
      <text:p text:style-name="P15"><text:span text:style-name="T13"><text:s text:c="16"/></text:span><text:span text:style-name="T39">tx_next</text:span><text:span text:style-name="T13"> &lt;= </text:span><text:span text:style-name="T34">'1'</text:span><text:span text:style-name="T13">;</text:span></text:p>
      <text:p text:style-name="P15"><text:span text:style-name="T13"><text:s text:c="16"/></text:span><text:span text:style-name="T6">if</text:span><text:span text:style-name="T13"> </text:span><text:span text:style-name="T26">tx_start</text:span><text:span text:style-name="T13"> = </text:span><text:span text:style-name="T34">'1'</text:span><text:span text:style-name="T13"> </text:span><text:span text:style-name="T6">then</text:span></text:p>
      <text:p text:style-name="P15"><text:span text:style-name="T13"><text:s text:c="20"/></text:span><text:span text:style-name="T39">state_next</text:span><text:span text:style-name="T13"> &lt;= </text:span><text:span text:style-name="T7">start</text:span><text:span text:style-name="T13">;</text:span></text:p>
      <text:p text:style-name="P15"><text:span text:style-name="T13"><text:s text:c="20"/></text:span><text:span text:style-name="T39">s_next</text:span><text:span text:style-name="T13"> &lt;= (</text:span><text:span text:style-name="T6">others</text:span><text:span text:style-name="T13"> =&gt; </text:span><text:span text:style-name="T34">'0'</text:span><text:span text:style-name="T13">);</text:span></text:p>
      <text:p text:style-name="P15"><text:span text:style-name="T13"><text:s text:c="20"/></text:span><text:span text:style-name="T39">b_next</text:span><text:span text:style-name="T13"> &lt;= </text:span><text:span text:style-name="T26">din</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when</text:span><text:span text:style-name="T13"> </text:span><text:span text:style-name="T7">start</text:span><text:span text:style-name="T13"> =&gt; </text:span></text:p>
      <text:p text:style-name="P15"><text:span text:style-name="T13"><text:s text:c="16"/></text:span><text:span text:style-name="T39">tx_next</text:span><text:span text:style-name="T13"> &lt;= </text:span><text:span text:style-name="T34">'0'</text:span><text:span text:style-name="T13">;</text:span></text:p>
      <text:p text:style-name="P15"><text:span text:style-name="T13"><text:s text:c="16"/></text:span><text:span text:style-name="T6">if</text:span><text:span text:style-name="T13"> (</text:span><text:span text:style-name="T26">s_tick</text:span><text:span text:style-name="T13"> = </text:span><text:span text:style-name="T34">'1'</text:span><text:span text:style-name="T13">) </text:span><text:span text:style-name="T6">then</text:span></text:p>
      <text:p text:style-name="P15"><text:span text:style-name="T13"><text:s text:c="20"/></text:span><text:span text:style-name="T6">if</text:span><text:span text:style-name="T13"> </text:span><text:span text:style-name="T39">s_reg</text:span><text:span text:style-name="T13"> = </text:span><text:span text:style-name="T31">15</text:span><text:span text:style-name="T13"> </text:span><text:span text:style-name="T6">then</text:span></text:p>
      <text:p text:style-name="P15"><text:span text:style-name="T13"><text:s text:c="24"/></text:span><text:span text:style-name="T39">state_next</text:span><text:span text:style-name="T13"> &lt;= </text:span><text:span text:style-name="T7">data</text:span><text:span text:style-name="T13">;</text:span></text:p>
      <text:p text:style-name="P15"><text:span text:style-name="T13"><text:s text:c="24"/></text:span><text:span text:style-name="T39">s_next</text:span><text:span text:style-name="T13"> &lt;= (</text:span><text:span text:style-name="T6">others</text:span><text:span text:style-name="T13"> =&gt; </text:span><text:span text:style-name="T34">'0'</text:span><text:span text:style-name="T13">);</text:span></text:p>
      <text:p text:style-name="P15"><text:span text:style-name="T13"><text:s text:c="24"/></text:span><text:span text:style-name="T39">n_next</text:span><text:span text:style-name="T13"> &lt;= (</text:span><text:span text:style-name="T6">others</text:span><text:span text:style-name="T13"> =&gt; </text:span><text:span text:style-name="T34">'0'</text:span><text:span text:style-name="T13">);</text:span></text:p>
      <text:p text:style-name="P15"><text:span text:style-name="T13"><text:s text:c="20"/></text:span><text:span text:style-name="T6">else</text:span></text:p>
      <text:p text:style-name="P15"><text:span text:style-name="T13"><text:s text:c="24"/></text:span><text:span text:style-name="T39">s_next</text:span><text:span text:style-name="T13"> &lt;= </text:span><text:span text:style-name="T39">s_reg</text:span><text:span text:style-name="T13"> </text:span><text:span text:style-name="T14">+</text:span><text:span text:style-name="T31">1</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when</text:span><text:span text:style-name="T13"> </text:span><text:span text:style-name="T7">data</text:span><text:span text:style-name="T13"> =&gt; </text:span></text:p>
      <text:p text:style-name="P15"><text:span text:style-name="T13"><text:s text:c="16"/></text:span><text:span text:style-name="T39">tx_next</text:span><text:span text:style-name="T13"> &lt;= </text:span><text:span text:style-name="T39">b_reg</text:span><text:span text:style-name="T13">(</text:span><text:span text:style-name="T31">0</text:span><text:span text:style-name="T13">);</text:span></text:p>
      <text:p text:style-name="P15"><text:span text:style-name="T13"><text:s text:c="16"/></text:span><text:span text:style-name="T6">if</text:span><text:span text:style-name="T13"> </text:span><text:span text:style-name="T26">s_tick</text:span><text:span text:style-name="T13"> = </text:span><text:span text:style-name="T34">'1'</text:span><text:span text:style-name="T13"> </text:span><text:span text:style-name="T6">then</text:span></text:p>
      <text:p text:style-name="P15"><text:span text:style-name="T13"><text:s text:c="20"/></text:span><text:span text:style-name="T6">if</text:span><text:span text:style-name="T13"> </text:span><text:span text:style-name="T39">s_reg</text:span><text:span text:style-name="T13"> = </text:span><text:span text:style-name="T31">15</text:span><text:span text:style-name="T13"> </text:span><text:span text:style-name="T6">then</text:span></text:p>
      <text:p text:style-name="P15"><text:span text:style-name="T13"><text:s text:c="24"/></text:span><text:span text:style-name="T39">s_next</text:span><text:span text:style-name="T13"> &lt;= (</text:span><text:span text:style-name="T6">others</text:span><text:span text:style-name="T13"> =&gt; </text:span><text:span text:style-name="T34">'0'</text:span><text:span text:style-name="T13">);</text:span></text:p>
      <text:p text:style-name="P15"><text:span text:style-name="T13"><text:s text:c="24"/></text:span><text:span text:style-name="T39">b_next</text:span><text:span text:style-name="T13"> &lt;= </text:span><text:span text:style-name="T34">'0'</text:span><text:span text:style-name="T13"> </text:span><text:span text:style-name="T14">&amp;</text:span><text:span text:style-name="T13"> </text:span><text:span text:style-name="T39">b_reg</text:span><text:span text:style-name="T13">(</text:span><text:span text:style-name="T31">7</text:span><text:span text:style-name="T13"> </text:span><text:span text:style-name="T6">downto</text:span><text:span text:style-name="T13"> </text:span><text:span text:style-name="T31">1</text:span><text:span text:style-name="T13">);</text:span></text:p>
      <text:p text:style-name="P15"><text:span text:style-name="T13"><text:s text:c="24"/></text:span><text:span text:style-name="T6">if</text:span><text:span text:style-name="T13"> </text:span><text:span text:style-name="T39">n_reg</text:span><text:span text:style-name="T13"> = </text:span><text:span text:style-name="T7">dbit</text:span><text:span text:style-name="T14">-</text:span><text:span text:style-name="T31">1</text:span><text:span text:style-name="T13"> </text:span><text:span text:style-name="T6">then</text:span></text:p>
      <text:p text:style-name="P15"><text:span text:style-name="T13"><text:s text:c="28"/></text:span><text:span text:style-name="T39">state_next</text:span><text:span text:style-name="T13"> &lt;= </text:span><text:span text:style-name="T7">stop</text:span><text:span text:style-name="T13">;</text:span></text:p>
      <text:p text:style-name="P15"><text:span text:style-name="T13"><text:s text:c="24"/></text:span><text:span text:style-name="T6">else</text:span></text:p>
      <text:p text:style-name="P15"><text:span text:style-name="T13"><text:s text:c="28"/></text:span><text:span text:style-name="T39">n_next</text:span><text:span text:style-name="T13"> &lt;= </text:span><text:span text:style-name="T39">n_reg</text:span><text:span text:style-name="T13"> </text:span><text:span text:style-name="T14">+</text:span><text:span text:style-name="T31">1</text:span><text:span text:style-name="T13">;</text:span></text:p>
      <text:p text:style-name="P15"><text:span text:style-name="T13"><text:s text:c="24"/></text:span><text:span text:style-name="T6">end</text:span><text:span text:style-name="T13"> </text:span><text:span text:style-name="T6">if</text:span><text:span text:style-name="T13">;</text:span></text:p>
      <text:p text:style-name="P15"><text:span text:style-name="T13"><text:s text:c="20"/></text:span><text:span text:style-name="T6">else</text:span></text:p>
      <text:p text:style-name="P15"><text:span text:style-name="T13"><text:s text:c="24"/></text:span><text:span text:style-name="T39">s_next</text:span><text:span text:style-name="T13"> &lt;= </text:span><text:span text:style-name="T39">s_reg</text:span><text:span text:style-name="T13"> </text:span><text:span text:style-name="T14">+</text:span><text:span text:style-name="T31">1</text:span><text:span text:style-name="T13">;</text:span></text:p>
      <text:p text:style-name="P15"><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when</text:span><text:span text:style-name="T13"> </text:span><text:span text:style-name="T7">stop</text:span><text:span text:style-name="T13"> =&gt;</text:span></text:p>
      <text:p text:style-name="P15"><text:span text:style-name="T13"><text:s text:c="16"/></text:span><text:span text:style-name="T39">tx_next</text:span><text:span text:style-name="T13"> &lt;= </text:span><text:span text:style-name="T34">'1'</text:span><text:span text:style-name="T13">;</text:span></text:p>
      <text:p text:style-name="P15"><text:span text:style-name="T13"><text:s text:c="16"/></text:span><text:span text:style-name="T6">if</text:span><text:span text:style-name="T13"> </text:span><text:span text:style-name="T26">s_tick</text:span><text:span text:style-name="T13"> = </text:span><text:span text:style-name="T34">'1'</text:span><text:span text:style-name="T13"> </text:span><text:span text:style-name="T6">then</text:span></text:p>
      <text:p text:style-name="P15"><text:span text:style-name="T13"><text:s text:c="20"/></text:span><text:span text:style-name="T6">if</text:span><text:span text:style-name="T13"> </text:span><text:span text:style-name="T39">s_reg</text:span><text:span text:style-name="T13"> = </text:span><text:span text:style-name="T7">sb_tick</text:span><text:span text:style-name="T13"> </text:span><text:span text:style-name="T14">-</text:span><text:span text:style-name="T31">1</text:span><text:span text:style-name="T13"> </text:span><text:span text:style-name="T6">then</text:span></text:p>
      <text:p text:style-name="P15"><text:span text:style-name="T13"><text:s text:c="24"/></text:span><text:span text:style-name="T39">state_next</text:span><text:span text:style-name="T13"> &lt;= </text:span><text:span text:style-name="T7">idle</text:span><text:span text:style-name="T13">;</text:span></text:p>
      <text:p text:style-name="P15"><text:span text:style-name="T13"><text:s text:c="24"/></text:span><text:span text:style-name="T26">tx_done_tick</text:span><text:span text:style-name="T13"> &lt;= </text:span><text:span text:style-name="T34">'1'</text:span><text:span text:style-name="T13">;</text:span></text:p>
      <text:p text:style-name="P15"><text:span text:style-name="T13"><text:s text:c="20"/></text:span><text:span text:style-name="T6">else</text:span></text:p>
      <text:p text:style-name="P15"><text:span text:style-name="T13"><text:s text:c="24"/></text:span><text:span text:style-name="T39">s_next</text:span><text:span text:style-name="T13"> &lt;= </text:span><text:span text:style-name="T39">s_reg</text:span><text:span text:style-name="T13"> </text:span><text:span text:style-name="T14">+</text:span><text:span text:style-name="T31">1</text:span><text:span text:style-name="T13">;</text:span></text:p>
      <text:p text:style-name="P15"><text:soft-page-break/><text:span text:style-name="T13"><text:s text:c="20"/></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8"/></text:span><text:span text:style-name="T6">end</text:span><text:span text:style-name="T13"> </text:span><text:span text:style-name="T6">case</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tx</text:span><text:span text:style-name="T13"> &lt;= </text:span><text:span text:style-name="T39">tx_reg</text:span><text:span text:style-name="T13">;</text:span></text:p>
      <text:p text:style-name="P15"><text:span text:style-name="T6">end</text:span><text:span text:style-name="T13"> </text:span><text:span text:style-name="T22">arch</text:span><text:span text:style-name="T13">;</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uart</text:span><text:span text:style-name="T13"> </text:span><text:span text:style-name="T6">is</text:span><text:span text:style-name="T13"> </text:span></text:p>
      <text:p text:style-name="P15"><text:span text:style-name="T13"><text:s text:c="4"/></text:span><text:span text:style-name="T6">generic</text:span><text:span text:style-name="T13">(</text:span></text:p>
      <text:p text:style-name="P15"><text:span text:style-name="T13"><text:s text:c="8"/></text:span><text:span text:style-name="T36">--default setting:</text:span></text:p>
      <text:p text:style-name="P15"><text:span text:style-name="T13"><text:s text:c="8"/></text:span><text:span text:style-name="T36">--19200 baud, 8 data bits, 1 stop bit, 2^2 FIFO</text:span></text:p>
      <text:p text:style-name="P15"><text:span text:style-name="T13"><text:s text:c="8"/></text:span><text:span text:style-name="T7">dbit</text:span><text:span text:style-name="T13">: </text:span><text:span text:style-name="T28">integer</text:span><text:span text:style-name="T13"> := </text:span><text:span text:style-name="T31">8</text:span><text:span text:style-name="T13">; <text:s text:c="8"/></text:span><text:span text:style-name="T36">--# data bits</text:span></text:p>
      <text:p text:style-name="P15"><text:span text:style-name="T13"><text:s text:c="8"/></text:span><text:span text:style-name="T7">sb_tick</text:span><text:span text:style-name="T13">: </text:span><text:span text:style-name="T28">integer</text:span><text:span text:style-name="T13"> := </text:span><text:span text:style-name="T31">16</text:span><text:span text:style-name="T13">; <text:s text:c="3"/></text:span><text:span text:style-name="T36">--# ticks for stop bits, 16/24/32</text:span></text:p>
      <text:p text:style-name="P15"><text:span text:style-name="T13"><text:s text:c="8"/></text:span><text:span text:style-name="T36">--for 1/1.5/2 stop bits</text:span></text:p>
      <text:p text:style-name="P15"><text:span text:style-name="T13"><text:s text:c="8"/></text:span><text:span text:style-name="T7">dvsr</text:span><text:span text:style-name="T13">: </text:span><text:span text:style-name="T28">integer</text:span><text:span text:style-name="T13"> := </text:span><text:span text:style-name="T31">163</text:span><text:span text:style-name="T13">; <text:s text:c="4"/></text:span><text:span text:style-name="T36">--baud rate divisor</text:span></text:p>
      <text:p text:style-name="P15"><text:span text:style-name="T13"><text:s text:c="8"/></text:span><text:span text:style-name="T36">--dvsr = 50M/(16*baud rate)</text:span></text:p>
      <text:p text:style-name="P15"><text:span text:style-name="T13"><text:s text:c="8"/></text:span><text:span text:style-name="T7">dvsr_bit</text:span><text:span text:style-name="T13">: </text:span><text:span text:style-name="T28">integer</text:span><text:span text:style-name="T13"> := </text:span><text:span text:style-name="T31">8</text:span><text:span text:style-name="T13">; </text:span><text:span text:style-name="T36">--#bits of dvsr</text:span></text:p>
      <text:p text:style-name="P15"><text:span text:style-name="T13"><text:s text:c="8"/></text:span><text:span text:style-name="T7">fifo_w</text:span><text:span text:style-name="T13">: </text:span><text:span text:style-name="T28">integer</text:span><text:span text:style-name="T13"> := </text:span><text:span text:style-name="T31">2</text:span><text:span text:style-name="T13">); <text:s text:c="3"/></text:span><text:span text:style-name="T36">--#addr bits of FIFO</text:span></text:p>
      <text:p text:style-name="P15"><text:span text:style-name="T13"><text:s text:c="4"/></text:span><text:span text:style-name="T36">--#words in FIFO = 2^fifo_w</text:span></text:p>
      <text:p text:style-name="P15"><text:span text:style-name="T13"><text:s text:c="4"/></text:span><text:span text:style-name="T6">port</text:span><text:span text:style-name="T13">(</text:span></text:p>
      <text:p text:style-name="P15"><text:span text:style-name="T13"><text:s text:c="8"/></text:span><text:span text:style-name="T36">-- <text:s text:c="7"/>clk, rst: in std_logic;</text:span></text:p>
      <text:p text:style-name="P15"><text:span text:style-name="T13"><text:s text:c="8"/></text:span><text:span text:style-name="T36">-- <text:s text:c="7"/>rd_uart, wr_uart: in std_logic;</text:span></text:p>
      <text:p text:style-name="P15"><text:span text:style-name="T13"><text:s text:c="8"/></text:span><text:span text:style-name="T36">-- <text:s text:c="7"/>rx: in std_logic;</text:span></text:p>
      <text:p text:style-name="P15"><text:span text:style-name="T13"><text:s text:c="8"/></text:span><text:span text:style-name="T36">-- <text:s text:c="7"/>w_data: in std_logic_vector(7 downto 0);</text:span></text:p>
      <text:p text:style-name="P15"><text:span text:style-name="T13"><text:s text:c="8"/></text:span><text:span text:style-name="T36">-- <text:s text:c="7"/>tx_full, rx_empty: out std_logic;</text:span></text:p>
      <text:p text:style-name="P15"><text:span text:style-name="T13"><text:s text:c="8"/></text:span><text:span text:style-name="T26">r_data</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8"/></text:span><text:span text:style-name="T36">-- <text:s text:c="7"/>tx: out std_logic);</text:span></text:p>
      <text:p text:style-name="P15"><text:span text:style-name="T13"><text:s text:c="8"/></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8"/></text:span><text:span text:style-name="T26">rx_done_tick</text:span><text:span text:style-name="T13">: </text:span><text:span text:style-name="T6">out</text:span><text:span text:style-name="T13"> </text:span><text:span text:style-name="T28">std_logic</text:span><text:span text:style-name="T13">;</text:span></text:p>
      <text:p text:style-name="P15"><text:span text:style-name="T13"><text:s text:c="8"/></text:span><text:span text:style-name="T26">rx</text:span><text:span text:style-name="T13">: </text:span><text:span text:style-name="T6">in</text:span><text:span text:style-name="T13"> </text:span><text:span text:style-name="T28">std_logic</text:span><text:span text:style-name="T13">); <text:s text:c="7"/></text:span></text:p>
      <text:p text:style-name="P15"><text:span text:style-name="T6">end</text:span><text:span text:style-name="T13"> </text:span><text:span text:style-name="T22">uart</text:span><text:span text:style-name="T13">;</text:span></text:p>
      <text:p text:style-name="P16"/>
      <text:p text:style-name="P15"><text:span text:style-name="T6">architecture</text:span><text:span text:style-name="T13"> </text:span><text:span text:style-name="T22">str_arch</text:span><text:span text:style-name="T13"> </text:span><text:span text:style-name="T6">of</text:span><text:span text:style-name="T13"> </text:span><text:span text:style-name="T22">uart</text:span><text:span text:style-name="T13"> </text:span><text:span text:style-name="T6">is</text:span></text:p>
      <text:p text:style-name="P15"><text:span text:style-name="T13"><text:s text:c="4"/></text:span><text:span text:style-name="T6">signal</text:span><text:span text:style-name="T13"> </text:span><text:span text:style-name="T39">tick</text:span><text:span text:style-name="T13">: </text:span><text:span text:style-name="T28">std_logic</text:span><text:span text:style-name="T13">;</text:span></text:p>
      <text:p text:style-name="P15"><text:span text:style-name="T13"><text:s text:c="4"/></text:span><text:span text:style-name="T36">-- <text:s text:c="3"/>signal rx_done_tick: std_logic;</text:span></text:p>
      <text:p text:style-name="P15"><text:span text:style-name="T13"><text:s text:c="4"/></text:span><text:span text:style-name="T36">-- <text:s text:c="3"/>signal tx_fifo_out: std_logic_vector(7 downto 0);</text:span></text:p>
      <text:p text:style-name="P15"><text:span text:style-name="T13"><text:s text:c="4"/></text:span><text:span text:style-name="T6">signal</text:span><text:span text:style-name="T13"> </text:span><text:span text:style-name="T39">rx_data_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36">-- <text:s text:c="3"/>signal tx_empty, tx_fifo_not_empty: std_logic;</text:span></text:p>
      <text:p text:style-name="P15"><text:span text:style-name="T13"><text:s text:c="4"/></text:span><text:span text:style-name="T36">-- <text:s text:c="3"/>signal tx_done_tick: std_logic;</text:span></text:p>
      <text:p text:style-name="P16"/>
      <text:p text:style-name="P23">begin</text:p>
      <text:p text:style-name="P15"><text:span text:style-name="T13"><text:s text:c="4"/></text:span><text:span text:style-name="T38">baud_gen_unit</text:span><text:span text:style-name="T13">: </text:span><text:span text:style-name="T6">entity</text:span><text:span text:style-name="T13"> </text:span><text:span text:style-name="T22">work</text:span><text:span text:style-name="T13">.</text:span><text:span text:style-name="T22">mod_m_counter</text:span><text:span text:style-name="T13">(</text:span><text:span text:style-name="T22">arch</text:span><text:span text:style-name="T13">)</text:span></text:p>
      <text:p text:style-name="P15"><text:span text:style-name="T13"><text:s text:c="8"/></text:span><text:span text:style-name="T6">generic</text:span><text:span text:style-name="T13"> </text:span><text:span text:style-name="T6">map</text:span><text:span text:style-name="T13">(</text:span><text:span text:style-name="T7">m</text:span><text:span text:style-name="T13"> =&gt; </text:span><text:span text:style-name="T7">dvsr</text:span><text:span text:style-name="T13">, </text:span><text:span text:style-name="T7">n</text:span><text:span text:style-name="T13"> =&gt; </text:span><text:span text:style-name="T7">dvsr_bit</text:span><text:span text:style-name="T13">)</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26">clk</text:span><text:span text:style-name="T13">, </text:span><text:span text:style-name="T26">rst</text:span><text:span text:style-name="T13"> =&gt; </text:span><text:span text:style-name="T26">rst</text:span><text:span text:style-name="T13">, </text:span><text:span text:style-name="T26">q</text:span><text:span text:style-name="T13"> =&gt; </text:span><text:span text:style-name="T6">open</text:span><text:span text:style-name="T13">, </text:span><text:span text:style-name="T26">max_tick</text:span><text:span text:style-name="T13"> =&gt; </text:span><text:span text:style-name="T39">tick</text:span><text:span text:style-name="T13">);</text:span></text:p>
      <text:p text:style-name="P16"/>
      <text:p text:style-name="P15"><text:span text:style-name="T13"><text:s text:c="4"/></text:span><text:span text:style-name="T38">uart_rx_unit</text:span><text:span text:style-name="T13">: </text:span><text:span text:style-name="T6">entity</text:span><text:span text:style-name="T13"> </text:span><text:span text:style-name="T22">work</text:span><text:span text:style-name="T13">.</text:span><text:span text:style-name="T22">uart_rx</text:span><text:span text:style-name="T13">(</text:span><text:span text:style-name="T22">arch</text:span><text:span text:style-name="T13">)</text:span></text:p>
      <text:p text:style-name="P15"><text:span text:style-name="T13"><text:s text:c="8"/></text:span><text:span text:style-name="T6">generic</text:span><text:span text:style-name="T13"> </text:span><text:span text:style-name="T6">map</text:span><text:span text:style-name="T13">(</text:span><text:span text:style-name="T7">dbit</text:span><text:span text:style-name="T13"> =&gt; </text:span><text:span text:style-name="T7">dbit</text:span><text:span text:style-name="T13">, </text:span><text:span text:style-name="T7">sb_tick</text:span><text:span text:style-name="T13"> =&gt; </text:span><text:span text:style-name="T7">sb_tick</text:span><text:span text:style-name="T13">)</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26">clk</text:span><text:span text:style-name="T13">, </text:span><text:span text:style-name="T26">rst</text:span><text:span text:style-name="T13"> =&gt; </text:span><text:span text:style-name="T26">rst</text:span><text:span text:style-name="T13">, </text:span><text:span text:style-name="T26">rx</text:span><text:span text:style-name="T13"> =&gt; </text:span><text:span text:style-name="T26">rx</text:span><text:span text:style-name="T13">, </text:span><text:span text:style-name="T26">s_tick</text:span><text:span text:style-name="T13"> =&gt; </text:span><text:span text:style-name="T39">tick</text:span><text:span text:style-name="T13">,</text:span></text:p>
      <text:p text:style-name="P15"><text:span text:style-name="T13"><text:s text:c="17"/></text:span><text:span text:style-name="T26">rx_done_tick</text:span><text:span text:style-name="T13"> =&gt; </text:span><text:span text:style-name="T26">rx_done_tick</text:span><text:span text:style-name="T13">, </text:span><text:span text:style-name="T26">data_out</text:span><text:span text:style-name="T13"> =&gt; </text:span><text:span text:style-name="T26">r_data</text:span><text:span text:style-name="T13">);</text:span></text:p>
      <text:p text:style-name="P16"/>
      <text:p text:style-name="P15"><text:span text:style-name="T13"><text:s text:c="4"/></text:span><text:span text:style-name="T36">-- <text:s text:c="3"/>fifo_rx_unit: entity work.fifo(arch)</text:span></text:p>
      <text:p text:style-name="P15"><text:span text:style-name="T13"><text:s text:c="4"/></text:span><text:span text:style-name="T36">-- <text:s text:c="7"/>generic map(b =&gt; dbit, w =&gt; fifo_w)</text:span></text:p>
      <text:p text:style-name="P15"><text:soft-page-break/><text:span text:style-name="T13"><text:s text:c="4"/></text:span><text:span text:style-name="T36">-- <text:s text:c="7"/>port map(clk =&gt; clk, rst =&gt; rst, rd =&gt; rd_uart, wr =&gt; rx_done_tick,</text:span></text:p>
      <text:p text:style-name="P15"><text:span text:style-name="T13"><text:s text:c="4"/></text:span><text:span text:style-name="T36">-- <text:s text:c="19"/>w_data =&gt; rx_data_out, empty =&gt; rx_empty, full =&gt; open, r_data =&gt; r_data);</text:span></text:p>
      <text:p text:style-name="P16"/>
      <text:p text:style-name="P15"><text:span text:style-name="T13"><text:s text:c="4"/></text:span><text:span text:style-name="T36">-- <text:s text:c="3"/>fifo_tx_unit: entity work.fifo(arch)</text:span></text:p>
      <text:p text:style-name="P15"><text:span text:style-name="T13"><text:s text:c="4"/></text:span><text:span text:style-name="T36">-- <text:s text:c="7"/>generic map(b =&gt; dbit, w =&gt; fifo_w)</text:span></text:p>
      <text:p text:style-name="P15"><text:span text:style-name="T13"><text:s text:c="4"/></text:span><text:span text:style-name="T36">-- <text:s text:c="7"/>port map(clk =&gt; clk, rst =&gt; rst, rd =&gt; tx_done_tick, wr =&gt; wr_uart, w_data =&gt; w_data,</text:span></text:p>
      <text:p text:style-name="P15"><text:span text:style-name="T13"><text:s text:c="4"/></text:span><text:span text:style-name="T36">-- <text:s text:c="19"/>empty =&gt; tx_empty, full =&gt; tx_full, r_data =&gt; tx_fifo_out);</text:span></text:p>
      <text:p text:style-name="P15"><text:span text:style-name="T13"><text:s text:c="4"/></text:span><text:span text:style-name="T36">-- <text:s text:c="3"/></text:span></text:p>
      <text:p text:style-name="P15"><text:span text:style-name="T13"><text:s text:c="4"/></text:span><text:span text:style-name="T36">-- <text:s text:c="3"/>uart_tx_unit: entity work.uart_tx(arch)</text:span></text:p>
      <text:p text:style-name="P15"><text:span text:style-name="T13"><text:s text:c="4"/></text:span><text:span text:style-name="T36">-- <text:s text:c="7"/>generic map(dbit =&gt; dbit, sb_tick =&gt; sb_tick)</text:span></text:p>
      <text:p text:style-name="P15"><text:span text:style-name="T13"><text:s text:c="4"/></text:span><text:span text:style-name="T36">-- <text:s text:c="7"/>port map(clk =&gt; clk, rst =&gt; rst, tx_start =&gt; tx_fifo_not_empty, s_tick =&gt; tick,</text:span></text:p>
      <text:p text:style-name="P15"><text:span text:style-name="T13"><text:s text:c="4"/></text:span><text:span text:style-name="T36">-- <text:s text:c="19"/>din =&gt; tx_fifo_out, tx_done_tick =&gt; tx_done_tick, tx =&gt; tx);</text:span></text:p>
      <text:p text:style-name="P15"><text:span text:style-name="T13"><text:s text:c="4"/></text:span><text:span text:style-name="T36">-- <text:s text:c="3"/></text:span></text:p>
      <text:p text:style-name="P15"><text:span text:style-name="T13"><text:s text:c="4"/></text:span><text:span text:style-name="T36">-- <text:s text:c="3"/>tx_fifo_not_empty &lt;= not tx_empty;</text:span></text:p>
      <text:p text:style-name="P15"><text:span text:style-name="T6">end</text:span><text:span text:style-name="T13"> </text:span><text:span text:style-name="T22">str_arch</text:span><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uar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x</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rst</text:span><text:span text:style-name="T13"> : </text:span><text:span text:style-name="T6">in</text:span><text:span text:style-name="T13"> </text:span><text:span text:style-name="T28">boolean</text:span><text:span text:style-name="T13">; <text:s text:c="58"/></text:span></text:p>
      <text:p text:style-name="P15"><text:span text:style-name="T13"><text:s text:c="4"/></text:span><text:span text:style-name="T26">tx</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uart</text:span><text:span text:style-name="T13">;</text:span></text:p>
      <text:p text:style-name="P16"/>
      <text:p text:style-name="P15"><text:span text:style-name="T6">architecture</text:span><text:span text:style-name="T13"> </text:span><text:span text:style-name="T22">str_arch</text:span><text:span text:style-name="T13"> </text:span><text:span text:style-name="T6">of</text:span><text:span text:style-name="T13"> </text:span><text:span text:style-name="T22">uart</text:span><text:span text:style-name="T13"> </text:span><text:span text:style-name="T6">is</text:span></text:p>
      <text:p text:style-name="P15"><text:span text:style-name="T13"><text:s text:c="4"/></text:span><text:span text:style-name="T6">signal</text:span><text:span text:style-name="T13"> </text:span><text:span text:style-name="T39">ld</text:span><text:span text:style-name="T13">, </text:span><text:span text:style-name="T39">rxready</text:span><text:span text:style-name="T13">, </text:span><text:span text:style-name="T39">load</text:span><text:span text:style-name="T13">, </text:span><text:span text:style-name="T39">ready</text:span><text:span text:style-name="T13">: </text:span><text:span text:style-name="T28">std_logic</text:span><text:span text:style-name="T13">; <text:s text:c="20"/></text:span></text:p>
      <text:p text:style-name="P15"><text:span text:style-name="T13"><text:s text:c="4"/></text:span><text:span text:style-name="T6">signal</text:span><text:span text:style-name="T13"> </text:span><text:span text:style-name="T39">din</text:span><text:span text:style-name="T13">, </text:span><text:span text:style-name="T39">dout</text:span><text:span text:style-name="T13">, </text:span><text:span text:style-name="T39">data_in</text:span><text:span text:style-name="T13">, </text:span><text:span text:style-name="T39">data_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text:s text:c="16"/></text:span></text:p>
      <text:p text:style-name="P16"/>
      <text:p text:style-name="P23">begin</text:p>
      <text:p text:style-name="P15"><text:span text:style-name="T13"><text:s text:c="4"/></text:span><text:span text:style-name="T38">tx_rx_unit</text:span><text:span text:style-name="T13">: </text:span><text:span text:style-name="T6">entity</text:span><text:span text:style-name="T13"> </text:span><text:span text:style-name="T22">work</text:span><text:span text:style-name="T13">.</text:span><text:span text:style-name="T22">uartmodule</text:span><text:span text:style-name="T13">(</text:span><text:span text:style-name="T22">arch</text:span><text:span text:style-name="T13">)</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26">clk</text:span><text:span text:style-name="T13">, </text:span><text:span text:style-name="T26">rst</text:span><text:span text:style-name="T13"> =&gt; </text:span><text:span text:style-name="T26">rst</text:span><text:span text:style-name="T13">, </text:span><text:span text:style-name="T26">tx</text:span><text:span text:style-name="T13"> =&gt; tx, </text:span><text:span text:style-name="T26">rx</text:span><text:span text:style-name="T13"> =&gt; </text:span><text:span text:style-name="T26">rx</text:span><text:span text:style-name="T13">, </text:span><text:span text:style-name="T26">ld</text:span><text:span text:style-name="T13"> =&gt; </text:span><text:span text:style-name="T39">ld</text:span><text:span text:style-name="T13">, </text:span><text:span text:style-name="T26">din</text:span><text:span text:style-name="T13"> =&gt; </text:span><text:span text:style-name="T39">din</text:span><text:span text:style-name="T13">, </text:span><text:span text:style-name="T26">dout</text:span><text:span text:style-name="T13"> =&gt; </text:span><text:span text:style-name="T39">dout</text:span><text:span text:style-name="T13">, </text:span><text:span text:style-name="T26">rxready</text:span><text:span text:style-name="T13"> =&gt; </text:span><text:span text:style-name="T39">rxready</text:span><text:span text:style-name="T13">);</text:span></text:p>
      <text:p text:style-name="P16"/>
      <text:p text:style-name="P15"><text:span text:style-name="T13"><text:s text:c="4"/></text:span><text:span text:style-name="T38">acc_unit</text:span><text:span text:style-name="T13">: </text:span><text:span text:style-name="T6">entity</text:span><text:span text:style-name="T13"> </text:span><text:span text:style-name="T22">work</text:span><text:span text:style-name="T13">.</text:span><text:span text:style-name="T22">accumulator</text:span><text:span text:style-name="T13">(</text:span><text:span text:style-name="T22">arch</text:span><text:span text:style-name="T13">)</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26">clk</text:span><text:span text:style-name="T13">, </text:span><text:span text:style-name="T26">rst</text:span><text:span text:style-name="T13"> =&gt; </text:span><text:span text:style-name="T26">rst</text:span><text:span text:style-name="T13">, </text:span><text:span text:style-name="T26">data_out</text:span><text:span text:style-name="T13"> =&gt; </text:span><text:span text:style-name="T39">din</text:span><text:span text:style-name="T13">, </text:span><text:span text:style-name="T26">data_in</text:span><text:span text:style-name="T13"> =&gt; </text:span><text:span text:style-name="T39">dout</text:span><text:span text:style-name="T13">,</text:span></text:p>
      <text:p text:style-name="P15"><text:span text:style-name="T13"><text:s text:c="17"/></text:span><text:span text:style-name="T26">load</text:span><text:span text:style-name="T13"> =&gt; </text:span><text:span text:style-name="T39">ld</text:span><text:span text:style-name="T13">, </text:span><text:span text:style-name="T26">ready</text:span><text:span text:style-name="T13"> =&gt; </text:span><text:span text:style-name="T39">rxready</text:span><text:span text:style-name="T13">);</text:span></text:p>
      <text:p text:style-name="P16"/>
      <text:p text:style-name="P15"><text:span text:style-name="T6">end</text:span><text:span text:style-name="T13"> </text:span><text:span text:style-name="T22">str_arch</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uart_test</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btn</text:span><text:span text:style-name="T13">: </text:span><text:span text:style-name="T28">std_logic_vector</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26">rx</text:span><text:span text:style-name="T13">: </text:span><text:span text:style-name="T6">in</text:span><text:span text:style-name="T13"> </text:span><text:span text:style-name="T28">std_logic</text:span><text:span text:style-name="T13">;</text:span></text:p>
      <text:p text:style-name="P15"><text:span text:style-name="T13"><text:s text:c="4"/></text:span><text:span text:style-name="T26">tx</text:span><text:span text:style-name="T13">: </text:span><text:span text:style-name="T6">out</text:span><text:span text:style-name="T13"> </text:span><text:span text:style-name="T28">std_logic</text:span><text:span text:style-name="T13">;</text:span></text:p>
      <text:p text:style-name="P15"><text:span text:style-name="T13"><text:s text:c="4"/></text:span><text:span text:style-name="T26">led</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seg</text:span><text:span text:style-name="T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an</text:span><text:span text:style-name="T13">: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uart_test</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uart_test</text:span><text:span text:style-name="T13"> </text:span><text:span text:style-name="T6">is</text:span></text:p>
      <text:p text:style-name="P15"><text:span text:style-name="T13"><text:s text:c="4"/></text:span><text:span text:style-name="T6">signal</text:span><text:span text:style-name="T13"> </text:span><text:span text:style-name="T39">tx_full</text:span><text:span text:style-name="T13">, </text:span><text:span text:style-name="T39">rx_empty</text:span><text:span text:style-name="T13">: </text:span><text:span text:style-name="T28">std_logic</text:span><text:span text:style-name="T13">;</text:span></text:p>
      <text:p text:style-name="P15"><text:span text:style-name="T13"><text:s text:c="4"/></text:span><text:span text:style-name="T6">signal</text:span><text:span text:style-name="T13"> </text:span><text:span text:style-name="T39">rec_data</text:span><text:span text:style-name="T13">, </text:span><text:span text:style-name="T39">rec_data1</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btn_tick</text:span><text:span text:style-name="T13">: </text:span><text:span text:style-name="T28">std_logic</text:span><text:span text:style-name="T13">;</text:span></text:p>
      <text:p text:style-name="P23">begin</text:p>
      <text:p text:style-name="P15"><text:span text:style-name="T13"><text:s text:c="4"/></text:span><text:span text:style-name="T36">--instantiate uart</text:span></text:p>
      <text:p text:style-name="P15"><text:span text:style-name="T13"><text:s text:c="4"/></text:span><text:span text:style-name="T38">uart_unit</text:span><text:span text:style-name="T13">: </text:span><text:span text:style-name="T6">entity</text:span><text:span text:style-name="T13"> </text:span><text:span text:style-name="T22">work</text:span><text:span text:style-name="T13">.</text:span><text:span text:style-name="T22">uart</text:span><text:span text:style-name="T13">(</text:span><text:span text:style-name="T22">str_arch</text:span><text:span text:style-name="T13">)</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26">clk</text:span><text:span text:style-name="T13">, </text:span><text:span text:style-name="T26">rst</text:span><text:span text:style-name="T13"> =&gt; </text:span><text:span text:style-name="T26">rst</text:span><text:span text:style-name="T13">, rd_uart =&gt; </text:span><text:span text:style-name="T39">btn_tick</text:span><text:span text:style-name="T13">,</text:span></text:p>
      <text:p text:style-name="P15"><text:soft-page-break/><text:span text:style-name="T13"><text:s text:c="17"/>wr_uart =&gt; </text:span><text:span text:style-name="T39">btn_tick</text:span><text:span text:style-name="T13">, </text:span><text:span text:style-name="T26">rx</text:span><text:span text:style-name="T13"> =&gt; </text:span><text:span text:style-name="T26">rx</text:span><text:span text:style-name="T13">, w_data =&gt; </text:span><text:span text:style-name="T39">rec_data1</text:span><text:span text:style-name="T13">,</text:span></text:p>
      <text:p text:style-name="P15"><text:span text:style-name="T13"><text:s text:c="17"/></text:span><text:span text:style-name="T39">tx_full</text:span><text:span text:style-name="T13"> =&gt; </text:span><text:span text:style-name="T39">tx_full</text:span><text:span text:style-name="T13">, </text:span><text:span text:style-name="T39">rx_empty</text:span><text:span text:style-name="T13"> =&gt; </text:span><text:span text:style-name="T39">rx_empty</text:span><text:span text:style-name="T13">,</text:span></text:p>
      <text:p text:style-name="P15"><text:span text:style-name="T13"><text:s text:c="17"/></text:span><text:span text:style-name="T26">r_data</text:span><text:span text:style-name="T13"> =&gt; </text:span><text:span text:style-name="T39">rec_data</text:span><text:span text:style-name="T13">, </text:span><text:span text:style-name="T26">tx</text:span><text:span text:style-name="T13"> =&gt; </text:span><text:span text:style-name="T26">tx</text:span><text:span text:style-name="T13">);</text:span></text:p>
      <text:p text:style-name="P16"/>
      <text:p text:style-name="P15"><text:span text:style-name="T13"><text:s text:c="4"/></text:span><text:span text:style-name="T36">--increment data loop back</text:span></text:p>
      <text:p text:style-name="P15"><text:span text:style-name="T13"><text:s text:c="4"/></text:span><text:span text:style-name="T39">rec_data1</text:span><text:span text:style-name="T13"> &lt;= </text:span><text:span text:style-name="T28">std_logic_vector</text:span><text:span text:style-name="T13">(</text:span><text:span text:style-name="T28">unsigned</text:span><text:span text:style-name="T13">(</text:span><text:span text:style-name="T39">rec_data</text:span><text:span text:style-name="T13">)</text:span><text:span text:style-name="T14">+</text:span><text:span text:style-name="T31">1</text:span><text:span text:style-name="T13">);</text:span></text:p>
      <text:p text:style-name="P15"><text:span text:style-name="T13"><text:s text:c="4"/></text:span><text:span text:style-name="T36">--led display</text:span></text:p>
      <text:p text:style-name="P15"><text:span text:style-name="T13"><text:s text:c="4"/></text:span><text:span text:style-name="T26">led</text:span><text:span text:style-name="T13"> &lt;= </text:span><text:span text:style-name="T39">rec_data</text:span><text:span text:style-name="T13">;</text:span></text:p>
      <text:p text:style-name="P15"><text:span text:style-name="T13"><text:s text:c="4"/></text:span><text:span text:style-name="T26">an</text:span><text:span text:style-name="T13"> &lt;= </text:span><text:span text:style-name="T34">"1110"</text:span><text:span text:style-name="T13">;</text:span></text:p>
      <text:p text:style-name="P15"><text:span text:style-name="T13"><text:s text:c="4"/></text:span><text:span text:style-name="T26">sseg</text:span><text:span text:style-name="T13"> &lt;= </text:span><text:span text:style-name="T34">'1'</text:span><text:span text:style-name="T13"> </text:span><text:span text:style-name="T14">&amp;</text:span><text:span text:style-name="T13"> (</text:span><text:span text:style-name="T6">not</text:span><text:span text:style-name="T13"> </text:span><text:span text:style-name="T39">tx_full</text:span><text:span text:style-name="T13">) </text:span><text:span text:style-name="T14">&amp;</text:span><text:span text:style-name="T13"> </text:span><text:span text:style-name="T34">"11"</text:span><text:span text:style-name="T13"> </text:span><text:span text:style-name="T14">&amp;</text:span><text:span text:style-name="T13"> (</text:span><text:span text:style-name="T6">not</text:span><text:span text:style-name="T13"> </text:span><text:span text:style-name="T39">rx_empty</text:span><text:span text:style-name="T13">) </text:span><text:span text:style-name="T14">&amp;</text:span><text:span text:style-name="T13"> </text:span><text:span text:style-name="T34">"111"</text:span><text:span text:style-name="T13">;</text:span></text:p>
      <text:p text:style-name="P15"><text:span text:style-name="T6">end</text:span><text:span text:style-name="T13"> </text:span><text:span text:style-name="T22">arch</text:span><text:span text:style-name="T13">;</text:span></text:p>
      <text:p text:style-name="P16"/>
      <text:p text:style-name="P24">--https://www.youtube.com/watch?v=Fimf3jypV_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numeric_std</text:span><text:span text:style-name="T13">.</text:span><text:span text:style-name="T6">all</text:span><text:span text:style-name="T13">;</text:span></text:p>
      <text:p text:style-name="P16"/>
      <text:p text:style-name="P15"><text:span text:style-name="T6">entity</text:span><text:span text:style-name="T13"> </text:span><text:span text:style-name="T22">uartmodule</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ld</text:span><text:span text:style-name="T13">, </text:span><text:span text:style-name="T26">rx</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rst</text:span><text:span text:style-name="T13"> : </text:span><text:span text:style-name="T6">in</text:span><text:span text:style-name="T13"> </text:span><text:span text:style-name="T28">boolean</text:span><text:span text:style-name="T13">; <text:s text:c="9"/></text:span></text:p>
      <text:p text:style-name="P15"><text:span text:style-name="T13"><text:s text:c="4"/></text:span><text:span text:style-name="T26">d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dout</text:span><text:span text:style-name="T13">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tx</text:span><text:span text:style-name="T13">, </text:span><text:span text:style-name="T26">txbusy</text:span><text:span text:style-name="T13">, </text:span><text:span text:style-name="T26">rxready</text:span><text:span text:style-name="T13"> <text:s text:c="3"/>: </text:span><text:span text:style-name="T6">out</text:span><text:span text:style-name="T13"> </text:span><text:span text:style-name="T28">std_logic</text:span><text:span text:style-name="T13">);</text:span></text:p>
      <text:p text:style-name="P15"><text:span text:style-name="T6">end</text:span><text:span text:style-name="T13"> </text:span><text:span text:style-name="T22">uartmodule</text:span><text:span text:style-name="T13">;</text:span></text:p>
      <text:p text:style-name="P16"/>
      <text:p text:style-name="P15"><text:span text:style-name="T6">architecture</text:span><text:span text:style-name="T13"> </text:span><text:span text:style-name="T22">arch</text:span><text:span text:style-name="T13"> </text:span><text:span text:style-name="T6">of</text:span><text:span text:style-name="T13"> </text:span><text:span text:style-name="T22">uartmodule</text:span><text:span text:style-name="T13"> </text:span><text:span text:style-name="T6">is</text:span></text:p>
      <text:p text:style-name="P15"><text:span text:style-name="T13"><text:s text:c="4"/></text:span><text:span text:style-name="T6">constant</text:span><text:span text:style-name="T13"> </text:span><text:span text:style-name="T7">width_1</text:span><text:span text:style-name="T13"> : </text:span><text:span text:style-name="T28">natural</text:span><text:span text:style-name="T13"> := </text:span><text:span text:style-name="T31">8</text:span><text:span text:style-name="T13">; <text:s text:c="3"/></text:span></text:p>
      <text:p text:style-name="P15"><text:span text:style-name="T13"><text:s text:c="4"/></text:span><text:span text:style-name="T6">constant</text:span><text:span text:style-name="T13"> </text:span><text:span text:style-name="T7">width_2</text:span><text:span text:style-name="T13"> : </text:span><text:span text:style-name="T28">natural</text:span><text:span text:style-name="T13"> := </text:span><text:span text:style-name="T31">7</text:span><text:span text:style-name="T13">;</text:span></text:p>
      <text:p text:style-name="P16"/>
      <text:p text:style-name="P15"><text:span text:style-name="T13"><text:s text:c="4"/></text:span><text:span text:style-name="T6">type</text:span><text:span text:style-name="T13"> </text:span><text:span text:style-name="T28">tx_state</text:span><text:span text:style-name="T13"> </text:span><text:span text:style-name="T6">is</text:span><text:span text:style-name="T13"> (</text:span><text:span text:style-name="T7">idle_tx</text:span><text:span text:style-name="T13">, </text:span><text:span text:style-name="T7">shift_tx</text:span><text:span text:style-name="T13">);</text:span></text:p>
      <text:p text:style-name="P15"><text:span text:style-name="T13"><text:s text:c="4"/></text:span><text:span text:style-name="T6">signal</text:span><text:span text:style-name="T13"> </text:span><text:span text:style-name="T39">txfsm</text:span><text:span text:style-name="T13"> : </text:span><text:span text:style-name="T28">tx_state</text:span><text:span text:style-name="T13">;</text:span></text:p>
      <text:p text:style-name="P16"/>
      <text:p text:style-name="P15"><text:span text:style-name="T13"><text:s text:c="4"/></text:span><text:span text:style-name="T6">type</text:span><text:span text:style-name="T13"> </text:span><text:span text:style-name="T28">rx_state</text:span><text:span text:style-name="T13"> </text:span><text:span text:style-name="T6">is</text:span><text:span text:style-name="T13"> (</text:span><text:span text:style-name="T7">idle_rx</text:span><text:span text:style-name="T13">, </text:span><text:span text:style-name="T7">shift_rx</text:span><text:span text:style-name="T13">);</text:span></text:p>
      <text:p text:style-name="P15"><text:span text:style-name="T13"><text:s text:c="4"/></text:span><text:span text:style-name="T6">signal</text:span><text:span text:style-name="T13"> </text:span><text:span text:style-name="T39">rxfsm</text:span><text:span text:style-name="T13"> : </text:span><text:span text:style-name="T28">rx_state</text:span><text:span text:style-name="T13">;</text:span></text:p>
      <text:p text:style-name="P16"/>
      <text:p text:style-name="P15"><text:span text:style-name="T13"><text:s text:c="4"/></text:span><text:span text:style-name="T6">signal</text:span><text:span text:style-name="T13"> </text:span><text:span text:style-name="T39">tx_reg</text:span><text:span text:style-name="T13"> : </text:span><text:span text:style-name="T28">std_logic_vector</text:span><text:span text:style-name="T13">(</text:span><text:span text:style-name="T31">9</text:span><text:span text:style-name="T13"> </text:span><text:span text:style-name="T6">downto</text:span><text:span text:style-name="T13"> </text:span><text:span text:style-name="T31">0</text:span><text:span text:style-name="T13">); </text:span></text:p>
      <text:p text:style-name="P15"><text:span text:style-name="T13"><text:s text:c="4"/></text:span><text:span text:style-name="T6">signal</text:span><text:span text:style-name="T13"> </text:span><text:span text:style-name="T39">txbitcnt</text:span><text:span text:style-name="T13"> : </text:span><text:span text:style-name="T28">unsigned</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txclkdiv</text:span><text:span text:style-name="T13"> : </text:span><text:span text:style-name="T28">unsigned</text:span><text:span text:style-name="T13">(</text:span><text:span text:style-name="T7">width_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txclkdiv_sum</text:span><text:span text:style-name="T13"> : </text:span><text:span text:style-name="T28">unsigned</text:span><text:span text:style-name="T13">(</text:span><text:span text:style-name="T7">width_1</text:span><text:span text:style-name="T13"> </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ticktx</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txclkena</text:span><text:span text:style-name="T13"> : </text:span><text:span text:style-name="T28">std_logic</text:span><text:span text:style-name="T13">;</text:span></text:p>
      <text:p text:style-name="P16"/>
      <text:p text:style-name="P15"><text:span text:style-name="T13"><text:s text:c="4"/></text:span><text:span text:style-name="T6">signal</text:span><text:span text:style-name="T13"> </text:span><text:span text:style-name="T39">rx_reg</text:span><text:span text:style-name="T13"> : </text:span><text:span text:style-name="T28">std_logic_vector</text:span><text:span text:style-name="T13">(</text:span><text:span text:style-name="T31">9</text:span><text:span text:style-name="T13"> </text:span><text:span text:style-name="T6">downto</text:span><text:span text:style-name="T13"> </text:span><text:span text:style-name="T31">0</text:span><text:span text:style-name="T13">); </text:span></text:p>
      <text:p text:style-name="P15"><text:span text:style-name="T13"><text:s text:c="4"/></text:span><text:span text:style-name="T6">signal</text:span><text:span text:style-name="T13"> </text:span><text:span text:style-name="T39">rxbitcnt</text:span><text:span text:style-name="T13"> : </text:span><text:span text:style-name="T28">unsigned</text:span><text:span text:style-name="T13">(</text:span><text:span text:style-name="T31">4</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rxclkdiv</text:span><text:span text:style-name="T13"> : </text:span><text:span text:style-name="T28">unsigned</text:span><text:span text:style-name="T13">(</text:span><text:span text:style-name="T7">width_2</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rxclkdiv_sum</text:span><text:span text:style-name="T13"> : </text:span><text:span text:style-name="T28">unsigned</text:span><text:span text:style-name="T13">(</text:span><text:span text:style-name="T7">width_2</text:span><text:span text:style-name="T13"> </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tickrx</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rxclkena</text:span><text:span text:style-name="T13"> : </text:span><text:span text:style-name="T28">std_logic</text:span><text:span text:style-name="T13">; <text:s text:c="3"/></text:span></text:p>
      <text:p text:style-name="P16"/>
      <text:p text:style-name="P15"><text:span text:style-name="T6">begin</text:span><text:span text:style-name="T13"> </text:span></text:p>
      <text:p text:style-name="P16"/>
      <text:p text:style-name="P15"><text:span text:style-name="T13"><text:s text:c="4"/></text:span><text:span text:style-name="T36">--clk divider tx</text:span></text:p>
      <text:p text:style-name="P15"><text:span text:style-name="T13"><text:s text:c="4"/></text:span><text:span text:style-name="T39">txclkdiv_sum</text:span><text:span text:style-name="T13"> &lt;= </text:span><text:span text:style-name="T14">resize</text:span><text:span text:style-name="T13">(</text:span><text:span text:style-name="T39">txclkdiv</text:span><text:span text:style-name="T13">,</text:span><text:span text:style-name="T7">width_1</text:span><text:span text:style-name="T13"> </text:span><text:span text:style-name="T14">+</text:span><text:span text:style-name="T31">2</text:span><text:span text:style-name="T13">) </text:span><text:span text:style-name="T14">-</text:span><text:span text:style-name="T31">1</text:span><text:span text:style-name="T13">; <text:s text:c="3"/></text:span></text:p>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txclkdiv</text:span><text:span text:style-name="T13"> &lt;= </text:span><text:span text:style-name="T34">"11011001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ticktx</text:span><text:span text:style-name="T13"> = </text:span><text:span text:style-name="T34">'1'</text:span><text:span text:style-name="T13"> </text:span><text:span text:style-name="T6">then</text:span></text:p>
      <text:p text:style-name="P15"><text:span text:style-name="T13"><text:s text:c="16"/></text:span><text:span text:style-name="T39">txclkdiv</text:span><text:span text:style-name="T13"> &lt;= </text:span><text:span text:style-name="T34">"110110010"</text:span><text:span text:style-name="T13">;</text:span></text:p>
      <text:p text:style-name="P15"><text:span text:style-name="T13"><text:s text:c="12"/></text:span><text:span text:style-name="T6">elsif</text:span><text:span text:style-name="T13"> </text:span><text:span text:style-name="T39">txclkena</text:span><text:span text:style-name="T13"> = </text:span><text:span text:style-name="T34">'1'</text:span><text:span text:style-name="T13"> </text:span><text:span text:style-name="T6">then</text:span></text:p>
      <text:p text:style-name="P15"><text:soft-page-break/><text:span text:style-name="T13"><text:s text:c="16"/></text:span><text:span text:style-name="T39">txclkdiv</text:span><text:span text:style-name="T13"> &lt;= </text:span><text:span text:style-name="T39">txclkdiv_sum</text:span><text:span text:style-name="T13">(</text:span><text:span text:style-name="T7">width_1</text:span><text:span text:style-name="T13"> </text:span><text:span text:style-name="T6">downto</text:span><text:span text:style-name="T13"> </text:span><text:span text:style-name="T31">0</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 <text:s text:c="3"/></text:span></text:p>
      <text:p text:style-name="P15"><text:span text:style-name="T13"><text:s text:c="4"/></text:span><text:span text:style-name="T39">ticktx</text:span><text:span text:style-name="T13"> &lt;= </text:span><text:span text:style-name="T39">txclkdiv_sum</text:span><text:span text:style-name="T13">(</text:span><text:span text:style-name="T7">width_1</text:span><text:span text:style-name="T13"> </text:span><text:span text:style-name="T14">+</text:span><text:span text:style-name="T31">1</text:span><text:span text:style-name="T13">);</text:span></text:p>
      <text:p text:style-name="P16"/>
      <text:p text:style-name="P15"><text:span text:style-name="T13"><text:s text:c="4"/></text:span><text:span text:style-name="T36">--clk divider rx</text:span></text:p>
      <text:p text:style-name="P15"><text:span text:style-name="T13"><text:s text:c="4"/></text:span><text:span text:style-name="T39">rxclkdiv_sum</text:span><text:span text:style-name="T13"> &lt;= </text:span><text:span text:style-name="T14">resize</text:span><text:span text:style-name="T13">(</text:span><text:span text:style-name="T39">rxclkdiv</text:span><text:span text:style-name="T13">,</text:span><text:span text:style-name="T7">width_2</text:span><text:span text:style-name="T13"> </text:span><text:span text:style-name="T14">+</text:span><text:span text:style-name="T31">2</text:span><text:span text:style-name="T13">) </text:span><text:span text:style-name="T14">-</text:span><text:span text:style-name="T31">1</text:span><text:span text:style-name="T13">; <text:s text:c="3"/></text:span></text:p>
      <text:p text:style-name="P15"><text:span text:style-name="T13"><text:s text:c="4"/></text:span><text:span text:style-name="T6">process</text:span><text:span text:style-name="T13">(</text:span><text:span text:style-name="T26">clk</text:span><text:span text:style-name="T13">,</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rxclkdiv</text:span><text:span text:style-name="T13"> &lt;= </text:span><text:span text:style-name="T34">"01101001"</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tickrx</text:span><text:span text:style-name="T13"> = </text:span><text:span text:style-name="T34">'1'</text:span><text:span text:style-name="T13"> </text:span><text:span text:style-name="T6">then</text:span></text:p>
      <text:p text:style-name="P15"><text:span text:style-name="T13"><text:s text:c="16"/></text:span><text:span text:style-name="T39">rxclkdiv</text:span><text:span text:style-name="T13"> &lt;= </text:span><text:span text:style-name="T34">"01101001"</text:span><text:span text:style-name="T13">;</text:span></text:p>
      <text:p text:style-name="P15"><text:span text:style-name="T13"><text:s text:c="12"/></text:span><text:span text:style-name="T6">elsif</text:span><text:span text:style-name="T13"> </text:span><text:span text:style-name="T39">rxclkena</text:span><text:span text:style-name="T13"> = </text:span><text:span text:style-name="T34">'1'</text:span><text:span text:style-name="T13"> </text:span><text:span text:style-name="T6">then</text:span></text:p>
      <text:p text:style-name="P15"><text:span text:style-name="T13"><text:s text:c="16"/></text:span><text:span text:style-name="T39">rxclkdiv</text:span><text:span text:style-name="T13"> &lt;= </text:span><text:span text:style-name="T39">rxclkdiv_sum</text:span><text:span text:style-name="T13">(</text:span><text:span text:style-name="T7">width_2</text:span><text:span text:style-name="T13"> </text:span><text:span text:style-name="T6">downto</text:span><text:span text:style-name="T13"> </text:span><text:span text:style-name="T31">0</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 <text:s text:c="3"/></text:span></text:p>
      <text:p text:style-name="P15"><text:span text:style-name="T13"><text:s text:c="4"/></text:span><text:span text:style-name="T39">tickrx</text:span><text:span text:style-name="T13"> &lt;= </text:span><text:span text:style-name="T39">rxclkdiv_sum</text:span><text:span text:style-name="T13">(</text:span><text:span text:style-name="T7">width_2</text:span><text:span text:style-name="T13"> </text:span><text:span text:style-name="T14">+</text:span><text:span text:style-name="T31">1</text:span><text:span text:style-name="T13">);</text:span></text:p>
      <text:p text:style-name="P16"/>
      <text:p text:style-name="P15"><text:span text:style-name="T13"><text:s text:c="4"/></text:span><text:span text:style-name="T36">--transmit state machine <text:s text:c="3"/></text:span></text:p>
      <text:p text:style-name="P15"><text:span text:style-name="T13"><text:s text:c="4"/></text:span><text:span text:style-name="T38">tx_fsm</text:span><text:span text:style-name="T13">: </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tx_reg</text:span><text:span text:style-name="T13"> &lt;= (</text:span><text:span text:style-name="T6">others</text:span><text:span text:style-name="T13"> =&gt; </text:span><text:span text:style-name="T34">'1'</text:span><text:span text:style-name="T13">);</text:span></text:p>
      <text:p text:style-name="P15"><text:span text:style-name="T13"><text:s text:c="12"/></text:span><text:span text:style-name="T39">txbitcnt</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txfsm</text:span><text:span text:style-name="T13"> &lt;= </text:span><text:span text:style-name="T7">idle_tx</text:span><text:span text:style-name="T13">;</text:span></text:p>
      <text:p text:style-name="P15"><text:span text:style-name="T13"><text:s text:c="12"/></text:span><text:span text:style-name="T26">txbusy</text:span><text:span text:style-name="T13"> &lt;= </text:span><text:span text:style-name="T34">'0'</text:span><text:span text:style-name="T13">; <text:s text:c="7"/></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case</text:span><text:span text:style-name="T13"> </text:span><text:span text:style-name="T39">txfsm</text:span><text:span text:style-name="T13"> </text:span><text:span text:style-name="T6">is</text:span></text:p>
      <text:p text:style-name="P15"><text:span text:style-name="T13"><text:s text:c="16"/></text:span><text:span text:style-name="T6">when</text:span><text:span text:style-name="T13"> </text:span><text:span text:style-name="T7">idle_tx</text:span><text:span text:style-name="T13"> =&gt;</text:span></text:p>
      <text:p text:style-name="P15"><text:span text:style-name="T13"><text:s text:c="20"/></text:span><text:span text:style-name="T6">if</text:span><text:span text:style-name="T13"> </text:span><text:span text:style-name="T26">ld</text:span><text:span text:style-name="T13"> = </text:span><text:span text:style-name="T34">'0'</text:span><text:span text:style-name="T13"> </text:span><text:span text:style-name="T6">then</text:span><text:span text:style-name="T13"> </text:span><text:span text:style-name="T36">--latch the input data immediately</text:span></text:p>
      <text:p text:style-name="P15"><text:span text:style-name="T13"><text:s text:c="24"/></text:span><text:span text:style-name="T39">tx_reg</text:span><text:span text:style-name="T13"> &lt;= </text:span><text:span text:style-name="T34">'1'</text:span><text:span text:style-name="T13"> </text:span><text:span text:style-name="T14">&amp;</text:span><text:span text:style-name="T13"> </text:span><text:span text:style-name="T26">din</text:span><text:span text:style-name="T13"> </text:span><text:span text:style-name="T14">&amp;</text:span><text:span text:style-name="T13"> </text:span><text:span text:style-name="T34">'0'</text:span><text:span text:style-name="T13">; </text:span><text:span text:style-name="T36">--stop bit &amp; data &amp; start bit</text:span></text:p>
      <text:p text:style-name="P15"><text:span text:style-name="T13"><text:s text:c="24"/></text:span><text:span text:style-name="T26">txbusy</text:span><text:span text:style-name="T13"> &lt;= </text:span><text:span text:style-name="T34">'1'</text:span><text:span text:style-name="T13">;</text:span></text:p>
      <text:p text:style-name="P15"><text:span text:style-name="T13"><text:s text:c="24"/></text:span><text:span text:style-name="T39">txbitcnt</text:span><text:span text:style-name="T13"> &lt;= </text:span><text:span text:style-name="T34">"1010"</text:span><text:span text:style-name="T13">;</text:span></text:p>
      <text:p text:style-name="P15"><text:span text:style-name="T13"><text:s text:c="24"/></text:span><text:span text:style-name="T39">txfsm</text:span><text:span text:style-name="T13"> &lt;= </text:span><text:span text:style-name="T7">shift_tx</text:span><text:span text:style-name="T13">;</text:span></text:p>
      <text:p text:style-name="P15"><text:span text:style-name="T13"><text:s text:c="24"/></text:span><text:span text:style-name="T39">txclkena</text:span><text:span text:style-name="T13"> &lt;= </text:span><text:span text:style-name="T34">'1'</text:span><text:span text:style-name="T13">;</text:span></text:p>
      <text:p text:style-name="P15"><text:span text:style-name="T13"><text:s text:c="20"/></text:span><text:span text:style-name="T6">else</text:span></text:p>
      <text:p text:style-name="P15"><text:span text:style-name="T13"><text:s text:c="24"/></text:span><text:span text:style-name="T26">txbusy</text:span><text:span text:style-name="T13"> &lt;= </text:span><text:span text:style-name="T34">'0'</text:span><text:span text:style-name="T13">;</text:span></text:p>
      <text:p text:style-name="P15"><text:span text:style-name="T13"><text:s text:c="24"/></text:span><text:span text:style-name="T39">txclkena</text:span><text:span text:style-name="T13"> &lt;= </text:span><text:span text:style-name="T34">'0'</text:span><text:span text:style-name="T13">;</text:span></text:p>
      <text:p text:style-name="P15"><text:span text:style-name="T13"><text:s text:c="20"/></text:span><text:span text:style-name="T6">end</text:span><text:span text:style-name="T13"> </text:span><text:span text:style-name="T6">if</text:span><text:span text:style-name="T13">; <text:s text:c="15"/></text:span></text:p>
      <text:p text:style-name="P16"/>
      <text:p text:style-name="P15"><text:span text:style-name="T13"><text:s text:c="16"/></text:span><text:span text:style-name="T6">when</text:span><text:span text:style-name="T13"> </text:span><text:span text:style-name="T7">shift_tx</text:span><text:span text:style-name="T13"> =&gt;</text:span></text:p>
      <text:p text:style-name="P15"><text:span text:style-name="T13"><text:s text:c="20"/></text:span><text:span text:style-name="T39">txbitcnt</text:span><text:span text:style-name="T13"> &lt;= </text:span><text:span text:style-name="T39">txbitcnt</text:span><text:span text:style-name="T13"> </text:span><text:span text:style-name="T14">-</text:span><text:span text:style-name="T31">1</text:span><text:span text:style-name="T13">;</text:span></text:p>
      <text:p text:style-name="P15"><text:span text:style-name="T13"><text:s text:c="20"/></text:span><text:span text:style-name="T39">tx_reg</text:span><text:span text:style-name="T13"> &lt;= </text:span><text:span text:style-name="T34">'1'</text:span><text:span text:style-name="T13"> </text:span><text:span text:style-name="T14">&amp;</text:span><text:span text:style-name="T13"> </text:span><text:span text:style-name="T39">tx_reg</text:span><text:span text:style-name="T13">(</text:span><text:span text:style-name="T39">tx_reg</text:span><text:span text:style-name="T33">'high</text:span><text:span text:style-name="T13"> </text:span><text:span text:style-name="T6">downto</text:span><text:span text:style-name="T13"> </text:span><text:span text:style-name="T31">1</text:span><text:span text:style-name="T13">);</text:span></text:p>
      <text:p text:style-name="P15"><text:span text:style-name="T13"><text:s text:c="20"/></text:span><text:span text:style-name="T6">if</text:span><text:span text:style-name="T13"> </text:span><text:span text:style-name="T39">txbitcnt</text:span><text:span text:style-name="T13"> = </text:span><text:span text:style-name="T31">0</text:span><text:span text:style-name="T13"> </text:span><text:span text:style-name="T6">then</text:span></text:p>
      <text:p text:style-name="P15"><text:span text:style-name="T13"><text:s text:c="24"/></text:span><text:span text:style-name="T39">txfsm</text:span><text:span text:style-name="T13"> &lt;= </text:span><text:span text:style-name="T7">idle_tx</text:span><text:span text:style-name="T13">;</text:span></text:p>
      <text:p text:style-name="P15"><text:span text:style-name="T13"><text:s text:c="20"/></text:span><text:span text:style-name="T6">end</text:span><text:span text:style-name="T13"> </text:span><text:span text:style-name="T6">if</text:span><text:span text:style-name="T13">;</text:span></text:p>
      <text:p text:style-name="P16"><text:soft-page-break/></text:p>
      <text:p text:style-name="P15"><text:span text:style-name="T13"><text:s text:c="16"/></text:span><text:span text:style-name="T6">when</text:span><text:span text:style-name="T13"> </text:span><text:span text:style-name="T6">others</text:span><text:span text:style-name="T13"> =&gt;</text:span></text:p>
      <text:p text:style-name="P15"><text:span text:style-name="T13"><text:s text:c="20"/></text:span><text:span text:style-name="T39">txfsm</text:span><text:span text:style-name="T13"> &lt;= </text:span><text:span text:style-name="T7">idle_tx</text:span><text:span text:style-name="T13">; <text:s text:c="19"/></text:span></text:p>
      <text:p text:style-name="P15"><text:span text:style-name="T13"><text:s text:c="12"/></text:span><text:span text:style-name="T6">end</text:span><text:span text:style-name="T13"> </text:span><text:span text:style-name="T6">case</text:span><text:span text:style-name="T13">; <text:s text:c="11"/></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tx</text:span><text:span text:style-name="T13"> &lt;= </text:span><text:span text:style-name="T39">tx_reg</text:span><text:span text:style-name="T13">(</text:span><text:span text:style-name="T31">0</text:span><text:span text:style-name="T13">);</text:span></text:p>
      <text:p text:style-name="P16"/>
      <text:p text:style-name="P15"><text:span text:style-name="T13"><text:s text:c="4"/></text:span><text:span text:style-name="T36">--receive state machine</text:span></text:p>
      <text:p text:style-name="P15"><text:span text:style-name="T13"><text:s text:c="4"/></text:span><text:span text:style-name="T38">rx_fsm</text:span><text:span text:style-name="T13">: </text:span><text:span text:style-name="T6">process</text:span><text:span text:style-name="T13">(</text:span><text:span text:style-name="T26">clk</text:span><text:span text:style-name="T13">, </text:span><text:span text:style-name="T26">rst</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6">not</text:span><text:span text:style-name="T13"> </text:span><text:span text:style-name="T26">rst</text:span><text:span text:style-name="T13"> </text:span><text:span text:style-name="T6">then</text:span></text:p>
      <text:p text:style-name="P15"><text:span text:style-name="T13"><text:s text:c="12"/></text:span><text:span text:style-name="T39">rx_reg</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rxbitcnt</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39">rxfsm</text:span><text:span text:style-name="T13"> &lt;= </text:span><text:span text:style-name="T7">idle_rx</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span text:style-name="T13"> <text:s text:c="11"/></text:span></text:p>
      <text:p text:style-name="P15"><text:span text:style-name="T13"><text:s text:c="12"/></text:span><text:span text:style-name="T6">case</text:span><text:span text:style-name="T13"> </text:span><text:span text:style-name="T39">rxfsm</text:span><text:span text:style-name="T13"> </text:span><text:span text:style-name="T6">is</text:span><text:span text:style-name="T13"> <text:s text:c="11"/></text:span></text:p>
      <text:p text:style-name="P15"><text:span text:style-name="T13"><text:s text:c="16"/></text:span><text:span text:style-name="T6">when</text:span><text:span text:style-name="T13"> </text:span><text:span text:style-name="T7">idle_rx</text:span><text:span text:style-name="T13"> =&gt; </text:span><text:span text:style-name="T36">--wait on start bit</text:span></text:p>
      <text:p text:style-name="P15"><text:span text:style-name="T13"><text:s text:c="20"/></text:span><text:span text:style-name="T6">if</text:span><text:span text:style-name="T13"> </text:span><text:span text:style-name="T26">rx</text:span><text:span text:style-name="T13"> = </text:span><text:span text:style-name="T34">'0'</text:span><text:span text:style-name="T13"> </text:span><text:span text:style-name="T6">then</text:span></text:p>
      <text:p text:style-name="P15"><text:span text:style-name="T13"><text:s text:c="24"/></text:span><text:span text:style-name="T39">rxfsm</text:span><text:span text:style-name="T13"> &lt;= </text:span><text:span text:style-name="T7">shift_rx</text:span><text:span text:style-name="T13">;</text:span></text:p>
      <text:p text:style-name="P15"><text:span text:style-name="T13"><text:s text:c="24"/></text:span><text:span text:style-name="T39">rxbitcnt</text:span><text:span text:style-name="T13"> &lt;= </text:span><text:span text:style-name="T34">"10101"</text:span><text:span text:style-name="T13">;</text:span></text:p>
      <text:p text:style-name="P15"><text:span text:style-name="T13"><text:s text:c="24"/></text:span><text:span text:style-name="T39">rxclkena</text:span><text:span text:style-name="T13"> &lt;= </text:span><text:span text:style-name="T34">'1'</text:span><text:span text:style-name="T13">; </text:span><text:span text:style-name="T36">--synchronize the divisor</text:span></text:p>
      <text:p text:style-name="P15"><text:span text:style-name="T13"><text:s text:c="20"/></text:span><text:span text:style-name="T6">else</text:span><text:span text:style-name="T13"> </text:span></text:p>
      <text:p text:style-name="P15"><text:span text:style-name="T13"><text:s text:c="24"/></text:span><text:span text:style-name="T39">rxclkena</text:span><text:span text:style-name="T13"> &lt;= </text:span><text:span text:style-name="T34">'0'</text:span><text:span text:style-name="T13">;</text:span></text:p>
      <text:p text:style-name="P15"><text:span text:style-name="T13"><text:s text:c="20"/></text:span><text:span text:style-name="T6">end</text:span><text:span text:style-name="T13"> </text:span><text:span text:style-name="T6">if</text:span><text:span text:style-name="T13">; </text:span><text:span text:style-name="T36">--else false start, stay in idle</text:span></text:p>
      <text:p text:style-name="P16"/>
      <text:p text:style-name="P15"><text:span text:style-name="T13"><text:s text:c="16"/></text:span><text:span text:style-name="T6">when</text:span><text:span text:style-name="T13"> </text:span><text:span text:style-name="T7">shift_rx</text:span><text:span text:style-name="T13"> =&gt; </text:span><text:span text:style-name="T36">--sample data</text:span></text:p>
      <text:p text:style-name="P15"><text:span text:style-name="T13"><text:s text:c="20"/></text:span><text:span text:style-name="T6">if</text:span><text:span text:style-name="T13"> </text:span><text:span text:style-name="T39">tickrx</text:span><text:span text:style-name="T13"> = </text:span><text:span text:style-name="T34">'1'</text:span><text:span text:style-name="T13"> </text:span><text:span text:style-name="T6">then</text:span></text:p>
      <text:p text:style-name="P15"><text:span text:style-name="T13"><text:s text:c="24"/></text:span><text:span text:style-name="T39">rxbitcnt</text:span><text:span text:style-name="T13"> &lt;= </text:span><text:span text:style-name="T39">rxbitcnt</text:span><text:span text:style-name="T13"> </text:span><text:span text:style-name="T14">-</text:span><text:span text:style-name="T31">1</text:span><text:span text:style-name="T13">; </text:span><text:span text:style-name="T36">--shift right</text:span></text:p>
      <text:p text:style-name="P15"><text:span text:style-name="T13"><text:s text:c="24"/></text:span><text:span text:style-name="T39">rx_reg</text:span><text:span text:style-name="T13"> &lt;= </text:span><text:span text:style-name="T26">rx</text:span><text:span text:style-name="T13"> </text:span><text:span text:style-name="T14">&amp;</text:span><text:span text:style-name="T13"> </text:span><text:span text:style-name="T39">rx_reg</text:span><text:span text:style-name="T13">(</text:span><text:span text:style-name="T39">rx_reg</text:span><text:span text:style-name="T33">'high</text:span><text:span text:style-name="T13"> </text:span><text:span text:style-name="T6">downto</text:span><text:span text:style-name="T13"> </text:span><text:span text:style-name="T31">1</text:span><text:span text:style-name="T13">);</text:span></text:p>
      <text:p text:style-name="P15"><text:span text:style-name="T13"><text:s text:c="24"/></text:span><text:span text:style-name="T6">if</text:span><text:span text:style-name="T13"> </text:span><text:span text:style-name="T39">rxbitcnt</text:span><text:span text:style-name="T13"> &lt;= </text:span><text:span text:style-name="T31">0</text:span><text:span text:style-name="T13"> </text:span><text:span text:style-name="T6">then</text:span></text:p>
      <text:p text:style-name="P15"><text:span text:style-name="T13"><text:s text:c="28"/></text:span><text:span text:style-name="T39">rxfsm</text:span><text:span text:style-name="T13"> &lt;= </text:span><text:span text:style-name="T7">idle_rx</text:span><text:span text:style-name="T13">;</text:span></text:p>
      <text:p text:style-name="P15"><text:span text:style-name="T13"><text:s text:c="28"/></text:span><text:span text:style-name="T26">rxready</text:span><text:span text:style-name="T13"> &lt;= </text:span><text:span text:style-name="T34">'1'</text:span><text:span text:style-name="T13">;</text:span></text:p>
      <text:p text:style-name="P15"><text:span text:style-name="T13"><text:s text:c="24"/></text:span><text:span text:style-name="T6">else</text:span><text:span text:style-name="T13"> </text:span><text:span text:style-name="T26">rxready</text:span><text:span text:style-name="T13"> &lt;= </text:span><text:span text:style-name="T34">'0'</text:span><text:span text:style-name="T13">;</text:span></text:p>
      <text:p text:style-name="P15"><text:span text:style-name="T13"><text:s text:c="20"/></text:span><text:span text:style-name="T6">end</text:span><text:span text:style-name="T13"> </text:span><text:span text:style-name="T6">if</text:span><text:span text:style-name="T13">; <text:s text:c="19"/></text:span></text:p>
      <text:p text:style-name="P15"><text:span text:style-name="T13"><text:s text:c="16"/></text:span><text:span text:style-name="T6">end</text:span><text:span text:style-name="T13"> </text:span><text:span text:style-name="T6">if</text:span><text:span text:style-name="T13">;</text:span></text:p>
      <text:p text:style-name="P16"/>
      <text:p text:style-name="P15"><text:span text:style-name="T13"><text:s text:c="12"/></text:span><text:span text:style-name="T6">when</text:span><text:span text:style-name="T13"> </text:span><text:span text:style-name="T6">others</text:span><text:span text:style-name="T13"> =&gt;</text:span></text:p>
      <text:p text:style-name="P15"><text:span text:style-name="T13"><text:s text:c="16"/></text:span><text:span text:style-name="T39">rxfsm</text:span><text:span text:style-name="T13"> &lt;= </text:span><text:span text:style-name="T7">idle_rx</text:span><text:span text:style-name="T13">;</text:span></text:p>
      <text:p text:style-name="P15"><text:span text:style-name="T13"><text:s text:c="12"/></text:span><text:span text:style-name="T6">end</text:span><text:span text:style-name="T13"> </text:span><text:span text:style-name="T6">case</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 <text:s text:c="3"/></text:span></text:p>
      <text:p text:style-name="P15"><text:span text:style-name="T13"><text:s text:c="4"/></text:span><text:span text:style-name="T26">dout</text:span><text:span text:style-name="T13"> &lt;= </text:span><text:span text:style-name="T39">rx_reg</text:span><text:span text:style-name="T13">(</text:span><text:span text:style-name="T31">8</text:span><text:span text:style-name="T13"> </text:span><text:span text:style-name="T6">downto</text:span><text:span text:style-name="T13"> </text:span><text:span text:style-name="T31">1</text:span><text:span text:style-name="T13">);</text:span></text:p>
      <text:p text:style-name="P15"><text:span text:style-name="T6">end</text:span><text:span text:style-name="T13"> </text:span><text:span text:style-name="T22">arch</text:span><text:span text:style-name="T13">; <text:s text:c="7"/></text:span></text:p>
      <text:p text:style-name="P16"/>
      <text:p text:style-name="P16"/>
      <text:p text:style-name="P16"/>
      <text:p text:style-name="P16"/>
      <text:p text:style-name="P16"/>
      <text:p text:style-name="P16"/>
      <text:p text:style-name="P16"><text:soft-page-break/></text:p>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bigger</text:span><text:span text:style-name="T13"> </text:span><text:span text:style-name="T6">is</text:span><text:span text:style-name="T13"> </text:span></text:p>
      <text:p text:style-name="P15"><text:span text:style-name="T13"><text:s text:c="4"/></text:span><text:span text:style-name="T6">generic</text:span><text:span text:style-name="T13">(</text:span><text:span text:style-name="T7">n</text:span><text:span text:style-name="T13"> : </text:span><text:span text:style-name="T28">natural</text:span><text:span text:style-name="T13"> := </text:span><text:span text:style-name="T31">7</text:span><text:span text:style-name="T13">);</text:span></text:p>
      <text:p text:style-name="P15"><text:span text:style-name="T13"><text:s text:c="4"/></text:span><text:span text:style-name="T6">port</text:span><text:span text:style-name="T13">( </text:span><text:span text:style-name="T26">a</text:span><text:span text:style-name="T13">, </text:span><text:span text:style-name="T26">b</text:span><text:span text:style-name="T13">: </text:span><text:span text:style-name="T6">in</text:span><text:span text:style-name="T13"> </text:span><text:span text:style-name="T28">std_logic_vector</text:span><text:span text:style-name="T13">(</text:span><text:span text:style-name="T7">n</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big</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rtl1</text:span><text:span text:style-name="T13"> </text:span><text:span text:style-name="T6">of</text:span><text:span text:style-name="T13"> </text:span><text:span text:style-name="T22">bigger</text:span><text:span text:style-name="T13"> </text:span><text:span text:style-name="T6">is</text:span></text:p>
      <text:p text:style-name="P23">begin</text:p>
      <text:p text:style-name="P15"><text:span text:style-name="T13"><text:s text:c="4"/></text:span><text:span text:style-name="T38">po</text:span><text:span text:style-name="T13"> : </text:span><text:span text:style-name="T6">process</text:span><text:span text:style-name="T13">(</text:span><text:span text:style-name="T26">a</text:span><text:span text:style-name="T13">,</text:span><text:span text:style-name="T26">b</text:span><text:span text:style-name="T13">)</text:span></text:p>
      <text:p text:style-name="P15"><text:span text:style-name="T13"><text:s text:c="8"/></text:span><text:span text:style-name="T6">variable</text:span><text:span text:style-name="T13"> </text:span><text:span text:style-name="T30">big_so_far</text:span><text:span text:style-name="T13"> : </text:span><text:span text:style-name="T28">std_logic</text:span><text:span text:style-name="T13">;</text:span></text:p>
      <text:p text:style-name="P23">begin</text:p>
      <text:p text:style-name="P15"><text:span text:style-name="T13"><text:s text:c="4"/></text:span><text:span text:style-name="T30">big_so_far</text:span><text:span text:style-name="T13"> := </text:span><text:span text:style-name="T34">'0'</text:span><text:span text:style-name="T13">;</text:span></text:p>
      <text:p text:style-name="P15"><text:span text:style-name="T13"><text:s text:c="4"/></text:span><text:span text:style-name="T6">for</text:span><text:span text:style-name="T13"> i </text:span><text:span text:style-name="T6">in</text:span><text:span text:style-name="T13"> </text:span><text:span text:style-name="T26">a</text:span><text:span text:style-name="T33">'length</text:span><text:span text:style-name="T14">-</text:span><text:span text:style-name="T31">1</text:span><text:span text:style-name="T13"> </text:span><text:span text:style-name="T6">downto</text:span><text:span text:style-name="T13"> </text:span><text:span text:style-name="T31">0</text:span><text:span text:style-name="T13"> </text:span><text:span text:style-name="T6">loop</text:span><text:span text:style-name="T13"> </text:span><text:span text:style-name="T36">--left to right</text:span></text:p>
      <text:p text:style-name="P15"><text:span text:style-name="T13"><text:s text:c="8"/></text:span><text:span text:style-name="T6">if</text:span><text:span text:style-name="T13"> (</text:span><text:span text:style-name="T26">a</text:span><text:span text:style-name="T13">(i) = </text:span><text:span text:style-name="T34">'1'</text:span><text:span text:style-name="T13">) </text:span><text:span text:style-name="T6">and</text:span><text:span text:style-name="T13"> (</text:span><text:span text:style-name="T26">b</text:span><text:span text:style-name="T13">(i) = </text:span><text:span text:style-name="T34">'0'</text:span><text:span text:style-name="T13">) </text:span><text:span text:style-name="T6">then</text:span></text:p>
      <text:p text:style-name="P15"><text:span text:style-name="T13"><text:s text:c="12"/></text:span><text:span text:style-name="T30">big_so_far</text:span><text:span text:style-name="T13"> := </text:span><text:span text:style-name="T34">'1'</text:span><text:span text:style-name="T13">;</text:span></text:p>
      <text:p text:style-name="P15"><text:span text:style-name="T13"><text:s text:c="12"/></text:span><text:span text:style-name="T6">exit</text:span><text:span text:style-name="T13">;</text:span></text:p>
      <text:p text:style-name="P15"><text:span text:style-name="T13"><text:s text:c="8"/></text:span><text:span text:style-name="T6">elsif</text:span><text:span text:style-name="T13"> (</text:span><text:span text:style-name="T26">a</text:span><text:span text:style-name="T13">(i) = </text:span><text:span text:style-name="T34">'0'</text:span><text:span text:style-name="T13">) </text:span><text:span text:style-name="T6">and</text:span><text:span text:style-name="T13"> (</text:span><text:span text:style-name="T26">b</text:span><text:span text:style-name="T13">(i) = </text:span><text:span text:style-name="T34">'1'</text:span><text:span text:style-name="T13">) </text:span><text:span text:style-name="T6">then</text:span></text:p>
      <text:p text:style-name="P15"><text:span text:style-name="T13"><text:s text:c="12"/></text:span><text:span text:style-name="T6">exi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26">big</text:span><text:span text:style-name="T13"> &lt;= </text:span><text:span text:style-name="T30">big_so_far</text:span><text:span text:style-name="T13">;</text:span></text:p>
      <text:p text:style-name="P15"><text:span text:style-name="T6">end</text:span><text:span text:style-name="T13"> </text:span><text:span text:style-name="T6">process</text:span><text:span text:style-name="T13">;</text:span></text:p>
      <text:p text:style-name="P15"><text:span text:style-name="T6">end</text:span><text:span text:style-name="T13"> </text:span><text:span text:style-name="T22">rtl1</text:span><text:span text:style-name="T13">;</text:span></text:p>
      <text:p text:style-name="P16"/>
      <text:p text:style-name="P15"><text:span text:style-name="T6">architecture</text:span><text:span text:style-name="T13"> </text:span><text:span text:style-name="T22">rtl2</text:span><text:span text:style-name="T13"> </text:span><text:span text:style-name="T6">of</text:span><text:span text:style-name="T13"> </text:span><text:span text:style-name="T22">bigger</text:span><text:span text:style-name="T13"> </text:span><text:span text:style-name="T6">is</text:span></text:p>
      <text:p text:style-name="P15"><text:span text:style-name="T13"><text:s text:c="4"/></text:span><text:span text:style-name="T6">signal</text:span><text:span text:style-name="T13"> </text:span><text:span text:style-name="T39">eachbit</text:span><text:span text:style-name="T13"> : </text:span><text:span text:style-name="T28">std_logic_vector</text:span><text:span text:style-name="T13">(</text:span><text:span text:style-name="T7">n</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8">xnor_gen</text:span><text:span text:style-name="T13"> : </text:span><text:span text:style-name="T6">for</text:span><text:span text:style-name="T13"> </text:span><text:span text:style-name="T30">i</text:span><text:span text:style-name="T13"> </text:span><text:span text:style-name="T6">in</text:span><text:span text:style-name="T13"> </text:span><text:span text:style-name="T26">a</text:span><text:span text:style-name="T33">'range</text:span><text:span text:style-name="T13"> </text:span><text:span text:style-name="T6">generate</text:span></text:p>
      <text:p text:style-name="P15"><text:span text:style-name="T13"><text:s text:c="8"/></text:span><text:span text:style-name="T39">eachbit</text:span><text:span text:style-name="T13">(</text:span><text:span text:style-name="T30">i</text:span><text:span text:style-name="T13">) &lt;= </text:span><text:span text:style-name="T6">not</text:span><text:span text:style-name="T13"> (</text:span><text:span text:style-name="T26">a</text:span><text:span text:style-name="T13">(</text:span><text:span text:style-name="T30">i</text:span><text:span text:style-name="T13">) </text:span><text:span text:style-name="T6">xor</text:span><text:span text:style-name="T13"> </text:span><text:span text:style-name="T26">b</text:span><text:span text:style-name="T13">(</text:span><text:span text:style-name="T30">i</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5"><text:span text:style-name="T13"><text:s text:c="4"/></text:span><text:span text:style-name="T38">p0</text:span><text:span text:style-name="T13">: </text:span><text:span text:style-name="T6">process</text:span><text:span text:style-name="T13">(</text:span><text:span text:style-name="T39">eachbit</text:span><text:span text:style-name="T13">, </text:span><text:span text:style-name="T26">a</text:span><text:span text:style-name="T13">, </text:span><text:span text:style-name="T26">b</text:span><text:span text:style-name="T13">)</text:span></text:p>
      <text:p text:style-name="P15"><text:span text:style-name="T13"><text:s text:c="8"/></text:span><text:span text:style-name="T6">variable</text:span><text:span text:style-name="T13"> </text:span><text:span text:style-name="T30">equal_so_far</text:span><text:span text:style-name="T13">, </text:span><text:span text:style-name="T30">big_so_far</text:span><text:span text:style-name="T13"> : </text:span><text:span text:style-name="T28">std_logic</text:span><text:span text:style-name="T13">;</text:span></text:p>
      <text:p text:style-name="P15"><text:span text:style-name="T13"><text:s text:c="4"/></text:span><text:span text:style-name="T6">begin</text:span></text:p>
      <text:p text:style-name="P15"><text:span text:style-name="T13"><text:s text:c="8"/></text:span><text:span text:style-name="T30">equal_so_far</text:span><text:span text:style-name="T13"> := </text:span><text:span text:style-name="T34">'1'</text:span><text:span text:style-name="T13">;</text:span></text:p>
      <text:p text:style-name="P15"><text:span text:style-name="T13"><text:s text:c="8"/></text:span><text:span text:style-name="T30">big_so_far</text:span><text:span text:style-name="T13"> := </text:span><text:span text:style-name="T34">'0'</text:span><text:span text:style-name="T13">;</text:span></text:p>
      <text:p text:style-name="P15"><text:span text:style-name="T13"><text:s text:c="8"/></text:span><text:span text:style-name="T6">for</text:span><text:span text:style-name="T13"> i </text:span><text:span text:style-name="T6">in</text:span><text:span text:style-name="T13"> </text:span><text:span text:style-name="T26">a</text:span><text:span text:style-name="T33">'range</text:span><text:span text:style-name="T13"> </text:span><text:span text:style-name="T6">loop</text:span><text:span text:style-name="T13"> <text:s text:c="3"/></text:span></text:p>
      <text:p text:style-name="P15"><text:span text:style-name="T13"><text:s text:c="12"/></text:span><text:span text:style-name="T30">big_so_far</text:span><text:span text:style-name="T13"> := (</text:span><text:span text:style-name="T30">equal_so_far</text:span><text:span text:style-name="T13"> </text:span><text:span text:style-name="T6">and</text:span><text:span text:style-name="T13"> </text:span><text:span text:style-name="T26">a</text:span><text:span text:style-name="T13">(i) </text:span><text:span text:style-name="T6">and</text:span><text:span text:style-name="T13"> (</text:span><text:span text:style-name="T6">not</text:span><text:span text:style-name="T13"> </text:span><text:span text:style-name="T26">b</text:span><text:span text:style-name="T13">(i))) </text:span><text:span text:style-name="T6">or</text:span><text:span text:style-name="T13"> </text:span><text:span text:style-name="T30">big_so_far</text:span><text:span text:style-name="T13">;</text:span></text:p>
      <text:p text:style-name="P15"><text:span text:style-name="T13"><text:s text:c="12"/></text:span><text:span text:style-name="T30">equal_so_far</text:span><text:span text:style-name="T13"> := </text:span><text:span text:style-name="T30">equal_so_far</text:span><text:span text:style-name="T13"> </text:span><text:span text:style-name="T6">and</text:span><text:span text:style-name="T13"> </text:span><text:span text:style-name="T39">eachbit</text:span><text:span text:style-name="T13">(i);</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26">big</text:span><text:span text:style-name="T13"> &lt;= </text:span><text:span text:style-name="T30">big_so_far</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rtl2</text:span><text:span text:style-name="T13">;</text:span></text:p>
      <text:p text:style-name="P16"/>
      <text:p text:style-name="P15"><text:span text:style-name="T6">architecture</text:span><text:span text:style-name="T13"> </text:span><text:span text:style-name="T22">rtl3</text:span><text:span text:style-name="T13"> </text:span><text:span text:style-name="T6">of</text:span><text:span text:style-name="T13"> </text:span><text:span text:style-name="T22">bigger</text:span><text:span text:style-name="T13"> </text:span><text:span text:style-name="T6">is</text:span></text:p>
      <text:p text:style-name="P23">begin</text:p>
      <text:p text:style-name="P15"><text:span text:style-name="T13"><text:s text:c="4"/></text:span><text:span text:style-name="T26">big</text:span><text:span text:style-name="T13"> &lt;= </text:span><text:span text:style-name="T34">'1'</text:span><text:span text:style-name="T13"> </text:span><text:span text:style-name="T6">when</text:span><text:span text:style-name="T13"> </text:span><text:span text:style-name="T26">a</text:span><text:span text:style-name="T13"> </text:span><text:span text:style-name="T14">&gt;</text:span><text:span text:style-name="T13"> </text:span><text:span text:style-name="T26">b</text:span><text:span text:style-name="T13"> <text:s/></text:span><text:span text:style-name="T6">else</text:span><text:span text:style-name="T13"> </text:span><text:span text:style-name="T34">'0'</text:span><text:span text:style-name="T13">;</text:span></text:p>
      <text:p text:style-name="P15"><text:soft-page-break/><text:span text:style-name="T6">end</text:span><text:span text:style-name="T13"> </text:span><text:span text:style-name="T22">rtl3</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arith</text:span><text:span text:style-name="T13">.</text:span><text:span text:style-name="T6">all</text:span><text:span text:style-name="T13">;</text:span></text:p>
      <text:p text:style-name="P16"/>
      <text:p text:style-name="P16"/>
      <text:p text:style-name="P15"><text:span text:style-name="T6">entity</text:span><text:span text:style-name="T13"> </text:span><text:span text:style-name="T22">tbbigger</text:span><text:span text:style-name="T13"> </text:span><text:span text:style-name="T6">i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bigger</text:span><text:span text:style-name="T13"> </text:span><text:span text:style-name="T6">is</text:span></text:p>
      <text:p text:style-name="P15"><text:span text:style-name="T13"><text:s text:c="4"/></text:span><text:span text:style-name="T6">component</text:span><text:span text:style-name="T13"> </text:span><text:span text:style-name="T22">bigger</text:span></text:p>
      <text:p text:style-name="P15"><text:span text:style-name="T13"><text:s text:c="4"/></text:span><text:span text:style-name="T6">generic</text:span><text:span text:style-name="T13">(</text:span><text:span text:style-name="T7">n</text:span><text:span text:style-name="T13"> : </text:span><text:span text:style-name="T28">natural</text:span><text:span text:style-name="T13"> := </text:span><text:span text:style-name="T31">7</text:span><text:span text:style-name="T13">);</text:span></text:p>
      <text:p text:style-name="P15"><text:span text:style-name="T13"><text:s text:c="4"/></text:span><text:span text:style-name="T6">port</text:span><text:span text:style-name="T13">( </text:span><text:span text:style-name="T26">a</text:span><text:span text:style-name="T13">, </text:span><text:span text:style-name="T26">b</text:span><text:span text:style-name="T13">: </text:span><text:span text:style-name="T6">in</text:span><text:span text:style-name="T13"> </text:span><text:span text:style-name="T28">std_logic_vector</text:span><text:span text:style-name="T13">(</text:span><text:span text:style-name="T7">n</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big</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nstant</text:span><text:span text:style-name="T13"> </text:span><text:span text:style-name="T7">n</text:span><text:span text:style-name="T13"> : </text:span><text:span text:style-name="T28">natural</text:span><text:span text:style-name="T13"> := </text:span><text:span text:style-name="T31">8</text:span><text:span text:style-name="T13">;</text:span></text:p>
      <text:p text:style-name="P15"><text:span text:style-name="T6">signal</text:span><text:span text:style-name="T13"> </text:span><text:span text:style-name="T39">a</text:span><text:span text:style-name="T13">, </text:span><text:span text:style-name="T39">b</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big1</text:span><text:span text:style-name="T13">,</text:span><text:span text:style-name="T39">big2</text:span><text:span text:style-name="T13">,</text:span><text:span text:style-name="T39">big3</text:span><text:span text:style-name="T13">, </text:span><text:span text:style-name="T39">big_c</text:span><text:span text:style-name="T13"> : </text:span><text:span text:style-name="T28">std_logic</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pan><text:span text:style-name="T31">5</text:span><text:span text:style-name="T13"> </text:span><text:span text:style-name="T7">ns</text:span><text:span text:style-name="T13">;</text:span></text:p>
      <text:p text:style-name="P15"><text:span text:style-name="T6">constant</text:span><text:span text:style-name="T13"> </text:span><text:span text:style-name="T7">strobe</text:span><text:span text:style-name="T13"> : </text:span><text:span text:style-name="T28">time</text:span><text:span text:style-name="T13"> := </text:span><text:span text:style-name="T7">period</text:span><text:span text:style-name="T13"> </text:span><text:span text:style-name="T14">-</text:span><text:span text:style-name="T13"> </text:span><text:span text:style-name="T31">1</text:span><text:span text:style-name="T13"> </text:span><text:span text:style-name="T7">ns</text:span><text:span text:style-name="T13">;</text:span></text:p>
      <text:p text:style-name="P16"/>
      <text:p text:style-name="P23">begin</text:p>
      <text:p text:style-name="P16"/>
      <text:p text:style-name="P15"><text:span text:style-name="T13"><text:s text:c="4"/></text:span><text:span text:style-name="T38">p0</text:span><text:span text:style-name="T13">: </text:span><text:span text:style-name="T6">process</text:span></text:p>
      <text:p text:style-name="P15"><text:span text:style-name="T13"><text:s text:c="4"/></text:span><text:span text:style-name="T6">begin</text:span></text:p>
      <text:p text:style-name="P15"><text:span text:style-name="T13"><text:s text:c="8"/></text:span><text:span text:style-name="T6">for</text:span><text:span text:style-name="T13"> i </text:span><text:span text:style-name="T6">in</text:span><text:span text:style-name="T13"> </text:span><text:span text:style-name="T39">a</text:span><text:span text:style-name="T33">'range</text:span><text:span text:style-name="T13"> </text:span><text:span text:style-name="T6">loop</text:span></text:p>
      <text:p text:style-name="P15"><text:span text:style-name="T13"><text:s text:c="12"/></text:span><text:span text:style-name="T39">a</text:span><text:span text:style-name="T13"> &lt;= </text:span><text:span text:style-name="T14">conv_std_logic_vector</text:span><text:span text:style-name="T13">(i,</text:span><text:span text:style-name="T7">n</text:span><text:span text:style-name="T13">);</text:span></text:p>
      <text:p text:style-name="P15"><text:span text:style-name="T13"><text:s text:c="12"/></text:span><text:span text:style-name="T6">for</text:span><text:span text:style-name="T13"> j </text:span><text:span text:style-name="T6">in</text:span><text:span text:style-name="T13"> </text:span><text:span text:style-name="T39">b</text:span><text:span text:style-name="T33">'range</text:span><text:span text:style-name="T13"> </text:span><text:span text:style-name="T6">loop</text:span></text:p>
      <text:p text:style-name="P15"><text:span text:style-name="T13"><text:s text:c="16"/></text:span><text:span text:style-name="T39">b</text:span><text:span text:style-name="T13"> &lt;= </text:span><text:span text:style-name="T14">conv_std_logic_vector</text:span><text:span text:style-name="T13">(j,</text:span><text:span text:style-name="T7">n</text:span><text:span text:style-name="T13">);</text:span></text:p>
      <text:p text:style-name="P15"><text:span text:style-name="T13"><text:s text:c="16"/></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12"/></text:span><text:span text:style-name="T6">end</text:span><text:span text:style-name="T13"> </text:span><text:span text:style-name="T6">loop</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6">wait</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big_c</text:span><text:span text:style-name="T13"> &lt;= </text:span><text:span text:style-name="T34">'1'</text:span><text:span text:style-name="T13"> </text:span><text:span text:style-name="T6">when</text:span><text:span text:style-name="T13"> </text:span><text:span text:style-name="T39">a</text:span><text:span text:style-name="T13"> </text:span><text:span text:style-name="T14">&gt;</text:span><text:span text:style-name="T13"> </text:span><text:span text:style-name="T39">b</text:span><text:span text:style-name="T13"> <text:s/></text:span><text:span text:style-name="T6">else</text:span><text:span text:style-name="T13"> </text:span><text:span text:style-name="T34">'0'</text:span><text:span text:style-name="T13">;</text:span></text:p>
      <text:p text:style-name="P15"><text:span text:style-name="T13"><text:s text:c="4"/></text:span><text:span text:style-name="T38">check</text:span><text:span text:style-name="T13"> : </text:span><text:span text:style-name="T6">process</text:span></text:p>
      <text:p text:style-name="P15"><text:span text:style-name="T13"><text:s text:c="8"/></text:span><text:span text:style-name="T6">variable</text:span><text:span text:style-name="T13"> </text:span><text:span text:style-name="T30">pass_cnt</text:span><text:span text:style-name="T13"> : </text:span><text:span text:style-name="T28">integer</text:span><text:span text:style-name="T13"> := </text:span><text:span text:style-name="T31">0</text:span><text:span text:style-name="T13">;</text:span></text:p>
      <text:p text:style-name="P15"><text:span text:style-name="T13"><text:s text:c="4"/></text:span><text:span text:style-name="T6">begin</text:span></text:p>
      <text:p text:style-name="P15"><text:span text:style-name="T13"><text:s text:c="8"/></text:span><text:span text:style-name="T6">wait</text:span><text:span text:style-name="T13"> </text:span><text:span text:style-name="T6">for</text:span><text:span text:style-name="T13"> </text:span><text:span text:style-name="T7">strobe</text:span><text:span text:style-name="T13">;</text:span></text:p>
      <text:p text:style-name="P15"><text:span text:style-name="T13"><text:s text:c="8"/></text:span><text:span text:style-name="T6">assert</text:span><text:span text:style-name="T13"> </text:span><text:span text:style-name="T7">false</text:span><text:span text:style-name="T13"> </text:span><text:span text:style-name="T6">report</text:span><text:span text:style-name="T13"> </text:span><text:span text:style-name="T34">"comparing..."</text:span><text:span text:style-name="T13"> </text:span><text:span text:style-name="T6">severity</text:span><text:span text:style-name="T13"> </text:span><text:span text:style-name="T7">note</text:span><text:span text:style-name="T13">;</text:span></text:p>
      <text:p text:style-name="P15"><text:span text:style-name="T13"><text:s text:c="8"/></text:span><text:span text:style-name="T6">if</text:span><text:span text:style-name="T13"> (</text:span><text:span text:style-name="T39">big1</text:span><text:span text:style-name="T13"> /= </text:span><text:span text:style-name="T39">big_c</text:span><text:span text:style-name="T13">) </text:span><text:span text:style-name="T6">or</text:span><text:span text:style-name="T13"> (</text:span><text:span text:style-name="T39">big2</text:span><text:span text:style-name="T13"> /= </text:span><text:span text:style-name="T39">big_c</text:span><text:span text:style-name="T13">) </text:span><text:span text:style-name="T6">or</text:span><text:span text:style-name="T13"> (</text:span><text:span text:style-name="T39">big3</text:span><text:span text:style-name="T13"> /= </text:span><text:span text:style-name="T39">big_c</text:span><text:span text:style-name="T13">)</text:span><text:span text:style-name="T6">then</text:span></text:p>
      <text:p text:style-name="P15"><text:span text:style-name="T13"><text:s text:c="12"/></text:span><text:span text:style-name="T6">assert</text:span><text:span text:style-name="T13"> </text:span><text:span text:style-name="T7">false</text:span><text:span text:style-name="T13"> </text:span><text:span text:style-name="T6">report</text:span><text:span text:style-name="T13"> </text:span><text:span text:style-name="T34">"not match"</text:span><text:span text:style-name="T13"> </text:span><text:span text:style-name="T6">severity</text:span><text:span text:style-name="T13"> </text:span><text:span text:style-name="T7">warning</text:span><text:span text:style-name="T13">;</text:span></text:p>
      <text:p text:style-name="P15"><text:span text:style-name="T13"><text:s text:c="12"/></text:span><text:span text:style-name="T30">pass_cnt</text:span><text:span text:style-name="T13"> := </text:span><text:span text:style-name="T30">pass_cnt</text:span><text:span text:style-name="T13"> </text:span><text:span text:style-name="T14">+</text:span><text:span text:style-name="T31">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6">assert</text:span><text:span text:style-name="T13"> (</text:span><text:span text:style-name="T30">pass_cnt</text:span><text:span text:style-name="T13"> = </text:span><text:span text:style-name="T31">0</text:span><text:span text:style-name="T13">) </text:span><text:span text:style-name="T6">report</text:span><text:span text:style-name="T13"> </text:span><text:span text:style-name="T34">"test failed"</text:span><text:span text:style-name="T13"> </text:span><text:span text:style-name="T6">severity</text:span><text:span text:style-name="T13"> </text:span><text:span text:style-name="T7">error</text:span><text:span text:style-name="T13">;</text:span></text:p>
      <text:p text:style-name="P15"><text:soft-page-break/><text:span text:style-name="T13"><text:s text:c="8"/></text:span><text:span text:style-name="T6">assert</text:span><text:span text:style-name="T13"> (</text:span><text:span text:style-name="T30">pass_cnt</text:span><text:span text:style-name="T13"> /= </text:span><text:span text:style-name="T31">0</text:span><text:span text:style-name="T13">) </text:span><text:span text:style-name="T6">report</text:span><text:span text:style-name="T13"> </text:span><text:span text:style-name="T34">"test pass"</text:span><text:span text:style-name="T13"> </text:span><text:span text:style-name="T6">severity</text:span><text:span text:style-name="T13"> </text:span><text:span text:style-name="T7">note</text:span><text:span text:style-name="T13">;</text:span></text:p>
      <text:p text:style-name="P15"><text:span text:style-name="T13"><text:s text:c="8"/></text:span><text:span text:style-name="T6">wait</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bigger1</text:span><text:span text:style-name="T13"> : </text:span><text:span text:style-name="T22">bigger</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big</text:span><text:span text:style-name="T13"> =&gt; </text:span><text:span text:style-name="T39">big1</text:span><text:span text:style-name="T13">);</text:span></text:p>
      <text:p text:style-name="P15"><text:span text:style-name="T13"><text:s text:c="4"/></text:span><text:span text:style-name="T38">bigger2</text:span><text:span text:style-name="T13"> : </text:span><text:span text:style-name="T22">bigger</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big</text:span><text:span text:style-name="T13"> =&gt; </text:span><text:span text:style-name="T39">big2</text:span><text:span text:style-name="T13">);</text:span></text:p>
      <text:p text:style-name="P15"><text:span text:style-name="T13"><text:s text:c="4"/></text:span><text:span text:style-name="T38">bigger3</text:span><text:span text:style-name="T13"> : </text:span><text:span text:style-name="T22">bigger</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big</text:span><text:span text:style-name="T13"> =&gt; </text:span><text:span text:style-name="T39">big3</text:span><text:span text:style-name="T13">);</text:span></text:p>
      <text:p text:style-name="P15"><text:span text:style-name="T6">end</text:span><text:span text:style-name="T13"> </text:span><text:span text:style-name="T22">beh</text:span><text:span text:style-name="T13">;</text:span></text:p>
      <text:p text:style-name="P16"/>
      <text:p text:style-name="P15"><text:span text:style-name="T6">configuration</text:span><text:span text:style-name="T13"> cfg_tbbigger </text:span><text:span text:style-name="T6">of</text:span><text:span text:style-name="T13"> </text:span><text:span text:style-name="T22">tbbigger</text:span><text:span text:style-name="T13"> </text:span><text:span text:style-name="T6">is</text:span></text:p>
      <text:p text:style-name="P15"><text:span text:style-name="T13"><text:s text:c="4"/></text:span><text:span text:style-name="T6">for</text:span><text:span text:style-name="T13"> </text:span><text:span text:style-name="T22">beh</text:span></text:p>
      <text:p text:style-name="P15"><text:span text:style-name="T13"><text:s text:c="4"/></text:span><text:span text:style-name="T6">for</text:span><text:span text:style-name="T13"> bigger1 : </text:span><text:span text:style-name="T22">bigger</text:span></text:p>
      <text:p text:style-name="P15"><text:span text:style-name="T13"><text:s text:c="4"/></text:span><text:span text:style-name="T6">use</text:span><text:span text:style-name="T13"> </text:span><text:span text:style-name="T6">entity</text:span><text:span text:style-name="T13"> </text:span><text:span text:style-name="T22">work</text:span><text:span text:style-name="T13">.</text:span><text:span text:style-name="T22">bigger</text:span><text:span text:style-name="T13">(</text:span><text:span text:style-name="T22">rtl1</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bigger2 : </text:span><text:span text:style-name="T22">bigger</text:span></text:p>
      <text:p text:style-name="P15"><text:span text:style-name="T6">use</text:span><text:span text:style-name="T13"> </text:span><text:span text:style-name="T6">entity</text:span><text:span text:style-name="T13"> </text:span><text:span text:style-name="T22">work</text:span><text:span text:style-name="T13">.</text:span><text:span text:style-name="T22">bigger</text:span><text:span text:style-name="T13">(</text:span><text:span text:style-name="T22">rtl2</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bigger3 : </text:span><text:span text:style-name="T22">bigger</text:span></text:p>
      <text:p text:style-name="P15"><text:span text:style-name="T6">use</text:span><text:span text:style-name="T13"> </text:span><text:span text:style-name="T6">entity</text:span><text:span text:style-name="T13"> </text:span><text:span text:style-name="T22">work</text:span><text:span text:style-name="T13">.</text:span><text:span text:style-name="T22">bigger</text:span><text:span text:style-name="T13">(</text:span><text:span text:style-name="T22">rtl3</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configuration</text:span><text:span text:style-name="T13">;</text:span></text:p>
      <text:p text:style-name="P15"/>
      <text:p text:style-name="P15"/>
      <text:p text:style-name="P15"/>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gle</text:span><text:span text:style-name="T13"> </text:span><text:span text:style-name="T6">is</text:span><text:span text:style-name="T13"> </text:span><text:span text:style-name="T6">port</text:span><text:span text:style-name="T13">(</text:span></text:p>
      <text:p text:style-name="P15"><text:span text:style-name="T13"><text:s text:c="4"/></text:span><text:span text:style-name="T26">a</text:span><text:span text:style-name="T13">, </text:span><text:span text:style-name="T26">b</text:span><text:span text:style-name="T13">: </text:span><text:span text:style-name="T6">in</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equal</text:span><text:span text:style-name="T13">, </text:span><text:span text:style-name="T26">greater</text:span><text:span text:style-name="T13">, </text:span><text:span text:style-name="T26">less</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rtl1</text:span><text:span text:style-name="T13"> </text:span><text:span text:style-name="T6">of</text:span><text:span text:style-name="T13"> </text:span><text:span text:style-name="T22">gle</text:span><text:span text:style-name="T13"> </text:span><text:span text:style-name="T6">is</text:span></text:p>
      <text:p text:style-name="P23">begin</text:p>
      <text:p text:style-name="P15"><text:span text:style-name="T13"><text:s text:c="4"/></text:span><text:span text:style-name="T38">p0</text:span><text:span text:style-name="T13">: </text:span><text:span text:style-name="T6">process</text:span><text:span text:style-name="T13">(</text:span><text:span text:style-name="T26">a</text:span><text:span text:style-name="T13">, </text:span><text:span text:style-name="T26">b</text:span><text:span text:style-name="T13">)</text:span></text:p>
      <text:p text:style-name="P15"><text:span text:style-name="T13"><text:s text:c="8"/></text:span><text:span text:style-name="T6">variable</text:span><text:span text:style-name="T13"> </text:span><text:span text:style-name="T30">eq</text:span><text:span text:style-name="T13">, </text:span><text:span text:style-name="T30">gt</text:span><text:span text:style-name="T13">, </text:span><text:span text:style-name="T30">lt</text:span><text:span text:style-name="T13"> : </text:span><text:span text:style-name="T28">std_logic</text:span><text:span text:style-name="T13">;</text:span></text:p>
      <text:p text:style-name="P15"><text:span text:style-name="T13"><text:s text:c="4"/></text:span><text:span text:style-name="T6">begin</text:span></text:p>
      <text:p text:style-name="P15"><text:span text:style-name="T13"><text:s text:c="8"/></text:span><text:span text:style-name="T26">equal</text:span><text:span text:style-name="T13"> &lt;= </text:span><text:span text:style-name="T34">'1'</text:span><text:span text:style-name="T13">;</text:span></text:p>
      <text:p text:style-name="P15"><text:span text:style-name="T13"><text:s text:c="8"/></text:span><text:span text:style-name="T26">greater</text:span><text:span text:style-name="T13"> &lt;= </text:span><text:span text:style-name="T34">'0'</text:span><text:span text:style-name="T13">;</text:span></text:p>
      <text:p text:style-name="P15"><text:span text:style-name="T13"><text:s text:c="8"/></text:span><text:span text:style-name="T26">less</text:span><text:span text:style-name="T13"> &lt;= </text:span><text:span text:style-name="T34">'0'</text:span><text:span text:style-name="T13">;</text:span></text:p>
      <text:p text:style-name="P16"/>
      <text:p text:style-name="P15"><text:span text:style-name="T13"><text:s text:c="8"/></text:span><text:span text:style-name="T6">for</text:span><text:span text:style-name="T13"> j </text:span><text:span text:style-name="T6">in</text:span><text:span text:style-name="T13"> </text:span><text:span text:style-name="T26">a</text:span><text:span text:style-name="T33">'range</text:span><text:span text:style-name="T13"> </text:span><text:span text:style-name="T6">loop</text:span></text:p>
      <text:p text:style-name="P15"><text:span text:style-name="T13"><text:s text:c="12"/></text:span><text:span text:style-name="T6">if</text:span><text:span text:style-name="T13">(</text:span><text:span text:style-name="T26">a</text:span><text:span text:style-name="T13">(j) </text:span><text:span text:style-name="T6">and</text:span><text:span text:style-name="T13"> (</text:span><text:span text:style-name="T6">not</text:span><text:span text:style-name="T13"> </text:span><text:span text:style-name="T26">b</text:span><text:span text:style-name="T13">(j))) = </text:span><text:span text:style-name="T34">'1'</text:span><text:span text:style-name="T13"> </text:span><text:span text:style-name="T6">then</text:span></text:p>
      <text:p text:style-name="P15"><text:soft-page-break/><text:span text:style-name="T13"><text:s text:c="16"/></text:span><text:span text:style-name="T26">greater</text:span><text:span text:style-name="T13"> &lt;= </text:span><text:span text:style-name="T34">'1'</text:span><text:span text:style-name="T13">;</text:span></text:p>
      <text:p text:style-name="P15"><text:span text:style-name="T13"><text:s text:c="16"/></text:span><text:span text:style-name="T26">equal</text:span><text:span text:style-name="T13"> &lt;= </text:span><text:span text:style-name="T34">'0'</text:span><text:span text:style-name="T13">;</text:span></text:p>
      <text:p text:style-name="P15"><text:span text:style-name="T13"><text:s text:c="16"/></text:span><text:span text:style-name="T6">exit</text:span><text:span text:style-name="T13">;</text:span></text:p>
      <text:p text:style-name="P15"><text:span text:style-name="T13"><text:s text:c="12"/></text:span><text:span text:style-name="T6">elsif</text:span><text:span text:style-name="T13">((</text:span><text:span text:style-name="T6">not</text:span><text:span text:style-name="T13"> </text:span><text:span text:style-name="T26">a</text:span><text:span text:style-name="T13">(j)) </text:span><text:span text:style-name="T6">and</text:span><text:span text:style-name="T13"> </text:span><text:span text:style-name="T26">b</text:span><text:span text:style-name="T13">(j)) = </text:span><text:span text:style-name="T34">'1'</text:span><text:span text:style-name="T13"> </text:span><text:span text:style-name="T6">then</text:span></text:p>
      <text:p text:style-name="P15"><text:span text:style-name="T13"><text:s text:c="16"/></text:span><text:span text:style-name="T26">less</text:span><text:span text:style-name="T13"> &lt;= </text:span><text:span text:style-name="T34">'1'</text:span><text:span text:style-name="T13">;</text:span></text:p>
      <text:p text:style-name="P15"><text:span text:style-name="T13"><text:s text:c="16"/></text:span><text:span text:style-name="T26">equal</text:span><text:span text:style-name="T13"> &lt;= </text:span><text:span text:style-name="T34">'0'</text:span><text:span text:style-name="T13">;</text:span></text:p>
      <text:p text:style-name="P15"><text:span text:style-name="T13"><text:s text:c="16"/></text:span><text:span text:style-name="T6">exit</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rtl1</text:span><text:span text:style-name="T13">;</text:span></text:p>
      <text:p text:style-name="P16"/>
      <text:p text:style-name="P15"><text:span text:style-name="T6">architecture</text:span><text:span text:style-name="T13"> </text:span><text:span text:style-name="T22">rtl2</text:span><text:span text:style-name="T13"> </text:span><text:span text:style-name="T6">of</text:span><text:span text:style-name="T13"> </text:span><text:span text:style-name="T22">gle</text:span><text:span text:style-name="T13"> </text:span><text:span text:style-name="T6">is</text:span></text:p>
      <text:p text:style-name="P23">begin</text:p>
      <text:p text:style-name="P15"><text:span text:style-name="T13"><text:s text:c="4"/></text:span><text:span text:style-name="T38">p1</text:span><text:span text:style-name="T13">: </text:span><text:span text:style-name="T6">process</text:span><text:span text:style-name="T13">(</text:span><text:span text:style-name="T26">a</text:span><text:span text:style-name="T13">,</text:span><text:span text:style-name="T26">b</text:span><text:span text:style-name="T13">)</text:span></text:p>
      <text:p text:style-name="P15"><text:span text:style-name="T13"><text:s text:c="4"/></text:span><text:span text:style-name="T6">begin</text:span></text:p>
      <text:p text:style-name="P15"><text:span text:style-name="T13"><text:s text:c="8"/></text:span><text:span text:style-name="T26">equal</text:span><text:span text:style-name="T13"> &lt;= </text:span><text:span text:style-name="T34">'0'</text:span><text:span text:style-name="T13">;</text:span></text:p>
      <text:p text:style-name="P15"><text:span text:style-name="T13"><text:s text:c="8"/></text:span><text:span text:style-name="T26">greater</text:span><text:span text:style-name="T13"> &lt;= </text:span><text:span text:style-name="T34">'0'</text:span><text:span text:style-name="T13">;</text:span></text:p>
      <text:p text:style-name="P15"><text:span text:style-name="T13"><text:s text:c="8"/></text:span><text:span text:style-name="T26">less</text:span><text:span text:style-name="T13"> &lt;= </text:span><text:span text:style-name="T34">'0'</text:span><text:span text:style-name="T13">;</text:span></text:p>
      <text:p text:style-name="P15"><text:span text:style-name="T13"><text:s text:c="8"/></text:span><text:span text:style-name="T6">if</text:span><text:span text:style-name="T13">(</text:span><text:span text:style-name="T26">a</text:span><text:span text:style-name="T13"> </text:span><text:span text:style-name="T14">&gt;</text:span><text:span text:style-name="T13"> </text:span><text:span text:style-name="T26">b</text:span><text:span text:style-name="T13">) </text:span><text:span text:style-name="T6">then</text:span></text:p>
      <text:p text:style-name="P15"><text:span text:style-name="T13"><text:s text:c="12"/></text:span><text:span text:style-name="T26">greater</text:span><text:span text:style-name="T13"> &lt;= </text:span><text:span text:style-name="T34">'1'</text:span><text:span text:style-name="T13">;</text:span></text:p>
      <text:p text:style-name="P15"><text:span text:style-name="T13"><text:s text:c="8"/></text:span><text:span text:style-name="T6">elsif</text:span><text:span text:style-name="T13">(</text:span><text:span text:style-name="T26">a</text:span><text:span text:style-name="T13"> </text:span><text:span text:style-name="T14">&lt;</text:span><text:span text:style-name="T13"> </text:span><text:span text:style-name="T26">b</text:span><text:span text:style-name="T13">) </text:span><text:span text:style-name="T6">then</text:span></text:p>
      <text:p text:style-name="P15"><text:span text:style-name="T13"><text:s text:c="12"/></text:span><text:span text:style-name="T26">less</text:span><text:span text:style-name="T13"> &lt;= </text:span><text:span text:style-name="T34">'1'</text:span><text:span text:style-name="T13">;</text:span></text:p>
      <text:p text:style-name="P15"><text:span text:style-name="T13"><text:s text:c="8"/></text:span><text:span text:style-name="T6">else</text:span></text:p>
      <text:p text:style-name="P15"><text:span text:style-name="T13"><text:s text:c="12"/></text:span><text:span text:style-name="T26">equal</text:span><text:span text:style-name="T13"> &lt;= </text:span><text:span text:style-name="T34">'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rtl2</text:span><text:span text:style-name="T13">;</text:span></text:p>
      <text:p text:style-name="P16"/>
      <text:p text:style-name="P15"><text:span text:style-name="T6">architecture</text:span><text:span text:style-name="T13"> </text:span><text:span text:style-name="T22">rtl3</text:span><text:span text:style-name="T13"> </text:span><text:span text:style-name="T6">of</text:span><text:span text:style-name="T13"> </text:span><text:span text:style-name="T22">gle</text:span><text:span text:style-name="T13"> </text:span><text:span text:style-name="T6">is</text:span></text:p>
      <text:p text:style-name="P23">begin</text:p>
      <text:p text:style-name="P15"><text:span text:style-name="T13"><text:s text:c="4"/></text:span><text:span text:style-name="T38">p2</text:span><text:span text:style-name="T13">: </text:span><text:span text:style-name="T6">process</text:span><text:span text:style-name="T13">(</text:span><text:span text:style-name="T26">a</text:span><text:span text:style-name="T13">,</text:span><text:span text:style-name="T26">b</text:span><text:span text:style-name="T13">)</text:span></text:p>
      <text:p text:style-name="P15"><text:span text:style-name="T13"><text:s text:c="4"/></text:span><text:span text:style-name="T6">begin</text:span></text:p>
      <text:p text:style-name="P15"><text:span text:style-name="T13"><text:s text:c="8"/></text:span><text:span text:style-name="T26">equal</text:span><text:span text:style-name="T13"> &lt;= </text:span><text:span text:style-name="T34">'0'</text:span><text:span text:style-name="T13">;</text:span></text:p>
      <text:p text:style-name="P15"><text:span text:style-name="T13"><text:s text:c="8"/></text:span><text:span text:style-name="T26">greater</text:span><text:span text:style-name="T13"> &lt;= </text:span><text:span text:style-name="T34">'0'</text:span><text:span text:style-name="T13">;</text:span></text:p>
      <text:p text:style-name="P15"><text:span text:style-name="T13"><text:s text:c="8"/></text:span><text:span text:style-name="T26">less</text:span><text:span text:style-name="T13"> &lt;= </text:span><text:span text:style-name="T34">'0'</text:span><text:span text:style-name="T13">;</text:span></text:p>
      <text:p text:style-name="P15"><text:span text:style-name="T13"><text:s text:c="8"/></text:span><text:span text:style-name="T6">if</text:span><text:span text:style-name="T13"> </text:span><text:span text:style-name="T26">a</text:span><text:span text:style-name="T13"> = </text:span><text:span text:style-name="T26">b</text:span><text:span text:style-name="T13"> </text:span><text:span text:style-name="T6">then</text:span></text:p>
      <text:p text:style-name="P15"><text:span text:style-name="T13"><text:s text:c="12"/></text:span><text:span text:style-name="T26">equal</text:span><text:span text:style-name="T13"> &lt;= </text:span><text:span text:style-name="T34">'1'</text:span><text:span text:style-name="T13">;</text:span></text:p>
      <text:p text:style-name="P15"><text:span text:style-name="T13"><text:s text:c="8"/></text:span><text:span text:style-name="T6">elsif</text:span><text:span text:style-name="T13"> </text:span><text:span text:style-name="T26">a</text:span><text:span text:style-name="T13"> </text:span><text:span text:style-name="T14">&gt;</text:span><text:span text:style-name="T13"> </text:span><text:span text:style-name="T26">b</text:span><text:span text:style-name="T13"> </text:span><text:span text:style-name="T6">then</text:span></text:p>
      <text:p text:style-name="P15"><text:span text:style-name="T13"><text:s text:c="12"/></text:span><text:span text:style-name="T26">greater</text:span><text:span text:style-name="T13"> &lt;= </text:span><text:span text:style-name="T34">'1'</text:span><text:span text:style-name="T13">;</text:span></text:p>
      <text:p text:style-name="P15"><text:span text:style-name="T13"><text:s text:c="8"/></text:span><text:span text:style-name="T6">else</text:span></text:p>
      <text:p text:style-name="P15"><text:span text:style-name="T13"><text:s text:c="12"/></text:span><text:span text:style-name="T26">less</text:span><text:span text:style-name="T13"> &lt;= </text:span><text:span text:style-name="T34">'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rtl3</text:span><text:span text:style-name="T13">;</text:span></text:p>
      <text:p text:style-name="P16"/>
      <text:p text:style-name="P15"><text:span text:style-name="T6">architecture</text:span><text:span text:style-name="T13"> </text:span><text:span text:style-name="T22">rtl4</text:span><text:span text:style-name="T13"> </text:span><text:span text:style-name="T6">of</text:span><text:span text:style-name="T13"> </text:span><text:span text:style-name="T22">gle</text:span><text:span text:style-name="T13"> </text:span><text:span text:style-name="T6">is</text:span></text:p>
      <text:p text:style-name="P23">begin</text:p>
      <text:p text:style-name="P15"><text:span text:style-name="T13"><text:s text:c="4"/></text:span><text:span text:style-name="T26">equal</text:span><text:span text:style-name="T13"> &lt;= </text:span><text:span text:style-name="T34">'1'</text:span><text:span text:style-name="T13"> </text:span><text:span text:style-name="T6">when</text:span><text:span text:style-name="T13"> </text:span><text:span text:style-name="T26">a</text:span><text:span text:style-name="T13"> = </text:span><text:span text:style-name="T26">b</text:span><text:span text:style-name="T13"> </text:span><text:span text:style-name="T6">else</text:span><text:span text:style-name="T13"> </text:span><text:span text:style-name="T34">'0'</text:span><text:span text:style-name="T13">;</text:span></text:p>
      <text:p text:style-name="P15"><text:span text:style-name="T13"><text:s text:c="4"/></text:span><text:span text:style-name="T26">greater</text:span><text:span text:style-name="T13"> &lt;= </text:span><text:span text:style-name="T34">'1'</text:span><text:span text:style-name="T13"> </text:span><text:span text:style-name="T6">when</text:span><text:span text:style-name="T13"> </text:span><text:span text:style-name="T26">a</text:span><text:span text:style-name="T13"> </text:span><text:span text:style-name="T14">&gt;</text:span><text:span text:style-name="T13"> </text:span><text:span text:style-name="T26">b</text:span><text:span text:style-name="T13"> </text:span><text:span text:style-name="T6">else</text:span><text:span text:style-name="T13"> </text:span><text:span text:style-name="T34">'0'</text:span><text:span text:style-name="T13">;</text:span></text:p>
      <text:p text:style-name="P15"><text:soft-page-break/><text:span text:style-name="T13"><text:s text:c="4"/></text:span><text:span text:style-name="T26">less</text:span><text:span text:style-name="T13"> &lt;= </text:span><text:span text:style-name="T34">'1'</text:span><text:span text:style-name="T13"> </text:span><text:span text:style-name="T6">when</text:span><text:span text:style-name="T13"> </text:span><text:span text:style-name="T26">a</text:span><text:span text:style-name="T13"> </text:span><text:span text:style-name="T14">&lt;</text:span><text:span text:style-name="T13"> </text:span><text:span text:style-name="T26">b</text:span><text:span text:style-name="T13"> </text:span><text:span text:style-name="T6">else</text:span><text:span text:style-name="T13"> </text:span><text:span text:style-name="T34">'0'</text:span><text:span text:style-name="T13">;</text:span></text:p>
      <text:p text:style-name="P15"><text:span text:style-name="T6">end</text:span><text:span text:style-name="T13"> </text:span><text:span text:style-name="T22">rtl4</text:span><text:span text:style-name="T13">;</text:span></text:p>
      <text:p text:style-name="P16"/>
      <text:p text:style-name="P15"><text:span text:style-name="T6">architecture</text:span><text:span text:style-name="T13"> </text:span><text:span text:style-name="T22">rtl5</text:span><text:span text:style-name="T13"> </text:span><text:span text:style-name="T6">of</text:span><text:span text:style-name="T13"> </text:span><text:span text:style-name="T22">gle</text:span><text:span text:style-name="T13"> </text:span><text:span text:style-name="T6">is</text:span></text:p>
      <text:p text:style-name="P15"><text:span text:style-name="T13"><text:s text:c="4"/></text:span><text:span text:style-name="T6">signal</text:span><text:span text:style-name="T13"> </text:span><text:span text:style-name="T39">eq_temp</text:span><text:span text:style-name="T13">, </text:span><text:span text:style-name="T39">gt_temp</text:span><text:span text:style-name="T13">, </text:span><text:span text:style-name="T39">lt_temp</text:span><text:span text:style-name="T13"> : </text:span><text:span text:style-name="T28">std_logic</text:span><text:span text:style-name="T13">;</text:span></text:p>
      <text:p text:style-name="P23">begin</text:p>
      <text:p text:style-name="P15"><text:span text:style-name="T13"><text:s text:c="4"/></text:span><text:span text:style-name="T39">eq_temp</text:span><text:span text:style-name="T13"> &lt;= </text:span><text:span text:style-name="T34">'1'</text:span><text:span text:style-name="T13"> </text:span><text:span text:style-name="T6">when</text:span><text:span text:style-name="T13"> </text:span><text:span text:style-name="T26">a</text:span><text:span text:style-name="T13"> = </text:span><text:span text:style-name="T26">b</text:span><text:span text:style-name="T13"> </text:span><text:span text:style-name="T6">else</text:span><text:span text:style-name="T13"> </text:span><text:span text:style-name="T34">'0'</text:span><text:span text:style-name="T13">;</text:span></text:p>
      <text:p text:style-name="P15"><text:span text:style-name="T13"><text:s text:c="4"/></text:span><text:span text:style-name="T39">gt_temp</text:span><text:span text:style-name="T13"> &lt;= </text:span><text:span text:style-name="T34">'1'</text:span><text:span text:style-name="T13"> </text:span><text:span text:style-name="T6">when</text:span><text:span text:style-name="T13"> </text:span><text:span text:style-name="T26">a</text:span><text:span text:style-name="T13"> </text:span><text:span text:style-name="T14">&gt;</text:span><text:span text:style-name="T13"> </text:span><text:span text:style-name="T26">b</text:span><text:span text:style-name="T13"> </text:span><text:span text:style-name="T6">else</text:span><text:span text:style-name="T13"> </text:span><text:span text:style-name="T34">'0'</text:span><text:span text:style-name="T13">;</text:span></text:p>
      <text:p text:style-name="P15"><text:span text:style-name="T13"><text:s text:c="4"/></text:span><text:span text:style-name="T39">lt_temp</text:span><text:span text:style-name="T13"> &lt;= </text:span><text:span text:style-name="T39">eq_temp</text:span><text:span text:style-name="T13"> </text:span><text:span text:style-name="T6">nor</text:span><text:span text:style-name="T13"> </text:span><text:span text:style-name="T39">gt_temp</text:span><text:span text:style-name="T13">;</text:span></text:p>
      <text:p text:style-name="P16"/>
      <text:p text:style-name="P15"><text:span text:style-name="T13"><text:s text:c="4"/></text:span><text:span text:style-name="T26">equal</text:span><text:span text:style-name="T13"> &lt;= </text:span><text:span text:style-name="T39">eq_temp</text:span><text:span text:style-name="T13">;</text:span></text:p>
      <text:p text:style-name="P15"><text:span text:style-name="T13"><text:s text:c="4"/></text:span><text:span text:style-name="T26">greater</text:span><text:span text:style-name="T13"> &lt;= </text:span><text:span text:style-name="T39">gt_temp</text:span><text:span text:style-name="T13">;</text:span></text:p>
      <text:p text:style-name="P15"><text:span text:style-name="T13"><text:s text:c="4"/></text:span><text:span text:style-name="T26">less</text:span><text:span text:style-name="T13"> &lt;= </text:span><text:span text:style-name="T39">lt_temp</text:span><text:span text:style-name="T13">;</text:span></text:p>
      <text:p text:style-name="P16"/>
      <text:p text:style-name="P15"><text:span text:style-name="T6">end</text:span><text:span text:style-name="T13"> </text:span><text:span text:style-name="T22">rtl5</text:span><text:span text:style-name="T13">;</text:span></text:p>
      <text:p text:style-name="P16"/>
      <text:p text:style-name="P15"><text:span text:style-name="T6">architecture</text:span><text:span text:style-name="T13"> </text:span><text:span text:style-name="T22">rtl6</text:span><text:span text:style-name="T13"> </text:span><text:span text:style-name="T6">of</text:span><text:span text:style-name="T13"> </text:span><text:span text:style-name="T22">gle</text:span><text:span text:style-name="T13"> </text:span><text:span text:style-name="T6">is</text:span></text:p>
      <text:p text:style-name="P15"><text:span text:style-name="T13"><text:s text:c="4"/></text:span><text:span text:style-name="T6">signal</text:span><text:span text:style-name="T13"> </text:span><text:span text:style-name="T39">eq_temp</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sub</text:span><text:span text:style-name="T13"> : </text:span><text:span text:style-name="T28">std_logic_vector</text:span><text:span text:style-name="T13">(</text:span><text:span text:style-name="T26">a</text:span><text:span text:style-name="T33">'length</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9">eq_temp</text:span><text:span text:style-name="T13"> &lt;= </text:span><text:span text:style-name="T34">'1'</text:span><text:span text:style-name="T13"> </text:span><text:span text:style-name="T6">when</text:span><text:span text:style-name="T13"> </text:span><text:span text:style-name="T26">a</text:span><text:span text:style-name="T13"> = </text:span><text:span text:style-name="T26">b</text:span><text:span text:style-name="T13"> </text:span><text:span text:style-name="T6">else</text:span><text:span text:style-name="T13"> </text:span><text:span text:style-name="T34">'0'</text:span><text:span text:style-name="T13">;</text:span></text:p>
      <text:p text:style-name="P15"><text:span text:style-name="T13"><text:s text:c="4"/></text:span><text:span text:style-name="T39">sub</text:span><text:span text:style-name="T13"> &lt;= (</text:span><text:span text:style-name="T34">'0'</text:span><text:span text:style-name="T13"> </text:span><text:span text:style-name="T14">&amp;</text:span><text:span text:style-name="T13"> </text:span><text:span text:style-name="T26">a</text:span><text:span text:style-name="T13">) </text:span><text:span text:style-name="T14">-</text:span><text:span text:style-name="T13"> (</text:span><text:span text:style-name="T34">'0'</text:span><text:span text:style-name="T13"> </text:span><text:span text:style-name="T14">&amp;</text:span><text:span text:style-name="T13"> </text:span><text:span text:style-name="T26">b</text:span><text:span text:style-name="T13">);</text:span></text:p>
      <text:p text:style-name="P15"><text:span text:style-name="T13"><text:s text:c="4"/></text:span><text:span text:style-name="T26">less</text:span><text:span text:style-name="T13"> &lt;= </text:span><text:span text:style-name="T39">sub</text:span><text:span text:style-name="T13">(</text:span><text:span text:style-name="T26">a</text:span><text:span text:style-name="T33">'length</text:span><text:span text:style-name="T13">) </text:span><text:span text:style-name="T6">and</text:span><text:span text:style-name="T13"> (</text:span><text:span text:style-name="T6">not</text:span><text:span text:style-name="T13"> </text:span><text:span text:style-name="T39">eq_temp</text:span><text:span text:style-name="T13">);</text:span></text:p>
      <text:p text:style-name="P15"><text:span text:style-name="T13"><text:s text:c="4"/></text:span><text:span text:style-name="T26">greater</text:span><text:span text:style-name="T13"> &lt;= (</text:span><text:span text:style-name="T6">not</text:span><text:span text:style-name="T13"> </text:span><text:span text:style-name="T39">sub</text:span><text:span text:style-name="T13">(</text:span><text:span text:style-name="T26">a</text:span><text:span text:style-name="T33">'length</text:span><text:span text:style-name="T13">)) </text:span><text:span text:style-name="T6">and</text:span><text:span text:style-name="T13"> (</text:span><text:span text:style-name="T6">not</text:span><text:span text:style-name="T13"> </text:span><text:span text:style-name="T39">eq_temp</text:span><text:span text:style-name="T13">);</text:span></text:p>
      <text:p text:style-name="P15"><text:span text:style-name="T13"><text:s text:c="4"/></text:span><text:span text:style-name="T26">equal</text:span><text:span text:style-name="T13"> &lt;= </text:span><text:span text:style-name="T39">eq_temp</text:span><text:span text:style-name="T13">;</text:span></text:p>
      <text:p text:style-name="P15"><text:span text:style-name="T6">end</text:span><text:span text:style-name="T13"> </text:span><text:span text:style-name="T22">rtl6</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arith</text:span><text:span text:style-name="T13">.</text:span><text:span text:style-name="T6">all</text:span><text:span text:style-name="T13">;</text:span></text:p>
      <text:p text:style-name="P16"/>
      <text:p text:style-name="P15"><text:span text:style-name="T6">entity</text:span><text:span text:style-name="T13"> </text:span><text:span text:style-name="T22">tbgle</text:span><text:span text:style-name="T13"> </text:span><text:span text:style-name="T6">i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gle</text:span><text:span text:style-name="T13"> </text:span><text:span text:style-name="T6">is</text:span></text:p>
      <text:p text:style-name="P15"><text:span text:style-name="T13"><text:s text:c="4"/></text:span><text:span text:style-name="T6">component</text:span><text:span text:style-name="T13"> </text:span><text:span text:style-name="T22">gle</text:span></text:p>
      <text:p text:style-name="P15"><text:span text:style-name="T13"><text:s text:c="4"/></text:span><text:span text:style-name="T6">generic</text:span><text:span text:style-name="T13">(</text:span><text:span text:style-name="T7">n</text:span><text:span text:style-name="T13"> : </text:span><text:span text:style-name="T28">natural</text:span><text:span text:style-name="T13"> := </text:span><text:span text:style-name="T31">32</text:span><text:span text:style-name="T13">);</text:span></text:p>
      <text:p text:style-name="P15"><text:span text:style-name="T13"><text:s text:c="4"/></text:span><text:span text:style-name="T6">port</text:span><text:span text:style-name="T13">( </text:span><text:span text:style-name="T26">a</text:span><text:span text:style-name="T13">, </text:span><text:span text:style-name="T26">b</text:span><text:span text:style-name="T13">: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0"/></text:span><text:span text:style-name="T26">equal</text:span><text:span text:style-name="T13">, </text:span><text:span text:style-name="T26">greater</text:span><text:span text:style-name="T13">, </text:span><text:span text:style-name="T26">less</text:span><text:span text:style-name="T13">: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nstant</text:span><text:span text:style-name="T13"> </text:span><text:span text:style-name="T7">w</text:span><text:span text:style-name="T13"> : </text:span><text:span text:style-name="T28">natural</text:span><text:span text:style-name="T13"> := </text:span><text:span text:style-name="T31">5</text:span><text:span text:style-name="T13">; </text:span><text:span text:style-name="T36">--signal width</text:span></text:p>
      <text:p text:style-name="P16"/>
      <text:p text:style-name="P15"><text:span text:style-name="T6">signal</text:span><text:span text:style-name="T13"> </text:span><text:span text:style-name="T39">a</text:span><text:span text:style-name="T13">, </text:span><text:span text:style-name="T39">b</text:span><text:span text:style-name="T13">: </text:span><text:span text:style-name="T28">std_logic_vector</text:span><text:span text:style-name="T13">(</text:span><text:span text:style-name="T31">2</text:span><text:span text:style-name="T14">**</text:span><text:span text:style-name="T7">w</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equal</text:span><text:span text:style-name="T13">, </text:span><text:span text:style-name="T39">greater</text:span><text:span text:style-name="T13">, </text:span><text:span text:style-name="T39">less</text:span><text:span text:style-name="T13">: </text:span><text:span text:style-name="T28">std_logic</text:span><text:span text:style-name="T13">;</text:span></text:p>
      <text:p text:style-name="P15"><text:span text:style-name="T6">signal</text:span><text:span text:style-name="T13"> </text:span><text:span text:style-name="T39">e_c</text:span><text:span text:style-name="T13">, </text:span><text:span text:style-name="T39">e1</text:span><text:span text:style-name="T13">, </text:span><text:span text:style-name="T39">e2</text:span><text:span text:style-name="T13">, </text:span><text:span text:style-name="T39">e3</text:span><text:span text:style-name="T13">, </text:span><text:span text:style-name="T39">e4</text:span><text:span text:style-name="T13">, </text:span><text:span text:style-name="T39">e5</text:span><text:span text:style-name="T13">, </text:span><text:span text:style-name="T39">e6</text:span><text:span text:style-name="T13"> : </text:span><text:span text:style-name="T28">std_logic</text:span><text:span text:style-name="T13">;</text:span></text:p>
      <text:p text:style-name="P15"><text:span text:style-name="T6">signal</text:span><text:span text:style-name="T13"> </text:span><text:span text:style-name="T39">g_c</text:span><text:span text:style-name="T13">, </text:span><text:span text:style-name="T39">g1</text:span><text:span text:style-name="T13">, </text:span><text:span text:style-name="T39">g2</text:span><text:span text:style-name="T13">, </text:span><text:span text:style-name="T39">g3</text:span><text:span text:style-name="T13">, </text:span><text:span text:style-name="T39">g4</text:span><text:span text:style-name="T13">, </text:span><text:span text:style-name="T39">g5</text:span><text:span text:style-name="T13">, </text:span><text:span text:style-name="T39">g6</text:span><text:span text:style-name="T13"> : </text:span><text:span text:style-name="T28">std_logic</text:span><text:span text:style-name="T13">;</text:span></text:p>
      <text:p text:style-name="P15"><text:span text:style-name="T6">signal</text:span><text:span text:style-name="T13"> </text:span><text:span text:style-name="T39">l_c</text:span><text:span text:style-name="T13">, </text:span><text:span text:style-name="T39">l1</text:span><text:span text:style-name="T13">, </text:span><text:span text:style-name="T39">l2</text:span><text:span text:style-name="T13">, </text:span><text:span text:style-name="T39">l3</text:span><text:span text:style-name="T13">, </text:span><text:span text:style-name="T39">l4</text:span><text:span text:style-name="T13">, </text:span><text:span text:style-name="T39">l5</text:span><text:span text:style-name="T13">, </text:span><text:span text:style-name="T39">l6</text:span><text:span text:style-name="T13"> : </text:span><text:span text:style-name="T28">std_logic</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pan><text:span text:style-name="T31">5</text:span><text:span text:style-name="T13"> </text:span><text:span text:style-name="T7">ns</text:span><text:span text:style-name="T13">;</text:span></text:p>
      <text:p text:style-name="P15"><text:soft-page-break/><text:span text:style-name="T6">constant</text:span><text:span text:style-name="T13"> </text:span><text:span text:style-name="T7">strobe</text:span><text:span text:style-name="T13"> : </text:span><text:span text:style-name="T28">time</text:span><text:span text:style-name="T13"> := </text:span><text:span text:style-name="T7">period</text:span><text:span text:style-name="T13"> </text:span><text:span text:style-name="T14">-</text:span><text:span text:style-name="T31">1</text:span><text:span text:style-name="T13"> </text:span><text:span text:style-name="T7">ns</text:span><text:span text:style-name="T13">;</text:span></text:p>
      <text:p text:style-name="P16"/>
      <text:p text:style-name="P23">begin</text:p>
      <text:p text:style-name="P15"><text:span text:style-name="T13"><text:s text:c="4"/></text:span><text:span text:style-name="T38">p0</text:span><text:span text:style-name="T13">: </text:span><text:span text:style-name="T6">process</text:span></text:p>
      <text:p text:style-name="P15"><text:span text:style-name="T13"><text:s text:c="4"/></text:span><text:span text:style-name="T6">begin</text:span></text:p>
      <text:p text:style-name="P15"><text:span text:style-name="T13"><text:s text:c="8"/></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31">2</text:span><text:span text:style-name="T14">**</text:span><text:span text:style-name="T7">w</text:span><text:span text:style-name="T14">-</text:span><text:span text:style-name="T31">1</text:span><text:span text:style-name="T13"> </text:span><text:span text:style-name="T6">loop</text:span></text:p>
      <text:p text:style-name="P15"><text:span text:style-name="T13"><text:s text:c="12"/></text:span><text:span text:style-name="T39">a</text:span><text:span text:style-name="T13"> &lt;= </text:span><text:span text:style-name="T14">conv_std_logic_vector</text:span><text:span text:style-name="T13">(i,</text:span><text:span text:style-name="T31">2</text:span><text:span text:style-name="T14">**</text:span><text:span text:style-name="T7">w</text:span><text:span text:style-name="T13">);</text:span></text:p>
      <text:p text:style-name="P15"><text:span text:style-name="T13"><text:s text:c="12"/></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31">2</text:span><text:span text:style-name="T14">**</text:span><text:span text:style-name="T7">w</text:span><text:span text:style-name="T14">-</text:span><text:span text:style-name="T31">1</text:span><text:span text:style-name="T13"> </text:span><text:span text:style-name="T6">loop</text:span></text:p>
      <text:p text:style-name="P15"><text:span text:style-name="T13"><text:s text:c="16"/></text:span><text:span text:style-name="T39">b</text:span><text:span text:style-name="T13"> &lt;= </text:span><text:span text:style-name="T14">conv_std_logic_vector</text:span><text:span text:style-name="T13">(j,</text:span><text:span text:style-name="T31">2</text:span><text:span text:style-name="T14">**</text:span><text:span text:style-name="T7">w</text:span><text:span text:style-name="T13">);</text:span></text:p>
      <text:p text:style-name="P15"><text:span text:style-name="T13"><text:s text:c="16"/></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12"/></text:span><text:span text:style-name="T6">end</text:span><text:span text:style-name="T13"> </text:span><text:span text:style-name="T6">loop</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6">wait</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e_c</text:span><text:span text:style-name="T13"> &lt;= </text:span><text:span text:style-name="T34">'1'</text:span><text:span text:style-name="T13"> </text:span><text:span text:style-name="T6">when</text:span><text:span text:style-name="T13"> </text:span><text:span text:style-name="T39">a</text:span><text:span text:style-name="T13"> = </text:span><text:span text:style-name="T39">b</text:span><text:span text:style-name="T13"> </text:span><text:span text:style-name="T6">else</text:span><text:span text:style-name="T13"> </text:span><text:span text:style-name="T34">'0'</text:span><text:span text:style-name="T13">;</text:span></text:p>
      <text:p text:style-name="P15"><text:span text:style-name="T13"><text:s text:c="4"/></text:span><text:span text:style-name="T39">g_c</text:span><text:span text:style-name="T13"> &lt;= </text:span><text:span text:style-name="T34">'1'</text:span><text:span text:style-name="T13"> </text:span><text:span text:style-name="T6">when</text:span><text:span text:style-name="T13"> </text:span><text:span text:style-name="T39">a</text:span><text:span text:style-name="T13"> </text:span><text:span text:style-name="T14">&gt;</text:span><text:span text:style-name="T13"> </text:span><text:span text:style-name="T39">b</text:span><text:span text:style-name="T13"> </text:span><text:span text:style-name="T6">else</text:span><text:span text:style-name="T13"> </text:span><text:span text:style-name="T34">'0'</text:span><text:span text:style-name="T13">;</text:span></text:p>
      <text:p text:style-name="P15"><text:span text:style-name="T13"><text:s text:c="4"/></text:span><text:span text:style-name="T39">l_c</text:span><text:span text:style-name="T13"> &lt;= </text:span><text:span text:style-name="T34">'1'</text:span><text:span text:style-name="T13"> </text:span><text:span text:style-name="T6">when</text:span><text:span text:style-name="T13"> </text:span><text:span text:style-name="T39">a</text:span><text:span text:style-name="T13"> </text:span><text:span text:style-name="T14">&lt;</text:span><text:span text:style-name="T13"> </text:span><text:span text:style-name="T39">b</text:span><text:span text:style-name="T13"> </text:span><text:span text:style-name="T6">else</text:span><text:span text:style-name="T13"> </text:span><text:span text:style-name="T34">'0'</text:span><text:span text:style-name="T13">; <text:s text:c="3"/></text:span></text:p>
      <text:p text:style-name="P16"/>
      <text:p text:style-name="P16"/>
      <text:p text:style-name="P15"><text:span text:style-name="T13"><text:s text:c="4"/></text:span><text:span text:style-name="T38">check</text:span><text:span text:style-name="T13">: </text:span><text:span text:style-name="T6">process</text:span></text:p>
      <text:p text:style-name="P15"><text:span text:style-name="T13"><text:s text:c="8"/></text:span><text:span text:style-name="T6">variable</text:span><text:span text:style-name="T13"> </text:span><text:span text:style-name="T30">pass_cnt</text:span><text:span text:style-name="T13"> : </text:span><text:span text:style-name="T28">natural</text:span><text:span text:style-name="T13"> := </text:span><text:span text:style-name="T31">0</text:span><text:span text:style-name="T13">;</text:span></text:p>
      <text:p text:style-name="P15"><text:span text:style-name="T13"><text:s text:c="4"/></text:span><text:span text:style-name="T6">begin</text:span></text:p>
      <text:p text:style-name="P15"><text:span text:style-name="T13"><text:s text:c="8"/></text:span><text:span text:style-name="T6">wait</text:span><text:span text:style-name="T13"> </text:span><text:span text:style-name="T6">for</text:span><text:span text:style-name="T13"> </text:span><text:span text:style-name="T7">strobe</text:span><text:span text:style-name="T13">;</text:span></text:p>
      <text:p text:style-name="P15"><text:span text:style-name="T13"><text:s text:c="8"/></text:span><text:span text:style-name="T6">if</text:span><text:span text:style-name="T13">(</text:span><text:span text:style-name="T39">e_c</text:span><text:span text:style-name="T13"> /= </text:span><text:span text:style-name="T39">e1</text:span><text:span text:style-name="T13">) </text:span><text:span text:style-name="T6">or</text:span><text:span text:style-name="T13"> (</text:span><text:span text:style-name="T39">e_c</text:span><text:span text:style-name="T13"> /= </text:span><text:span text:style-name="T39">e2</text:span><text:span text:style-name="T13">) </text:span><text:span text:style-name="T6">or</text:span><text:span text:style-name="T13"> (</text:span><text:span text:style-name="T39">e_c</text:span><text:span text:style-name="T13"> /= </text:span><text:span text:style-name="T39">e3</text:span><text:span text:style-name="T13">) </text:span><text:span text:style-name="T6">or</text:span><text:span text:style-name="T13"> (</text:span><text:span text:style-name="T39">e_c</text:span><text:span text:style-name="T13"> /= </text:span><text:span text:style-name="T39">e4</text:span><text:span text:style-name="T13">) </text:span><text:span text:style-name="T6">or</text:span><text:span text:style-name="T13"> (</text:span><text:span text:style-name="T39">e_c</text:span><text:span text:style-name="T13"> /= </text:span><text:span text:style-name="T39">e5</text:span><text:span text:style-name="T13">) </text:span><text:span text:style-name="T6">or</text:span><text:span text:style-name="T13"> (</text:span><text:span text:style-name="T39">e_c</text:span><text:span text:style-name="T13"> /= </text:span><text:span text:style-name="T39">e6</text:span><text:span text:style-name="T13">) </text:span><text:span text:style-name="T6">or</text:span><text:span text:style-name="T13"> </text:span></text:p>
      <text:p text:style-name="P15"><text:span text:style-name="T13"><text:s text:c="12"/>(</text:span><text:span text:style-name="T39">g_c</text:span><text:span text:style-name="T13"> /= </text:span><text:span text:style-name="T39">g1</text:span><text:span text:style-name="T13">) </text:span><text:span text:style-name="T6">or</text:span><text:span text:style-name="T13"> (</text:span><text:span text:style-name="T39">g_c</text:span><text:span text:style-name="T13"> /= </text:span><text:span text:style-name="T39">g2</text:span><text:span text:style-name="T13">) </text:span><text:span text:style-name="T6">or</text:span><text:span text:style-name="T13"> (</text:span><text:span text:style-name="T39">g_c</text:span><text:span text:style-name="T13"> /= </text:span><text:span text:style-name="T39">g3</text:span><text:span text:style-name="T13">) </text:span><text:span text:style-name="T6">or</text:span><text:span text:style-name="T13"> (</text:span><text:span text:style-name="T39">g_c</text:span><text:span text:style-name="T13"> /= </text:span><text:span text:style-name="T39">g4</text:span><text:span text:style-name="T13">) </text:span><text:span text:style-name="T6">or</text:span><text:span text:style-name="T13"> (</text:span><text:span text:style-name="T39">g_c</text:span><text:span text:style-name="T13"> /= </text:span><text:span text:style-name="T39">g5</text:span><text:span text:style-name="T13">) </text:span><text:span text:style-name="T6">or</text:span><text:span text:style-name="T13"> (</text:span><text:span text:style-name="T39">g_c</text:span><text:span text:style-name="T13"> /= </text:span><text:span text:style-name="T39">g6</text:span><text:span text:style-name="T13">) </text:span><text:span text:style-name="T6">or</text:span><text:span text:style-name="T13"> </text:span></text:p>
      <text:p text:style-name="P15"><text:span text:style-name="T13"><text:s text:c="12"/>(</text:span><text:span text:style-name="T39">l_c</text:span><text:span text:style-name="T13"> /= </text:span><text:span text:style-name="T39">l1</text:span><text:span text:style-name="T13">) </text:span><text:span text:style-name="T6">or</text:span><text:span text:style-name="T13"> (</text:span><text:span text:style-name="T39">l_c</text:span><text:span text:style-name="T13"> /= </text:span><text:span text:style-name="T39">l2</text:span><text:span text:style-name="T13">) </text:span><text:span text:style-name="T6">or</text:span><text:span text:style-name="T13"> (</text:span><text:span text:style-name="T39">l_c</text:span><text:span text:style-name="T13"> /= </text:span><text:span text:style-name="T39">l3</text:span><text:span text:style-name="T13">) </text:span><text:span text:style-name="T6">or</text:span><text:span text:style-name="T13"> (</text:span><text:span text:style-name="T39">l_c</text:span><text:span text:style-name="T13"> /= </text:span><text:span text:style-name="T39">l4</text:span><text:span text:style-name="T13">) </text:span><text:span text:style-name="T6">or</text:span><text:span text:style-name="T13"> (</text:span><text:span text:style-name="T39">l_c</text:span><text:span text:style-name="T13"> /= </text:span><text:span text:style-name="T39">l5</text:span><text:span text:style-name="T13">) </text:span><text:span text:style-name="T6">or</text:span><text:span text:style-name="T13"> (</text:span><text:span text:style-name="T39">l_c</text:span><text:span text:style-name="T13"> /= </text:span><text:span text:style-name="T39">l6</text:span><text:span text:style-name="T13">) </text:span><text:span text:style-name="T6">then</text:span></text:p>
      <text:p text:style-name="P15"><text:span text:style-name="T13"><text:s text:c="12"/></text:span><text:span text:style-name="T6">assert</text:span><text:span text:style-name="T13"> </text:span><text:span text:style-name="T7">false</text:span><text:span text:style-name="T13"> </text:span><text:span text:style-name="T6">report</text:span><text:span text:style-name="T13"> </text:span><text:span text:style-name="T34">"no match"</text:span><text:span text:style-name="T13"> </text:span><text:span text:style-name="T6">severity</text:span><text:span text:style-name="T13"> </text:span><text:span text:style-name="T7">warning</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text:span><text:span text:style-name="T30">pass_cnt</text:span><text:span text:style-name="T13"> := </text:span><text:span text:style-name="T30">pass_cnt</text:span><text:span text:style-name="T13"> </text:span><text:span text:style-name="T14">+</text:span><text:span text:style-name="T31">1</text:span><text:span text:style-name="T13">;</text:span></text:p>
      <text:p text:style-name="P15"><text:span text:style-name="T13"><text:s text:c="8"/></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6">assert</text:span><text:span text:style-name="T13">(</text:span><text:span text:style-name="T30">pass_cnt</text:span><text:span text:style-name="T13"> = </text:span><text:span text:style-name="T31">0</text:span><text:span text:style-name="T13">) </text:span><text:span text:style-name="T6">report</text:span><text:span text:style-name="T13"> </text:span><text:span text:style-name="T34">"test fail"</text:span><text:span text:style-name="T13"> </text:span><text:span text:style-name="T6">severity</text:span><text:span text:style-name="T13"> </text:span><text:span text:style-name="T7">error</text:span><text:span text:style-name="T13">;</text:span></text:p>
      <text:p text:style-name="P15"><text:span text:style-name="T13"><text:s text:c="8"/></text:span><text:span text:style-name="T6">assert</text:span><text:span text:style-name="T13">(</text:span><text:span text:style-name="T30">pass_cnt</text:span><text:span text:style-name="T13"> /=</text:span><text:span text:style-name="T31">0</text:span><text:span text:style-name="T13">) </text:span><text:span text:style-name="T6">report</text:span><text:span text:style-name="T13"> </text:span><text:span text:style-name="T34">"test pass"</text:span><text:span text:style-name="T13"> </text:span><text:span text:style-name="T6">severity</text:span><text:span text:style-name="T13"> </text:span><text:span text:style-name="T7">note</text:span><text:span text:style-name="T13">;</text:span></text:p>
      <text:p text:style-name="P15"><text:span text:style-name="T13"><text:s text:c="8"/></text:span><text:span text:style-name="T6">wait</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gle1</text:span><text:span text:style-name="T13"> : </text:span><text:span text:style-name="T22">gle</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equal</text:span><text:span text:style-name="T13"> =&gt; </text:span><text:span text:style-name="T39">e1</text:span><text:span text:style-name="T13">, </text:span><text:span text:style-name="T26">greater</text:span><text:span text:style-name="T13"> =&gt; </text:span><text:span text:style-name="T39">g1</text:span><text:span text:style-name="T13">, </text:span><text:span text:style-name="T26">less</text:span><text:span text:style-name="T13"> =&gt; </text:span><text:span text:style-name="T39">l1</text:span><text:span text:style-name="T13">);</text:span></text:p>
      <text:p text:style-name="P15"><text:span text:style-name="T13"><text:s text:c="4"/></text:span><text:span text:style-name="T38">gle2</text:span><text:span text:style-name="T13"> : </text:span><text:span text:style-name="T22">gle</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equal</text:span><text:span text:style-name="T13"> =&gt; </text:span><text:span text:style-name="T39">e2</text:span><text:span text:style-name="T13">, </text:span><text:span text:style-name="T26">greater</text:span><text:span text:style-name="T13"> =&gt; </text:span><text:span text:style-name="T39">g2</text:span><text:span text:style-name="T13">, </text:span><text:span text:style-name="T26">less</text:span><text:span text:style-name="T13"> =&gt; </text:span><text:span text:style-name="T39">l2</text:span><text:span text:style-name="T13">);</text:span></text:p>
      <text:p text:style-name="P15"><text:span text:style-name="T13"><text:s text:c="4"/></text:span><text:span text:style-name="T38">gle3</text:span><text:span text:style-name="T13"> : </text:span><text:span text:style-name="T22">gle</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equal</text:span><text:span text:style-name="T13"> =&gt; </text:span><text:span text:style-name="T39">e3</text:span><text:span text:style-name="T13">, </text:span><text:span text:style-name="T26">greater</text:span><text:span text:style-name="T13"> =&gt; </text:span><text:span text:style-name="T39">g3</text:span><text:span text:style-name="T13">, </text:span><text:span text:style-name="T26">less</text:span><text:span text:style-name="T13"> =&gt; </text:span><text:span text:style-name="T39">l3</text:span><text:span text:style-name="T13">);</text:span></text:p>
      <text:p text:style-name="P15"><text:span text:style-name="T13"><text:s text:c="4"/></text:span><text:span text:style-name="T38">gle4</text:span><text:span text:style-name="T13"> : </text:span><text:span text:style-name="T22">gle</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equal</text:span><text:span text:style-name="T13"> =&gt; </text:span><text:span text:style-name="T39">e4</text:span><text:span text:style-name="T13">, </text:span><text:span text:style-name="T26">greater</text:span><text:span text:style-name="T13"> =&gt; </text:span><text:span text:style-name="T39">g4</text:span><text:span text:style-name="T13">, </text:span><text:span text:style-name="T26">less</text:span><text:span text:style-name="T13"> =&gt; </text:span><text:span text:style-name="T39">l4</text:span><text:span text:style-name="T13">);</text:span></text:p>
      <text:p text:style-name="P15"><text:span text:style-name="T13"><text:s text:c="4"/></text:span><text:span text:style-name="T38">gle5</text:span><text:span text:style-name="T13"> : </text:span><text:span text:style-name="T22">gle</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equal</text:span><text:span text:style-name="T13"> =&gt; </text:span><text:span text:style-name="T39">e5</text:span><text:span text:style-name="T13">, </text:span><text:span text:style-name="T26">greater</text:span><text:span text:style-name="T13"> =&gt; </text:span><text:span text:style-name="T39">g5</text:span><text:span text:style-name="T13">, </text:span><text:span text:style-name="T26">less</text:span><text:span text:style-name="T13"> =&gt; </text:span><text:span text:style-name="T39">l5</text:span><text:span text:style-name="T13">);</text:span></text:p>
      <text:p text:style-name="P15"><text:span text:style-name="T13"><text:s text:c="4"/></text:span><text:span text:style-name="T38">gle6</text:span><text:span text:style-name="T13"> : </text:span><text:span text:style-name="T22">gle</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equal</text:span><text:span text:style-name="T13"> =&gt; </text:span><text:span text:style-name="T39">e6</text:span><text:span text:style-name="T13">, </text:span><text:span text:style-name="T26">greater</text:span><text:span text:style-name="T13"> =&gt; </text:span><text:span text:style-name="T39">g6</text:span><text:span text:style-name="T13">, </text:span><text:span text:style-name="T26">less</text:span><text:span text:style-name="T13"> =&gt; </text:span><text:span text:style-name="T39">l6</text:span><text:span text:style-name="T13">);</text:span></text:p>
      <text:p text:style-name="P16"/>
      <text:p text:style-name="P15"><text:span text:style-name="T6">end</text:span><text:span text:style-name="T13"> </text:span><text:span text:style-name="T22">beh</text:span><text:span text:style-name="T13">;</text:span></text:p>
      <text:p text:style-name="P16"><text:soft-page-break/></text:p>
      <text:p text:style-name="P15"><text:span text:style-name="T6">configuration</text:span><text:span text:style-name="T13"> cfg_tbgle </text:span><text:span text:style-name="T6">of</text:span><text:span text:style-name="T13"> </text:span><text:span text:style-name="T22">tbgle</text:span><text:span text:style-name="T13"> </text:span><text:span text:style-name="T6">is</text:span></text:p>
      <text:p text:style-name="P15"><text:span text:style-name="T13"><text:s text:c="4"/></text:span><text:span text:style-name="T6">for</text:span><text:span text:style-name="T13"> </text:span><text:span text:style-name="T22">beh</text:span></text:p>
      <text:p text:style-name="P15"><text:span text:style-name="T13"><text:s text:c="4"/></text:span><text:span text:style-name="T6">for</text:span><text:span text:style-name="T13"> gle1 : </text:span><text:span text:style-name="T22">gle</text:span></text:p>
      <text:p text:style-name="P15"><text:span text:style-name="T13"><text:s text:c="4"/></text:span><text:span text:style-name="T6">use</text:span><text:span text:style-name="T13"> </text:span><text:span text:style-name="T6">entity</text:span><text:span text:style-name="T13"> </text:span><text:span text:style-name="T22">work</text:span><text:span text:style-name="T13">.</text:span><text:span text:style-name="T22">gle</text:span><text:span text:style-name="T13">(</text:span><text:span text:style-name="T22">rtl1</text:span><text:span text:style-name="T13">);</text:span></text:p>
      <text:p text:style-name="P15"><text:span text:style-name="T6">end</text:span><text:span text:style-name="T13"> </text:span><text:span text:style-name="T6">for</text:span><text:span text:style-name="T13">; <text:s text:c="7"/></text:span></text:p>
      <text:p text:style-name="P15"><text:span text:style-name="T6">for</text:span><text:span text:style-name="T13"> gle2 : </text:span><text:span text:style-name="T22">gle</text:span></text:p>
      <text:p text:style-name="P15"><text:span text:style-name="T6">use</text:span><text:span text:style-name="T13"> </text:span><text:span text:style-name="T6">entity</text:span><text:span text:style-name="T13"> </text:span><text:span text:style-name="T22">work</text:span><text:span text:style-name="T13">.</text:span><text:span text:style-name="T22">gle</text:span><text:span text:style-name="T13">(</text:span><text:span text:style-name="T22">rtl1</text:span><text:span text:style-name="T13">);</text:span></text:p>
      <text:p text:style-name="P15"><text:span text:style-name="T6">end</text:span><text:span text:style-name="T13"> </text:span><text:span text:style-name="T6">for</text:span><text:span text:style-name="T13">; <text:s text:c="7"/></text:span></text:p>
      <text:p text:style-name="P15"><text:span text:style-name="T6">for</text:span><text:span text:style-name="T13"> gle3 : </text:span><text:span text:style-name="T22">gle</text:span></text:p>
      <text:p text:style-name="P15"><text:span text:style-name="T6">use</text:span><text:span text:style-name="T13"> </text:span><text:span text:style-name="T6">entity</text:span><text:span text:style-name="T13"> </text:span><text:span text:style-name="T22">work</text:span><text:span text:style-name="T13">.</text:span><text:span text:style-name="T22">gle</text:span><text:span text:style-name="T13">(</text:span><text:span text:style-name="T22">rtl1</text:span><text:span text:style-name="T13">);</text:span></text:p>
      <text:p text:style-name="P15"><text:span text:style-name="T6">end</text:span><text:span text:style-name="T13"> </text:span><text:span text:style-name="T6">for</text:span><text:span text:style-name="T13">; <text:s text:c="7"/></text:span></text:p>
      <text:p text:style-name="P15"><text:span text:style-name="T6">for</text:span><text:span text:style-name="T13"> gle4 : </text:span><text:span text:style-name="T22">gle</text:span></text:p>
      <text:p text:style-name="P15"><text:span text:style-name="T6">use</text:span><text:span text:style-name="T13"> </text:span><text:span text:style-name="T6">entity</text:span><text:span text:style-name="T13"> </text:span><text:span text:style-name="T22">work</text:span><text:span text:style-name="T13">.</text:span><text:span text:style-name="T22">gle</text:span><text:span text:style-name="T13">(</text:span><text:span text:style-name="T22">rtl1</text:span><text:span text:style-name="T13">);</text:span></text:p>
      <text:p text:style-name="P15"><text:span text:style-name="T6">end</text:span><text:span text:style-name="T13"> </text:span><text:span text:style-name="T6">for</text:span><text:span text:style-name="T13">; <text:s text:c="7"/></text:span></text:p>
      <text:p text:style-name="P15"><text:span text:style-name="T6">for</text:span><text:span text:style-name="T13"> gle5 : </text:span><text:span text:style-name="T22">gle</text:span></text:p>
      <text:p text:style-name="P15"><text:span text:style-name="T6">use</text:span><text:span text:style-name="T13"> </text:span><text:span text:style-name="T6">entity</text:span><text:span text:style-name="T13"> </text:span><text:span text:style-name="T22">work</text:span><text:span text:style-name="T13">.</text:span><text:span text:style-name="T22">gle</text:span><text:span text:style-name="T13">(</text:span><text:span text:style-name="T22">rtl1</text:span><text:span text:style-name="T13">);</text:span></text:p>
      <text:p text:style-name="P15"><text:span text:style-name="T6">end</text:span><text:span text:style-name="T13"> </text:span><text:span text:style-name="T6">for</text:span><text:span text:style-name="T13">; <text:s text:c="7"/></text:span></text:p>
      <text:p text:style-name="P15"><text:span text:style-name="T6">for</text:span><text:span text:style-name="T13"> gle6 : </text:span><text:span text:style-name="T22">gle</text:span></text:p>
      <text:p text:style-name="P15"><text:span text:style-name="T6">use</text:span><text:span text:style-name="T13"> </text:span><text:span text:style-name="T6">entity</text:span><text:span text:style-name="T13"> </text:span><text:span text:style-name="T22">work</text:span><text:span text:style-name="T13">.</text:span><text:span text:style-name="T22">gle</text:span><text:span text:style-name="T13">(</text:span><text:span text:style-name="T22">rtl1</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configuration</text:span><text:span text:style-name="T13">;</text:span></text:p>
      <text:p text:style-name="P16"/>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rpadder</text:span><text:span text:style-name="T13"> </text:span><text:span text:style-name="T6">is</text:span><text:span text:style-name="T13"> </text:span></text:p>
      <text:p text:style-name="P15"><text:span text:style-name="T13"><text:s text:c="4"/></text:span><text:span text:style-name="T6">generic</text:span><text:span text:style-name="T13">(</text:span><text:span text:style-name="T7">n</text:span><text:span text:style-name="T13"> : </text:span><text:span text:style-name="T28">natural</text:span><text:span text:style-name="T13"> := </text:span><text:span text:style-name="T31">8</text:span><text:span text:style-name="T13">);</text:span></text:p>
      <text:p text:style-name="P15"><text:span text:style-name="T13"><text:s text:c="4"/></text:span><text:span text:style-name="T6">port</text:span><text:span text:style-name="T13">( <text:s text:c="3"/></text:span><text:span text:style-name="T26">a</text:span><text:span text:style-name="T13">, </text:span><text:span text:style-name="T26">b</text:span><text:span text:style-name="T13"> :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3"/></text:span><text:span text:style-name="T26">ci</text:span><text:span text:style-name="T13"> : </text:span><text:span text:style-name="T6">in</text:span><text:span text:style-name="T13"> </text:span><text:span text:style-name="T28">std_logic</text:span><text:span text:style-name="T13"> := </text:span><text:span text:style-name="T34">'0'</text:span><text:span text:style-name="T13">;</text:span></text:p>
      <text:p text:style-name="P15"><text:span text:style-name="T13"><text:s text:c="13"/></text:span><text:span text:style-name="T26">s</text:span><text:span text:style-name="T13"> :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3"/></text:span><text:span text:style-name="T26">c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rpadder</text:span><text:span text:style-name="T13">;</text:span></text:p>
      <text:p text:style-name="P16"/>
      <text:p text:style-name="P15"><text:span text:style-name="T6">architecture</text:span><text:span text:style-name="T13"> </text:span><text:span text:style-name="T22">rtl1</text:span><text:span text:style-name="T13"> </text:span><text:span text:style-name="T6">of</text:span><text:span text:style-name="T13"> </text:span><text:span text:style-name="T22">rpadder</text:span><text:span text:style-name="T13"> </text:span><text:span text:style-name="T6">is</text:span></text:p>
      <text:p text:style-name="P15"><text:span text:style-name="T13"><text:s text:c="4"/></text:span><text:span text:style-name="T6">component</text:span><text:span text:style-name="T13"> </text:span><text:span text:style-name="T22">fa</text:span></text:p>
      <text:p text:style-name="P15"><text:span text:style-name="T13"><text:s text:c="4"/></text:span><text:span text:style-name="T6">port</text:span><text:span text:style-name="T13">( <text:s text:c="3"/></text:span><text:span text:style-name="T26">a</text:span><text:span text:style-name="T13">, </text:span><text:span text:style-name="T26">b</text:span><text:span text:style-name="T13">, </text:span><text:span text:style-name="T26">ci</text:span><text:span text:style-name="T13"> : </text:span><text:span text:style-name="T6">in</text:span><text:span text:style-name="T13"> </text:span><text:span text:style-name="T28">std_logic</text:span><text:span text:style-name="T13">;</text:span></text:p>
      <text:p text:style-name="P15"><text:span text:style-name="T13"><text:s text:c="13"/></text:span><text:span text:style-name="T26">s</text:span><text:span text:style-name="T13">, </text:span><text:span text:style-name="T26">c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5"><text:span text:style-name="T6">signal</text:span><text:span text:style-name="T13"> </text:span><text:span text:style-name="T39">c</text:span><text:span text:style-name="T13"> : </text:span><text:span text:style-name="T28">std_logic_vector</text:span><text:span text:style-name="T13">(</text:span><text:span text:style-name="T26">a</text:span><text:span text:style-name="T33">'length</text:span><text:span text:style-name="T14">-</text:span><text:span text:style-name="T31">1</text:span><text:span text:style-name="T13"> </text:span><text:span text:style-name="T6">downto</text:span><text:span text:style-name="T13"> </text:span><text:span text:style-name="T31">1</text:span><text:span text:style-name="T13">);</text:span></text:p>
      <text:p text:style-name="P16"/>
      <text:p text:style-name="P23">begin</text:p>
      <text:p text:style-name="P15"><text:span text:style-name="T13"><text:s text:c="4"/></text:span><text:span text:style-name="T38">gen</text:span><text:span text:style-name="T13"> : </text:span><text:span text:style-name="T6">for</text:span><text:span text:style-name="T13"> </text:span><text:span text:style-name="T30">j</text:span><text:span text:style-name="T13"> </text:span><text:span text:style-name="T6">in</text:span><text:span text:style-name="T13"> </text:span><text:span text:style-name="T26">a</text:span><text:span text:style-name="T33">'range</text:span><text:span text:style-name="T13"> </text:span><text:span text:style-name="T6">generate</text:span></text:p>
      <text:p text:style-name="P15"><text:span text:style-name="T13"><text:s text:c="8"/></text:span><text:span text:style-name="T38">genlsb</text:span><text:span text:style-name="T13"> : </text:span><text:span text:style-name="T6">if</text:span><text:span text:style-name="T13"> </text:span><text:span text:style-name="T30">j</text:span><text:span text:style-name="T13"> = </text:span><text:span text:style-name="T31">0</text:span><text:span text:style-name="T13"> </text:span><text:span text:style-name="T6">generate</text:span></text:p>
      <text:p text:style-name="P15"><text:span text:style-name="T13"><text:s text:c="12"/></text:span><text:span text:style-name="T38">fa0</text:span><text:span text:style-name="T13"> : </text:span><text:span text:style-name="T22">fa</text:span><text:span text:style-name="T13"> </text:span><text:span text:style-name="T6">port</text:span><text:span text:style-name="T13"> </text:span><text:span text:style-name="T6">map</text:span><text:span text:style-name="T13">(</text:span><text:span text:style-name="T26">a</text:span><text:span text:style-name="T13"> =&gt; </text:span><text:span text:style-name="T26">a</text:span><text:span text:style-name="T13">(</text:span><text:span text:style-name="T31">0</text:span><text:span text:style-name="T13">), </text:span><text:span text:style-name="T26">b</text:span><text:span text:style-name="T13"> =&gt; </text:span><text:span text:style-name="T26">b</text:span><text:span text:style-name="T13">(</text:span><text:span text:style-name="T31">0</text:span><text:span text:style-name="T13">),</text:span></text:p>
      <text:p text:style-name="P15"><text:span text:style-name="T13"><text:s text:c="30"/></text:span><text:span text:style-name="T26">ci</text:span><text:span text:style-name="T13"> =&gt; </text:span><text:span text:style-name="T26">ci</text:span><text:span text:style-name="T13">, </text:span><text:span text:style-name="T26">s</text:span><text:span text:style-name="T13"> =&gt; </text:span><text:span text:style-name="T26">s</text:span><text:span text:style-name="T13">(</text:span><text:span text:style-name="T31">0</text:span><text:span text:style-name="T13">), </text:span><text:span text:style-name="T26">cout</text:span><text:span text:style-name="T13"> =&gt; </text:span><text:span text:style-name="T39">c</text:span><text:span text:style-name="T13">(</text:span><text:span text:style-name="T31">1</text:span><text:span text:style-name="T13">));</text:span></text:p>
      <text:p text:style-name="P15"><text:span text:style-name="T13"><text:s text:c="8"/></text:span><text:span text:style-name="T6">end</text:span><text:span text:style-name="T13"> </text:span><text:span text:style-name="T6">generate</text:span><text:span text:style-name="T13">;</text:span></text:p>
      <text:p text:style-name="P15"><text:soft-page-break/><text:span text:style-name="T13"><text:s text:c="8"/></text:span><text:span text:style-name="T38">genmid</text:span><text:span text:style-name="T13"> : </text:span><text:span text:style-name="T6">if</text:span><text:span text:style-name="T13"> </text:span><text:span text:style-name="T30">j</text:span><text:span text:style-name="T13"> /= </text:span><text:span text:style-name="T31">0</text:span><text:span text:style-name="T13"> </text:span><text:span text:style-name="T6">and</text:span><text:span text:style-name="T13"> </text:span><text:span text:style-name="T30">j</text:span><text:span text:style-name="T13"> </text:span><text:span text:style-name="T14">&lt;</text:span><text:span text:style-name="T13"> </text:span><text:span text:style-name="T26">a</text:span><text:span text:style-name="T33">'length</text:span><text:span text:style-name="T14">-</text:span><text:span text:style-name="T31">1</text:span><text:span text:style-name="T13"> </text:span><text:span text:style-name="T6">generate</text:span></text:p>
      <text:p text:style-name="P15"><text:span text:style-name="T13"><text:s text:c="12"/></text:span><text:span text:style-name="T38">fa0</text:span><text:span text:style-name="T13"> : </text:span><text:span text:style-name="T22">fa</text:span><text:span text:style-name="T13"> </text:span><text:span text:style-name="T6">port</text:span><text:span text:style-name="T13"> </text:span><text:span text:style-name="T6">map</text:span><text:span text:style-name="T13">(</text:span><text:span text:style-name="T26">a</text:span><text:span text:style-name="T13"> =&gt; </text:span><text:span text:style-name="T26">a</text:span><text:span text:style-name="T13">(</text:span><text:span text:style-name="T30">j</text:span><text:span text:style-name="T13">), </text:span><text:span text:style-name="T26">b</text:span><text:span text:style-name="T13"> =&gt; </text:span><text:span text:style-name="T26">b</text:span><text:span text:style-name="T13">(</text:span><text:span text:style-name="T30">j</text:span><text:span text:style-name="T13">),</text:span></text:p>
      <text:p text:style-name="P15"><text:span text:style-name="T13"><text:s text:c="30"/></text:span><text:span text:style-name="T26">ci</text:span><text:span text:style-name="T13"> =&gt; </text:span><text:span text:style-name="T39">c</text:span><text:span text:style-name="T13">(</text:span><text:span text:style-name="T30">j</text:span><text:span text:style-name="T13">), </text:span><text:span text:style-name="T26">s</text:span><text:span text:style-name="T13"> =&gt; </text:span><text:span text:style-name="T26">s</text:span><text:span text:style-name="T13">(</text:span><text:span text:style-name="T30">j</text:span><text:span text:style-name="T13">), </text:span><text:span text:style-name="T26">cout</text:span><text:span text:style-name="T13"> =&gt; </text:span><text:span text:style-name="T39">c</text:span><text:span text:style-name="T13">(</text:span><text:span text:style-name="T30">j</text:span><text:span text:style-name="T13"> </text:span><text:span text:style-name="T14">+</text:span><text:span text:style-name="T31">1</text:span><text:span text:style-name="T13">));</text:span></text:p>
      <text:p text:style-name="P15"><text:span text:style-name="T13"><text:s text:c="8"/></text:span><text:span text:style-name="T6">end</text:span><text:span text:style-name="T13"> </text:span><text:span text:style-name="T6">generate</text:span><text:span text:style-name="T13">;</text:span></text:p>
      <text:p text:style-name="P15"><text:span text:style-name="T13"><text:s text:c="8"/></text:span><text:span text:style-name="T38">genmsb</text:span><text:span text:style-name="T13"> : </text:span><text:span text:style-name="T6">if</text:span><text:span text:style-name="T13"> </text:span><text:span text:style-name="T30">j</text:span><text:span text:style-name="T13"> = </text:span><text:span text:style-name="T26">a</text:span><text:span text:style-name="T33">'length</text:span><text:span text:style-name="T14">-</text:span><text:span text:style-name="T31">1</text:span><text:span text:style-name="T13"> </text:span><text:span text:style-name="T6">generate</text:span></text:p>
      <text:p text:style-name="P15"><text:span text:style-name="T13"><text:s text:c="12"/></text:span><text:span text:style-name="T38">fa0</text:span><text:span text:style-name="T13"> : </text:span><text:span text:style-name="T22">fa</text:span><text:span text:style-name="T13"> </text:span><text:span text:style-name="T6">port</text:span><text:span text:style-name="T13"> </text:span><text:span text:style-name="T6">map</text:span><text:span text:style-name="T13">(</text:span><text:span text:style-name="T26">a</text:span><text:span text:style-name="T13"> =&gt; </text:span><text:span text:style-name="T26">a</text:span><text:span text:style-name="T13">(</text:span><text:span text:style-name="T30">j</text:span><text:span text:style-name="T13">), </text:span><text:span text:style-name="T26">b</text:span><text:span text:style-name="T13"> =&gt; </text:span><text:span text:style-name="T26">b</text:span><text:span text:style-name="T13">(</text:span><text:span text:style-name="T30">j</text:span><text:span text:style-name="T13">),</text:span></text:p>
      <text:p text:style-name="P15"><text:span text:style-name="T13"><text:s text:c="30"/></text:span><text:span text:style-name="T26">ci</text:span><text:span text:style-name="T13"> =&gt; </text:span><text:span text:style-name="T39">c</text:span><text:span text:style-name="T13">(</text:span><text:span text:style-name="T30">j</text:span><text:span text:style-name="T13">), </text:span><text:span text:style-name="T26">s</text:span><text:span text:style-name="T13"> =&gt; </text:span><text:span text:style-name="T26">s</text:span><text:span text:style-name="T13">(</text:span><text:span text:style-name="T30">j</text:span><text:span text:style-name="T13">), </text:span><text:span text:style-name="T26">cout</text:span><text:span text:style-name="T13"> =&gt; </text:span><text:span text:style-name="T26">cout</text:span><text:span text:style-name="T13">);</text:span></text:p>
      <text:p text:style-name="P15"><text:span text:style-name="T13"><text:s text:c="8"/></text:span><text:span text:style-name="T6">end</text:span><text:span text:style-name="T13"> </text:span><text:span text:style-name="T6">generate</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5"><text:span text:style-name="T6">end</text:span><text:span text:style-name="T13"> </text:span><text:span text:style-name="T22">rtl1</text:span><text:span text:style-name="T13">;</text:span></text:p>
      <text:p text:style-name="P16"/>
      <text:p text:style-name="P24">--architecture rtl2 of rpadder is</text:p>
      <text:p text:style-name="P24">-- <text:s text:c="3"/>procedure fadder(</text:p>
      <text:p text:style-name="P24">-- <text:s text:c="7"/>signal <text:s text:c="3"/>a, b, ci : in std_logic;</text:p>
      <text:p text:style-name="P24">-- <text:s text:c="7"/>signal <text:s text:c="2"/>s, cout : out std_logic) is</text:p>
      <text:p text:style-name="P24">-- <text:s text:c="3"/>begin</text:p>
      <text:p text:style-name="P24">-- <text:s text:c="7"/>s &lt;= a xor b xor ci;</text:p>
      <text:p text:style-name="P24">-- <text:s text:c="7"/>cout &lt;= ((a or b) and ci) or (a and b);</text:p>
      <text:p text:style-name="P24">-- <text:s text:c="3"/>end fadder;</text:p>
      <text:p text:style-name="P24">-- <text:s text:c="3"/>signal c : std_logic_vector(a'length-1 downto 1);</text:p>
      <text:p text:style-name="P24">-- <text:s text:c="3"/></text:p>
      <text:p text:style-name="P24">--begin</text:p>
      <text:p text:style-name="P24">-- <text:s text:c="3"/>gen : for j in a'range generate</text:p>
      <text:p text:style-name="P24">-- <text:s text:c="7"/>genlsb : if j = 0 generate</text:p>
      <text:p text:style-name="P24">-- <text:s text:c="11"/>fadder(a =&gt; a(0), b =&gt; b(0),</text:p>
      <text:p text:style-name="P24">-- <text:s text:c="35"/>ci =&gt; ci, s =&gt; s(0), cout =&gt; c(1));</text:p>
      <text:p text:style-name="P24">-- <text:s text:c="7"/>end generate;</text:p>
      <text:p text:style-name="P24">-- <text:s text:c="7"/>genmid : if j /= 0 and j &lt; a'length-1 generate</text:p>
      <text:p text:style-name="P24">-- <text:s text:c="11"/>fadder(a =&gt; a(j), b =&gt; b(j),</text:p>
      <text:p text:style-name="P24">-- <text:s text:c="35"/>ci =&gt; c(j), s =&gt; s(j), cout =&gt; c(j +1));</text:p>
      <text:p text:style-name="P24">-- <text:s text:c="7"/>end generate;</text:p>
      <text:p text:style-name="P24">-- <text:s text:c="7"/>genmsb : if j = a'length-1 generate</text:p>
      <text:p text:style-name="P24">-- <text:s text:c="11"/>fadder(a =&gt; a(j), b =&gt; b(j),</text:p>
      <text:p text:style-name="P24">-- <text:s text:c="35"/>ci =&gt; c(j), s =&gt; s(j), cout =&gt; cout);</text:p>
      <text:p text:style-name="P24">-- <text:s text:c="7"/>end generate;</text:p>
      <text:p text:style-name="P24">-- <text:s text:c="3"/>end generate;</text:p>
      <text:p text:style-name="P24">--end rtl2;</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arith</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tbrpadder</text:span><text:span text:style-name="T13"> </text:span><text:span text:style-name="T6">is</text:span><text:span text:style-name="T13"> </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rpadder</text:span><text:span text:style-name="T13"> </text:span><text:span text:style-name="T6">is</text:span></text:p>
      <text:p text:style-name="P16"/>
      <text:p text:style-name="P15"><text:span text:style-name="T13"><text:s text:c="4"/></text:span><text:span text:style-name="T6">constant</text:span><text:span text:style-name="T13"> </text:span><text:span text:style-name="T7">n</text:span><text:span text:style-name="T13"> : </text:span><text:span text:style-name="T28">natural</text:span><text:span text:style-name="T13"> := </text:span><text:span text:style-name="T31">8</text:span><text:span text:style-name="T13">;</text:span></text:p>
      <text:p text:style-name="P16"><text:soft-page-break/></text:p>
      <text:p text:style-name="P15"><text:span text:style-name="T13"><text:s text:c="4"/></text:span><text:span text:style-name="T6">component</text:span><text:span text:style-name="T13"> </text:span><text:span text:style-name="T22">rpadder</text:span></text:p>
      <text:p text:style-name="P15"><text:span text:style-name="T13"><text:s text:c="4"/></text:span><text:span text:style-name="T6">port</text:span><text:span text:style-name="T13">( <text:s text:c="3"/></text:span><text:span text:style-name="T26">a</text:span><text:span text:style-name="T13">, </text:span><text:span text:style-name="T26">b</text:span><text:span text:style-name="T13"> :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3"/></text:span><text:span text:style-name="T26">ci</text:span><text:span text:style-name="T13"> : </text:span><text:span text:style-name="T6">in</text:span><text:span text:style-name="T13"> </text:span><text:span text:style-name="T28">std_logic</text:span><text:span text:style-name="T13">;</text:span></text:p>
      <text:p text:style-name="P15"><text:span text:style-name="T13"><text:s text:c="13"/></text:span><text:span text:style-name="T26">s</text:span><text:span text:style-name="T13"> :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13"/></text:span><text:span text:style-name="T26">c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signal</text:span><text:span text:style-name="T13"> </text:span><text:span text:style-name="T39">a</text:span><text:span text:style-name="T13">, </text:span><text:span text:style-name="T39">b</text:span><text:span text:style-name="T13"> :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ci</text:span><text:span text:style-name="T13"> : </text:span><text:span text:style-name="T28">std_logic</text:span><text:span text:style-name="T13">;</text:span></text:p>
      <text:p text:style-name="P15"><text:span text:style-name="T6">signal</text:span><text:span text:style-name="T13"> </text:span><text:span text:style-name="T39">s</text:span><text:span text:style-name="T13">, </text:span><text:span text:style-name="T39">sc</text:span><text:span text:style-name="T13"> :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cout</text:span><text:span text:style-name="T13"> : </text:span><text:span text:style-name="T28">std_logic</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pan><text:span text:style-name="T31">5</text:span><text:span text:style-name="T13"> </text:span><text:span text:style-name="T7">ns</text:span><text:span text:style-name="T13">;</text:span></text:p>
      <text:p text:style-name="P16"/>
      <text:p text:style-name="P23">begin</text:p>
      <text:p text:style-name="P15"><text:span text:style-name="T13"><text:s text:c="4"/></text:span><text:span text:style-name="T38">p0</text:span><text:span text:style-name="T13">: </text:span><text:span text:style-name="T6">process</text:span></text:p>
      <text:p text:style-name="P15"><text:span text:style-name="T13"><text:s text:c="4"/></text:span><text:span text:style-name="T6">begin</text:span></text:p>
      <text:p text:style-name="P15"><text:span text:style-name="T13"><text:s text:c="8"/></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31">2</text:span><text:span text:style-name="T14">**</text:span><text:span text:style-name="T7">n</text:span><text:span text:style-name="T14">-</text:span><text:span text:style-name="T31">1</text:span><text:span text:style-name="T13"> </text:span><text:span text:style-name="T6">loop</text:span></text:p>
      <text:p text:style-name="P15"><text:span text:style-name="T13"><text:s text:c="12"/></text:span><text:span text:style-name="T39">a</text:span><text:span text:style-name="T13"> &lt;= </text:span><text:span text:style-name="T14">conv_std_logic_vector</text:span><text:span text:style-name="T13">(i,</text:span><text:span text:style-name="T7">n</text:span><text:span text:style-name="T13">);</text:span></text:p>
      <text:p text:style-name="P15"><text:span text:style-name="T13"><text:s text:c="12"/></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31">2</text:span><text:span text:style-name="T14">**</text:span><text:span text:style-name="T7">n</text:span><text:span text:style-name="T14">-</text:span><text:span text:style-name="T31">1</text:span><text:span text:style-name="T13"> </text:span><text:span text:style-name="T6">loop</text:span></text:p>
      <text:p text:style-name="P15"><text:span text:style-name="T13"><text:s text:c="16"/></text:span><text:span text:style-name="T39">b</text:span><text:span text:style-name="T13"> &lt;= </text:span><text:span text:style-name="T14">conv_std_logic_vector</text:span><text:span text:style-name="T13">(j,</text:span><text:span text:style-name="T7">n</text:span><text:span text:style-name="T13">);</text:span></text:p>
      <text:p text:style-name="P15"><text:span text:style-name="T13"><text:s text:c="16"/></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12"/></text:span><text:span text:style-name="T6">end</text:span><text:span text:style-name="T13"> </text:span><text:span text:style-name="T6">loop</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sc</text:span><text:span text:style-name="T13"> &lt;= </text:span><text:span text:style-name="T39">a</text:span><text:span text:style-name="T14">+</text:span><text:span text:style-name="T39">b</text:span><text:span text:style-name="T13">;</text:span></text:p>
      <text:p text:style-name="P16"/>
      <text:p text:style-name="P15"><text:span text:style-name="T13"><text:s text:c="4"/></text:span><text:span text:style-name="T38">rpadder1</text:span><text:span text:style-name="T13"> : </text:span><text:span text:style-name="T22">rpadder</text:span></text:p>
      <text:p text:style-name="P15"><text:span text:style-name="T13"><text:s text:c="8"/></text:span><text:span text:style-name="T6">port</text:span><text:span text:style-name="T13"> </text:span><text:span text:style-name="T6">map</text:span><text:span text:style-name="T13"> (</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ci</text:span><text:span text:style-name="T13"> =&gt; </text:span><text:span text:style-name="T39">ci</text:span><text:span text:style-name="T13">, </text:span><text:span text:style-name="T26">s</text:span><text:span text:style-name="T13"> =&gt; </text:span><text:span text:style-name="T39">s</text:span><text:span text:style-name="T13">, </text:span><text:span text:style-name="T26">cout</text:span><text:span text:style-name="T13"> =&gt; </text:span><text:span text:style-name="T39">cout</text:span><text:span text:style-name="T13">);</text:span></text:p>
      <text:p text:style-name="P16"/>
      <text:p text:style-name="P15"><text:span text:style-name="T6">end</text:span><text:span text:style-name="T13"> </text:span><text:span text:style-name="T22">beh</text:span><text:span text:style-name="T13">;</text:span></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fapg</text:span><text:span text:style-name="T13"> </text:span><text:span text:style-name="T6">is</text:span><text:span text:style-name="T13"> </text:span><text:span text:style-name="T6">port</text:span><text:span text:style-name="T13">(</text:span></text:p>
      <text:p text:style-name="P15"><text:span text:style-name="T13"><text:s text:c="4"/></text:span><text:span text:style-name="T26">a</text:span><text:span text:style-name="T13">, </text:span><text:span text:style-name="T26">b</text:span><text:span text:style-name="T13">, </text:span><text:span text:style-name="T26">ci</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s</text:span><text:span text:style-name="T13">, </text:span><text:span text:style-name="T26">p</text:span><text:span text:style-name="T13">, </text:span><text:span text:style-name="T26">g</text:span><text:span text:style-name="T13"> <text:s text:c="3"/>: </text:span><text:span text:style-name="T6">out</text:span><text:span text:style-name="T13"> </text:span><text:span text:style-name="T28">std_logic</text:span><text:span text:style-name="T13">);</text:span></text:p>
      <text:p text:style-name="P15"><text:span text:style-name="T6">end</text:span><text:span text:style-name="T13"> </text:span><text:span text:style-name="T22">fapg</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fapg</text:span><text:span text:style-name="T13"> </text:span><text:span text:style-name="T6">is</text:span></text:p>
      <text:p text:style-name="P15"><text:span text:style-name="T13"><text:s text:c="4"/></text:span><text:span text:style-name="T6">signal</text:span><text:span text:style-name="T13"> </text:span><text:span text:style-name="T39">gsig</text:span><text:span text:style-name="T13">, </text:span><text:span text:style-name="T39">psig</text:span><text:span text:style-name="T13"> : </text:span><text:span text:style-name="T28">std_logic</text:span><text:span text:style-name="T13">;</text:span></text:p>
      <text:p text:style-name="P23">begin</text:p>
      <text:p text:style-name="P15"><text:span text:style-name="T13"><text:s text:c="4"/></text:span><text:span text:style-name="T39">gsig</text:span><text:span text:style-name="T13"> &lt;= </text:span><text:span text:style-name="T26">a</text:span><text:span text:style-name="T13"> </text:span><text:span text:style-name="T6">and</text:span><text:span text:style-name="T13"> </text:span><text:span text:style-name="T26">b</text:span><text:span text:style-name="T13">;</text:span></text:p>
      <text:p text:style-name="P15"><text:span text:style-name="T13"><text:s text:c="4"/></text:span><text:span text:style-name="T39">psig</text:span><text:span text:style-name="T13"> &lt;= </text:span><text:span text:style-name="T26">a</text:span><text:span text:style-name="T13"> </text:span><text:span text:style-name="T6">xor</text:span><text:span text:style-name="T13"> </text:span><text:span text:style-name="T26">b</text:span><text:span text:style-name="T13">;</text:span></text:p>
      <text:p text:style-name="P15"><text:span text:style-name="T13"><text:s text:c="4"/></text:span><text:span text:style-name="T26">s</text:span><text:span text:style-name="T13"> &lt;= </text:span><text:span text:style-name="T39">psig</text:span><text:span text:style-name="T13"> </text:span><text:span text:style-name="T6">xor</text:span><text:span text:style-name="T13"> </text:span><text:span text:style-name="T26">ci</text:span><text:span text:style-name="T13">;</text:span></text:p>
      <text:p text:style-name="P15"><text:span text:style-name="T13"><text:s text:c="4"/></text:span><text:span text:style-name="T26">g</text:span><text:span text:style-name="T13"> &lt;= </text:span><text:span text:style-name="T39">gsig</text:span><text:span text:style-name="T13">;</text:span></text:p>
      <text:p text:style-name="P15"><text:soft-page-break/><text:span text:style-name="T13"><text:s text:c="4"/></text:span><text:span text:style-name="T26">p</text:span><text:span text:style-name="T13"> &lt;= </text:span><text:span text:style-name="T39">psig</text:span><text:span text:style-name="T13">;</text:span></text:p>
      <text:p text:style-name="P15"><text:span text:style-name="T6">end</text:span><text:span text:style-name="T13"> </text:span><text:span text:style-name="T22">rtl</text:span><text:span text:style-name="T13">;</text:span></text:p>
      <text:p text:style-name="P16"/>
      <text:p text:style-name="P16"/>
      <text:p text:style-name="P24">----ripple carry adder</text:p>
      <text:p text:style-name="P24">--library ieee;</text:p>
      <text:p text:style-name="P24">--use ieee.std_logic_1164.all;</text:p>
      <text:p text:style-name="P24">--</text:p>
      <text:p text:style-name="P24">--entity fa is </text:p>
      <text:p text:style-name="P24">--generic(n : natural := 3);</text:p>
      <text:p text:style-name="P24">--port(</text:p>
      <text:p text:style-name="P24">-- <text:s text:c="3"/>a, b <text:s text:c="3"/>: <text:s/>in std_logic_vector(n downto 0);</text:p>
      <text:p text:style-name="P24">-- <text:s text:c="3"/>z <text:s text:c="7"/>: out std_logic_vector(n downto 0);</text:p>
      <text:p text:style-name="P24">-- <text:s text:c="3"/>co <text:s text:c="7"/>: out std_logic);</text:p>
      <text:p text:style-name="P24">--end entity;</text:p>
      <text:p text:style-name="P24">--</text:p>
      <text:p text:style-name="P24">--architecture dataflow of fa is</text:p>
      <text:p text:style-name="P24">-- <text:s text:c="3"/>signal carry : std_logic_vector(n +1 downto 0);</text:p>
      <text:p text:style-name="P24">--begin</text:p>
      <text:p text:style-name="P24">-- <text:s text:c="3"/>carry(0) &lt;= '0';</text:p>
      <text:p text:style-name="P24">-- <text:s text:c="3"/></text:p>
      <text:p text:style-name="P24">-- <text:s text:c="3"/>adder : for m in 0 to n generate</text:p>
      <text:p text:style-name="P24">-- <text:s text:c="7"/>carry(m +1) &lt;= (a(m) and b(m)) or (carry(m) and (a(m) xor b(m)));</text:p>
      <text:p text:style-name="P24">-- <text:s text:c="7"/>z(m) <text:s/>&lt;= a(m) xor b(m) xor carry(m);</text:p>
      <text:p text:style-name="P24">-- <text:s text:c="3"/>end generate;</text:p>
      <text:p text:style-name="P24">-- <text:s text:c="3"/></text:p>
      <text:p text:style-name="P24">-- <text:s text:c="3"/>co &lt;= carry(n +1);</text:p>
      <text:p text:style-name="P24">-- <text:s text:c="3"/></text:p>
      <text:p text:style-name="P24">--end dataflow;</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clau</text:span><text:span text:style-name="T13"> </text:span><text:span text:style-name="T6">is</text:span><text:span text:style-name="T13"> </text:span><text:span text:style-name="T6">port</text:span><text:span text:style-name="T13">(</text:span></text:p>
      <text:p text:style-name="P15"><text:span text:style-name="T13"><text:s text:c="4"/></text:span><text:span text:style-name="T26">p</text:span><text:span text:style-name="T13">, </text:span><text:span text:style-name="T26">g</text:span><text:span text:style-name="T13"> : </text:span><text:span text:style-name="T6">in</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ci</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co</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4"/></text:span><text:span text:style-name="T26">gp</text:span><text:span text:style-name="T13">, </text:span><text:span text:style-name="T26">gg</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clau</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clau</text:span><text:span text:style-name="T13"> </text:span><text:span text:style-name="T6">is</text:span></text:p>
      <text:p text:style-name="P23">begin</text:p>
      <text:p text:style-name="P15"><text:span text:style-name="T13"><text:s text:c="4"/></text:span><text:span text:style-name="T26">co</text:span><text:span text:style-name="T13">(</text:span><text:span text:style-name="T31">0</text:span><text:span text:style-name="T13">) &lt;= </text:span><text:span text:style-name="T26">ci</text:span><text:span text:style-name="T13">;</text:span></text:p>
      <text:p text:style-name="P15"><text:span text:style-name="T13"><text:s text:c="4"/></text:span><text:span text:style-name="T26">co</text:span><text:span text:style-name="T13">(</text:span><text:span text:style-name="T31">1</text:span><text:span text:style-name="T13">) &lt;= (</text:span><text:span text:style-name="T26">ci</text:span><text:span text:style-name="T13"> </text:span><text:span text:style-name="T6">and</text:span><text:span text:style-name="T13"> </text:span><text:span text:style-name="T26">p</text:span><text:span text:style-name="T13">(</text:span><text:span text:style-name="T31">0</text:span><text:span text:style-name="T13">)) </text:span><text:span text:style-name="T6">or</text:span><text:span text:style-name="T13"> </text:span><text:span text:style-name="T26">g</text:span><text:span text:style-name="T13">(</text:span><text:span text:style-name="T31">0</text:span><text:span text:style-name="T13">);</text:span></text:p>
      <text:p text:style-name="P15"><text:span text:style-name="T13"><text:s text:c="4"/></text:span><text:span text:style-name="T26">co</text:span><text:span text:style-name="T13">(</text:span><text:span text:style-name="T31">2</text:span><text:span text:style-name="T13">) &lt;= (</text:span><text:span text:style-name="T26">ci</text:span><text:span text:style-name="T13"> </text:span><text:span text:style-name="T6">and</text:span><text:span text:style-name="T13"> </text:span><text:span text:style-name="T26">p</text:span><text:span text:style-name="T13">(</text:span><text:span text:style-name="T31">0</text:span><text:span text:style-name="T13">) </text:span><text:span text:style-name="T6">and</text:span><text:span text:style-name="T13"> </text:span><text:span text:style-name="T26">p</text:span><text:span text:style-name="T13">(</text:span><text:span text:style-name="T31">1</text:span><text:span text:style-name="T13">)) </text:span><text:span text:style-name="T6">or</text:span><text:span text:style-name="T13"> (</text:span><text:span text:style-name="T26">g</text:span><text:span text:style-name="T13">(</text:span><text:span text:style-name="T31">0</text:span><text:span text:style-name="T13">) </text:span><text:span text:style-name="T6">and</text:span><text:span text:style-name="T13"> </text:span><text:span text:style-name="T26">p</text:span><text:span text:style-name="T13">(</text:span><text:span text:style-name="T31">1</text:span><text:span text:style-name="T13">)) </text:span><text:span text:style-name="T6">or</text:span><text:span text:style-name="T13"> </text:span><text:span text:style-name="T26">g</text:span><text:span text:style-name="T13">(</text:span><text:span text:style-name="T31">1</text:span><text:span text:style-name="T13">);</text:span></text:p>
      <text:p text:style-name="P15"><text:span text:style-name="T13"><text:s text:c="4"/></text:span><text:span text:style-name="T26">co</text:span><text:span text:style-name="T13">(</text:span><text:span text:style-name="T31">3</text:span><text:span text:style-name="T13">) &lt;= (</text:span><text:span text:style-name="T26">ci</text:span><text:span text:style-name="T13"> </text:span><text:span text:style-name="T6">and</text:span><text:span text:style-name="T13"> </text:span><text:span text:style-name="T26">p</text:span><text:span text:style-name="T13">(</text:span><text:span text:style-name="T31">0</text:span><text:span text:style-name="T13">) </text:span><text:span text:style-name="T6">and</text:span><text:span text:style-name="T13"> </text:span><text:span text:style-name="T26">p</text:span><text:span text:style-name="T13">(</text:span><text:span text:style-name="T31">1</text:span><text:span text:style-name="T13">) </text:span><text:span text:style-name="T6">and</text:span><text:span text:style-name="T13"> </text:span><text:span text:style-name="T26">p</text:span><text:span text:style-name="T13">(</text:span><text:span text:style-name="T31">2</text:span><text:span text:style-name="T13">)) </text:span><text:span text:style-name="T6">or</text:span><text:span text:style-name="T13"> (</text:span><text:span text:style-name="T26">g</text:span><text:span text:style-name="T13">(</text:span><text:span text:style-name="T31">0</text:span><text:span text:style-name="T13">) </text:span><text:span text:style-name="T6">and</text:span><text:span text:style-name="T13"> </text:span><text:span text:style-name="T26">p</text:span><text:span text:style-name="T13">(</text:span><text:span text:style-name="T31">1</text:span><text:span text:style-name="T13">) </text:span><text:span text:style-name="T6">and</text:span><text:span text:style-name="T13"> </text:span><text:span text:style-name="T26">p</text:span><text:span text:style-name="T13">(</text:span><text:span text:style-name="T31">2</text:span><text:span text:style-name="T13">)) </text:span><text:span text:style-name="T6">or</text:span><text:span text:style-name="T13"> (</text:span><text:span text:style-name="T26">g</text:span><text:span text:style-name="T13">(</text:span><text:span text:style-name="T31">1</text:span><text:span text:style-name="T13">) </text:span><text:span text:style-name="T6">and</text:span><text:span text:style-name="T13"> </text:span><text:span text:style-name="T26">p</text:span><text:span text:style-name="T13">(</text:span><text:span text:style-name="T31">2</text:span><text:span text:style-name="T13">)) </text:span><text:span text:style-name="T6">or</text:span><text:span text:style-name="T13"> </text:span><text:span text:style-name="T26">g</text:span><text:span text:style-name="T13">(</text:span><text:span text:style-name="T31">2</text:span><text:span text:style-name="T13">);</text:span></text:p>
      <text:p text:style-name="P16"/>
      <text:p text:style-name="P15"><text:span text:style-name="T13"><text:s text:c="4"/></text:span><text:span text:style-name="T26">gg</text:span><text:span text:style-name="T13"> <text:s text:c="7"/>&lt;= (</text:span><text:span text:style-name="T26">g</text:span><text:span text:style-name="T13">(</text:span><text:span text:style-name="T31">0</text:span><text:span text:style-name="T13">) </text:span><text:span text:style-name="T6">and</text:span><text:span text:style-name="T13"> </text:span><text:span text:style-name="T26">p</text:span><text:span text:style-name="T13">(</text:span><text:span text:style-name="T31">1</text:span><text:span text:style-name="T13">) </text:span><text:span text:style-name="T6">and</text:span><text:span text:style-name="T13"> </text:span><text:span text:style-name="T26">p</text:span><text:span text:style-name="T13">(</text:span><text:span text:style-name="T31">2</text:span><text:span text:style-name="T13">) </text:span><text:span text:style-name="T6">and</text:span><text:span text:style-name="T13"> </text:span><text:span text:style-name="T26">p</text:span><text:span text:style-name="T13">(</text:span><text:span text:style-name="T31">3</text:span><text:span text:style-name="T13">)) </text:span><text:span text:style-name="T6">or</text:span><text:span text:style-name="T13"> (</text:span><text:span text:style-name="T26">g</text:span><text:span text:style-name="T13">(</text:span><text:span text:style-name="T31">1</text:span><text:span text:style-name="T13">) </text:span><text:span text:style-name="T6">and</text:span><text:span text:style-name="T13"> </text:span><text:span text:style-name="T26">p</text:span><text:span text:style-name="T13">(</text:span><text:span text:style-name="T31">2</text:span><text:span text:style-name="T13">) </text:span><text:span text:style-name="T6">and</text:span><text:span text:style-name="T13"> </text:span><text:span text:style-name="T26">p</text:span><text:span text:style-name="T13">(</text:span><text:span text:style-name="T31">3</text:span><text:span text:style-name="T13">)) </text:span><text:span text:style-name="T6">or</text:span><text:span text:style-name="T13"> (</text:span><text:span text:style-name="T26">g</text:span><text:span text:style-name="T13">(</text:span><text:span text:style-name="T31">2</text:span><text:span text:style-name="T13">) </text:span><text:span text:style-name="T6">and</text:span><text:span text:style-name="T13"> </text:span><text:span text:style-name="T26">p</text:span><text:span text:style-name="T13">(</text:span><text:span text:style-name="T31">3</text:span><text:span text:style-name="T13">)) </text:span><text:span text:style-name="T6">or</text:span><text:span text:style-name="T13"> </text:span><text:span text:style-name="T26">g</text:span><text:span text:style-name="T13">(</text:span><text:span text:style-name="T31">3</text:span><text:span text:style-name="T13">);</text:span></text:p>
      <text:p text:style-name="P15"><text:span text:style-name="T13"><text:s text:c="4"/></text:span><text:span text:style-name="T26">gp</text:span><text:span text:style-name="T13"> <text:s text:c="7"/>&lt;= </text:span><text:span text:style-name="T26">p</text:span><text:span text:style-name="T13">(</text:span><text:span text:style-name="T31">3</text:span><text:span text:style-name="T13">) </text:span><text:span text:style-name="T6">and</text:span><text:span text:style-name="T13"> </text:span><text:span text:style-name="T26">p</text:span><text:span text:style-name="T13">(</text:span><text:span text:style-name="T31">2</text:span><text:span text:style-name="T13">) </text:span><text:span text:style-name="T6">and</text:span><text:span text:style-name="T13"> </text:span><text:span text:style-name="T26">p</text:span><text:span text:style-name="T13">(</text:span><text:span text:style-name="T31">1</text:span><text:span text:style-name="T13">) </text:span><text:span text:style-name="T6">and</text:span><text:span text:style-name="T13"> </text:span><text:span text:style-name="T26">p</text:span><text:span text:style-name="T13">(</text:span><text:span text:style-name="T31">0</text:span><text:span text:style-name="T13">);</text:span></text:p>
      <text:p text:style-name="P15"><text:soft-page-break/><text:span text:style-name="T6">end</text:span><text:span text:style-name="T13"> </text:span><text:span text:style-name="T22">rtl</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cla16</text:span><text:span text:style-name="T13"> </text:span><text:span text:style-name="T6">is</text:span><text:span text:style-name="T13"> </text:span><text:span text:style-name="T6">port</text:span><text:span text:style-name="T13">(</text:span></text:p>
      <text:p text:style-name="P15"><text:span text:style-name="T13"><text:s text:c="4"/></text:span><text:span text:style-name="T26">a</text:span><text:span text:style-name="T13">, </text:span><text:span text:style-name="T26">b</text:span><text:span text:style-name="T13"> : </text:span><text:span text:style-name="T6">in</text:span><text:span text:style-name="T13"> </text:span><text:span text:style-name="T28">std_logic_vector</text:span><text:span text:style-name="T13">(</text:span><text:span text:style-name="T31">15</text:span><text:span text:style-name="T13"> </text:span><text:span text:style-name="T6">downto</text:span><text:span text:style-name="T13"> </text:span><text:span text:style-name="T31">0</text:span><text:span text:style-name="T13">);</text:span></text:p>
      <text:p text:style-name="P15"><text:span text:style-name="T13"><text:s text:c="4"/></text:span><text:span text:style-name="T26">ci</text:span><text:span text:style-name="T13"> <text:s text:c="2"/>: </text:span><text:span text:style-name="T6">in</text:span><text:span text:style-name="T13"> </text:span><text:span text:style-name="T28">std_logic</text:span><text:span text:style-name="T13">;</text:span></text:p>
      <text:p text:style-name="P15"><text:span text:style-name="T13"><text:s text:c="4"/></text:span><text:span text:style-name="T26">s</text:span><text:span text:style-name="T13"> <text:s text:c="3"/>: </text:span><text:span text:style-name="T6">out</text:span><text:span text:style-name="T13"> </text:span><text:span text:style-name="T28">std_logic_vector</text:span><text:span text:style-name="T13">(</text:span><text:span text:style-name="T31">15</text:span><text:span text:style-name="T13"> </text:span><text:span text:style-name="T6">downto</text:span><text:span text:style-name="T13"> </text:span><text:span text:style-name="T31">0</text:span><text:span text:style-name="T13">);</text:span></text:p>
      <text:p text:style-name="P15"><text:span text:style-name="T13"><text:s text:c="4"/></text:span><text:span text:style-name="T26">co</text:span><text:span text:style-name="T13"> <text:s text:c="2"/>: </text:span><text:span text:style-name="T6">out</text:span><text:span text:style-name="T13"> </text:span><text:span text:style-name="T28">std_logic</text:span><text:span text:style-name="T13">);</text:span></text:p>
      <text:p text:style-name="P15"><text:span text:style-name="T6">end</text:span><text:span text:style-name="T13"> </text:span><text:span text:style-name="T22">cla16</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cla16</text:span><text:span text:style-name="T13"> </text:span><text:span text:style-name="T6">is</text:span></text:p>
      <text:p text:style-name="P15"><text:span text:style-name="T13"><text:s text:c="4"/></text:span><text:span text:style-name="T6">component</text:span><text:span text:style-name="T13"> </text:span><text:span text:style-name="T22">fapg</text:span></text:p>
      <text:p text:style-name="P15"><text:span text:style-name="T13"><text:s text:c="4"/></text:span><text:span text:style-name="T6">port</text:span><text:span text:style-name="T13">( </text:span><text:span text:style-name="T26">a</text:span><text:span text:style-name="T13">, </text:span><text:span text:style-name="T26">b</text:span><text:span text:style-name="T13">, </text:span><text:span text:style-name="T26">ci</text:span><text:span text:style-name="T13"> : </text:span><text:span text:style-name="T6">in</text:span><text:span text:style-name="T13"> </text:span><text:span text:style-name="T28">std_logic</text:span><text:span text:style-name="T13">;</text:span></text:p>
      <text:p text:style-name="P15"><text:span text:style-name="T13"><text:s text:c="10"/></text:span><text:span text:style-name="T26">s</text:span><text:span text:style-name="T13">, </text:span><text:span text:style-name="T26">p</text:span><text:span text:style-name="T13">, </text:span><text:span text:style-name="T26">g</text:span><text:span text:style-name="T13"> <text:s/>: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mponent</text:span><text:span text:style-name="T13"> </text:span><text:span text:style-name="T22">clau</text:span><text:span text:style-name="T13"> </text:span></text:p>
      <text:p text:style-name="P15"><text:span text:style-name="T6">port</text:span><text:span text:style-name="T13">( <text:s text:c="3"/></text:span><text:span text:style-name="T26">p</text:span><text:span text:style-name="T13">, </text:span><text:span text:style-name="T26">g</text:span><text:span text:style-name="T13"> : </text:span><text:span text:style-name="T6">in</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9"/></text:span><text:span text:style-name="T26">ci</text:span><text:span text:style-name="T13"> : </text:span><text:span text:style-name="T6">in</text:span><text:span text:style-name="T13"> </text:span><text:span text:style-name="T28">std_logic</text:span><text:span text:style-name="T13">;</text:span></text:p>
      <text:p text:style-name="P15"><text:span text:style-name="T13"><text:s text:c="9"/></text:span><text:span text:style-name="T26">co</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13"><text:s text:c="9"/></text:span><text:span text:style-name="T26">gp</text:span><text:span text:style-name="T13">, </text:span><text:span text:style-name="T26">gg</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nstant</text:span><text:span text:style-name="T13"> </text:span><text:span text:style-name="T7">n</text:span><text:span text:style-name="T13"> : </text:span><text:span text:style-name="T28">integer</text:span><text:span text:style-name="T13"> := </text:span><text:span text:style-name="T31">4</text:span><text:span text:style-name="T13">; </text:span><text:span text:style-name="T36">-- number of 4 bits</text:span></text:p>
      <text:p text:style-name="P15"><text:span text:style-name="T6">signal</text:span><text:span text:style-name="T13"> </text:span><text:span text:style-name="T39">p</text:span><text:span text:style-name="T13">, </text:span><text:span text:style-name="T39">g</text:span><text:span text:style-name="T13">, </text:span><text:span text:style-name="T39">c</text:span><text:span text:style-name="T13"> : </text:span><text:span text:style-name="T28">std_logic_vector</text:span><text:span text:style-name="T13">(</text:span><text:span text:style-name="T7">n</text:span><text:span text:style-name="T14">*</text:span><text:span text:style-name="T31">4</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gp</text:span><text:span text:style-name="T13">, </text:span><text:span text:style-name="T39">gg</text:span><text:span text:style-name="T13">, </text:span><text:span text:style-name="T39">gc</text:span><text:span text:style-name="T13"> :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8">fagen</text:span><text:span text:style-name="T13"> : </text:span><text:span text:style-name="T6">for</text:span><text:span text:style-name="T13"> </text:span><text:span text:style-name="T30">i</text:span><text:span text:style-name="T13"> </text:span><text:span text:style-name="T6">in</text:span><text:span text:style-name="T13"> </text:span><text:span text:style-name="T31">0</text:span><text:span text:style-name="T13"> </text:span><text:span text:style-name="T6">to</text:span><text:span text:style-name="T13"> </text:span><text:span text:style-name="T7">n</text:span><text:span text:style-name="T14">*</text:span><text:span text:style-name="T31">4</text:span><text:span text:style-name="T14">-</text:span><text:span text:style-name="T31">1</text:span><text:span text:style-name="T13"> </text:span><text:span text:style-name="T6">generate</text:span></text:p>
      <text:p text:style-name="P15"><text:span text:style-name="T13"><text:s text:c="8"/></text:span><text:span text:style-name="T38">fapg0</text:span><text:span text:style-name="T13"> : </text:span><text:span text:style-name="T22">fapg</text:span><text:span text:style-name="T13"> </text:span><text:span text:style-name="T6">port</text:span><text:span text:style-name="T13"> </text:span><text:span text:style-name="T6">map</text:span><text:span text:style-name="T13"> (</text:span><text:span text:style-name="T26">a</text:span><text:span text:style-name="T13"> =&gt; </text:span><text:span text:style-name="T26">a</text:span><text:span text:style-name="T13">(</text:span><text:span text:style-name="T30">i</text:span><text:span text:style-name="T13">), </text:span><text:span text:style-name="T26">b</text:span><text:span text:style-name="T13"> =&gt; </text:span><text:span text:style-name="T26">b</text:span><text:span text:style-name="T13">(</text:span><text:span text:style-name="T30">i</text:span><text:span text:style-name="T13">), </text:span><text:span text:style-name="T26">ci</text:span><text:span text:style-name="T13"> =&gt; </text:span><text:span text:style-name="T39">c</text:span><text:span text:style-name="T13">(</text:span><text:span text:style-name="T30">i</text:span><text:span text:style-name="T13">), </text:span><text:span text:style-name="T26">s</text:span><text:span text:style-name="T13"> =&gt; </text:span><text:span text:style-name="T26">s</text:span><text:span text:style-name="T13">(</text:span><text:span text:style-name="T30">i</text:span><text:span text:style-name="T13">), </text:span><text:span text:style-name="T26">p</text:span><text:span text:style-name="T13"> =&gt; </text:span><text:span text:style-name="T39">p</text:span><text:span text:style-name="T13">(</text:span><text:span text:style-name="T30">i</text:span><text:span text:style-name="T13">), </text:span><text:span text:style-name="T26">g</text:span><text:span text:style-name="T13"> =&gt; </text:span><text:span text:style-name="T39">g</text:span><text:span text:style-name="T13">(</text:span><text:span text:style-name="T30">i</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6"/>
      <text:p text:style-name="P15"><text:span text:style-name="T13"><text:s text:c="4"/></text:span><text:span text:style-name="T38">claugen</text:span><text:span text:style-name="T13"> : </text:span><text:span text:style-name="T6">for</text:span><text:span text:style-name="T13"> </text:span><text:span text:style-name="T30">i</text:span><text:span text:style-name="T13"> </text:span><text:span text:style-name="T6">in</text:span><text:span text:style-name="T13"> </text:span><text:span text:style-name="T31">0</text:span><text:span text:style-name="T13"> </text:span><text:span text:style-name="T6">to</text:span><text:span text:style-name="T13"> </text:span><text:span text:style-name="T7">n</text:span><text:span text:style-name="T14">-</text:span><text:span text:style-name="T31">1</text:span><text:span text:style-name="T13"> </text:span><text:span text:style-name="T6">generate</text:span></text:p>
      <text:p text:style-name="P15"><text:span text:style-name="T13"><text:s text:c="8"/></text:span><text:span text:style-name="T38">clau0</text:span><text:span text:style-name="T13"> : </text:span><text:span text:style-name="T22">clau</text:span><text:span text:style-name="T13"> </text:span><text:span text:style-name="T6">port</text:span><text:span text:style-name="T13"> </text:span><text:span text:style-name="T6">map</text:span><text:span text:style-name="T13">(</text:span><text:span text:style-name="T26">p</text:span><text:span text:style-name="T13"> =&gt; </text:span><text:span text:style-name="T39">p</text:span><text:span text:style-name="T13">(</text:span><text:span text:style-name="T30">i</text:span><text:span text:style-name="T14">*</text:span><text:span text:style-name="T31">4</text:span><text:span text:style-name="T14">+</text:span><text:span text:style-name="T31">3</text:span><text:span text:style-name="T13"> </text:span><text:span text:style-name="T6">downto</text:span><text:span text:style-name="T13"> </text:span><text:span text:style-name="T30">i</text:span><text:span text:style-name="T14">*</text:span><text:span text:style-name="T31">4</text:span><text:span text:style-name="T13">), </text:span><text:span text:style-name="T26">g</text:span><text:span text:style-name="T13"> =&gt; </text:span><text:span text:style-name="T39">g</text:span><text:span text:style-name="T13">(</text:span><text:span text:style-name="T30">i</text:span><text:span text:style-name="T14">*</text:span><text:span text:style-name="T31">4</text:span><text:span text:style-name="T14">+</text:span><text:span text:style-name="T31">3</text:span><text:span text:style-name="T13"> </text:span><text:span text:style-name="T6">downto</text:span><text:span text:style-name="T13"> </text:span><text:span text:style-name="T30">i</text:span><text:span text:style-name="T14">*</text:span><text:span text:style-name="T31">4</text:span><text:span text:style-name="T13">), </text:span><text:span text:style-name="T26">ci</text:span><text:span text:style-name="T13"> =&gt; </text:span><text:span text:style-name="T39">gc</text:span><text:span text:style-name="T13">(</text:span><text:span text:style-name="T30">i</text:span><text:span text:style-name="T13">), </text:span><text:span text:style-name="T26">co</text:span><text:span text:style-name="T13"> =&gt; </text:span><text:span text:style-name="T39">c</text:span><text:span text:style-name="T13">(</text:span><text:span text:style-name="T30">i</text:span><text:span text:style-name="T14">*</text:span><text:span text:style-name="T31">4</text:span><text:span text:style-name="T14">+</text:span><text:span text:style-name="T31">3</text:span><text:span text:style-name="T13"> </text:span><text:span text:style-name="T6">downto</text:span><text:span text:style-name="T13"> </text:span><text:span text:style-name="T30">i</text:span><text:span text:style-name="T14">*</text:span><text:span text:style-name="T31">4</text:span><text:span text:style-name="T13">), </text:span><text:span text:style-name="T26">gp</text:span><text:span text:style-name="T13"> =&gt; </text:span><text:span text:style-name="T39">gp</text:span><text:span text:style-name="T13">(</text:span><text:span text:style-name="T30">i</text:span><text:span text:style-name="T13">), </text:span><text:span text:style-name="T26">gg</text:span><text:span text:style-name="T13"> =&gt; </text:span><text:span text:style-name="T39">gg</text:span><text:span text:style-name="T13">(</text:span><text:span text:style-name="T30">i</text:span><text:span text:style-name="T13">));</text:span></text:p>
      <text:p text:style-name="P15"><text:span text:style-name="T13"><text:s text:c="4"/></text:span><text:span text:style-name="T6">end</text:span><text:span text:style-name="T13"> </text:span><text:span text:style-name="T6">generate</text:span><text:span text:style-name="T13">;</text:span></text:p>
      <text:p text:style-name="P16"/>
      <text:p text:style-name="P15"><text:span text:style-name="T13"><text:s text:c="4"/></text:span><text:span text:style-name="T38">clau1</text:span><text:span text:style-name="T13"> : </text:span><text:span text:style-name="T22">clau</text:span><text:span text:style-name="T13"> </text:span><text:span text:style-name="T6">port</text:span><text:span text:style-name="T13"> </text:span><text:span text:style-name="T6">map</text:span><text:span text:style-name="T13">(</text:span><text:span text:style-name="T26">p</text:span><text:span text:style-name="T13"> =&gt; </text:span><text:span text:style-name="T39">gp</text:span><text:span text:style-name="T13">, </text:span><text:span text:style-name="T26">g</text:span><text:span text:style-name="T13"> =&gt; </text:span><text:span text:style-name="T39">gg</text:span><text:span text:style-name="T13">, </text:span><text:span text:style-name="T26">ci</text:span><text:span text:style-name="T13"> =&gt; </text:span><text:span text:style-name="T26">ci</text:span><text:span text:style-name="T13">, </text:span><text:span text:style-name="T26">co</text:span><text:span text:style-name="T13"> =&gt; </text:span><text:span text:style-name="T39">gc</text:span><text:span text:style-name="T13">, </text:span><text:span text:style-name="T26">gp</text:span><text:span text:style-name="T13"> =&gt; </text:span><text:span text:style-name="T6">open</text:span><text:span text:style-name="T13">, </text:span><text:span text:style-name="T26">gg</text:span><text:span text:style-name="T13"> =&gt; </text:span><text:span text:style-name="T26">co</text:span><text:span text:style-name="T13">);</text:span></text:p>
      <text:p text:style-name="P15"><text:span text:style-name="T6">end</text:span><text:span text:style-name="T13"> </text:span><text:span text:style-name="T22">rtl</text:span><text:span text:style-name="T13">;</text:span></text:p>
      <text:p text:style-name="P16"/>
      <text:p text:style-name="P15"><text:span text:style-name="T6">library</text:span><text:span text:style-name="T13"> </text:span><text:span text:style-name="T22">ieee</text:span><text:span text:style-name="T13">; </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adder</text:span><text:span text:style-name="T13"> </text:span><text:span text:style-name="T6">is</text:span></text:p>
      <text:p text:style-name="P15"><text:span text:style-name="T13"><text:s text:c="4"/></text:span><text:span text:style-name="T6">generic</text:span><text:span text:style-name="T13">(</text:span><text:span text:style-name="T7">n</text:span><text:span text:style-name="T13"> : </text:span><text:span text:style-name="T6">in</text:span><text:span text:style-name="T13"> </text:span><text:span text:style-name="T28">integer</text:span><text:span text:style-name="T13"> := </text:span><text:span text:style-name="T31">16</text:span><text:span text:style-name="T13">);</text:span></text:p>
      <text:p text:style-name="P15"><text:span text:style-name="T13"><text:s text:c="4"/></text:span><text:span text:style-name="T6">port</text:span><text:span text:style-name="T13">(</text:span></text:p>
      <text:p text:style-name="P15"><text:span text:style-name="T13"><text:s text:c="8"/></text:span><text:span text:style-name="T26">a</text:span><text:span text:style-name="T13">, </text:span><text:span text:style-name="T26">b</text:span><text:span text:style-name="T13"> :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ci</text:span><text:span text:style-name="T13"> : </text:span><text:span text:style-name="T6">in</text:span><text:span text:style-name="T13"> </text:span><text:span text:style-name="T28">std_logic</text:span><text:span text:style-name="T13">;</text:span></text:p>
      <text:p text:style-name="P15"><text:soft-page-break/><text:span text:style-name="T13"><text:s text:c="8"/></text:span><text:span text:style-name="T26">s</text:span><text:span text:style-name="T13"> :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c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adder</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adder</text:span><text:span text:style-name="T13"> </text:span><text:span text:style-name="T6">is</text:span></text:p>
      <text:p text:style-name="P15"><text:span text:style-name="T13"><text:s text:c="4"/></text:span><text:span text:style-name="T6">signal</text:span><text:span text:style-name="T13"> </text:span><text:span text:style-name="T39">result</text:span><text:span text:style-name="T13"> : </text:span><text:span text:style-name="T28">std_logic_vector</text:span><text:span text:style-name="T13">(</text:span><text:span text:style-name="T26">a</text:span><text:span text:style-name="T33">'length</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9">result</text:span><text:span text:style-name="T13"> &lt;= (</text:span><text:span text:style-name="T34">'0'</text:span><text:span text:style-name="T13"> </text:span><text:span text:style-name="T14">&amp;</text:span><text:span text:style-name="T13"> </text:span><text:span text:style-name="T26">a</text:span><text:span text:style-name="T13">) </text:span><text:span text:style-name="T14">+</text:span><text:span text:style-name="T13"> (</text:span><text:span text:style-name="T34">'0'</text:span><text:span text:style-name="T13"> </text:span><text:span text:style-name="T14">&amp;</text:span><text:span text:style-name="T13"> </text:span><text:span text:style-name="T26">b</text:span><text:span text:style-name="T13">) </text:span><text:span text:style-name="T14">+</text:span><text:span text:style-name="T13"> </text:span><text:span text:style-name="T26">ci</text:span><text:span text:style-name="T13">;</text:span></text:p>
      <text:p text:style-name="P15"><text:span text:style-name="T13"><text:s text:c="4"/></text:span><text:span text:style-name="T26">s</text:span><text:span text:style-name="T13"> &lt;= </text:span><text:span text:style-name="T39">result</text:span><text:span text:style-name="T13">(</text:span><text:span text:style-name="T26">a</text:span><text:span text:style-name="T33">'length</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cout</text:span><text:span text:style-name="T13"> &lt;= </text:span><text:span text:style-name="T39">result</text:span><text:span text:style-name="T13">(</text:span><text:span text:style-name="T26">a</text:span><text:span text:style-name="T33">'length</text:span><text:span text:style-name="T13">);</text:span></text:p>
      <text:p text:style-name="P15"><text:span text:style-name="T6">end</text:span><text:span text:style-name="T13"> </text:span><text:span text:style-name="T22">rtl</text:span><text:span text:style-name="T13">;</text:span></text:p>
      <text:p text:style-name="P16"/>
      <text:p text:style-name="P15"><text:span text:style-name="T6">configuration</text:span><text:span text:style-name="T13"> cfg_cla16 </text:span><text:span text:style-name="T6">of</text:span><text:span text:style-name="T13"> cla16 </text:span><text:span text:style-name="T6">is</text:span></text:p>
      <text:p text:style-name="P15"><text:span text:style-name="T13"><text:s text:c="4"/></text:span><text:span text:style-name="T6">for</text:span><text:span text:style-name="T13"> rtl</text:span></text:p>
      <text:p text:style-name="P15"><text:span text:style-name="T13"><text:s text:c="4"/></text:span><text:span text:style-name="T6">for</text:span><text:span text:style-name="T13"> fagen</text:span></text:p>
      <text:p text:style-name="P15"><text:span text:style-name="T13"><text:s text:c="4"/></text:span><text:span text:style-name="T6">for</text:span><text:span text:style-name="T13"> </text:span><text:span text:style-name="T6">all</text:span><text:span text:style-name="T13"> : fapg</text:span></text:p>
      <text:p text:style-name="P15"><text:span text:style-name="T13"><text:s text:c="4"/></text:span><text:span text:style-name="T6">use</text:span><text:span text:style-name="T13"> </text:span><text:span text:style-name="T6">entity</text:span><text:span text:style-name="T13"> </text:span><text:span text:style-name="T22">work</text:span><text:span text:style-name="T13">.</text:span><text:span text:style-name="T22">fapg</text:span><text:span text:style-name="T13">(rtl);</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claugen</text:span></text:p>
      <text:p text:style-name="P15"><text:span text:style-name="T6">for</text:span><text:span text:style-name="T13"> </text:span><text:span text:style-name="T6">all</text:span><text:span text:style-name="T13"> : clau</text:span></text:p>
      <text:p text:style-name="P15"><text:span text:style-name="T6">use</text:span><text:span text:style-name="T13"> </text:span><text:span text:style-name="T6">entity</text:span><text:span text:style-name="T13"> </text:span><text:span text:style-name="T22">work</text:span><text:span text:style-name="T13">.</text:span><text:span text:style-name="T22">clau</text:span><text:span text:style-name="T13">(rtl);</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clau1 : clau</text:span></text:p>
      <text:p text:style-name="P15"><text:span text:style-name="T6">use</text:span><text:span text:style-name="T13"> </text:span><text:span text:style-name="T6">entity</text:span><text:span text:style-name="T13"> </text:span><text:span text:style-name="T22">work</text:span><text:span text:style-name="T13">.</text:span><text:span text:style-name="T22">clau</text:span><text:span text:style-name="T13">(rtl);</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cfg_cla16;</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arith</text:span><text:span text:style-name="T13">.</text:span><text:span text:style-name="T6">all</text:span><text:span text:style-name="T13">;</text:span></text:p>
      <text:p text:style-name="P16"/>
      <text:p text:style-name="P15"><text:span text:style-name="T6">entity</text:span><text:span text:style-name="T13"> </text:span><text:span text:style-name="T22">tbcla16</text:span><text:span text:style-name="T13"> </text:span><text:span text:style-name="T6">i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cla16</text:span><text:span text:style-name="T13"> </text:span><text:span text:style-name="T6">is</text:span></text:p>
      <text:p text:style-name="P15"><text:span text:style-name="T13"><text:s text:c="4"/></text:span><text:span text:style-name="T6">component</text:span><text:span text:style-name="T13"> </text:span><text:span text:style-name="T22">cla16</text:span><text:span text:style-name="T13"> </text:span><text:span text:style-name="T6">port</text:span><text:span text:style-name="T13">(</text:span></text:p>
      <text:p text:style-name="P15"><text:span text:style-name="T13"><text:s text:c="8"/></text:span><text:span text:style-name="T26">a</text:span><text:span text:style-name="T13">, </text:span><text:span text:style-name="T26">b</text:span><text:span text:style-name="T13"> : </text:span><text:span text:style-name="T6">in</text:span><text:span text:style-name="T13"> </text:span><text:span text:style-name="T28">std_logic_vector</text:span><text:span text:style-name="T13">(</text:span><text:span text:style-name="T31">15</text:span><text:span text:style-name="T13"> </text:span><text:span text:style-name="T6">downto</text:span><text:span text:style-name="T13"> </text:span><text:span text:style-name="T31">0</text:span><text:span text:style-name="T13">);</text:span></text:p>
      <text:p text:style-name="P15"><text:span text:style-name="T13"><text:s text:c="8"/></text:span><text:span text:style-name="T26">ci</text:span><text:span text:style-name="T13"> <text:s text:c="2"/>: </text:span><text:span text:style-name="T6">in</text:span><text:span text:style-name="T13"> </text:span><text:span text:style-name="T28">std_logic</text:span><text:span text:style-name="T13">;</text:span></text:p>
      <text:p text:style-name="P15"><text:span text:style-name="T13"><text:s text:c="8"/></text:span><text:span text:style-name="T26">s</text:span><text:span text:style-name="T13"> <text:s text:c="3"/>: </text:span><text:span text:style-name="T6">out</text:span><text:span text:style-name="T13"> </text:span><text:span text:style-name="T28">std_logic_vector</text:span><text:span text:style-name="T13">(</text:span><text:span text:style-name="T31">15</text:span><text:span text:style-name="T13"> </text:span><text:span text:style-name="T6">downto</text:span><text:span text:style-name="T13"> </text:span><text:span text:style-name="T31">0</text:span><text:span text:style-name="T13">);</text:span></text:p>
      <text:p text:style-name="P15"><text:span text:style-name="T13"><text:s text:c="8"/></text:span><text:span text:style-name="T26">co</text:span><text:span text:style-name="T13"> <text:s text:c="2"/>: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mponent</text:span><text:span text:style-name="T13"> </text:span><text:span text:style-name="T22">adder</text:span><text:span text:style-name="T13"> </text:span></text:p>
      <text:p text:style-name="P15"><text:span text:style-name="T6">generic</text:span><text:span text:style-name="T13">(</text:span><text:span text:style-name="T7">n</text:span><text:span text:style-name="T13"> : </text:span><text:span text:style-name="T28">natural</text:span><text:span text:style-name="T13"> := </text:span><text:span text:style-name="T31">16</text:span><text:span text:style-name="T13">);</text:span></text:p>
      <text:p text:style-name="P15"><text:span text:style-name="T6">port</text:span><text:span text:style-name="T13">(</text:span></text:p>
      <text:p text:style-name="P15"><text:span text:style-name="T13"><text:s text:c="4"/></text:span><text:span text:style-name="T26">a</text:span><text:span text:style-name="T13">, </text:span><text:span text:style-name="T26">b</text:span><text:span text:style-name="T13"> : </text:span><text:span text:style-name="T6">in</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ci</text:span><text:span text:style-name="T13"> : </text:span><text:span text:style-name="T6">in</text:span><text:span text:style-name="T13"> </text:span><text:span text:style-name="T28">std_logic</text:span><text:span text:style-name="T13">;</text:span></text:p>
      <text:p text:style-name="P15"><text:soft-page-break/><text:span text:style-name="T13"><text:s text:c="4"/></text:span><text:span text:style-name="T26">s</text:span><text:span text:style-name="T13"> : </text:span><text:span text:style-name="T6">out</text:span><text:span text:style-name="T13">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c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pan><text:span text:style-name="T31">5</text:span><text:span text:style-name="T13"> </text:span><text:span text:style-name="T7">ns</text:span><text:span text:style-name="T13">;</text:span></text:p>
      <text:p text:style-name="P15"><text:span text:style-name="T6">constant</text:span><text:span text:style-name="T13"> </text:span><text:span text:style-name="T7">strobe</text:span><text:span text:style-name="T13"> : </text:span><text:span text:style-name="T28">time</text:span><text:span text:style-name="T13"> := </text:span><text:span text:style-name="T7">period</text:span><text:span text:style-name="T13"> </text:span><text:span text:style-name="T14">-</text:span><text:span text:style-name="T31">1</text:span><text:span text:style-name="T13"> </text:span><text:span text:style-name="T7">ns</text:span><text:span text:style-name="T13">;</text:span></text:p>
      <text:p text:style-name="P15"><text:span text:style-name="T6">constant</text:span><text:span text:style-name="T13"> </text:span><text:span text:style-name="T7">n</text:span><text:span text:style-name="T13"> : </text:span><text:span text:style-name="T28">natural</text:span><text:span text:style-name="T13"> := </text:span><text:span text:style-name="T31">16</text:span><text:span text:style-name="T13">;</text:span></text:p>
      <text:p text:style-name="P16"/>
      <text:p text:style-name="P15"><text:span text:style-name="T6">signal</text:span><text:span text:style-name="T13"> </text:span><text:span text:style-name="T39">a</text:span><text:span text:style-name="T13"> :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b</text:span><text:span text:style-name="T13"> :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ci</text:span><text:span text:style-name="T13"> : </text:span><text:span text:style-name="T28">std_logic</text:span><text:span text:style-name="T13">;</text:span></text:p>
      <text:p text:style-name="P15"><text:span text:style-name="T6">signal</text:span><text:span text:style-name="T13"> </text:span><text:span text:style-name="T39">co</text:span><text:span text:style-name="T13">, </text:span><text:span text:style-name="T39">co1</text:span><text:span text:style-name="T13"> : </text:span><text:span text:style-name="T28">std_logic</text:span><text:span text:style-name="T13">;</text:span></text:p>
      <text:p text:style-name="P15"><text:span text:style-name="T6">signal</text:span><text:span text:style-name="T13"> </text:span><text:span text:style-name="T39">s</text:span><text:span text:style-name="T13">, </text:span><text:span text:style-name="T39">s1</text:span><text:span text:style-name="T13"> :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8">p0</text:span><text:span text:style-name="T13"> : </text:span><text:span text:style-name="T6">process</text:span></text:p>
      <text:p text:style-name="P15"><text:span text:style-name="T13"><text:s text:c="8"/></text:span><text:span text:style-name="T6">variable</text:span><text:span text:style-name="T13"> </text:span><text:span text:style-name="T30">q</text:span><text:span text:style-name="T13"> : </text:span><text:span text:style-name="T28">std_logic_vector</text:span><text:span text:style-name="T13">(</text:span><text:span text:style-name="T7">n</text:span><text:span text:style-name="T14">-</text:span><text:span text:style-name="T31">1</text:span><text:span text:style-name="T13"> </text:span><text:span text:style-name="T6">downto</text:span><text:span text:style-name="T13"> </text:span><text:span text:style-name="T31">0</text:span><text:span text:style-name="T13">);</text:span></text:p>
      <text:p text:style-name="P15"><text:span text:style-name="T13"><text:s text:c="4"/></text:span><text:span text:style-name="T6">begin</text:span></text:p>
      <text:p text:style-name="P15"><text:span text:style-name="T13"><text:s text:c="8"/></text:span><text:span text:style-name="T39">a</text:span><text:span text:style-name="T13"> &lt;= (</text:span><text:span text:style-name="T6">others</text:span><text:span text:style-name="T13"> =&gt; </text:span><text:span text:style-name="T34">'1'</text:span><text:span text:style-name="T13">);</text:span></text:p>
      <text:p text:style-name="P15"><text:span text:style-name="T13"><text:s text:c="8"/></text:span><text:span text:style-name="T39">b</text:span><text:span text:style-name="T13"> &lt;= (</text:span><text:span text:style-name="T6">others</text:span><text:span text:style-name="T13"> =&gt; </text:span><text:span text:style-name="T34">'1'</text:span><text:span text:style-name="T13">);</text:span></text:p>
      <text:p text:style-name="P15"><text:span text:style-name="T13"><text:s text:c="8"/></text:span><text:span text:style-name="T39">ci</text:span><text:span text:style-name="T13"> &lt;= </text:span><text:span text:style-name="T34">'1'</text:span><text:span text:style-name="T13">;</text:span></text:p>
      <text:p text:style-name="P15"><text:span text:style-name="T13"><text:s text:c="8"/></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30">q</text:span><text:span text:style-name="T13"> := (</text:span><text:span text:style-name="T6">others</text:span><text:span text:style-name="T13"> =&gt; </text:span><text:span text:style-name="T34">'0'</text:span><text:span text:style-name="T13">);</text:span></text:p>
      <text:p text:style-name="P15"><text:span text:style-name="T13"><text:s text:c="8"/></text:span><text:span text:style-name="T6">loop</text:span></text:p>
      <text:p text:style-name="P15"><text:span text:style-name="T13"><text:s text:c="12"/></text:span><text:span text:style-name="T39">a</text:span><text:span text:style-name="T13"> &lt;= </text:span><text:span text:style-name="T30">q</text:span><text:span text:style-name="T13">;</text:span></text:p>
      <text:p text:style-name="P15"><text:span text:style-name="T13"><text:s text:c="12"/></text:span><text:span text:style-name="T39">b</text:span><text:span text:style-name="T13"> &lt;= (</text:span><text:span text:style-name="T30">q</text:span><text:span text:style-name="T13">(</text:span><text:span text:style-name="T7">n</text:span><text:span text:style-name="T14">-</text:span><text:span text:style-name="T31">1</text:span><text:span text:style-name="T13">) </text:span><text:span text:style-name="T6">xor</text:span><text:span text:style-name="T13"> (</text:span><text:span text:style-name="T6">not</text:span><text:span text:style-name="T13"> </text:span><text:span text:style-name="T30">q</text:span><text:span text:style-name="T13">(</text:span><text:span text:style-name="T31">2</text:span><text:span text:style-name="T13">))) </text:span><text:span text:style-name="T14">&amp;</text:span><text:span text:style-name="T13"> </text:span><text:span text:style-name="T30">q</text:span><text:span text:style-name="T13">(</text:span><text:span text:style-name="T7">n</text:span><text:span text:style-name="T14">-</text:span><text:span text:style-name="T31">1</text:span><text:span text:style-name="T13"> </text:span><text:span text:style-name="T6">downto</text:span><text:span text:style-name="T13"> </text:span><text:span text:style-name="T31">1</text:span><text:span text:style-name="T13">);</text:span></text:p>
      <text:p text:style-name="P15"><text:span text:style-name="T13"><text:s text:c="12"/></text:span><text:span text:style-name="T39">ci</text:span><text:span text:style-name="T13"> &lt;= </text:span><text:span text:style-name="T30">q</text:span><text:span text:style-name="T13">(</text:span><text:span text:style-name="T31">0</text:span><text:span text:style-name="T13">) </text:span><text:span text:style-name="T6">and</text:span><text:span text:style-name="T13"> </text:span><text:span text:style-name="T30">q</text:span><text:span text:style-name="T13">(</text:span><text:span text:style-name="T31">1</text:span><text:span text:style-name="T13">);</text:span></text:p>
      <text:p text:style-name="P15"><text:span text:style-name="T13"><text:s text:c="12"/></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12"/></text:span><text:span text:style-name="T30">q</text:span><text:span text:style-name="T13"> := </text:span><text:span text:style-name="T30">q</text:span><text:span text:style-name="T13">(</text:span><text:span text:style-name="T7">n</text:span><text:span text:style-name="T14">-</text:span><text:span text:style-name="T31">2</text:span><text:span text:style-name="T13"> </text:span><text:span text:style-name="T6">downto</text:span><text:span text:style-name="T13"> </text:span><text:span text:style-name="T31">0</text:span><text:span text:style-name="T13">) </text:span><text:span text:style-name="T14">&amp;</text:span><text:span text:style-name="T13"> (</text:span><text:span text:style-name="T30">q</text:span><text:span text:style-name="T13">(</text:span><text:span text:style-name="T7">n</text:span><text:span text:style-name="T14">-</text:span><text:span text:style-name="T31">1</text:span><text:span text:style-name="T13">) </text:span><text:span text:style-name="T6">xor</text:span><text:span text:style-name="T13"> (</text:span><text:span text:style-name="T6">not</text:span><text:span text:style-name="T13"> </text:span><text:span text:style-name="T30">q</text:span><text:span text:style-name="T13">(</text:span><text:span text:style-name="T31">2</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check</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6">wait</text:span><text:span text:style-name="T13"> </text:span><text:span text:style-name="T6">for</text:span><text:span text:style-name="T13"> </text:span><text:span text:style-name="T7">strobe</text:span><text:span text:style-name="T13">;</text:span></text:p>
      <text:p text:style-name="P15"><text:span text:style-name="T13"><text:s text:c="8"/></text:span><text:span text:style-name="T6">loop</text:span></text:p>
      <text:p text:style-name="P15"><text:span text:style-name="T13"><text:s text:c="12"/></text:span><text:span text:style-name="T6">if</text:span><text:span text:style-name="T13">(</text:span><text:span text:style-name="T39">s</text:span><text:span text:style-name="T13"> /= </text:span><text:span text:style-name="T39">s1</text:span><text:span text:style-name="T13">) </text:span><text:span text:style-name="T6">or</text:span><text:span text:style-name="T13"> (</text:span><text:span text:style-name="T39">co</text:span><text:span text:style-name="T13"> /= </text:span><text:span text:style-name="T39">co1</text:span><text:span text:style-name="T13">) </text:span><text:span text:style-name="T6">then</text:span></text:p>
      <text:p text:style-name="P15"><text:span text:style-name="T13"><text:s text:c="16"/></text:span><text:span text:style-name="T6">assert</text:span><text:span text:style-name="T13"> </text:span><text:span text:style-name="T7">false</text:span><text:span text:style-name="T13"> </text:span><text:span text:style-name="T6">report</text:span><text:span text:style-name="T13"> </text:span><text:span text:style-name="T34">"no match"</text:span><text:span text:style-name="T13"> </text:span><text:span text:style-name="T6">severity</text:span><text:span text:style-name="T13"> </text:span><text:span text:style-name="T7">warning</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8">cla0</text:span><text:span text:style-name="T13"> : </text:span><text:span text:style-name="T22">cla16</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ci</text:span><text:span text:style-name="T13"> =&gt; </text:span><text:span text:style-name="T39">ci</text:span><text:span text:style-name="T13">, </text:span><text:span text:style-name="T26">s</text:span><text:span text:style-name="T13"> =&gt; </text:span><text:span text:style-name="T39">s</text:span><text:span text:style-name="T13">, </text:span><text:span text:style-name="T26">co</text:span><text:span text:style-name="T13"> =&gt; </text:span><text:span text:style-name="T39">co</text:span><text:span text:style-name="T13">);</text:span></text:p>
      <text:p text:style-name="P15"><text:span text:style-name="T13"><text:s text:c="4"/></text:span><text:span text:style-name="T38">adder0</text:span><text:span text:style-name="T13"> : </text:span><text:span text:style-name="T22">adder</text:span></text:p>
      <text:p text:style-name="P15"><text:span text:style-name="T13"><text:s text:c="8"/></text:span><text:span text:style-name="T6">generic</text:span><text:span text:style-name="T13"> </text:span><text:span text:style-name="T6">map</text:span><text:span text:style-name="T13">(</text:span><text:span text:style-name="T7">n</text:span><text:span text:style-name="T13"> =&gt; </text:span><text:span text:style-name="T7">n</text:span><text:span text:style-name="T13">)</text:span></text:p>
      <text:p text:style-name="P15"><text:span text:style-name="T13"><text:s text:c="8"/></text:span><text:span text:style-name="T6">port</text:span><text:span text:style-name="T13"> </text:span><text:span text:style-name="T6">map</text:span><text:span text:style-name="T13">(</text:span><text:span text:style-name="T26">a</text:span><text:span text:style-name="T13"> =&gt; </text:span><text:span text:style-name="T39">a</text:span><text:span text:style-name="T13">, </text:span><text:span text:style-name="T26">b</text:span><text:span text:style-name="T13"> =&gt; </text:span><text:span text:style-name="T39">b</text:span><text:span text:style-name="T13">, </text:span><text:span text:style-name="T26">ci</text:span><text:span text:style-name="T13"> =&gt; </text:span><text:span text:style-name="T39">ci</text:span><text:span text:style-name="T13">, </text:span><text:span text:style-name="T26">s</text:span><text:span text:style-name="T13"> =&gt; </text:span><text:span text:style-name="T39">s1</text:span><text:span text:style-name="T13">, </text:span><text:span text:style-name="T26">cout</text:span><text:span text:style-name="T13"> =&gt; </text:span><text:span text:style-name="T39">co1</text:span><text:span text:style-name="T13">);</text:span></text:p>
      <text:p text:style-name="P15"><text:span text:style-name="T6">end</text:span><text:span text:style-name="T13"> </text:span><text:span text:style-name="T22">beh</text:span><text:span text:style-name="T13">;</text:span></text:p>
      <text:p text:style-name="P15"><text:span text:style-name="T6">configuration</text:span><text:span text:style-name="T13"> cfg_tbcla16 </text:span><text:span text:style-name="T6">of</text:span><text:span text:style-name="T13"> </text:span><text:span text:style-name="T22">tbcla16</text:span><text:span text:style-name="T13"> </text:span><text:span text:style-name="T6">is</text:span></text:p>
      <text:p text:style-name="P15"><text:span text:style-name="T13"><text:s text:c="4"/></text:span><text:span text:style-name="T6">for</text:span><text:span text:style-name="T13"> </text:span><text:span text:style-name="T22">beh</text:span><text:span text:style-name="T13"> </text:span></text:p>
      <text:p text:style-name="P15"><text:span text:style-name="T13"><text:s text:c="4"/></text:span><text:span text:style-name="T6">for</text:span><text:span text:style-name="T13"> </text:span><text:span text:style-name="T6">all</text:span><text:span text:style-name="T13"> : cla16</text:span></text:p>
      <text:p text:style-name="P15"><text:soft-page-break/><text:span text:style-name="T13"><text:s text:c="4"/></text:span><text:span text:style-name="T6">use</text:span><text:span text:style-name="T13"> </text:span><text:span text:style-name="T6">configuration</text:span><text:span text:style-name="T13"> </text:span><text:span text:style-name="T22">work</text:span><text:span text:style-name="T13">.cfg_cla16;</text:span></text:p>
      <text:p text:style-name="P15"><text:span text:style-name="T6">end</text:span><text:span text:style-name="T13"> </text:span><text:span text:style-name="T6">for</text:span><text:span text:style-name="T13">;</text:span></text:p>
      <text:p text:style-name="P15"><text:span text:style-name="T6">for</text:span><text:span text:style-name="T13"> </text:span><text:span text:style-name="T6">all</text:span><text:span text:style-name="T13"> : adder</text:span></text:p>
      <text:p text:style-name="P15"><text:span text:style-name="T6">use</text:span><text:span text:style-name="T13"> </text:span><text:span text:style-name="T6">entity</text:span><text:span text:style-name="T13"> </text:span><text:span text:style-name="T22">work</text:span><text:span text:style-name="T13">.</text:span><text:span text:style-name="T22">adder</text:span><text:span text:style-name="T13">(rtl);</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cfg_tbcla16;</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countone</text:span><text:span text:style-name="T13"> </text:span><text:span text:style-name="T6">is</text:span><text:span text:style-name="T13"> </text:span><text:span text:style-name="T6">port</text:span><text:span text:style-name="T13">(</text:span></text:p>
      <text:p text:style-name="P15"><text:span text:style-name="T13"><text:s text:c="4"/></text:span><text:span text:style-name="T26">din</text:span><text:span text:style-name="T13"> : </text:span><text:span text:style-name="T6">in</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num</text:span><text:span text:style-name="T13"> : </text:span><text:span text:style-name="T6">out</text:span><text:span text:style-name="T13">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countone</text:span><text:span text:style-name="T13">;</text:span></text:p>
      <text:p text:style-name="P16"/>
      <text:p text:style-name="P15"><text:span text:style-name="T6">architecture</text:span><text:span text:style-name="T13"> </text:span><text:span text:style-name="T22">rtl1</text:span><text:span text:style-name="T13"> </text:span><text:span text:style-name="T6">of</text:span><text:span text:style-name="T13"> </text:span><text:span text:style-name="T22">countone</text:span><text:span text:style-name="T13"> </text:span><text:span text:style-name="T6">is</text:span></text:p>
      <text:p text:style-name="P23">begin</text:p>
      <text:p text:style-name="P15"><text:span text:style-name="T13"><text:s text:c="4"/></text:span><text:span text:style-name="T38">comb</text:span><text:span text:style-name="T13"> : </text:span><text:span text:style-name="T6">process</text:span><text:span text:style-name="T13">(</text:span><text:span text:style-name="T26">din</text:span><text:span text:style-name="T13">)</text:span></text:p>
      <text:p text:style-name="P15"><text:span text:style-name="T13"><text:s text:c="8"/></text:span><text:span text:style-name="T6">variable</text:span><text:span text:style-name="T13"> </text:span><text:span text:style-name="T30">temp</text:span><text:span text:style-name="T13"> :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0">temp</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j </text:span><text:span text:style-name="T6">in</text:span><text:span text:style-name="T13"> </text:span><text:span text:style-name="T26">din</text:span><text:span text:style-name="T33">'range</text:span><text:span text:style-name="T13"> </text:span><text:span text:style-name="T6">loop</text:span></text:p>
      <text:p text:style-name="P15"><text:span text:style-name="T13"><text:s text:c="8"/></text:span><text:span text:style-name="T6">if</text:span><text:span text:style-name="T13">(</text:span><text:span text:style-name="T26">din</text:span><text:span text:style-name="T13">(j)) = </text:span><text:span text:style-name="T34">'1'</text:span><text:span text:style-name="T13"> </text:span><text:span text:style-name="T6">then</text:span></text:p>
      <text:p text:style-name="P15"><text:span text:style-name="T13"><text:s text:c="12"/></text:span><text:span text:style-name="T30">temp</text:span><text:span text:style-name="T13"> := </text:span><text:span text:style-name="T30">temp</text:span><text:span text:style-name="T13"> </text:span><text:span text:style-name="T14">+</text:span><text:span text:style-name="T31">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26">num</text:span><text:span text:style-name="T13"> &lt;= </text:span><text:span text:style-name="T30">temp</text:span><text:span text:style-name="T13">;</text:span></text:p>
      <text:p text:style-name="P15"><text:span text:style-name="T6">end</text:span><text:span text:style-name="T13"> </text:span><text:span text:style-name="T6">process</text:span><text:span text:style-name="T13">;</text:span></text:p>
      <text:p text:style-name="P15"><text:span text:style-name="T6">end</text:span><text:span text:style-name="T13"> </text:span><text:span text:style-name="T22">rtl1</text:span><text:span text:style-name="T13">;</text:span></text:p>
      <text:p text:style-name="P16"/>
      <text:p text:style-name="P15"><text:span text:style-name="T6">architecture</text:span><text:span text:style-name="T13"> </text:span><text:span text:style-name="T22">rtl2</text:span><text:span text:style-name="T13"> </text:span><text:span text:style-name="T6">of</text:span><text:span text:style-name="T13"> </text:span><text:span text:style-name="T22">countone</text:span><text:span text:style-name="T13"> </text:span><text:span text:style-name="T6">is</text:span></text:p>
      <text:p text:style-name="P23">begin</text:p>
      <text:p text:style-name="P15"><text:span text:style-name="T13"><text:s text:c="4"/></text:span><text:span text:style-name="T38">comb</text:span><text:span text:style-name="T13"> : </text:span><text:span text:style-name="T6">process</text:span><text:span text:style-name="T13">(</text:span><text:span text:style-name="T26">din</text:span><text:span text:style-name="T13">)</text:span></text:p>
      <text:p text:style-name="P15"><text:span text:style-name="T13"><text:s text:c="8"/></text:span><text:span text:style-name="T6">constant</text:span><text:span text:style-name="T13"> </text:span><text:span text:style-name="T7">parts</text:span><text:span text:style-name="T13"> : </text:span><text:span text:style-name="T28">integer</text:span><text:span text:style-name="T13"> := </text:span><text:span text:style-name="T31">8</text:span><text:span text:style-name="T13">;</text:span></text:p>
      <text:p text:style-name="P15"><text:span text:style-name="T13"><text:s text:c="4"/></text:span><text:span text:style-name="T6">variable</text:span><text:span text:style-name="T13"> </text:span><text:span text:style-name="T30">temp</text:span><text:span text:style-name="T13"> :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15"><text:span text:style-name="T13"><text:s text:c="4"/></text:span><text:span text:style-name="T6">variable</text:span><text:span text:style-name="T13"> </text:span><text:span text:style-name="T30">temp1</text:span><text:span text:style-name="T13"> :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0">temp</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7">parts</text:span><text:span text:style-name="T13"> </text:span><text:span text:style-name="T14">-</text:span><text:span text:style-name="T31">1</text:span><text:span text:style-name="T13"> </text:span><text:span text:style-name="T6">loop</text:span></text:p>
      <text:p text:style-name="P15"><text:span text:style-name="T13"><text:s text:c="8"/></text:span><text:span text:style-name="T30">temp1</text:span><text:span text:style-name="T13"> := (</text:span><text:span text:style-name="T6">others</text:span><text:span text:style-name="T13"> =&gt; </text:span><text:span text:style-name="T34">'0'</text:span><text:span text:style-name="T13">);</text:span></text:p>
      <text:p text:style-name="P15"><text:span text:style-name="T13"><text:s text:c="8"/></text:span><text:span text:style-name="T6">for</text:span><text:span text:style-name="T13"> k </text:span><text:span text:style-name="T6">in</text:span><text:span text:style-name="T13"> </text:span><text:span text:style-name="T31">32</text:span><text:span text:style-name="T14">/</text:span><text:span text:style-name="T7">parts</text:span><text:span text:style-name="T14">-</text:span><text:span text:style-name="T31">1</text:span><text:span text:style-name="T13"> </text:span><text:span text:style-name="T6">downto</text:span><text:span text:style-name="T13"> </text:span><text:span text:style-name="T31">0</text:span><text:span text:style-name="T13"> </text:span><text:span text:style-name="T6">loop</text:span></text:p>
      <text:p text:style-name="P15"><text:span text:style-name="T13"><text:s text:c="12"/></text:span><text:span text:style-name="T6">if</text:span><text:span text:style-name="T13"> (</text:span><text:span text:style-name="T26">din</text:span><text:span text:style-name="T13">(</text:span><text:span text:style-name="T31">32</text:span><text:span text:style-name="T14">/</text:span><text:span text:style-name="T7">parts</text:span><text:span text:style-name="T13"> </text:span><text:span text:style-name="T14">*</text:span><text:span text:style-name="T13"> j </text:span><text:span text:style-name="T14">+</text:span><text:span text:style-name="T13"> k) = </text:span><text:span text:style-name="T34">'1'</text:span><text:span text:style-name="T13">) </text:span><text:span text:style-name="T6">then</text:span></text:p>
      <text:p text:style-name="P15"><text:span text:style-name="T13"><text:s text:c="16"/></text:span><text:span text:style-name="T30">temp1</text:span><text:span text:style-name="T13"> := </text:span><text:span text:style-name="T30">temp1</text:span><text:span text:style-name="T13"> </text:span><text:span text:style-name="T14">+</text:span><text:span text:style-name="T13"> </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30">temp</text:span><text:span text:style-name="T13"> := </text:span><text:span text:style-name="T30">temp</text:span><text:span text:style-name="T13"> </text:span><text:span text:style-name="T14">+</text:span><text:span text:style-name="T13"> </text:span><text:span text:style-name="T30">temp1</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26">num</text:span><text:span text:style-name="T13"> &lt;= </text:span><text:span text:style-name="T30">temp</text:span><text:span text:style-name="T13">;</text:span></text:p>
      <text:p text:style-name="P15"><text:soft-page-break/><text:span text:style-name="T6">end</text:span><text:span text:style-name="T13"> </text:span><text:span text:style-name="T6">process</text:span><text:span text:style-name="T13">;</text:span></text:p>
      <text:p text:style-name="P15"><text:span text:style-name="T6">end</text:span><text:span text:style-name="T13"> </text:span><text:span text:style-name="T22">rtl2</text:span><text:span text:style-name="T13">;</text:span></text:p>
      <text:p text:style-name="P16"/>
      <text:p text:style-name="P15"><text:span text:style-name="T6">architecture</text:span><text:span text:style-name="T13"> </text:span><text:span text:style-name="T22">rtl3</text:span><text:span text:style-name="T13"> </text:span><text:span text:style-name="T6">of</text:span><text:span text:style-name="T13"> </text:span><text:span text:style-name="T22">countone</text:span><text:span text:style-name="T13"> </text:span><text:span text:style-name="T6">is</text:span></text:p>
      <text:p text:style-name="P23">begin</text:p>
      <text:p text:style-name="P15"><text:span text:style-name="T13"><text:s text:c="4"/></text:span><text:span text:style-name="T38">comb</text:span><text:span text:style-name="T13"> : </text:span><text:span text:style-name="T6">process</text:span><text:span text:style-name="T13">(</text:span><text:span text:style-name="T26">din</text:span><text:span text:style-name="T13">)</text:span></text:p>
      <text:p text:style-name="P15"><text:span text:style-name="T13"><text:s text:c="8"/></text:span><text:span text:style-name="T6">constant</text:span><text:span text:style-name="T13"> </text:span><text:span text:style-name="T7">parts</text:span><text:span text:style-name="T13"> : </text:span><text:span text:style-name="T28">integer</text:span><text:span text:style-name="T13"> := </text:span><text:span text:style-name="T31">4</text:span><text:span text:style-name="T13">;</text:span></text:p>
      <text:p text:style-name="P15"><text:span text:style-name="T13"><text:s text:c="4"/></text:span><text:span text:style-name="T6">variable</text:span><text:span text:style-name="T13"> </text:span><text:span text:style-name="T30">temp</text:span><text:span text:style-name="T13"> :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15"><text:span text:style-name="T13"><text:s text:c="4"/></text:span><text:span text:style-name="T6">variable</text:span><text:span text:style-name="T13"> </text:span><text:span text:style-name="T30">temp1</text:span><text:span text:style-name="T13"> :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0">temp</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7">parts</text:span><text:span text:style-name="T13"> </text:span><text:span text:style-name="T14">-</text:span><text:span text:style-name="T31">1</text:span><text:span text:style-name="T13"> </text:span><text:span text:style-name="T6">loop</text:span></text:p>
      <text:p text:style-name="P15"><text:span text:style-name="T13"><text:s text:c="8"/></text:span><text:span text:style-name="T30">temp1</text:span><text:span text:style-name="T13"> := (</text:span><text:span text:style-name="T6">others</text:span><text:span text:style-name="T13"> =&gt; </text:span><text:span text:style-name="T34">'0'</text:span><text:span text:style-name="T13">);</text:span></text:p>
      <text:p text:style-name="P15"><text:span text:style-name="T13"><text:s text:c="8"/></text:span><text:span text:style-name="T6">for</text:span><text:span text:style-name="T13"> k </text:span><text:span text:style-name="T6">in</text:span><text:span text:style-name="T13"> </text:span><text:span text:style-name="T31">32</text:span><text:span text:style-name="T14">/</text:span><text:span text:style-name="T7">parts</text:span><text:span text:style-name="T14">-</text:span><text:span text:style-name="T31">1</text:span><text:span text:style-name="T13"> </text:span><text:span text:style-name="T6">downto</text:span><text:span text:style-name="T13"> </text:span><text:span text:style-name="T31">0</text:span><text:span text:style-name="T13"> </text:span><text:span text:style-name="T6">loop</text:span></text:p>
      <text:p text:style-name="P15"><text:span text:style-name="T13"><text:s text:c="12"/></text:span><text:span text:style-name="T6">if</text:span><text:span text:style-name="T13"> (</text:span><text:span text:style-name="T26">din</text:span><text:span text:style-name="T13">(</text:span><text:span text:style-name="T31">32</text:span><text:span text:style-name="T14">/</text:span><text:span text:style-name="T7">parts</text:span><text:span text:style-name="T13"> </text:span><text:span text:style-name="T14">*</text:span><text:span text:style-name="T13"> j </text:span><text:span text:style-name="T14">+</text:span><text:span text:style-name="T13"> k) = </text:span><text:span text:style-name="T34">'1'</text:span><text:span text:style-name="T13">) </text:span><text:span text:style-name="T6">then</text:span></text:p>
      <text:p text:style-name="P15"><text:span text:style-name="T13"><text:s text:c="16"/></text:span><text:span text:style-name="T30">temp1</text:span><text:span text:style-name="T13"> := </text:span><text:span text:style-name="T30">temp1</text:span><text:span text:style-name="T13"> </text:span><text:span text:style-name="T14">+</text:span><text:span text:style-name="T13"> </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30">temp</text:span><text:span text:style-name="T13"> := </text:span><text:span text:style-name="T30">temp</text:span><text:span text:style-name="T13"> </text:span><text:span text:style-name="T14">+</text:span><text:span text:style-name="T13"> </text:span><text:span text:style-name="T30">temp1</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26">num</text:span><text:span text:style-name="T13"> &lt;= </text:span><text:span text:style-name="T30">temp</text:span><text:span text:style-name="T13">;</text:span></text:p>
      <text:p text:style-name="P15"><text:span text:style-name="T6">end</text:span><text:span text:style-name="T13"> </text:span><text:span text:style-name="T6">process</text:span><text:span text:style-name="T13">;</text:span></text:p>
      <text:p text:style-name="P15"><text:span text:style-name="T6">end</text:span><text:span text:style-name="T13"> </text:span><text:span text:style-name="T22">rtl3</text:span><text:span text:style-name="T13">;</text:span></text:p>
      <text:p text:style-name="P16"/>
      <text:p text:style-name="P15"><text:span text:style-name="T6">architecture</text:span><text:span text:style-name="T13"> </text:span><text:span text:style-name="T22">rtl4</text:span><text:span text:style-name="T13"> </text:span><text:span text:style-name="T6">of</text:span><text:span text:style-name="T13"> </text:span><text:span text:style-name="T22">countone</text:span><text:span text:style-name="T13"> </text:span><text:span text:style-name="T6">is</text:span></text:p>
      <text:p text:style-name="P23">begin</text:p>
      <text:p text:style-name="P15"><text:span text:style-name="T13"><text:s text:c="4"/></text:span><text:span text:style-name="T38">comb</text:span><text:span text:style-name="T13"> : </text:span><text:span text:style-name="T6">process</text:span><text:span text:style-name="T13">(</text:span><text:span text:style-name="T26">din</text:span><text:span text:style-name="T13">)</text:span></text:p>
      <text:p text:style-name="P15"><text:span text:style-name="T13"><text:s text:c="8"/></text:span><text:span text:style-name="T6">variable</text:span><text:span text:style-name="T13"> </text:span><text:span text:style-name="T30">temp</text:span><text:span text:style-name="T13"> :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15"><text:span text:style-name="T13"><text:s text:c="4"/></text:span><text:span text:style-name="T6">variable</text:span><text:span text:style-name="T13"> </text:span><text:span text:style-name="T30">cin</text:span><text:span text:style-name="T13">, </text:span><text:span text:style-name="T30">cout</text:span><text:span text:style-name="T13"> : </text:span><text:span text:style-name="T28">std_logic</text:span><text:span text:style-name="T13">;</text:span></text:p>
      <text:p text:style-name="P23">begin</text:p>
      <text:p text:style-name="P15"><text:span text:style-name="T13"><text:s text:c="4"/></text:span><text:span text:style-name="T30">temp</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j </text:span><text:span text:style-name="T6">in</text:span><text:span text:style-name="T13"> </text:span><text:span text:style-name="T26">din</text:span><text:span text:style-name="T33">'reverse_range</text:span><text:span text:style-name="T13"> </text:span><text:span text:style-name="T6">loop</text:span></text:p>
      <text:p text:style-name="P15"><text:span text:style-name="T13"><text:s text:c="8"/></text:span><text:span text:style-name="T6">if</text:span><text:span text:style-name="T13"> </text:span><text:span text:style-name="T26">din</text:span><text:span text:style-name="T13">(j) = </text:span><text:span text:style-name="T34">'1'</text:span><text:span text:style-name="T13"> </text:span><text:span text:style-name="T6">then</text:span></text:p>
      <text:p text:style-name="P15"><text:span text:style-name="T13"><text:s text:c="12"/></text:span><text:span text:style-name="T30">cin</text:span><text:span text:style-name="T13"> := </text:span><text:span text:style-name="T34">'1'</text:span><text:span text:style-name="T13">;</text:span></text:p>
      <text:p text:style-name="P15"><text:span text:style-name="T13"><text:s text:c="12"/></text:span><text:span text:style-name="T6">for</text:span><text:span text:style-name="T13"> k </text:span><text:span text:style-name="T6">in</text:span><text:span text:style-name="T13"> </text:span><text:span text:style-name="T30">temp</text:span><text:span text:style-name="T33">'reverse_range</text:span><text:span text:style-name="T13"> </text:span><text:span text:style-name="T6">loop</text:span></text:p>
      <text:p text:style-name="P15"><text:span text:style-name="T13"><text:s text:c="16"/></text:span><text:span text:style-name="T30">cout</text:span><text:span text:style-name="T13"> := </text:span><text:span text:style-name="T30">temp</text:span><text:span text:style-name="T13">(k) </text:span><text:span text:style-name="T6">and</text:span><text:span text:style-name="T13"> </text:span><text:span text:style-name="T30">cin</text:span><text:span text:style-name="T13">;</text:span></text:p>
      <text:p text:style-name="P15"><text:span text:style-name="T13"><text:s text:c="16"/></text:span><text:span text:style-name="T30">temp</text:span><text:span text:style-name="T13">(k) := </text:span><text:span text:style-name="T30">temp</text:span><text:span text:style-name="T13">(k) </text:span><text:span text:style-name="T6">xor</text:span><text:span text:style-name="T13"> </text:span><text:span text:style-name="T30">cin</text:span><text:span text:style-name="T13">;</text:span></text:p>
      <text:p text:style-name="P15"><text:span text:style-name="T13"><text:s text:c="16"/></text:span><text:span text:style-name="T30">cin</text:span><text:span text:style-name="T13"> := </text:span><text:span text:style-name="T30">cout</text:span><text:span text:style-name="T13">;</text:span></text:p>
      <text:p text:style-name="P15"><text:span text:style-name="T13"><text:s text:c="12"/></text:span><text:span text:style-name="T6">end</text:span><text:span text:style-name="T13"> </text:span><text:span text:style-name="T6">loop</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13"><text:s text:c="4"/></text:span><text:span text:style-name="T26">num</text:span><text:span text:style-name="T13"> &lt;= </text:span><text:span text:style-name="T30">temp</text:span><text:span text:style-name="T13">;</text:span></text:p>
      <text:p text:style-name="P15"><text:span text:style-name="T6">end</text:span><text:span text:style-name="T13"> </text:span><text:span text:style-name="T6">process</text:span><text:span text:style-name="T13">;</text:span></text:p>
      <text:p text:style-name="P15"><text:span text:style-name="T6">end</text:span><text:span text:style-name="T13"> </text:span><text:span text:style-name="T22">rtl4</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tbcountone</text:span><text:span text:style-name="T13"> </text:span><text:span text:style-name="T6">is</text:span></text:p>
      <text:p text:style-name="P15"><text:span text:style-name="T6">end</text:span><text:span text:style-name="T13"> </text:span><text:span text:style-name="T6">entity</text:span><text:span text:style-name="T13">;</text:span></text:p>
      <text:p text:style-name="P16"><text:soft-page-break/></text:p>
      <text:p text:style-name="P15"><text:span text:style-name="T6">architecture</text:span><text:span text:style-name="T13"> </text:span><text:span text:style-name="T22">beh</text:span><text:span text:style-name="T13"> </text:span><text:span text:style-name="T6">of</text:span><text:span text:style-name="T13"> </text:span><text:span text:style-name="T22">tbcountone</text:span><text:span text:style-name="T13"> </text:span><text:span text:style-name="T6">is</text:span></text:p>
      <text:p text:style-name="P16"/>
      <text:p text:style-name="P15"><text:span text:style-name="T13"><text:s text:c="4"/></text:span><text:span text:style-name="T6">component</text:span><text:span text:style-name="T13"> </text:span><text:span text:style-name="T22">countone</text:span><text:span text:style-name="T13"> </text:span><text:span text:style-name="T6">port</text:span><text:span text:style-name="T13">(</text:span></text:p>
      <text:p text:style-name="P15"><text:span text:style-name="T13"><text:s text:c="8"/></text:span><text:span text:style-name="T26">din</text:span><text:span text:style-name="T13"> : </text:span><text:span text:style-name="T6">in</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num</text:span><text:span text:style-name="T13"> : </text:span><text:span text:style-name="T6">out</text:span><text:span text:style-name="T13">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signal</text:span><text:span text:style-name="T13"> </text:span><text:span text:style-name="T39">din</text:span><text:span text:style-name="T13"> :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y1</text:span><text:span text:style-name="T13">,</text:span><text:span text:style-name="T39">y2</text:span><text:span text:style-name="T13">,</text:span><text:span text:style-name="T39">y3</text:span><text:span text:style-name="T13">,</text:span><text:span text:style-name="T39">y4</text:span><text:span text:style-name="T13"> : </text:span><text:span text:style-name="T28">std_logic_vector</text:span><text:span text:style-name="T13">(</text:span><text:span text:style-name="T31">5</text:span><text:span text:style-name="T13"> </text:span><text:span text:style-name="T6">downto</text:span><text:span text:style-name="T13"> </text:span><text:span text:style-name="T31">0</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pan><text:span text:style-name="T31">5</text:span><text:span text:style-name="T13"> </text:span><text:span text:style-name="T7">ns</text:span><text:span text:style-name="T13">;</text:span></text:p>
      <text:p text:style-name="P15"><text:span text:style-name="T6">constant</text:span><text:span text:style-name="T13"> </text:span><text:span text:style-name="T7">strobe</text:span><text:span text:style-name="T13"> : </text:span><text:span text:style-name="T28">time</text:span><text:span text:style-name="T13"> := </text:span><text:span text:style-name="T7">period</text:span><text:span text:style-name="T13"> </text:span><text:span text:style-name="T14">-</text:span><text:span text:style-name="T31">1</text:span><text:span text:style-name="T13"> </text:span><text:span text:style-name="T7">ns</text:span><text:span text:style-name="T13">;</text:span></text:p>
      <text:p text:style-name="P23">begin</text:p>
      <text:p text:style-name="P15"><text:span text:style-name="T13"><text:s text:c="4"/></text:span><text:span text:style-name="T38">p0</text:span><text:span text:style-name="T13"> : </text:span><text:span text:style-name="T6">process</text:span></text:p>
      <text:p text:style-name="P15"><text:span text:style-name="T13"><text:s text:c="8"/></text:span><text:span text:style-name="T6">variable</text:span><text:span text:style-name="T13"> </text:span><text:span text:style-name="T30">q</text:span><text:span text:style-name="T13"> :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4"/></text:span><text:span text:style-name="T6">begin</text:span></text:p>
      <text:p text:style-name="P15"><text:span text:style-name="T13"><text:s text:c="8"/></text:span><text:span text:style-name="T39">din</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30">q</text:span><text:span text:style-name="T13"> := (</text:span><text:span text:style-name="T6">others</text:span><text:span text:style-name="T13"> =&gt; </text:span><text:span text:style-name="T34">'0'</text:span><text:span text:style-name="T13">);</text:span></text:p>
      <text:p text:style-name="P15"><text:span text:style-name="T13"><text:s text:c="8"/></text:span><text:span text:style-name="T6">loop</text:span></text:p>
      <text:p text:style-name="P15"><text:span text:style-name="T13"><text:s text:c="12"/></text:span><text:span text:style-name="T39">din</text:span><text:span text:style-name="T13"> &lt;= </text:span><text:span text:style-name="T30">q</text:span><text:span text:style-name="T13">;</text:span></text:p>
      <text:p text:style-name="P15"><text:span text:style-name="T13"><text:s text:c="12"/></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12"/></text:span><text:span text:style-name="T30">q</text:span><text:span text:style-name="T13"> := </text:span><text:span text:style-name="T30">q</text:span><text:span text:style-name="T13">(</text:span><text:span text:style-name="T31">30</text:span><text:span text:style-name="T13"> </text:span><text:span text:style-name="T6">downto</text:span><text:span text:style-name="T13"> </text:span><text:span text:style-name="T31">0</text:span><text:span text:style-name="T13">) </text:span><text:span text:style-name="T14">&amp;</text:span><text:span text:style-name="T13"> (</text:span><text:span text:style-name="T30">q</text:span><text:span text:style-name="T13">(</text:span><text:span text:style-name="T31">31</text:span><text:span text:style-name="T13">) </text:span><text:span text:style-name="T6">xor</text:span><text:span text:style-name="T13"> (</text:span><text:span text:style-name="T6">not</text:span><text:span text:style-name="T13"> </text:span><text:span text:style-name="T30">q</text:span><text:span text:style-name="T13">(</text:span><text:span text:style-name="T31">2</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check</text:span><text:span text:style-name="T13"> : </text:span><text:span text:style-name="T6">process</text:span></text:p>
      <text:p text:style-name="P15"><text:span text:style-name="T13"><text:s text:c="4"/></text:span><text:span text:style-name="T6">begin</text:span><text:span text:style-name="T13"> <text:s text:c="3"/></text:span></text:p>
      <text:p text:style-name="P15"><text:span text:style-name="T13"><text:s text:c="8"/></text:span><text:span text:style-name="T6">wait</text:span><text:span text:style-name="T13"> </text:span><text:span text:style-name="T6">for</text:span><text:span text:style-name="T13"> </text:span><text:span text:style-name="T7">strobe</text:span><text:span text:style-name="T13">;</text:span></text:p>
      <text:p text:style-name="P15"><text:span text:style-name="T13"><text:s text:c="8"/></text:span><text:span text:style-name="T6">loop</text:span></text:p>
      <text:p text:style-name="P15"><text:span text:style-name="T13"><text:s text:c="12"/></text:span><text:span text:style-name="T6">if</text:span><text:span text:style-name="T13">(</text:span><text:span text:style-name="T39">y1</text:span><text:span text:style-name="T13"> /= </text:span><text:span text:style-name="T39">y2</text:span><text:span text:style-name="T13">) </text:span><text:span text:style-name="T6">or</text:span><text:span text:style-name="T13"> (</text:span><text:span text:style-name="T39">y2</text:span><text:span text:style-name="T13"> /= </text:span><text:span text:style-name="T39">y3</text:span><text:span text:style-name="T13">) </text:span><text:span text:style-name="T6">or</text:span><text:span text:style-name="T13"> (</text:span><text:span text:style-name="T39">y3</text:span><text:span text:style-name="T13"> /= </text:span><text:span text:style-name="T39">y4</text:span><text:span text:style-name="T13">) </text:span><text:span text:style-name="T6">then</text:span></text:p>
      <text:p text:style-name="P15"><text:span text:style-name="T13"><text:s text:c="16"/></text:span><text:span text:style-name="T6">assert</text:span><text:span text:style-name="T13"> </text:span><text:span text:style-name="T7">false</text:span><text:span text:style-name="T13"> </text:span><text:span text:style-name="T6">report</text:span><text:span text:style-name="T13"> </text:span><text:span text:style-name="T34">"no match"</text:span><text:span text:style-name="T13"> </text:span><text:span text:style-name="T6">severity</text:span><text:span text:style-name="T13"> </text:span><text:span text:style-name="T7">warning</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countone1</text:span><text:span text:style-name="T13"> : </text:span><text:span text:style-name="T22">countone</text:span><text:span text:style-name="T13"> </text:span><text:span text:style-name="T6">port</text:span><text:span text:style-name="T13"> </text:span><text:span text:style-name="T6">map</text:span><text:span text:style-name="T13">(</text:span><text:span text:style-name="T26">din</text:span><text:span text:style-name="T13"> =&gt; </text:span><text:span text:style-name="T39">din</text:span><text:span text:style-name="T13">, </text:span><text:span text:style-name="T26">num</text:span><text:span text:style-name="T13"> =&gt; </text:span><text:span text:style-name="T39">y1</text:span><text:span text:style-name="T13">);</text:span></text:p>
      <text:p text:style-name="P15"><text:span text:style-name="T13"><text:s text:c="4"/></text:span><text:span text:style-name="T38">countone2</text:span><text:span text:style-name="T13"> : </text:span><text:span text:style-name="T22">countone</text:span><text:span text:style-name="T13"> </text:span><text:span text:style-name="T6">port</text:span><text:span text:style-name="T13"> </text:span><text:span text:style-name="T6">map</text:span><text:span text:style-name="T13">(</text:span><text:span text:style-name="T26">din</text:span><text:span text:style-name="T13"> =&gt; </text:span><text:span text:style-name="T39">din</text:span><text:span text:style-name="T13">, </text:span><text:span text:style-name="T26">num</text:span><text:span text:style-name="T13"> =&gt; </text:span><text:span text:style-name="T39">y2</text:span><text:span text:style-name="T13">);</text:span></text:p>
      <text:p text:style-name="P15"><text:span text:style-name="T13"><text:s text:c="4"/></text:span><text:span text:style-name="T38">countone3</text:span><text:span text:style-name="T13"> : </text:span><text:span text:style-name="T22">countone</text:span><text:span text:style-name="T13"> </text:span><text:span text:style-name="T6">port</text:span><text:span text:style-name="T13"> </text:span><text:span text:style-name="T6">map</text:span><text:span text:style-name="T13">(</text:span><text:span text:style-name="T26">din</text:span><text:span text:style-name="T13"> =&gt; </text:span><text:span text:style-name="T39">din</text:span><text:span text:style-name="T13">, </text:span><text:span text:style-name="T26">num</text:span><text:span text:style-name="T13"> =&gt; </text:span><text:span text:style-name="T39">y3</text:span><text:span text:style-name="T13">);</text:span></text:p>
      <text:p text:style-name="P15"><text:span text:style-name="T13"><text:s text:c="4"/></text:span><text:span text:style-name="T38">countone4</text:span><text:span text:style-name="T13"> : </text:span><text:span text:style-name="T22">countone</text:span><text:span text:style-name="T13"> </text:span><text:span text:style-name="T6">port</text:span><text:span text:style-name="T13"> </text:span><text:span text:style-name="T6">map</text:span><text:span text:style-name="T13">(</text:span><text:span text:style-name="T26">din</text:span><text:span text:style-name="T13"> =&gt; </text:span><text:span text:style-name="T39">din</text:span><text:span text:style-name="T13">, </text:span><text:span text:style-name="T26">num</text:span><text:span text:style-name="T13"> =&gt; </text:span><text:span text:style-name="T39">y4</text:span><text:span text:style-name="T13">);</text:span></text:p>
      <text:p text:style-name="P15"><text:span text:style-name="T6">end</text:span><text:span text:style-name="T13"> </text:span><text:span text:style-name="T22">beh</text:span><text:span text:style-name="T13">;</text:span></text:p>
      <text:p text:style-name="P16"/>
      <text:p text:style-name="P15"><text:span text:style-name="T6">configuration</text:span><text:span text:style-name="T13"> cfg_tbcountone </text:span><text:span text:style-name="T6">of</text:span><text:span text:style-name="T13"> </text:span><text:span text:style-name="T22">tbcountone</text:span><text:span text:style-name="T13"> </text:span><text:span text:style-name="T6">is</text:span></text:p>
      <text:p text:style-name="P15"><text:span text:style-name="T13"><text:s text:c="4"/></text:span><text:span text:style-name="T6">for</text:span><text:span text:style-name="T13"> </text:span><text:span text:style-name="T22">beh</text:span></text:p>
      <text:p text:style-name="P15"><text:span text:style-name="T13"><text:s text:c="4"/></text:span><text:span text:style-name="T6">for</text:span><text:span text:style-name="T13"> countone1 : </text:span><text:span text:style-name="T22">countone</text:span></text:p>
      <text:p text:style-name="P15"><text:span text:style-name="T13"><text:s text:c="4"/></text:span><text:span text:style-name="T6">use</text:span><text:span text:style-name="T13"> </text:span><text:span text:style-name="T6">entity</text:span><text:span text:style-name="T13"> </text:span><text:span text:style-name="T22">work</text:span><text:span text:style-name="T13">.</text:span><text:span text:style-name="T22">countone</text:span><text:span text:style-name="T13">(</text:span><text:span text:style-name="T22">rtl1</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countone2 : </text:span><text:span text:style-name="T22">countone</text:span></text:p>
      <text:p text:style-name="P15"><text:soft-page-break/><text:span text:style-name="T6">use</text:span><text:span text:style-name="T13"> </text:span><text:span text:style-name="T6">entity</text:span><text:span text:style-name="T13"> </text:span><text:span text:style-name="T22">work</text:span><text:span text:style-name="T13">.</text:span><text:span text:style-name="T22">countone</text:span><text:span text:style-name="T13">(</text:span><text:span text:style-name="T22">rtl2</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countone3 : </text:span><text:span text:style-name="T22">countone</text:span></text:p>
      <text:p text:style-name="P15"><text:span text:style-name="T6">use</text:span><text:span text:style-name="T13"> </text:span><text:span text:style-name="T6">entity</text:span><text:span text:style-name="T13"> </text:span><text:span text:style-name="T22">work</text:span><text:span text:style-name="T13">.</text:span><text:span text:style-name="T22">countone</text:span><text:span text:style-name="T13">(</text:span><text:span text:style-name="T22">rtl3</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countone4 : </text:span><text:span text:style-name="T22">countone</text:span></text:p>
      <text:p text:style-name="P15"><text:span text:style-name="T6">use</text:span><text:span text:style-name="T13"> </text:span><text:span text:style-name="T6">entity</text:span><text:span text:style-name="T13"> </text:span><text:span text:style-name="T22">work</text:span><text:span text:style-name="T13">.</text:span><text:span text:style-name="T22">countone</text:span><text:span text:style-name="T13">(</text:span><text:span text:style-name="T22">rtl4</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configuration</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leadzero</text:span><text:span text:style-name="T13"> </text:span><text:span text:style-name="T6">is</text:span><text:span text:style-name="T13"> </text:span><text:span text:style-name="T6">port</text:span><text:span text:style-name="T13">(</text:span></text:p>
      <text:p text:style-name="P15"><text:span text:style-name="T13"><text:s text:c="4"/></text:span><text:span text:style-name="T26">din</text:span><text:span text:style-name="T13"> : </text:span><text:span text:style-name="T6">in</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zero</text:span><text:span text:style-name="T13"> : </text:span><text:span text:style-name="T6">out</text:span><text:span text:style-name="T13"> </text:span><text:span text:style-name="T28">std_logic_vector</text:span><text:span text:style-name="T13">(</text:span><text:span text:style-name="T31">4</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leadzero</text:span><text:span text:style-name="T13">;</text:span></text:p>
      <text:p text:style-name="P16"/>
      <text:p text:style-name="P15"><text:span text:style-name="T6">architecture</text:span><text:span text:style-name="T13"> </text:span><text:span text:style-name="T22">rtl1</text:span><text:span text:style-name="T13"> </text:span><text:span text:style-name="T6">of</text:span><text:span text:style-name="T13"> </text:span><text:span text:style-name="T22">leadzero</text:span><text:span text:style-name="T13"> </text:span><text:span text:style-name="T6">is</text:span></text:p>
      <text:p text:style-name="P23">begin</text:p>
      <text:p text:style-name="P15"><text:span text:style-name="T13"><text:s text:c="4"/></text:span><text:span text:style-name="T38">p0</text:span><text:span text:style-name="T13"> : </text:span><text:span text:style-name="T6">process</text:span><text:span text:style-name="T13">(</text:span><text:span text:style-name="T26">din</text:span><text:span text:style-name="T13">)</text:span></text:p>
      <text:p text:style-name="P15"><text:span text:style-name="T13"><text:s text:c="8"/></text:span><text:span text:style-name="T6">variable</text:span><text:span text:style-name="T13"> </text:span><text:span text:style-name="T30">num</text:span><text:span text:style-name="T13"> : </text:span><text:span text:style-name="T28">std_logic_vector</text:span><text:span text:style-name="T13">(</text:span><text:span text:style-name="T31">4</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0">num</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j </text:span><text:span text:style-name="T6">in</text:span><text:span text:style-name="T13"> </text:span><text:span text:style-name="T31">31</text:span><text:span text:style-name="T13"> </text:span><text:span text:style-name="T6">downto</text:span><text:span text:style-name="T13"> </text:span><text:span text:style-name="T31">0</text:span><text:span text:style-name="T13"> </text:span><text:span text:style-name="T6">loop</text:span></text:p>
      <text:p text:style-name="P15"><text:span text:style-name="T13"><text:s text:c="8"/></text:span><text:span text:style-name="T6">if</text:span><text:span text:style-name="T13"> </text:span><text:span text:style-name="T26">din</text:span><text:span text:style-name="T13">(j) = </text:span><text:span text:style-name="T34">'0'</text:span><text:span text:style-name="T13"> </text:span><text:span text:style-name="T6">then</text:span></text:p>
      <text:p text:style-name="P15"><text:span text:style-name="T13"><text:s text:c="12"/></text:span><text:span text:style-name="T30">num</text:span><text:span text:style-name="T13"> := </text:span><text:span text:style-name="T30">num</text:span><text:span text:style-name="T13"> </text:span><text:span text:style-name="T14">+</text:span><text:span text:style-name="T31">1</text:span><text:span text:style-name="T13">;</text:span></text:p>
      <text:p text:style-name="P15"><text:span text:style-name="T13"><text:s text:c="8"/></text:span><text:span text:style-name="T6">else</text:span><text:span text:style-name="T13"> </text:span><text:span text:style-name="T6">exit</text:span><text:span text:style-name="T13">;</text:span></text:p>
      <text:p text:style-name="P15"><text:span text:style-name="T13"><text:s text:c="4"/></text:span><text:span text:style-name="T6">end</text:span><text:span text:style-name="T13"> </text:span><text:span text:style-name="T6">if</text:span><text:span text:style-name="T13">;</text:span></text:p>
      <text:p text:style-name="P15"><text:span text:style-name="T6">end</text:span><text:span text:style-name="T13"> </text:span><text:span text:style-name="T6">loop</text:span><text:span text:style-name="T13">;</text:span></text:p>
      <text:p text:style-name="P15"><text:span text:style-name="T26">zero</text:span><text:span text:style-name="T13"> &lt;= </text:span><text:span text:style-name="T30">num</text:span><text:span text:style-name="T13">;</text:span></text:p>
      <text:p text:style-name="P15"><text:span text:style-name="T6">end</text:span><text:span text:style-name="T13"> </text:span><text:span text:style-name="T6">process</text:span><text:span text:style-name="T13">;</text:span></text:p>
      <text:p text:style-name="P15"><text:span text:style-name="T6">end</text:span><text:span text:style-name="T13"> </text:span><text:span text:style-name="T22">rtl1</text:span><text:span text:style-name="T13">;</text:span></text:p>
      <text:p text:style-name="P16"/>
      <text:p text:style-name="P16"/>
      <text:p text:style-name="P15"><text:span text:style-name="T6">architecture</text:span><text:span text:style-name="T13"> </text:span><text:span text:style-name="T22">rtl2</text:span><text:span text:style-name="T13"> </text:span><text:span text:style-name="T6">of</text:span><text:span text:style-name="T13"> </text:span><text:span text:style-name="T22">leadzero</text:span><text:span text:style-name="T13"> </text:span><text:span text:style-name="T6">is</text:span></text:p>
      <text:p text:style-name="P23">begin</text:p>
      <text:p text:style-name="P15"><text:span text:style-name="T13"><text:s text:c="4"/></text:span><text:span text:style-name="T38">p0</text:span><text:span text:style-name="T13"> : </text:span><text:span text:style-name="T6">process</text:span><text:span text:style-name="T13">(</text:span><text:span text:style-name="T26">din</text:span><text:span text:style-name="T13">)</text:span></text:p>
      <text:p text:style-name="P15"><text:span text:style-name="T13"><text:s text:c="8"/></text:span><text:span text:style-name="T6">variable</text:span><text:span text:style-name="T13"> </text:span><text:span text:style-name="T30">num</text:span><text:span text:style-name="T13"> : </text:span><text:span text:style-name="T28">std_logic_vector</text:span><text:span text:style-name="T13">(</text:span><text:span text:style-name="T31">4</text:span><text:span text:style-name="T13"> </text:span><text:span text:style-name="T6">downto</text:span><text:span text:style-name="T13"> </text:span><text:span text:style-name="T31">0</text:span><text:span text:style-name="T13">);</text:span></text:p>
      <text:p text:style-name="P15"><text:span text:style-name="T13"><text:s text:c="4"/></text:span><text:span text:style-name="T6">variable</text:span><text:span text:style-name="T13"> </text:span><text:span text:style-name="T30">cin</text:span><text:span text:style-name="T13">, </text:span><text:span text:style-name="T30">cout</text:span><text:span text:style-name="T13"> : </text:span><text:span text:style-name="T28">std_logic</text:span><text:span text:style-name="T13">;</text:span></text:p>
      <text:p text:style-name="P23">begin</text:p>
      <text:p text:style-name="P15"><text:span text:style-name="T13"><text:s text:c="4"/></text:span><text:span text:style-name="T30">num</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j </text:span><text:span text:style-name="T6">in</text:span><text:span text:style-name="T13"> </text:span><text:span text:style-name="T31">31</text:span><text:span text:style-name="T13"> </text:span><text:span text:style-name="T6">downto</text:span><text:span text:style-name="T13"> </text:span><text:span text:style-name="T31">0</text:span><text:span text:style-name="T13"> </text:span><text:span text:style-name="T6">loop</text:span></text:p>
      <text:p text:style-name="P15"><text:span text:style-name="T13"><text:s text:c="8"/></text:span><text:span text:style-name="T6">if</text:span><text:span text:style-name="T13">(</text:span><text:span text:style-name="T26">din</text:span><text:span text:style-name="T13">(j) = </text:span><text:span text:style-name="T34">'0'</text:span><text:span text:style-name="T13">) </text:span><text:span text:style-name="T6">then</text:span></text:p>
      <text:p text:style-name="P15"><text:span text:style-name="T13"><text:s text:c="12"/></text:span><text:span text:style-name="T30">cin</text:span><text:span text:style-name="T13"> := </text:span><text:span text:style-name="T34">'1'</text:span><text:span text:style-name="T13">;</text:span></text:p>
      <text:p text:style-name="P15"><text:span text:style-name="T13"><text:s text:c="12"/></text:span><text:span text:style-name="T6">for</text:span><text:span text:style-name="T13"> k </text:span><text:span text:style-name="T6">in</text:span><text:span text:style-name="T13"> </text:span><text:span text:style-name="T31">0</text:span><text:span text:style-name="T13"> </text:span><text:span text:style-name="T6">to</text:span><text:span text:style-name="T13"> </text:span><text:span text:style-name="T31">4</text:span><text:span text:style-name="T13"> </text:span><text:span text:style-name="T6">loop</text:span></text:p>
      <text:p text:style-name="P15"><text:span text:style-name="T13"><text:s text:c="16"/></text:span><text:span text:style-name="T30">cout</text:span><text:span text:style-name="T13"> := </text:span><text:span text:style-name="T30">num</text:span><text:span text:style-name="T13">(k) </text:span><text:span text:style-name="T6">and</text:span><text:span text:style-name="T13"> </text:span><text:span text:style-name="T30">cin</text:span><text:span text:style-name="T13">;</text:span></text:p>
      <text:p text:style-name="P15"><text:span text:style-name="T13"><text:s text:c="16"/></text:span><text:span text:style-name="T30">num</text:span><text:span text:style-name="T13">(k):= </text:span><text:span text:style-name="T30">num</text:span><text:span text:style-name="T13">(k) </text:span><text:span text:style-name="T6">xor</text:span><text:span text:style-name="T13"> </text:span><text:span text:style-name="T30">cin</text:span><text:span text:style-name="T13">;</text:span></text:p>
      <text:p text:style-name="P15"><text:soft-page-break/><text:span text:style-name="T13"><text:s text:c="16"/></text:span><text:span text:style-name="T30">cin</text:span><text:span text:style-name="T13"> := </text:span><text:span text:style-name="T30">cout</text:span><text:span text:style-name="T13">;</text:span></text:p>
      <text:p text:style-name="P15"><text:span text:style-name="T13"><text:s text:c="16"/></text:span><text:span text:style-name="T6">if</text:span><text:span text:style-name="T13"> </text:span><text:span text:style-name="T30">cout</text:span><text:span text:style-name="T13"> = </text:span><text:span text:style-name="T34">'0'</text:span><text:span text:style-name="T13"> </text:span><text:span text:style-name="T6">then</text:span></text:p>
      <text:p text:style-name="P15"><text:span text:style-name="T13"><text:s text:c="20"/></text:span><text:span text:style-name="T6">exit</text:span><text:span text:style-name="T13">; </text:span><text:span text:style-name="T6">end</text:span><text:span text:style-name="T13"> </text:span><text:span text:style-name="T6">if</text:span><text:span text:style-name="T13">;</text:span></text:p>
      <text:p text:style-name="P15"><text:span text:style-name="T13"><text:s text:c="16"/></text:span><text:span text:style-name="T6">end</text:span><text:span text:style-name="T13"> </text:span><text:span text:style-name="T6">loop</text:span><text:span text:style-name="T13">;</text:span></text:p>
      <text:p text:style-name="P15"><text:span text:style-name="T13"><text:s text:c="12"/></text:span><text:span text:style-name="T6">else</text:span></text:p>
      <text:p text:style-name="P15"><text:span text:style-name="T13"><text:s text:c="16"/></text:span><text:span text:style-name="T6">exit</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26">zero</text:span><text:span text:style-name="T13"> &lt;= </text:span><text:span text:style-name="T30">num</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6">end</text:span><text:span text:style-name="T13"> </text:span><text:span text:style-name="T22">rtl2</text:span><text:span text:style-name="T13">;</text:span></text:p>
      <text:p text:style-name="P16"/>
      <text:p text:style-name="P15"><text:span text:style-name="T6">architecture</text:span><text:span text:style-name="T13"> </text:span><text:span text:style-name="T22">rtl3</text:span><text:span text:style-name="T13"> </text:span><text:span text:style-name="T6">of</text:span><text:span text:style-name="T13"> </text:span><text:span text:style-name="T22">leadzero</text:span><text:span text:style-name="T13"> </text:span><text:span text:style-name="T6">is</text:span><text:span text:style-name="T13"> </text:span></text:p>
      <text:p text:style-name="P23">begin</text:p>
      <text:p text:style-name="P15"><text:span text:style-name="T13"><text:s text:c="4"/></text:span><text:span text:style-name="T38">p0</text:span><text:span text:style-name="T13"> : </text:span><text:span text:style-name="T6">process</text:span><text:span text:style-name="T13">(</text:span><text:span text:style-name="T26">din</text:span><text:span text:style-name="T13">)</text:span></text:p>
      <text:p text:style-name="P15"><text:span text:style-name="T13"><text:s text:c="8"/></text:span><text:span text:style-name="T6">variable</text:span><text:span text:style-name="T13"> </text:span><text:span text:style-name="T30">zvec</text:span><text:span text:style-name="T13"> :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0">zvec</text:span><text:span text:style-name="T13"> := (</text:span><text:span text:style-name="T6">others</text:span><text:span text:style-name="T13"> =&gt; </text:span><text:span text:style-name="T34">'0'</text:span><text:span text:style-name="T13">);</text:span></text:p>
      <text:p text:style-name="P15"><text:span text:style-name="T13"><text:s text:c="4"/></text:span><text:span text:style-name="T26">zero</text:span><text:span text:style-name="T13"> &lt;= (</text:span><text:span text:style-name="T6">others</text:span><text:span text:style-name="T13"> =&gt; </text:span><text:span text:style-name="T34">'0'</text:span><text:span text:style-name="T13">);</text:span></text:p>
      <text:p text:style-name="P15"><text:span text:style-name="T13"><text:s text:c="4"/></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31">31</text:span><text:span text:style-name="T13"> </text:span><text:span text:style-name="T6">loop</text:span></text:p>
      <text:p text:style-name="P15"><text:span text:style-name="T13"><text:s text:c="8"/></text:span><text:span text:style-name="T6">if</text:span><text:span text:style-name="T13"> </text:span><text:span text:style-name="T26">din</text:span><text:span text:style-name="T13">(</text:span><text:span text:style-name="T31">31</text:span><text:span text:style-name="T13"> </text:span><text:span text:style-name="T6">downto</text:span><text:span text:style-name="T13"> j) = </text:span><text:span text:style-name="T30">zvec</text:span><text:span text:style-name="T13">(</text:span><text:span text:style-name="T31">31</text:span><text:span text:style-name="T13"> </text:span><text:span text:style-name="T6">downto</text:span><text:span text:style-name="T13"> j) </text:span><text:span text:style-name="T6">then</text:span></text:p>
      <text:p text:style-name="P15"><text:span text:style-name="T13"><text:s text:c="12"/></text:span><text:span text:style-name="T26">zero</text:span><text:span text:style-name="T13"> &lt;= </text:span><text:span text:style-name="T34">"00000"</text:span><text:span text:style-name="T13"> </text:span><text:span text:style-name="T14">-</text:span><text:span text:style-name="T13">j;</text:span></text:p>
      <text:p text:style-name="P15"><text:span text:style-name="T13"><text:s text:c="12"/></text:span><text:span text:style-name="T6">exit</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loop</text:span><text:span text:style-name="T13">;</text:span></text:p>
      <text:p text:style-name="P15"><text:span text:style-name="T6">end</text:span><text:span text:style-name="T13"> </text:span><text:span text:style-name="T6">process</text:span><text:span text:style-name="T13">;</text:span></text:p>
      <text:p text:style-name="P15"><text:span text:style-name="T6">end</text:span><text:span text:style-name="T13"> </text:span><text:span text:style-name="T22">rtl3</text:span><text:span text:style-name="T13">;</text:span></text:p>
      <text:p text:style-name="P16"/>
      <text:p text:style-name="P15"><text:span text:style-name="T6">library</text:span><text:span text:style-name="T13"> ieee;</text:span></text:p>
      <text:p text:style-name="P15"><text:span text:style-name="T13"><text:s text:c="4"/></text:span><text:span text:style-name="T6">use</text:span><text:span text:style-name="T13"> ieee.std_logic_1164.</text:span><text:span text:style-name="T6">all</text:span><text:span text:style-name="T13">;</text:span></text:p>
      <text:p text:style-name="P15"><text:span text:style-name="T13"><text:s text:c="4"/></text:span><text:span text:style-name="T6">use</text:span><text:span text:style-name="T13"> ieee.std_logic_arith.</text:span><text:span text:style-name="T6">all</text:span><text:span text:style-name="T13">;</text:span></text:p>
      <text:p text:style-name="P15"><text:span text:style-name="T13"><text:s text:c="4"/></text:span><text:span text:style-name="T6">use</text:span><text:span text:style-name="T13"> ieee.std_logic_textio.</text:span><text:span text:style-name="T6">all</text:span><text:span text:style-name="T13">;</text:span></text:p>
      <text:p text:style-name="P15"><text:span text:style-name="T13"><text:s text:c="4"/></text:span><text:span text:style-name="T6">use</text:span><text:span text:style-name="T13"> std.textio.</text:span><text:span text:style-name="T6">all</text:span><text:span text:style-name="T13">;</text:span></text:p>
      <text:p text:style-name="P16"/>
      <text:p text:style-name="P15"><text:span text:style-name="T6">entity</text:span><text:span text:style-name="T13"> tbleadzero </text:span><text:span text:style-name="T6">is</text:span><text:span text:style-name="T13"> </text:span><text:span text:style-name="T6">generic</text:span><text:span text:style-name="T13">(</text:span></text:p>
      <text:p text:style-name="P15"><text:span text:style-name="T13"><text:s text:c="4"/>period : time := </text:span><text:span text:style-name="T31">50</text:span><text:span text:style-name="T13"> ns;</text:span></text:p>
      <text:p text:style-name="P15"><text:span text:style-name="T13"><text:s text:c="4"/>strobe : time := </text:span><text:span text:style-name="T31">45</text:span><text:span text:style-name="T13"> ns;</text:span></text:p>
      <text:p text:style-name="P15"><text:span text:style-name="T13"><text:s text:c="4"/>filename : string := </text:span><text:span text:style-name="T34">"tb.out"</text:span><text:span text:style-name="T13">);</text:span></text:p>
      <text:p text:style-name="P15"><text:span text:style-name="T6">end</text:span><text:span text:style-name="T13"> tbleadzero;</text:span></text:p>
      <text:p text:style-name="P16"/>
      <text:p text:style-name="P15"><text:span text:style-name="T6">architecture</text:span><text:span text:style-name="T13"> beh </text:span><text:span text:style-name="T6">of</text:span><text:span text:style-name="T13"> tbleadzero </text:span><text:span text:style-name="T6">is</text:span></text:p>
      <text:p text:style-name="P15"><text:span text:style-name="T13"><text:s text:c="4"/></text:span><text:span text:style-name="T6">component</text:span><text:span text:style-name="T13"> leadzero </text:span><text:span text:style-name="T6">port</text:span><text:span text:style-name="T13">(</text:span></text:p>
      <text:p text:style-name="P15"><text:span text:style-name="T13"><text:s text:c="8"/>din : </text:span><text:span text:style-name="T6">in</text:span><text:span text:style-name="T13"> std_logic_vector(</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8"/>zero : </text:span><text:span text:style-name="T6">out</text:span><text:span text:style-name="T13"> std_logic_vector(</text:span><text:span text:style-name="T31">4</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signal</text:span><text:span text:style-name="T13"> din : std_logic_vector(</text:span><text:span text:style-name="T31">31</text:span><text:span text:style-name="T13"> </text:span><text:span text:style-name="T6">downto</text:span><text:span text:style-name="T13"> </text:span><text:span text:style-name="T31">0</text:span><text:span text:style-name="T13">);</text:span></text:p>
      <text:p text:style-name="P15"><text:span text:style-name="T6">signal</text:span><text:span text:style-name="T13"> y, y1, y2, y3 : std_logic_vector(</text:span><text:span text:style-name="T31">4</text:span><text:span text:style-name="T13"> </text:span><text:span text:style-name="T6">downto</text:span><text:span text:style-name="T13"> </text:span><text:span text:style-name="T31">0</text:span><text:span text:style-name="T13">);</text:span></text:p>
      <text:p text:style-name="P23">begin</text:p>
      <text:p text:style-name="P15"><text:span text:style-name="T13"><text:s text:c="4"/>p0: </text:span><text:span text:style-name="T6">process</text:span></text:p>
      <text:p text:style-name="P15"><text:soft-page-break/><text:span text:style-name="T13"><text:s text:c="4"/></text:span><text:span text:style-name="T6">begin</text:span></text:p>
      <text:p text:style-name="P15"><text:span text:style-name="T13"><text:s text:c="8"/></text:span><text:span text:style-name="T6">for</text:span><text:span text:style-name="T13"> j </text:span><text:span text:style-name="T6">in</text:span><text:span text:style-name="T13"> </text:span><text:span text:style-name="T31">31</text:span><text:span text:style-name="T13"> </text:span><text:span text:style-name="T6">downto</text:span><text:span text:style-name="T13"> </text:span><text:span text:style-name="T31">0</text:span><text:span text:style-name="T13"> </text:span><text:span text:style-name="T6">loop</text:span></text:p>
      <text:p text:style-name="P15"><text:span text:style-name="T13"><text:s text:c="12"/>y &lt;= conv_std_logic_vector(j,</text:span><text:span text:style-name="T31">5</text:span><text:span text:style-name="T13">);</text:span></text:p>
      <text:p text:style-name="P15"><text:span text:style-name="T13"><text:s text:c="12"/>din &lt;= (</text:span><text:span text:style-name="T6">others</text:span><text:span text:style-name="T13"> =&gt; </text:span><text:span text:style-name="T34">'0'</text:span><text:span text:style-name="T13">);</text:span></text:p>
      <text:p text:style-name="P15"><text:span text:style-name="T13"><text:s text:c="12"/>din(</text:span><text:span text:style-name="T31">31</text:span><text:span text:style-name="T14">-</text:span><text:span text:style-name="T13">j) &lt;= </text:span><text:span text:style-name="T34">'1'</text:span><text:span text:style-name="T13">;</text:span></text:p>
      <text:p text:style-name="P15"><text:span text:style-name="T13"><text:s text:c="12"/></text:span><text:span text:style-name="T6">wait</text:span><text:span text:style-name="T13"> </text:span><text:span text:style-name="T6">for</text:span><text:span text:style-name="T13"> period;</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din &lt;= (</text:span><text:span text:style-name="T6">others</text:span><text:span text:style-name="T13"> =&gt; </text:span><text:span text:style-name="T34">'0'</text:span><text:span text:style-name="T13">);</text:span></text:p>
      <text:p text:style-name="P15"><text:span text:style-name="T13"><text:s text:c="8"/>y &lt;= </text:span><text:span text:style-name="T34">"00000"</text:span><text:span text:style-name="T13">;</text:span></text:p>
      <text:p text:style-name="P15"><text:span text:style-name="T13"><text:s text:c="8"/></text:span><text:span text:style-name="T6">wait</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check : </text:span><text:span text:style-name="T6">process</text:span></text:p>
      <text:p text:style-name="P15"><text:span text:style-name="T13"><text:s text:c="8"/></text:span><text:span text:style-name="T6">variable</text:span><text:span text:style-name="T13"> err_cnt : integer := </text:span><text:span text:style-name="T31">0</text:span><text:span text:style-name="T13">;</text:span></text:p>
      <text:p text:style-name="P15"><text:span text:style-name="T13"><text:s text:c="8"/></text:span><text:span text:style-name="T6">file</text:span><text:span text:style-name="T13"> fout : text </text:span><text:span text:style-name="T6">is</text:span><text:span text:style-name="T13"> </text:span><text:span text:style-name="T6">out</text:span><text:span text:style-name="T13"> filename;</text:span></text:p>
      <text:p text:style-name="P15"><text:span text:style-name="T13"><text:s text:c="8"/></text:span><text:span text:style-name="T6">variable</text:span><text:span text:style-name="T13"> l : line;</text:span></text:p>
      <text:p text:style-name="P15"><text:span text:style-name="T13"><text:s text:c="4"/></text:span><text:span text:style-name="T6">begin</text:span></text:p>
      <text:p text:style-name="P15"><text:span text:style-name="T13"><text:s text:c="8"/></text:span><text:span text:style-name="T6">wait</text:span><text:span text:style-name="T13"> </text:span><text:span text:style-name="T6">for</text:span><text:span text:style-name="T13"> strobe;</text:span></text:p>
      <text:p text:style-name="P15"><text:span text:style-name="T13"><text:s text:c="8"/></text:span><text:span text:style-name="T6">if</text:span><text:span text:style-name="T13"> y /= y1 </text:span><text:span text:style-name="T6">or</text:span><text:span text:style-name="T13"> y /= y2 </text:span><text:span text:style-name="T6">or</text:span><text:span text:style-name="T13"> y /= y3 </text:span><text:span text:style-name="T6">then</text:span></text:p>
      <text:p text:style-name="P15"><text:span text:style-name="T13"><text:s text:c="12"/>write(l, string'(</text:span><text:span text:style-name="T34">"not compared at time "</text:span><text:span text:style-name="T13">));</text:span></text:p>
      <text:p text:style-name="P16"><text:s text:c="12"/>write(l,now);</text:p>
      <text:p text:style-name="P16"><text:s text:c="12"/>writeline(fout,l);</text:p>
      <text:p text:style-name="P15"><text:span text:style-name="T13"><text:s text:c="12"/>err_cnt := err_cnt </text:span><text:span text:style-name="T14">+</text:span><text:span text:style-name="T31">1</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text:span><text:span text:style-name="T6">wait</text:span><text:span text:style-name="T13"> </text:span><text:span text:style-name="T6">for</text:span><text:span text:style-name="T13"> period;</text:span></text:p>
      <text:p text:style-name="P15"><text:span text:style-name="T13"><text:s text:c="8"/></text:span><text:span text:style-name="T6">if</text:span><text:span text:style-name="T13"> err_cnt = </text:span><text:span text:style-name="T31">0</text:span><text:span text:style-name="T13"> </text:span><text:span text:style-name="T6">then</text:span></text:p>
      <text:p text:style-name="P15"><text:span text:style-name="T13"><text:s text:c="12"/>write(l, string'(</text:span><text:span text:style-name="T34">"test pass"</text:span><text:span text:style-name="T13">));</text:span></text:p>
      <text:p text:style-name="P15"><text:span text:style-name="T13"><text:s text:c="8"/></text:span><text:span text:style-name="T6">else</text:span><text:span text:style-name="T13"> </text:span></text:p>
      <text:p text:style-name="P15"><text:span text:style-name="T13"><text:s text:c="12"/>write(l, string'(</text:span><text:span text:style-name="T34">"test fail"</text:span><text:span text:style-name="T13">));</text:span></text:p>
      <text:p text:style-name="P15"><text:span text:style-name="T13"><text:s text:c="8"/></text:span><text:span text:style-name="T6">end</text:span><text:span text:style-name="T13"> </text:span><text:span text:style-name="T6">if</text:span><text:span text:style-name="T13">;</text:span></text:p>
      <text:p text:style-name="P16"><text:s text:c="8"/>writeline(fout, l);</text:p>
      <text:p text:style-name="P15"><text:span text:style-name="T13"><text:s text:c="8"/></text:span><text:span text:style-name="T6">wait</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text:s text:c="4"/>leadzero1 : leadzero</text:p>
      <text:p text:style-name="P15"><text:span text:style-name="T13"><text:s text:c="8"/></text:span><text:span text:style-name="T6">port</text:span><text:span text:style-name="T13"> </text:span><text:span text:style-name="T6">map</text:span><text:span text:style-name="T13">(din =&gt; din, zero =&gt; y1);</text:span></text:p>
      <text:p text:style-name="P16"><text:s text:c="4"/>leadzero2 : leadzero</text:p>
      <text:p text:style-name="P15"><text:span text:style-name="T13"><text:s text:c="8"/></text:span><text:span text:style-name="T6">port</text:span><text:span text:style-name="T13"> </text:span><text:span text:style-name="T6">map</text:span><text:span text:style-name="T13">(din =&gt; din, zero =&gt; y2);</text:span></text:p>
      <text:p text:style-name="P16"><text:s text:c="4"/>leadzero3 : leadzero</text:p>
      <text:p text:style-name="P15"><text:span text:style-name="T13"><text:s text:c="8"/></text:span><text:span text:style-name="T6">port</text:span><text:span text:style-name="T13"> </text:span><text:span text:style-name="T6">map</text:span><text:span text:style-name="T13">(din =&gt; din, zero =&gt; y3);</text:span></text:p>
      <text:p text:style-name="P15"><text:span text:style-name="T6">end</text:span><text:span text:style-name="T13"> beh;</text:span></text:p>
      <text:p text:style-name="P16"/>
      <text:p text:style-name="P15"><text:span text:style-name="T6">configuration</text:span><text:span text:style-name="T13"> cfg_tbleadzero </text:span><text:span text:style-name="T6">of</text:span><text:span text:style-name="T13"> tbleadzero </text:span><text:span text:style-name="T6">is</text:span></text:p>
      <text:p text:style-name="P15"><text:span text:style-name="T13"><text:s text:c="4"/></text:span><text:span text:style-name="T6">for</text:span><text:span text:style-name="T13"> beh</text:span></text:p>
      <text:p text:style-name="P15"><text:span text:style-name="T13"><text:s text:c="4"/></text:span><text:span text:style-name="T6">for</text:span><text:span text:style-name="T13"> leadzero1 : leadzero</text:span></text:p>
      <text:p text:style-name="P15"><text:span text:style-name="T13"><text:s text:c="4"/></text:span><text:span text:style-name="T6">use</text:span><text:span text:style-name="T13"> </text:span><text:span text:style-name="T6">entity</text:span><text:span text:style-name="T13"> work.leadzero(rtl1);</text:span></text:p>
      <text:p text:style-name="P15"><text:span text:style-name="T6">end</text:span><text:span text:style-name="T13"> </text:span><text:span text:style-name="T6">for</text:span><text:span text:style-name="T13">;</text:span></text:p>
      <text:p text:style-name="P15"><text:span text:style-name="T6">for</text:span><text:span text:style-name="T13"> leadzero2 : leadzero</text:span></text:p>
      <text:p text:style-name="P15"><text:span text:style-name="T6">use</text:span><text:span text:style-name="T13"> </text:span><text:span text:style-name="T6">entity</text:span><text:span text:style-name="T13"> work.leadzero(rtl2);</text:span></text:p>
      <text:p text:style-name="P15"><text:span text:style-name="T6">end</text:span><text:span text:style-name="T13"> </text:span><text:span text:style-name="T6">for</text:span><text:span text:style-name="T13">;</text:span></text:p>
      <text:p text:style-name="P15"><text:soft-page-break/><text:span text:style-name="T6">for</text:span><text:span text:style-name="T13"> leadzero3 : leadzero</text:span></text:p>
      <text:p text:style-name="P15"><text:span text:style-name="T6">use</text:span><text:span text:style-name="T13"> </text:span><text:span text:style-name="T6">entity</text:span><text:span text:style-name="T13"> work.leadzero(rtl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configuration</text:span><text:span text:style-name="T13">;</text:span></text:p>
      <text:p text:style-name="P16"/>
      <text:p text:style-name="P16"/>
      <text:p text:style-name="P15"/>
      <text:p text:style-name="P16"/>
      <text:p text:style-name="P16"/>
      <text:p text:style-name="P16"><text:span text:style-name="T11">library</text:span> <text:span text:style-name="T21">ieee</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chop</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clkn</text:span><text:span text:style-name="T13">, </text:span><text:span text:style-name="T26">rstn</text:span><text:span text:style-name="T13">, </text:span><text:span text:style-name="T26">source</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tgt_h</text:span><text:span text:style-name="T13">, </text:span><text:span text:style-name="T26">tgt_fh</text:span><text:span text:style-name="T13">, </text:span><text:span text:style-name="T26">tgt_f</text:span><text:span text:style-name="T13">, </text:span><text:span text:style-name="T26">tgt_ff</text:span><text:span text:style-name="T13"> : </text:span><text:span text:style-name="T6">out</text:span><text:span text:style-name="T13"> </text:span><text:span text:style-name="T28">std_logic</text:span><text:span text:style-name="T13">);</text:span></text:p>
      <text:p text:style-name="P24">--source is the signal that is long and will be chopped</text:p>
      <text:p text:style-name="P24">--tgt_h chops source at the first falling_edge of clk</text:p>
      <text:p text:style-name="P24">--tgt_fh chops source at full half of clk period starting at falling_edge clk</text:p>
      <text:p text:style-name="P24">--tgt_f chops source at first rising_edge clk</text:p>
      <text:p text:style-name="P24">--tgt_ff chops source having a full length of clk starting at first rising_edge clk</text:p>
      <text:p text:style-name="P15"><text:span text:style-name="T6">end</text:span><text:span text:style-name="T13"> </text:span><text:span text:style-name="T22">chop</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chop</text:span><text:span text:style-name="T13"> </text:span><text:span text:style-name="T6">is</text:span></text:p>
      <text:p text:style-name="P15"><text:span text:style-name="T13"><text:s text:c="4"/></text:span><text:span text:style-name="T6">signal</text:span><text:span text:style-name="T13"> </text:span><text:span text:style-name="T39">ffh0</text:span><text:span text:style-name="T13">, </text:span><text:span text:style-name="T39">ffh1</text:span><text:span text:style-name="T13">, </text:span><text:span text:style-name="T39">fff0</text:span><text:span text:style-name="T13">, </text:span><text:span text:style-name="T39">fff1</text:span><text:span text:style-name="T13"> : </text:span><text:span text:style-name="T28">std_logic</text:span><text:span text:style-name="T13">;</text:span></text:p>
      <text:p text:style-name="P23">begin</text:p>
      <text:p text:style-name="P15"><text:span text:style-name="T13"><text:s text:c="4"/></text:span><text:span text:style-name="T38">posedge</text:span><text:span text:style-name="T13"> : </text:span><text:span text:style-name="T6">process</text:span><text:span text:style-name="T13">(</text:span><text:span text:style-name="T26">rstn</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f0</text:span><text:span text:style-name="T13"> &lt;= </text:span><text:span text:style-name="T34">'0'</text:span><text:span text:style-name="T13">;</text:span></text:p>
      <text:p text:style-name="P15"><text:span text:style-name="T13"><text:s text:c="12"/></text:span><text:span text:style-name="T39">fff1</text:span><text:span text:style-name="T13"> &lt;= </text:span><text:span text:style-name="T34">'0'</text:span><text:span text:style-name="T13">;</text:span></text:p>
      <text:p text:style-name="P15"><text:span text:style-name="T13"><text:s text:c="12"/></text:span><text:span text:style-name="T39">ffh1</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fff0</text:span><text:span text:style-name="T13"> &lt;= </text:span><text:span text:style-name="T26">source</text:span><text:span text:style-name="T13">;</text:span></text:p>
      <text:p text:style-name="P15"><text:span text:style-name="T13"><text:s text:c="12"/></text:span><text:span text:style-name="T39">fff1</text:span><text:span text:style-name="T13"> &lt;= </text:span><text:span text:style-name="T39">fff0</text:span><text:span text:style-name="T13">;</text:span></text:p>
      <text:p text:style-name="P15"><text:span text:style-name="T13"><text:s text:c="12"/></text:span><text:span text:style-name="T39">ffh1</text:span><text:span text:style-name="T13"> &lt;= </text:span><text:span text:style-name="T39">ffh0</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tgt_f</text:span><text:span text:style-name="T13"> &lt;= (</text:span><text:span text:style-name="T6">not</text:span><text:span text:style-name="T13"> </text:span><text:span text:style-name="T26">source</text:span><text:span text:style-name="T13">) </text:span><text:span text:style-name="T6">nor</text:span><text:span text:style-name="T13"> </text:span><text:span text:style-name="T39">fff0</text:span><text:span text:style-name="T13">;</text:span></text:p>
      <text:p text:style-name="P15"><text:span text:style-name="T13"><text:s text:c="4"/></text:span><text:span text:style-name="T26">tgt_ff</text:span><text:span text:style-name="T13"> &lt;= (</text:span><text:span text:style-name="T6">not</text:span><text:span text:style-name="T13"> </text:span><text:span text:style-name="T39">fff0</text:span><text:span text:style-name="T13">) </text:span><text:span text:style-name="T6">nor</text:span><text:span text:style-name="T13"> </text:span><text:span text:style-name="T39">fff1</text:span><text:span text:style-name="T13">;</text:span></text:p>
      <text:p text:style-name="P16"/>
      <text:p text:style-name="P15"><text:span text:style-name="T13"><text:s text:c="4"/></text:span><text:span text:style-name="T38">negedge</text:span><text:span text:style-name="T13"> : </text:span><text:span text:style-name="T6">process</text:span><text:span text:style-name="T13">(</text:span><text:span text:style-name="T26">rstn</text:span><text:span text:style-name="T13">, </text:span><text:span text:style-name="T26">clkn</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h0</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n</text:span><text:span text:style-name="T13">) </text:span><text:span text:style-name="T6">then</text:span></text:p>
      <text:p text:style-name="P15"><text:span text:style-name="T13"><text:s text:c="12"/></text:span><text:span text:style-name="T39">ffh0</text:span><text:span text:style-name="T13"> &lt;= </text:span><text:span text:style-name="T26">source</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tgt_h</text:span><text:span text:style-name="T13"> &lt;= (</text:span><text:span text:style-name="T6">not</text:span><text:span text:style-name="T13"> </text:span><text:span text:style-name="T26">source</text:span><text:span text:style-name="T13">) </text:span><text:span text:style-name="T6">nor</text:span><text:span text:style-name="T13"> </text:span><text:span text:style-name="T39">ffh0</text:span><text:span text:style-name="T13">;</text:span></text:p>
      <text:p text:style-name="P15"><text:soft-page-break/><text:span text:style-name="T13"><text:s text:c="4"/></text:span><text:span text:style-name="T26">tgt_fh</text:span><text:span text:style-name="T13"> &lt;= (</text:span><text:span text:style-name="T6">not</text:span><text:span text:style-name="T13"> </text:span><text:span text:style-name="T39">ffh0</text:span><text:span text:style-name="T13">) </text:span><text:span text:style-name="T6">nor</text:span><text:span text:style-name="T13"> </text:span><text:span text:style-name="T39">ffh1</text:span><text:span text:style-name="T13">;</text:span></text:p>
      <text:p text:style-name="P15"><text:span text:style-name="T6">end</text:span><text:span text:style-name="T13"> </text:span><text:span text:style-name="T22">rtl</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tbchop</text:span><text:span text:style-name="T13"> </text:span><text:span text:style-name="T6">i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chop</text:span><text:span text:style-name="T13"> </text:span><text:span text:style-name="T6">is</text:span></text:p>
      <text:p text:style-name="P15"><text:span text:style-name="T13"><text:s text:c="4"/></text:span><text:span text:style-name="T6">component</text:span><text:span text:style-name="T13"> </text:span><text:span text:style-name="T22">chop</text:span><text:span text:style-name="T13"> </text:span><text:span text:style-name="T6">is</text:span><text:span text:style-name="T13"> </text:span><text:span text:style-name="T6">port</text:span><text:span text:style-name="T13">(</text:span></text:p>
      <text:p text:style-name="P15"><text:span text:style-name="T13"><text:s text:c="8"/></text:span><text:span text:style-name="T26">clk</text:span><text:span text:style-name="T13">, </text:span><text:span text:style-name="T26">clkn</text:span><text:span text:style-name="T13">, </text:span><text:span text:style-name="T26">rstn</text:span><text:span text:style-name="T13">, </text:span><text:span text:style-name="T26">source</text:span><text:span text:style-name="T13"> : </text:span><text:span text:style-name="T6">in</text:span><text:span text:style-name="T13"> </text:span><text:span text:style-name="T28">std_logic</text:span><text:span text:style-name="T13">;</text:span></text:p>
      <text:p text:style-name="P15"><text:span text:style-name="T13"><text:s text:c="8"/></text:span><text:span text:style-name="T26">tgt_h</text:span><text:span text:style-name="T13">, </text:span><text:span text:style-name="T26">tgt_fh</text:span><text:span text:style-name="T13">, </text:span><text:span text:style-name="T26">tgt_f</text:span><text:span text:style-name="T13">, </text:span><text:span text:style-name="T26">tgt_ff</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nstant</text:span><text:span text:style-name="T13"> </text:span><text:span text:style-name="T7">halfclk</text:span><text:span text:style-name="T13"> : </text:span><text:span text:style-name="T28">time</text:span><text:span text:style-name="T13"> := </text:span><text:span text:style-name="T31">50</text:span><text:span text:style-name="T13"> </text:span><text:span text:style-name="T7">ns</text:span><text:span text:style-name="T13">;</text:span></text:p>
      <text:p text:style-name="P15"><text:span text:style-name="T6">constant</text:span><text:span text:style-name="T13"> </text:span><text:span text:style-name="T7">delay</text:span><text:span text:style-name="T13"> <text:s text:c="2"/>: </text:span><text:span text:style-name="T28">time</text:span><text:span text:style-name="T13"> := </text:span><text:span text:style-name="T31">30</text:span><text:span text:style-name="T13"> </text:span><text:span text:style-name="T7">ns</text:span><text:span text:style-name="T13">;</text:span></text:p>
      <text:p text:style-name="P16"/>
      <text:p text:style-name="P15"><text:span text:style-name="T6">signal</text:span><text:span text:style-name="T13"> </text:span><text:span text:style-name="T39">clk</text:span><text:span text:style-name="T13">, </text:span><text:span text:style-name="T39">clkn</text:span><text:span text:style-name="T13">, </text:span><text:span text:style-name="T39">rstn</text:span><text:span text:style-name="T13">, </text:span><text:span text:style-name="T39">source</text:span><text:span text:style-name="T13"> : </text:span><text:span text:style-name="T28">std_logic</text:span><text:span text:style-name="T13">;</text:span></text:p>
      <text:p text:style-name="P15"><text:span text:style-name="T6">signal</text:span><text:span text:style-name="T13"> </text:span><text:span text:style-name="T39">tgt_h</text:span><text:span text:style-name="T13">, </text:span><text:span text:style-name="T39">tgt_fh</text:span><text:span text:style-name="T13">, </text:span><text:span text:style-name="T39">tgt_f</text:span><text:span text:style-name="T13">, </text:span><text:span text:style-name="T39">tgt_ff</text:span><text:span text:style-name="T13"> : </text:span><text:span text:style-name="T28">std_logic</text:span><text:span text:style-name="T13">;</text:span></text:p>
      <text:p text:style-name="P23">begin</text:p>
      <text:p text:style-name="P15"><text:span text:style-name="T13"><text:s text:c="4"/></text:span><text:span text:style-name="T39">rstn</text:span><text:span text:style-name="T13"> &lt;= </text:span><text:span text:style-name="T34">'1'</text:span><text:span text:style-name="T13">, </text:span><text:span text:style-name="T34">'0'</text:span><text:span text:style-name="T13"> </text:span><text:span text:style-name="T6">after</text:span><text:span text:style-name="T13"> </text:span><text:span text:style-name="T7">halfclk</text:span><text:span text:style-name="T13"> </text:span><text:span text:style-name="T14">*</text:span><text:span text:style-name="T31">3</text:span><text:span text:style-name="T13"> </text:span><text:span text:style-name="T14">+</text:span><text:span text:style-name="T13"> </text:span><text:span text:style-name="T7">delay</text:span><text:span text:style-name="T13">,</text:span></text:p>
      <text:p text:style-name="P15"><text:span text:style-name="T13"><text:s text:c="4"/></text:span><text:span text:style-name="T34">'1'</text:span><text:span text:style-name="T13"> </text:span><text:span text:style-name="T6">after</text:span><text:span text:style-name="T13"> </text:span><text:span text:style-name="T7">halfclk</text:span><text:span text:style-name="T13"> </text:span><text:span text:style-name="T14">*</text:span><text:span text:style-name="T31">7</text:span><text:span text:style-name="T13"> </text:span><text:span text:style-name="T14">+</text:span><text:span text:style-name="T13"> </text:span><text:span text:style-name="T7">delay</text:span><text:span text:style-name="T13">;</text:span></text:p>
      <text:p text:style-name="P15"><text:span text:style-name="T13"><text:s text:c="4"/></text:span><text:span text:style-name="T38">clkp</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0'</text:span><text:span text:style-name="T13">; </text:span><text:span text:style-name="T6">wait</text:span><text:span text:style-name="T13"> </text:span><text:span text:style-name="T6">for</text:span><text:span text:style-name="T13"> </text:span><text:span text:style-name="T7">halfclk</text:span><text:span text:style-name="T13">;</text:span></text:p>
      <text:p text:style-name="P15"><text:span text:style-name="T13"><text:s text:c="8"/></text:span><text:span text:style-name="T39">clk</text:span><text:span text:style-name="T13"> &lt;= </text:span><text:span text:style-name="T34">'1'</text:span><text:span text:style-name="T13">; </text:span><text:span text:style-name="T6">wait</text:span><text:span text:style-name="T13"> </text:span><text:span text:style-name="T6">for</text:span><text:span text:style-name="T13"> </text:span><text:span text:style-name="T7">halfclk</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clkn</text:span><text:span text:style-name="T13"> &lt;= </text:span><text:span text:style-name="T6">not</text:span><text:span text:style-name="T13"> </text:span><text:span text:style-name="T39">clk</text:span><text:span text:style-name="T13">;</text:span></text:p>
      <text:p text:style-name="P16"/>
      <text:p text:style-name="P15"><text:span text:style-name="T13"><text:s text:c="4"/></text:span><text:span text:style-name="T38">datap</text:span><text:span text:style-name="T13"> : </text:span><text:span text:style-name="T6">process</text:span></text:p>
      <text:p text:style-name="P15"><text:span text:style-name="T13"><text:s text:c="8"/></text:span><text:span text:style-name="T6">variable</text:span><text:span text:style-name="T13"> </text:span><text:span text:style-name="T30">vec</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 </text:span><text:span text:style-name="T34">"01100011"</text:span><text:span text:style-name="T13">;</text:span></text:p>
      <text:p text:style-name="P15"><text:span text:style-name="T13"><text:s text:c="4"/></text:span><text:span text:style-name="T6">begin</text:span></text:p>
      <text:p text:style-name="P15"><text:span text:style-name="T13"><text:s text:c="8"/></text:span><text:span text:style-name="T30">vec</text:span><text:span text:style-name="T13"> := </text:span><text:span text:style-name="T30">vec</text:span><text:span text:style-name="T13">(</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30">vec</text:span><text:span text:style-name="T13">(</text:span><text:span text:style-name="T31">7</text:span><text:span text:style-name="T13">) </text:span><text:span text:style-name="T6">xor</text:span><text:span text:style-name="T13"> (</text:span><text:span text:style-name="T6">not</text:span><text:span text:style-name="T13"> </text:span><text:span text:style-name="T30">vec</text:span><text:span text:style-name="T13">(</text:span><text:span text:style-name="T31">2</text:span><text:span text:style-name="T13">)));</text:span></text:p>
      <text:p text:style-name="P15"><text:span text:style-name="T13"><text:s text:c="8"/></text:span><text:span text:style-name="T39">source</text:span><text:span text:style-name="T13"> &lt;= </text:span><text:span text:style-name="T34">'0'</text:span><text:span text:style-name="T13"> </text:span><text:span text:style-name="T6">after</text:span><text:span text:style-name="T13"> </text:span><text:span text:style-name="T7">delay</text:span><text:span text:style-name="T13">;</text:span></text:p>
      <text:p text:style-name="P15"><text:span text:style-name="T13"><text:s text:c="8"/></text:span><text:span text:style-name="T6">wait</text:span><text:span text:style-name="T13"> <text:s text:c="3"/></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if</text:span><text:span text:style-name="T13"> </text:span><text:span text:style-name="T30">vec</text:span><text:span text:style-name="T13">(</text:span><text:span text:style-name="T31">6</text:span><text:span text:style-name="T13">) = </text:span><text:span text:style-name="T34">'1'</text:span><text:span text:style-name="T13"> </text:span><text:span text:style-name="T6">then</text:span></text:p>
      <text:p text:style-name="P15"><text:span text:style-name="T13"><text:s text:c="12"/></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text:span><text:span text:style-name="T39">source</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5"><text:span text:style-name="T13"><text:s text:c="8"/></text:span><text:span text:style-name="T6">for</text:span><text:span text:style-name="T13"> j </text:span><text:span text:style-name="T6">in</text:span><text:span text:style-name="T13"> </text:span><text:span text:style-name="T31">1</text:span><text:span text:style-name="T13"> </text:span><text:span text:style-name="T6">to</text:span><text:span text:style-name="T13"> </text:span><text:span text:style-name="T31">4</text:span><text:span text:style-name="T13"> </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chop0</text:span><text:span text:style-name="T13"> : </text:span><text:span text:style-name="T22">chop</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39">clk</text:span><text:span text:style-name="T13">, </text:span><text:span text:style-name="T26">clkn</text:span><text:span text:style-name="T13"> =&gt; </text:span><text:span text:style-name="T39">clkn</text:span><text:span text:style-name="T13">, </text:span><text:span text:style-name="T26">rstn</text:span><text:span text:style-name="T13"> =&gt; </text:span><text:span text:style-name="T39">rstn</text:span><text:span text:style-name="T13">, </text:span><text:span text:style-name="T26">source</text:span><text:span text:style-name="T13"> =&gt; </text:span><text:span text:style-name="T39">source</text:span><text:span text:style-name="T13">,</text:span></text:p>
      <text:p text:style-name="P15"><text:span text:style-name="T13"><text:s text:c="17"/></text:span><text:span text:style-name="T26">tgt_h</text:span><text:span text:style-name="T13"> =&gt; </text:span><text:span text:style-name="T39">tgt_h</text:span><text:span text:style-name="T13">, </text:span><text:span text:style-name="T26">tgt_fh</text:span><text:span text:style-name="T13"> =&gt; </text:span><text:span text:style-name="T39">tgt_fh</text:span><text:span text:style-name="T13">, </text:span><text:span text:style-name="T26">tgt_f</text:span><text:span text:style-name="T13"> =&gt; </text:span><text:span text:style-name="T39">tgt_f</text:span><text:span text:style-name="T13">, </text:span><text:span text:style-name="T26">tgt_ff</text:span><text:span text:style-name="T13"> =&gt; </text:span><text:span text:style-name="T39">tgt_ff</text:span><text:span text:style-name="T13">);</text:span></text:p>
      <text:p text:style-name="P15"><text:span text:style-name="T6">end</text:span><text:span text:style-name="T13"> </text:span><text:span text:style-name="T22">beh</text:span><text:span text:style-name="T13">;</text:span></text:p>
      <text:p text:style-name="P16"><text:soft-page-break/></text:p>
      <text:p text:style-name="P24">--signal target1 is asserted at the same time as source and deasserted at </text:p>
      <text:p text:style-name="P24">--the first rising edge of the clk when source is deasserted. target2 is</text:p>
      <text:p text:style-name="P24">--asserted at the rising edge of the clk and deasserted two clk rising </text:p>
      <text:p text:style-name="P24">--edges after source is deasserted. target3 is asserted at the same time </text:p>
      <text:p text:style-name="P24">--as source and deasserted two clock rising edges after source is deasserted. </text:p>
      <text:p text:style-name="P24">--tail1 is asserted when source is deasserted. tail2 is exactle one full clock cycle wide.</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extend</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n</text:span><text:span text:style-name="T13">, </text:span><text:span text:style-name="T26">source</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trgt1</text:span><text:span text:style-name="T13">, </text:span><text:span text:style-name="T26">trgt2</text:span><text:span text:style-name="T13">, </text:span><text:span text:style-name="T26">trgt3</text:span><text:span text:style-name="T13">, </text:span><text:span text:style-name="T26">tail1</text:span><text:span text:style-name="T13">, </text:span><text:span text:style-name="T26">tail2</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extend</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extend</text:span><text:span text:style-name="T13"> </text:span><text:span text:style-name="T6">is</text:span><text:span text:style-name="T13"> </text:span></text:p>
      <text:p text:style-name="P15"><text:span text:style-name="T13"><text:s text:c="4"/></text:span><text:span text:style-name="T6">signal</text:span><text:span text:style-name="T13"> </text:span><text:span text:style-name="T39">ff0</text:span><text:span text:style-name="T13">, </text:span><text:span text:style-name="T39">ff1</text:span><text:span text:style-name="T13"> : </text:span><text:span text:style-name="T28">std_logic</text:span><text:span text:style-name="T13">;</text:span></text:p>
      <text:p text:style-name="P23">begin</text:p>
      <text:p text:style-name="P15"><text:span text:style-name="T13"><text:s text:c="4"/></text:span><text:span text:style-name="T38">posedge</text:span><text:span text:style-name="T13"> : </text:span><text:span text:style-name="T6">process</text:span><text:span text:style-name="T13">(</text:span><text:span text:style-name="T26">rstn</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0</text:span><text:span text:style-name="T13"> &lt;= </text:span><text:span text:style-name="T34">'0'</text:span><text:span text:style-name="T13">;</text:span></text:p>
      <text:p text:style-name="P15"><text:span text:style-name="T13"><text:s text:c="12"/></text:span><text:span text:style-name="T39">ff1</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ff0</text:span><text:span text:style-name="T13"> &lt;= </text:span><text:span text:style-name="T26">source</text:span><text:span text:style-name="T13">; </text:span></text:p>
      <text:p text:style-name="P15"><text:span text:style-name="T13"><text:s text:c="12"/></text:span><text:span text:style-name="T39">ff1</text:span><text:span text:style-name="T13"> &lt;= </text:span><text:span text:style-name="T39">ff0</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trgt1</text:span><text:span text:style-name="T13"> &lt;= </text:span><text:span text:style-name="T26">source</text:span><text:span text:style-name="T13"> <text:s text:c="4"/></text:span><text:span text:style-name="T6">or</text:span><text:span text:style-name="T13"> </text:span><text:span text:style-name="T39">ff0</text:span><text:span text:style-name="T13">;</text:span></text:p>
      <text:p text:style-name="P15"><text:span text:style-name="T13"><text:s text:c="4"/></text:span><text:span text:style-name="T26">trgt2</text:span><text:span text:style-name="T13"> &lt;= </text:span><text:span text:style-name="T39">ff0</text:span><text:span text:style-name="T13"> <text:s text:c="8"/></text:span><text:span text:style-name="T6">or</text:span><text:span text:style-name="T13"> </text:span><text:span text:style-name="T39">ff1</text:span><text:span text:style-name="T13">;</text:span></text:p>
      <text:p text:style-name="P15"><text:span text:style-name="T13"><text:s text:c="4"/></text:span><text:span text:style-name="T26">trgt3</text:span><text:span text:style-name="T13"> &lt;= </text:span><text:span text:style-name="T26">source</text:span><text:span text:style-name="T13"> <text:s text:c="4"/></text:span><text:span text:style-name="T6">or</text:span><text:span text:style-name="T13"> </text:span><text:span text:style-name="T39">ff0</text:span><text:span text:style-name="T13"> </text:span><text:span text:style-name="T6">or</text:span><text:span text:style-name="T13"> </text:span><text:span text:style-name="T39">ff1</text:span><text:span text:style-name="T13">;</text:span></text:p>
      <text:p text:style-name="P16"/>
      <text:p text:style-name="P15"><text:span text:style-name="T13"><text:s text:c="4"/></text:span><text:span text:style-name="T26">tail1</text:span><text:span text:style-name="T13"> &lt;= </text:span><text:span text:style-name="T26">source</text:span><text:span text:style-name="T13"> <text:s text:c="4"/></text:span><text:span text:style-name="T6">nor</text:span><text:span text:style-name="T13"> (</text:span><text:span text:style-name="T6">not</text:span><text:span text:style-name="T13"> </text:span><text:span text:style-name="T39">ff0</text:span><text:span text:style-name="T13">);</text:span></text:p>
      <text:p text:style-name="P15"><text:span text:style-name="T13"><text:s text:c="4"/></text:span><text:span text:style-name="T26">tail2</text:span><text:span text:style-name="T13"> &lt;= </text:span><text:span text:style-name="T39">ff0</text:span><text:span text:style-name="T13"> <text:s text:c="8"/></text:span><text:span text:style-name="T6">nor</text:span><text:span text:style-name="T13"> (</text:span><text:span text:style-name="T6">not</text:span><text:span text:style-name="T13"> </text:span><text:span text:style-name="T39">ff1</text:span><text:span text:style-name="T13">);</text:span></text:p>
      <text:p text:style-name="P15"><text:span text:style-name="T6">end</text:span><text:span text:style-name="T13"> </text:span><text:span text:style-name="T22">rtl</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tbextend</text:span><text:span text:style-name="T13"> </text:span><text:span text:style-name="T6">is</text:span></text:p>
      <text:p text:style-name="P15"><text:span text:style-name="T6">end</text:span><text:span text:style-name="T13"> </text:span><text:span text:style-name="T6">entity</text:span><text:span text:style-name="T13">; </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extend</text:span><text:span text:style-name="T13"> </text:span><text:span text:style-name="T6">is</text:span></text:p>
      <text:p text:style-name="P15"><text:span text:style-name="T13"><text:s text:c="4"/></text:span><text:span text:style-name="T6">component</text:span><text:span text:style-name="T13"> </text:span><text:span text:style-name="T22">extend</text:span><text:span text:style-name="T13"> </text:span><text:span text:style-name="T6">is</text:span><text:span text:style-name="T13"> </text:span><text:span text:style-name="T6">port</text:span><text:span text:style-name="T13">(</text:span></text:p>
      <text:p text:style-name="P15"><text:span text:style-name="T13"><text:s text:c="8"/></text:span><text:span text:style-name="T26">clk</text:span><text:span text:style-name="T13">, </text:span><text:span text:style-name="T26">rstn</text:span><text:span text:style-name="T13">, </text:span><text:span text:style-name="T26">source</text:span><text:span text:style-name="T13"> : </text:span><text:span text:style-name="T6">in</text:span><text:span text:style-name="T13"> </text:span><text:span text:style-name="T28">std_logic</text:span><text:span text:style-name="T13">;</text:span></text:p>
      <text:p text:style-name="P15"><text:span text:style-name="T13"><text:s text:c="8"/></text:span><text:span text:style-name="T26">trgt1</text:span><text:span text:style-name="T13">, </text:span><text:span text:style-name="T26">trgt2</text:span><text:span text:style-name="T13">, </text:span><text:span text:style-name="T26">trgt3</text:span><text:span text:style-name="T13">, </text:span><text:span text:style-name="T26">tail1</text:span><text:span text:style-name="T13">, </text:span><text:span text:style-name="T26">tail2</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oft-page-break/><text:span text:style-name="T6">signal</text:span><text:span text:style-name="T13"> </text:span><text:span text:style-name="T39">clk</text:span><text:span text:style-name="T13">, </text:span><text:span text:style-name="T39">rstn</text:span><text:span text:style-name="T13">, </text:span><text:span text:style-name="T39">source</text:span><text:span text:style-name="T13"> : </text:span><text:span text:style-name="T28">std_logic</text:span><text:span text:style-name="T13">;</text:span></text:p>
      <text:p text:style-name="P15"><text:span text:style-name="T6">signal</text:span><text:span text:style-name="T13"> </text:span><text:span text:style-name="T39">trgt1</text:span><text:span text:style-name="T13">, </text:span><text:span text:style-name="T39">trgt2</text:span><text:span text:style-name="T13">, </text:span><text:span text:style-name="T39">trgt3</text:span><text:span text:style-name="T13">, </text:span><text:span text:style-name="T39">tail1</text:span><text:span text:style-name="T13">, </text:span><text:span text:style-name="T39">tail2</text:span><text:span text:style-name="T13"> : </text:span><text:span text:style-name="T28">std_logic</text:span><text:span text:style-name="T13">;</text:span></text:p>
      <text:p text:style-name="P16"/>
      <text:p text:style-name="P15"><text:span text:style-name="T6">constant</text:span><text:span text:style-name="T13"> </text:span><text:span text:style-name="T7">halfclk</text:span><text:span text:style-name="T13"> : </text:span><text:span text:style-name="T28">time</text:span><text:span text:style-name="T13"> := </text:span><text:span text:style-name="T31">50</text:span><text:span text:style-name="T13"> </text:span><text:span text:style-name="T7">ns</text:span><text:span text:style-name="T13">;</text:span></text:p>
      <text:p text:style-name="P15"><text:span text:style-name="T6">constant</text:span><text:span text:style-name="T13"> </text:span><text:span text:style-name="T7">delay</text:span><text:span text:style-name="T13"> <text:s text:c="2"/>: </text:span><text:span text:style-name="T28">time</text:span><text:span text:style-name="T13"> := </text:span><text:span text:style-name="T31">30</text:span><text:span text:style-name="T13"> </text:span><text:span text:style-name="T7">ns</text:span><text:span text:style-name="T13">;</text:span></text:p>
      <text:p text:style-name="P23">begin</text:p>
      <text:p text:style-name="P15"><text:span text:style-name="T13"><text:s text:c="4"/></text:span><text:span text:style-name="T39">rstn</text:span><text:span text:style-name="T13"> &lt;= </text:span><text:span text:style-name="T34">'1'</text:span><text:span text:style-name="T13">, </text:span><text:span text:style-name="T34">'0'</text:span><text:span text:style-name="T13"> </text:span><text:span text:style-name="T6">after</text:span><text:span text:style-name="T13"> </text:span><text:span text:style-name="T7">halfclk</text:span><text:span text:style-name="T13"> </text:span><text:span text:style-name="T14">*</text:span><text:span text:style-name="T31">3</text:span><text:span text:style-name="T13"> </text:span><text:span text:style-name="T14">+</text:span><text:span text:style-name="T13"> </text:span><text:span text:style-name="T7">delay</text:span><text:span text:style-name="T13">,</text:span></text:p>
      <text:p text:style-name="P15"><text:span text:style-name="T13"><text:s text:c="4"/></text:span><text:span text:style-name="T34">'1'</text:span><text:span text:style-name="T13"> </text:span><text:span text:style-name="T6">after</text:span><text:span text:style-name="T13"> </text:span><text:span text:style-name="T7">halfclk</text:span><text:span text:style-name="T13"> </text:span><text:span text:style-name="T14">*</text:span><text:span text:style-name="T31">7</text:span><text:span text:style-name="T13"> </text:span><text:span text:style-name="T14">+</text:span><text:span text:style-name="T13"> </text:span><text:span text:style-name="T7">delay</text:span><text:span text:style-name="T13">;</text:span></text:p>
      <text:p text:style-name="P15"><text:span text:style-name="T13"><text:s text:c="4"/></text:span><text:span text:style-name="T38">clkp</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1'</text:span><text:span text:style-name="T13">; </text:span><text:span text:style-name="T6">wait</text:span><text:span text:style-name="T13"> </text:span><text:span text:style-name="T6">for</text:span><text:span text:style-name="T13"> </text:span><text:span text:style-name="T7">halfclk</text:span><text:span text:style-name="T13">;</text:span></text:p>
      <text:p text:style-name="P15"><text:span text:style-name="T13"><text:s text:c="8"/></text:span><text:span text:style-name="T39">clk</text:span><text:span text:style-name="T13"> &lt;= </text:span><text:span text:style-name="T34">'0'</text:span><text:span text:style-name="T13">; </text:span><text:span text:style-name="T6">wait</text:span><text:span text:style-name="T13"> </text:span><text:span text:style-name="T6">for</text:span><text:span text:style-name="T13"> </text:span><text:span text:style-name="T7">halfclk</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datap</text:span><text:span text:style-name="T13"> : </text:span><text:span text:style-name="T6">process</text:span></text:p>
      <text:p text:style-name="P15"><text:span text:style-name="T13"><text:s text:c="8"/></text:span><text:span text:style-name="T6">variable</text:span><text:span text:style-name="T13"> </text:span><text:span text:style-name="T30">vec</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 </text:span><text:span text:style-name="T34">"01111001"</text:span><text:span text:style-name="T13">;</text:span></text:p>
      <text:p text:style-name="P15"><text:span text:style-name="T13"><text:s text:c="4"/></text:span><text:span text:style-name="T6">begin</text:span></text:p>
      <text:p text:style-name="P15"><text:span text:style-name="T13"><text:s text:c="8"/></text:span><text:span text:style-name="T30">vec</text:span><text:span text:style-name="T13"> := </text:span><text:span text:style-name="T30">vec</text:span><text:span text:style-name="T13">(</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30">vec</text:span><text:span text:style-name="T13">(</text:span><text:span text:style-name="T31">7</text:span><text:span text:style-name="T13">) </text:span><text:span text:style-name="T6">xor</text:span><text:span text:style-name="T13"> (</text:span><text:span text:style-name="T6">not</text:span><text:span text:style-name="T13"> </text:span><text:span text:style-name="T30">vec</text:span><text:span text:style-name="T13">(</text:span><text:span text:style-name="T31">2</text:span><text:span text:style-name="T13">)));</text:span></text:p>
      <text:p text:style-name="P15"><text:span text:style-name="T13"><text:s text:c="8"/></text:span><text:span text:style-name="T39">source</text:span><text:span text:style-name="T13"> &lt;= </text:span><text:span text:style-name="T34">'0'</text:span><text:span text:style-name="T13"> </text:span><text:span text:style-name="T6">after</text:span><text:span text:style-name="T13"> </text:span><text:span text:style-name="T7">delay</text:span><text:span text:style-name="T13">;</text:span></text:p>
      <text:p text:style-name="P15"><text:span text:style-name="T13"><text:s text:c="8"/></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if</text:span><text:span text:style-name="T13"> </text:span><text:span text:style-name="T30">vec</text:span><text:span text:style-name="T13">(</text:span><text:span text:style-name="T31">6</text:span><text:span text:style-name="T13">) = </text:span><text:span text:style-name="T34">'1'</text:span><text:span text:style-name="T13"> </text:span><text:span text:style-name="T6">then</text:span></text:p>
      <text:p text:style-name="P15"><text:span text:style-name="T13"><text:s text:c="12"/></text:span><text:span text:style-name="T6">wait</text:span><text:span text:style-name="T13"> </text:span><text:span text:style-name="T6">until</text:span><text:span text:style-name="T13"> </text:span><text:span text:style-name="T14">fall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8"/></text:span><text:span text:style-name="T39">source</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5"><text:span text:style-name="T13"><text:s text:c="8"/></text:span><text:span text:style-name="T6">for</text:span><text:span text:style-name="T13"> j </text:span><text:span text:style-name="T6">in</text:span><text:span text:style-name="T13"> </text:span><text:span text:style-name="T31">1</text:span><text:span text:style-name="T13"> </text:span><text:span text:style-name="T6">to</text:span><text:span text:style-name="T13"> </text:span><text:span text:style-name="T31">4</text:span><text:span text:style-name="T13"> </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extend0</text:span><text:span text:style-name="T13"> : </text:span><text:span text:style-name="T22">extend</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39">clk</text:span><text:span text:style-name="T13">, </text:span><text:span text:style-name="T26">rstn</text:span><text:span text:style-name="T13"> =&gt; </text:span><text:span text:style-name="T39">rstn</text:span><text:span text:style-name="T13">, </text:span><text:span text:style-name="T26">source</text:span><text:span text:style-name="T13"> =&gt; </text:span><text:span text:style-name="T39">source</text:span><text:span text:style-name="T13">, </text:span><text:span text:style-name="T26">trgt1</text:span><text:span text:style-name="T13"> =&gt; </text:span><text:span text:style-name="T39">trgt1</text:span><text:span text:style-name="T13">, </text:span></text:p>
      <text:p text:style-name="P15"><text:span text:style-name="T13"><text:s text:c="17"/></text:span><text:span text:style-name="T26">trgt2</text:span><text:span text:style-name="T13"> =&gt; </text:span><text:span text:style-name="T39">trgt2</text:span><text:span text:style-name="T13">, </text:span><text:span text:style-name="T26">trgt3</text:span><text:span text:style-name="T13"> =&gt; </text:span><text:span text:style-name="T39">trgt3</text:span><text:span text:style-name="T13">, </text:span><text:span text:style-name="T26">tail1</text:span><text:span text:style-name="T13"> =&gt; </text:span><text:span text:style-name="T39">tail1</text:span><text:span text:style-name="T13">, </text:span><text:span text:style-name="T26">tail2</text:span><text:span text:style-name="T13"> =&gt; </text:span><text:span text:style-name="T39">tail2</text:span><text:span text:style-name="T13">);</text:span></text:p>
      <text:p text:style-name="P15"><text:span text:style-name="T6">end</text:span><text:span text:style-name="T13"> </text:span><text:span text:style-name="T22">beh</text:span><text:span text:style-name="T13">;</text:span></text:p>
      <text:p text:style-name="P16"/>
      <text:p text:style-name="P24">--JK Flip Flop</text:p>
      <text:p text:style-name="P24">--JK "00" - no change</text:p>
      <text:p text:style-name="P24">--JK "01" - flip flop is cleared to '0'</text:p>
      <text:p text:style-name="P24">--JK "10" - flip flop is set to '1'</text:p>
      <text:p text:style-name="P24">--JK "11" - flip flop reversed</text:p>
      <text:p text:style-name="P24"/>
      <text:p text:style-name="P24"/>
      <text:p text:style-name="P24"/>
      <text:p text:style-name="P24">library ieee;</text:p>
      <text:p text:style-name="P24"><text:s text:c="4"/>use ieee.std_logic_1164.all;</text:p>
      <text:p text:style-name="P24"/>
      <text:p text:style-name="P24">entity my_jkff is port(</text:p>
      <text:p text:style-name="P24"><text:s text:c="4"/>clk, rstn, j, k : in std_logic;</text:p>
      <text:p text:style-name="P24"><text:s text:c="4"/>q, qn : out std_logic);</text:p>
      <text:p text:style-name="P24">end my_jkff;</text:p>
      <text:p text:style-name="P24"/>
      <text:p text:style-name="P24"><text:soft-page-break/>architecture rtl of my_jkff is</text:p>
      <text:p text:style-name="P24"><text:s text:c="4"/>signal ff : std_logic;</text:p>
      <text:p text:style-name="P24">begin</text:p>
      <text:p text:style-name="P24"><text:s text:c="4"/>jkff0 : process(clk, rstn)</text:p>
      <text:p text:style-name="P24"><text:s text:c="8"/>variable jk : std_logic_vector(1 downto 0);</text:p>
      <text:p text:style-name="P24">begin</text:p>
      <text:p text:style-name="P24"><text:s text:c="4"/>if rstn = '0' then</text:p>
      <text:p text:style-name="P24"><text:s text:c="8"/>ff &lt;= '0';</text:p>
      <text:p text:style-name="P24"><text:s text:c="4"/>elsif rising_edge(clk) then</text:p>
      <text:p text:style-name="P24"><text:s text:c="8"/>jk := j &amp; k;</text:p>
      <text:p text:style-name="P24"><text:s text:c="8"/>case jk is</text:p>
      <text:p text:style-name="P24"><text:s text:c="12"/>when "01" =&gt; ff &lt;= '0';</text:p>
      <text:p text:style-name="P24"><text:s text:c="12"/>when "10" =&gt; ff &lt;= '1';</text:p>
      <text:p text:style-name="P24"><text:s text:c="12"/>when "11" =&gt; ff &lt;= <text:s/>not ff;</text:p>
      <text:p text:style-name="P24"><text:s text:c="12"/>when others =&gt; ff &lt;= ff;</text:p>
      <text:p text:style-name="P24"><text:s text:c="8"/>end case;</text:p>
      <text:p text:style-name="P24"><text:s text:c="4"/>end if; </text:p>
      <text:p text:style-name="P24">end process;</text:p>
      <text:p text:style-name="P24"/>
      <text:p text:style-name="P24">q &lt;= ff after 2 ns; qn &lt;= not ff after 2 ns;</text:p>
      <text:p text:style-name="P24">end rtl;</text:p>
      <text:p text:style-name="P24"/>
      <text:p text:style-name="P24"/>
      <text:p text:style-name="P24"/>
      <text:p text:style-name="P24"/>
      <text:p text:style-name="P24"/>
      <text:p text:style-name="P24"/>
      <text:p text:style-name="P24">library ieee;</text:p>
      <text:p text:style-name="P24"><text:s text:c="4"/>use ieee.std_logic_1164.all;</text:p>
      <text:p text:style-name="P24"><text:s text:c="4"/>use ieee.numeric_std.all;</text:p>
      <text:p text:style-name="P24"/>
      <text:p text:style-name="P24">entity pwm_mod is port(</text:p>
      <text:p text:style-name="P24"><text:s text:c="4"/>clk, rst : std_logic; <text:s text:c="3"/></text:p>
      <text:p text:style-name="P24"><text:s text:c="4"/>led0: out std_logic);</text:p>
      <text:p text:style-name="P24">end entity;</text:p>
      <text:p text:style-name="P24"/>
      <text:p text:style-name="P24">architecture arch of pwm_mod is</text:p>
      <text:p text:style-name="P24"><text:s text:c="4"/>signal clk_div_reg, clk_div_next : unsigned (13 downto 0);</text:p>
      <text:p text:style-name="P24"><text:s text:c="4"/>signal pwm0_reg, pwm0_next, pwm1_reg, pwm1_next : unsigned (7 downto 0);</text:p>
      <text:p text:style-name="P24"><text:s text:c="4"/>signal led_inv_0, led_inv_1, clk_div : std_logic;</text:p>
      <text:p text:style-name="P24">begin</text:p>
      <text:p text:style-name="P24"/>
      <text:p text:style-name="P24"><text:s text:c="4"/>process(clk, rst)</text:p>
      <text:p text:style-name="P24"><text:s text:c="4"/>begin</text:p>
      <text:p text:style-name="P24"><text:s text:c="8"/>if rst = '0' then</text:p>
      <text:p text:style-name="P24"><text:s text:c="12"/>clk_div_reg &lt;= (others =&gt; '0');</text:p>
      <text:p text:style-name="P24"><text:s text:c="8"/>elsif rising_edge(clk) then</text:p>
      <text:p text:style-name="P24"><text:s text:c="12"/>clk_div_reg &lt;= clk_div_next;</text:p>
      <text:p text:style-name="P24"><text:s text:c="8"/>end if;</text:p>
      <text:p text:style-name="P24"><text:s text:c="4"/>end process;</text:p>
      <text:p text:style-name="P24"><text:soft-page-break/></text:p>
      <text:p text:style-name="P24"><text:s text:c="4"/>clk_div_next &lt;= (others =&gt; '0') when clk_div_reg = 5000 else clk_div_reg + 1;</text:p>
      <text:p text:style-name="P24"/>
      <text:p text:style-name="P24"><text:s text:c="4"/>clk_div &lt;= '1' when clk_div_reg = 5000 else '0';</text:p>
      <text:p text:style-name="P24"/>
      <text:p text:style-name="P24"/>
      <text:p text:style-name="P24"><text:s text:c="4"/>process(clk_div, rst)</text:p>
      <text:p text:style-name="P24"><text:s text:c="4"/>begin</text:p>
      <text:p text:style-name="P24"><text:s text:c="8"/>if rst = '0' then</text:p>
      <text:p text:style-name="P24"><text:s text:c="12"/>pwm0_reg &lt;= (others =&gt; '0');</text:p>
      <text:p text:style-name="P24"><text:s text:c="12"/>pwm1_reg &lt;= (others =&gt; '0');</text:p>
      <text:p text:style-name="P24"><text:s text:c="8"/>elsif rising_edge(clk_div) then</text:p>
      <text:p text:style-name="P24"><text:s text:c="12"/>pwm0_reg &lt;= pwm0_next;</text:p>
      <text:p text:style-name="P24"><text:s text:c="12"/>pwm1_reg &lt;= pwm1_next;</text:p>
      <text:p text:style-name="P24"><text:s text:c="8"/>end if;</text:p>
      <text:p text:style-name="P24"><text:s text:c="4"/>end process;</text:p>
      <text:p text:style-name="P24"/>
      <text:p text:style-name="P24"><text:s text:c="4"/>pwm0_next &lt;= (others =&gt; '0') when pwm0_reg = 254 else pwm0_reg + 1;</text:p>
      <text:p text:style-name="P24"><text:s text:c="4"/>pwm1_next &lt;= (others =&gt; '0') when pwm1_reg = 252 else pwm1_reg + 1;</text:p>
      <text:p text:style-name="P24"/>
      <text:p text:style-name="P24"><text:s text:c="4"/>led_inv_0 &lt;= '1' when pwm0_reg &gt; 127 else '0';</text:p>
      <text:p text:style-name="P24"><text:s text:c="4"/>led_inv_1 &lt;= '1' when pwm1_reg &gt; 126 else '0';</text:p>
      <text:p text:style-name="P24"><text:s text:c="4"/>led0 &lt;= led_inv_0 xor led_inv_1; <text:s text:c="3"/></text:p>
      <text:p text:style-name="P24"/>
      <text:p text:style-name="P24">end arch;</text:p>
      <text:p text:style-name="P24"/>
      <text:p text:style-name="P24"/>
      <text:p text:style-name="P24">library ieee;</text:p>
      <text:p text:style-name="P24"><text:s text:c="4"/>use ieee.std_logic_1164.all;</text:p>
      <text:p text:style-name="P24"/>
      <text:p text:style-name="P24">entity flag_buf is </text:p>
      <text:p text:style-name="P24"><text:s text:c="4"/>generic(w: integer := 8);</text:p>
      <text:p text:style-name="P24"><text:s text:c="4"/>port(</text:p>
      <text:p text:style-name="P24"><text:s text:c="8"/>clk, rst: in std_logic;</text:p>
      <text:p text:style-name="P24"><text:s text:c="8"/>clr_flag, set_flag: in std_logic;</text:p>
      <text:p text:style-name="P24"><text:s text:c="8"/>din: in std_logic_vector(w-1 downto 0);</text:p>
      <text:p text:style-name="P24"><text:s text:c="8"/>dout: out std_logic_vector(w-1 downto 0);</text:p>
      <text:p text:style-name="P24"><text:s text:c="8"/>flag: out std_logic);</text:p>
      <text:p text:style-name="P24">end flag_buf;</text:p>
      <text:p text:style-name="P24"/>
      <text:p text:style-name="P24">architecture arch of flag_buf is</text:p>
      <text:p text:style-name="P24"><text:s text:c="4"/>signal buf_reg, buf_next: std_logic_vector(w-1 downto 0);</text:p>
      <text:p text:style-name="P24"><text:s text:c="4"/>signal flag_reg, flag_next: std_logic;</text:p>
      <text:p text:style-name="P24">begin</text:p>
      <text:p text:style-name="P24"><text:s text:c="4"/>--ff &amp; register</text:p>
      <text:p text:style-name="P24"><text:s text:c="4"/>process(clk, rst)</text:p>
      <text:p text:style-name="P24"><text:s text:c="4"/>begin</text:p>
      <text:p text:style-name="P24"><text:s text:c="8"/>if rst = '1' then</text:p>
      <text:p text:style-name="P24"><text:s text:c="12"/>buf_reg &lt;= (others =&gt; '0');</text:p>
      <text:p text:style-name="P24"><text:s text:c="12"/>flag_reg &lt;= '0';</text:p>
      <text:p text:style-name="P24"><text:soft-page-break/><text:s text:c="8"/>elsif(rising_edge(clk)) then</text:p>
      <text:p text:style-name="P24"><text:s text:c="12"/>buf_reg &lt;= buf_next;</text:p>
      <text:p text:style-name="P24"><text:s text:c="12"/>flag_reg &lt;= flag_next;</text:p>
      <text:p text:style-name="P24"><text:s text:c="8"/>end if;</text:p>
      <text:p text:style-name="P24"><text:s text:c="4"/>end process;</text:p>
      <text:p text:style-name="P24"><text:s text:c="4"/>--next-state logic</text:p>
      <text:p text:style-name="P24"><text:s text:c="4"/>process(buf_reg, flag_reg, set_flag, clr_flag, din)</text:p>
      <text:p text:style-name="P24"><text:s text:c="4"/>begin</text:p>
      <text:p text:style-name="P24"><text:s text:c="8"/>buf_next &lt;= buf_reg;</text:p>
      <text:p text:style-name="P24"><text:s text:c="8"/>flag_next &lt;= flag_reg;</text:p>
      <text:p text:style-name="P24"><text:s text:c="8"/>if (set_flag = '1') then</text:p>
      <text:p text:style-name="P24"><text:s text:c="12"/>buf_next &lt;= din;</text:p>
      <text:p text:style-name="P24"><text:s text:c="12"/>flag_next &lt;= '1';</text:p>
      <text:p text:style-name="P24"><text:s text:c="8"/>elsif (clr_flag = '1') then</text:p>
      <text:p text:style-name="P24"><text:s text:c="12"/>flag_next &lt;= '0';</text:p>
      <text:p text:style-name="P24"><text:s text:c="8"/>end if;</text:p>
      <text:p text:style-name="P24"><text:s text:c="4"/>end process;</text:p>
      <text:p text:style-name="P24"><text:s text:c="4"/>--output logic</text:p>
      <text:p text:style-name="P24"><text:s text:c="4"/>dout &lt;= buf_reg;</text:p>
      <text:p text:style-name="P24"><text:s text:c="4"/>flag &lt;= flag_reg;</text:p>
      <text:p text:style-name="P24">end arch;</text:p>
      <text:p text:style-name="P24"/>
      <text:p text:style-name="P24"/>
      <text:p text:style-name="P24">library ieee;</text:p>
      <text:p text:style-name="P24"><text:s text:c="4"/>use ieee.std_logic_1164.all;</text:p>
      <text:p text:style-name="P24"><text:s text:c="4"/>use ieee. numeric_std.all;</text:p>
      <text:p text:style-name="P24"/>
      <text:p text:style-name="P24">entity uart_tx is</text:p>
      <text:p text:style-name="P24"><text:s text:c="4"/>generic( <text:s text:c="3"/></text:p>
      <text:p text:style-name="P24"><text:s text:c="8"/>dbit: integer := 8; --# data bits</text:p>
      <text:p text:style-name="P24"><text:s text:c="8"/>sb_tick: integer := 16); --# ticks for stop bits</text:p>
      <text:p text:style-name="P24"><text:s text:c="4"/>port(</text:p>
      <text:p text:style-name="P24"><text:s text:c="8"/>clk, rst: in std_logic;</text:p>
      <text:p text:style-name="P24"><text:s text:c="8"/>tx_start: in std_logic;</text:p>
      <text:p text:style-name="P24"><text:s text:c="8"/>s_tick: in std_logic;</text:p>
      <text:p text:style-name="P24"><text:s text:c="8"/>din: in std_logic_vector(7 downto 0);</text:p>
      <text:p text:style-name="P24"><text:s text:c="8"/>tx_done_tick: out std_logic;</text:p>
      <text:p text:style-name="P24"><text:s text:c="8"/>tx: out std_logic);</text:p>
      <text:p text:style-name="P24"/>
      <text:p text:style-name="P24">end uart_tx;</text:p>
      <text:p text:style-name="P24"/>
      <text:p text:style-name="P24">architecture arch of uart_tx is</text:p>
      <text:p text:style-name="P24"><text:s text:c="4"/>type state_type is(idle, start, data, stop);</text:p>
      <text:p text:style-name="P24"><text:s text:c="4"/>signal state_reg, state_next: state_type;</text:p>
      <text:p text:style-name="P24"><text:s text:c="4"/>signal s_reg, s_next: unsigned(3 downto 0);</text:p>
      <text:p text:style-name="P24"><text:s text:c="4"/>signal n_reg, n_next: unsigned(2 downto 0);</text:p>
      <text:p text:style-name="P24"><text:s text:c="4"/>signal b_reg, b_next: std_logic_vector(7 downto 0);</text:p>
      <text:p text:style-name="P24"><text:s text:c="4"/>signal tx_reg, tx_next: std_logic;</text:p>
      <text:p text:style-name="P24">begin</text:p>
      <text:p text:style-name="P24"><text:s text:c="4"/>--FSMD state &amp; data registers</text:p>
      <text:p text:style-name="P24"><text:soft-page-break/><text:s text:c="4"/>process(clk, rst)</text:p>
      <text:p text:style-name="P24"><text:s text:c="4"/>begin</text:p>
      <text:p text:style-name="P24"><text:s text:c="8"/>if rst = '1' then</text:p>
      <text:p text:style-name="P24"><text:s text:c="12"/>state_reg &lt;= idle;</text:p>
      <text:p text:style-name="P24"><text:s text:c="12"/>s_reg &lt;= (others =&gt; '0');</text:p>
      <text:p text:style-name="P24"><text:s text:c="12"/>n_reg &lt;= (others =&gt; '0');</text:p>
      <text:p text:style-name="P24"><text:s text:c="12"/>b_reg &lt;= (others =&gt; '0');</text:p>
      <text:p text:style-name="P24"><text:s text:c="12"/>tx_reg &lt;= '1';</text:p>
      <text:p text:style-name="P24"><text:s text:c="8"/>elsif rising_edge(clk) then </text:p>
      <text:p text:style-name="P24"><text:s text:c="12"/>state_reg &lt;= state_next;</text:p>
      <text:p text:style-name="P24"><text:s text:c="12"/>s_reg &lt;= s_next;</text:p>
      <text:p text:style-name="P24"><text:s text:c="12"/>n_reg &lt;= n_next;</text:p>
      <text:p text:style-name="P24"><text:s text:c="12"/>b_reg &lt;= b_next;</text:p>
      <text:p text:style-name="P24"><text:s text:c="12"/>tx_reg &lt;= tx_next;</text:p>
      <text:p text:style-name="P24"><text:s text:c="8"/>end if;</text:p>
      <text:p text:style-name="P24"><text:s text:c="4"/>end process;</text:p>
      <text:p text:style-name="P24"><text:s text:c="4"/>--next-state logic &amp; data path function units/routing</text:p>
      <text:p text:style-name="P24"><text:s text:c="4"/>process(state_reg, s_reg, n_reg, b_reg, s_tick, tx_reg, tx_start, din)</text:p>
      <text:p text:style-name="P24"><text:s text:c="4"/>begin</text:p>
      <text:p text:style-name="P24"><text:s text:c="8"/>state_next &lt;= state_reg;</text:p>
      <text:p text:style-name="P24"><text:s text:c="8"/>s_next &lt;= s_reg;</text:p>
      <text:p text:style-name="P24"><text:s text:c="8"/>n_next &lt;= n_reg;</text:p>
      <text:p text:style-name="P24"><text:s text:c="8"/>b_next &lt;= b_reg;</text:p>
      <text:p text:style-name="P24"><text:s text:c="8"/>tx_next &lt;= tx_reg;</text:p>
      <text:p text:style-name="P24"><text:s text:c="8"/>tx_done_tick &lt;= '0';</text:p>
      <text:p text:style-name="P24"/>
      <text:p text:style-name="P24"><text:s text:c="8"/>case state_reg is</text:p>
      <text:p text:style-name="P24"><text:s text:c="12"/>when idle =&gt; </text:p>
      <text:p text:style-name="P24"><text:s text:c="16"/>tx_next &lt;= '1';</text:p>
      <text:p text:style-name="P24"><text:s text:c="16"/>if tx_start = '1' then</text:p>
      <text:p text:style-name="P24"><text:s text:c="20"/>state_next &lt;= start;</text:p>
      <text:p text:style-name="P24"><text:s text:c="20"/>s_next &lt;= (others =&gt; '0');</text:p>
      <text:p text:style-name="P24"><text:s text:c="20"/>b_next &lt;= din;</text:p>
      <text:p text:style-name="P24"><text:s text:c="16"/>end if;</text:p>
      <text:p text:style-name="P24"/>
      <text:p text:style-name="P24"><text:s text:c="12"/>when start =&gt; </text:p>
      <text:p text:style-name="P24"><text:s text:c="16"/>tx_next &lt;= '0';</text:p>
      <text:p text:style-name="P24"><text:s text:c="16"/>if (s_tick = '1') then</text:p>
      <text:p text:style-name="P24"><text:s text:c="20"/>if s_reg = 15 then</text:p>
      <text:p text:style-name="P24"><text:s text:c="24"/>state_next &lt;= data;</text:p>
      <text:p text:style-name="P24"><text:s text:c="24"/>s_next &lt;= (others =&gt; '0');</text:p>
      <text:p text:style-name="P24"><text:s text:c="24"/>n_next &lt;= (others =&gt; '0');</text:p>
      <text:p text:style-name="P24"><text:s text:c="20"/>else</text:p>
      <text:p text:style-name="P24"><text:s text:c="24"/>s_next &lt;= s_reg +1;</text:p>
      <text:p text:style-name="P24"><text:s text:c="20"/>end if;</text:p>
      <text:p text:style-name="P24"><text:s text:c="16"/>end if;</text:p>
      <text:p text:style-name="P24"/>
      <text:p text:style-name="P24"><text:s text:c="12"/>when data =&gt; </text:p>
      <text:p text:style-name="P24"><text:s text:c="16"/>tx_next &lt;= b_reg(0);</text:p>
      <text:p text:style-name="P24"><text:s text:c="16"/>if s_tick = '1' then</text:p>
      <text:p text:style-name="P24"><text:soft-page-break/><text:s text:c="20"/>if s_reg = 15 then</text:p>
      <text:p text:style-name="P24"><text:s text:c="24"/>s_next &lt;= (others =&gt; '0');</text:p>
      <text:p text:style-name="P24"><text:s text:c="24"/>b_next &lt;= '0' &amp; b_reg(7 downto 1);</text:p>
      <text:p text:style-name="P24"><text:s text:c="24"/>if n_reg = dbit-1 then</text:p>
      <text:p text:style-name="P24"><text:s text:c="28"/>state_next &lt;= stop;</text:p>
      <text:p text:style-name="P24"><text:s text:c="24"/>else</text:p>
      <text:p text:style-name="P24"><text:s text:c="28"/>n_next &lt;= n_reg +1;</text:p>
      <text:p text:style-name="P24"><text:s text:c="24"/>end if;</text:p>
      <text:p text:style-name="P24"><text:s text:c="20"/>else</text:p>
      <text:p text:style-name="P24"><text:s text:c="24"/>s_next &lt;= s_reg +1;</text:p>
      <text:p text:style-name="P24"><text:s text:c="20"/>end if;</text:p>
      <text:p text:style-name="P24"><text:s text:c="16"/>end if;</text:p>
      <text:p text:style-name="P24"/>
      <text:p text:style-name="P24"><text:s text:c="12"/>when stop =&gt;</text:p>
      <text:p text:style-name="P24"><text:s text:c="16"/>tx_next &lt;= '1';</text:p>
      <text:p text:style-name="P24"><text:s text:c="16"/>if s_tick = '1' then</text:p>
      <text:p text:style-name="P24"><text:s text:c="20"/>if s_reg = sb_tick -1 then</text:p>
      <text:p text:style-name="P24"><text:s text:c="24"/>state_next &lt;= idle;</text:p>
      <text:p text:style-name="P24"><text:s text:c="24"/>tx_done_tick &lt;= '1';</text:p>
      <text:p text:style-name="P24"><text:s text:c="20"/>else</text:p>
      <text:p text:style-name="P24"><text:s text:c="24"/>s_next &lt;= s_reg +1;</text:p>
      <text:p text:style-name="P24"><text:s text:c="20"/>end if;</text:p>
      <text:p text:style-name="P24"><text:s text:c="16"/>end if;</text:p>
      <text:p text:style-name="P24"/>
      <text:p text:style-name="P24"><text:s text:c="8"/>end case;</text:p>
      <text:p text:style-name="P24"><text:s text:c="4"/>end process;</text:p>
      <text:p text:style-name="P24"><text:s text:c="4"/>tx &lt;= tx_reg;</text:p>
      <text:p text:style-name="P24">end arch;</text:p>
      <text:p text:style-name="P24"/>
      <text:p text:style-name="P24"/>
      <text:p text:style-name="P24">library ieee;</text:p>
      <text:p text:style-name="P24"><text:s text:c="4"/>use ieee.std_logic_1164.all;</text:p>
      <text:p text:style-name="P24"><text:s text:c="4"/>use ieee.numeric_std.all;</text:p>
      <text:p text:style-name="P24"/>
      <text:p text:style-name="P24">entity uart is </text:p>
      <text:p text:style-name="P24"><text:s text:c="4"/>generic(</text:p>
      <text:p text:style-name="P24"><text:s text:c="8"/>--default setting:</text:p>
      <text:p text:style-name="P24"><text:s text:c="8"/>--19200 baud, 8 data bits, 1 stop bit, 2^2 FIFO</text:p>
      <text:p text:style-name="P24"><text:s text:c="8"/>dbit: integer := 8; <text:s text:c="8"/>--# data bits</text:p>
      <text:p text:style-name="P24"><text:s text:c="8"/>sb_tick: integer := 16; <text:s text:c="3"/>--# ticks for stop bits, 16/24/32</text:p>
      <text:p text:style-name="P24"><text:s text:c="8"/>--for 1/1.5/2 stop bits</text:p>
      <text:p text:style-name="P24"><text:s text:c="8"/>dvsr: integer := 163; <text:s text:c="4"/>--baud rate divisor</text:p>
      <text:p text:style-name="P24"><text:s text:c="8"/>--dvsr = 50M/(16*baud rate)</text:p>
      <text:p text:style-name="P24"><text:s text:c="8"/>dvsr_bit: integer := 8; --#bits of dvsr</text:p>
      <text:p text:style-name="P24"><text:s text:c="8"/>fifo_w: integer := 2); <text:s text:c="3"/>--#addr bits of FIFO</text:p>
      <text:p text:style-name="P24"><text:s text:c="4"/>--#words in FIFO = 2^fifo_w</text:p>
      <text:p text:style-name="P24"><text:s text:c="4"/>port(</text:p>
      <text:p text:style-name="P24"><text:s text:c="8"/>-- <text:s text:c="7"/>clk, rst: in std_logic;</text:p>
      <text:p text:style-name="P24"><text:s text:c="8"/>-- <text:s text:c="7"/>rd_uart, wr_uart: in std_logic;</text:p>
      <text:p text:style-name="P24"><text:s text:c="8"/>-- <text:s text:c="7"/>rx: in std_logic;</text:p>
      <text:p text:style-name="P24"><text:soft-page-break/><text:s text:c="8"/>-- <text:s text:c="7"/>w_data: in std_logic_vector(7 downto 0);</text:p>
      <text:p text:style-name="P24"><text:s text:c="8"/>-- <text:s text:c="7"/>tx_full, rx_empty: out std_logic;</text:p>
      <text:p text:style-name="P24"><text:s text:c="8"/>r_data: out std_logic_vector(7 downto 0);</text:p>
      <text:p text:style-name="P24"><text:s text:c="8"/>-- <text:s text:c="7"/>tx: out std_logic);</text:p>
      <text:p text:style-name="P24"><text:s text:c="8"/>clk, rst: in std_logic;</text:p>
      <text:p text:style-name="P24"><text:s text:c="8"/>rx_done_tick: out std_logic;</text:p>
      <text:p text:style-name="P24"><text:s text:c="8"/>rx: in std_logic); <text:s text:c="7"/></text:p>
      <text:p text:style-name="P24">end uart;</text:p>
      <text:p text:style-name="P24"/>
      <text:p text:style-name="P24">architecture str_arch of uart is</text:p>
      <text:p text:style-name="P24"><text:s text:c="4"/>signal tick: std_logic;</text:p>
      <text:p text:style-name="P24"><text:s text:c="4"/>-- <text:s text:c="3"/>signal rx_done_tick: std_logic;</text:p>
      <text:p text:style-name="P24"><text:s text:c="4"/>-- <text:s text:c="3"/>signal tx_fifo_out: std_logic_vector(7 downto 0);</text:p>
      <text:p text:style-name="P24"><text:s text:c="4"/>signal rx_data_out: std_logic_vector(7 downto 0);</text:p>
      <text:p text:style-name="P24"><text:s text:c="4"/>-- <text:s text:c="3"/>signal tx_empty, tx_fifo_not_empty: std_logic;</text:p>
      <text:p text:style-name="P24"><text:s text:c="4"/>-- <text:s text:c="3"/>signal tx_done_tick: std_logic;</text:p>
      <text:p text:style-name="P24"/>
      <text:p text:style-name="P24">begin</text:p>
      <text:p text:style-name="P24"><text:s text:c="4"/>baud_gen_unit: entity work.mod_m_counter(arch)</text:p>
      <text:p text:style-name="P24"><text:s text:c="8"/>generic map(m =&gt; dvsr, n =&gt; dvsr_bit)</text:p>
      <text:p text:style-name="P24"><text:s text:c="8"/>port map(clk =&gt; clk, rst =&gt; rst, q =&gt; open, max_tick =&gt; tick);</text:p>
      <text:p text:style-name="P24"/>
      <text:p text:style-name="P24"><text:s text:c="4"/>uart_rx_unit: entity work.uart_rx(arch)</text:p>
      <text:p text:style-name="P24"><text:s text:c="8"/>generic map(dbit =&gt; dbit, sb_tick =&gt; sb_tick)</text:p>
      <text:p text:style-name="P24"><text:s text:c="8"/>port map(clk =&gt; clk, rst =&gt; rst, rx =&gt; rx, s_tick =&gt; tick,</text:p>
      <text:p text:style-name="P24"><text:s text:c="17"/>rx_done_tick =&gt; rx_done_tick, data_out =&gt; r_data);</text:p>
      <text:p text:style-name="P24"/>
      <text:p text:style-name="P24"><text:s text:c="4"/>-- <text:s text:c="3"/>fifo_rx_unit: entity work.fifo(arch)</text:p>
      <text:p text:style-name="P24"><text:s text:c="4"/>-- <text:s text:c="7"/>generic map(b =&gt; dbit, w =&gt; fifo_w)</text:p>
      <text:p text:style-name="P24"><text:s text:c="4"/>-- <text:s text:c="7"/>port map(clk =&gt; clk, rst =&gt; rst, rd =&gt; rd_uart, wr =&gt; rx_done_tick,</text:p>
      <text:p text:style-name="P24"><text:s text:c="4"/>-- <text:s text:c="19"/>w_data =&gt; rx_data_out, empty =&gt; rx_empty, full =&gt; open, r_data =&gt; r_data);</text:p>
      <text:p text:style-name="P24"/>
      <text:p text:style-name="P24"><text:s text:c="4"/>-- <text:s text:c="3"/>fifo_tx_unit: entity work.fifo(arch)</text:p>
      <text:p text:style-name="P24"><text:s text:c="4"/>-- <text:s text:c="7"/>generic map(b =&gt; dbit, w =&gt; fifo_w)</text:p>
      <text:p text:style-name="P24"><text:s text:c="4"/>-- <text:s text:c="7"/>port map(clk =&gt; clk, rst =&gt; rst, rd =&gt; tx_done_tick, wr =&gt; wr_uart, w_data =&gt; w_data,</text:p>
      <text:p text:style-name="P24"><text:s text:c="4"/>-- <text:s text:c="19"/>empty =&gt; tx_empty, full =&gt; tx_full, r_data =&gt; tx_fifo_out);</text:p>
      <text:p text:style-name="P24"><text:s text:c="4"/>-- <text:s text:c="3"/></text:p>
      <text:p text:style-name="P24"><text:s text:c="4"/>-- <text:s text:c="3"/>uart_tx_unit: entity work.uart_tx(arch)</text:p>
      <text:p text:style-name="P24"><text:s text:c="4"/>-- <text:s text:c="7"/>generic map(dbit =&gt; dbit, sb_tick =&gt; sb_tick)</text:p>
      <text:p text:style-name="P24"><text:s text:c="4"/>-- <text:s text:c="7"/>port map(clk =&gt; clk, rst =&gt; rst, tx_start =&gt; tx_fifo_not_empty, s_tick =&gt; tick,</text:p>
      <text:p text:style-name="P24"><text:s text:c="4"/>-- <text:s text:c="19"/>din =&gt; tx_fifo_out, tx_done_tick =&gt; tx_done_tick, tx =&gt; tx);</text:p>
      <text:p text:style-name="P24"><text:s text:c="4"/>-- <text:s text:c="3"/></text:p>
      <text:p text:style-name="P24"><text:s text:c="4"/>-- <text:s text:c="3"/>tx_fifo_not_empty &lt;= not tx_empty;</text:p>
      <text:p text:style-name="P24">end str_arch;</text:p>
      <text:p text:style-name="P24"/>
      <text:p text:style-name="P24">library ieee;</text:p>
      <text:p text:style-name="P24"><text:s text:c="4"/>use ieee.std_logic_1164.all;</text:p>
      <text:p text:style-name="P24"><text:s text:c="4"/>use ieee.numeric_std.all;</text:p>
      <text:p text:style-name="P24"/>
      <text:p text:style-name="P24">entity uart is port(</text:p>
      <text:p text:style-name="P24"><text:soft-page-break/><text:s text:c="4"/>clk, rx : in std_logic;</text:p>
      <text:p text:style-name="P24"><text:s text:c="4"/>rst : in boolean; <text:s text:c="58"/></text:p>
      <text:p text:style-name="P24"><text:s text:c="4"/>tx : out std_logic);</text:p>
      <text:p text:style-name="P24">end uart;</text:p>
      <text:p text:style-name="P24"/>
      <text:p text:style-name="P24">architecture str_arch of uart is</text:p>
      <text:p text:style-name="P24"><text:s text:c="4"/>signal ld, rxready, load, ready: std_logic; <text:s text:c="20"/></text:p>
      <text:p text:style-name="P24"><text:s text:c="4"/>signal din, dout, data_in, data_out: std_logic_vector(7 downto 0); <text:s text:c="16"/></text:p>
      <text:p text:style-name="P24"/>
      <text:p text:style-name="P24">begin</text:p>
      <text:p text:style-name="P24"><text:s text:c="4"/>tx_rx_unit: entity work.uartmodule(arch)</text:p>
      <text:p text:style-name="P24"><text:s text:c="8"/>port map(clk =&gt; clk, rst =&gt; rst, tx =&gt; tx, rx =&gt; rx, ld =&gt; ld, din =&gt; din, dout =&gt; dout, rxready =&gt; rxready);</text:p>
      <text:p text:style-name="P24"/>
      <text:p text:style-name="P24"><text:s text:c="4"/>acc_unit: entity work.accumulator(arch)</text:p>
      <text:p text:style-name="P24"><text:s text:c="8"/>port map(clk =&gt; clk, rst =&gt; rst, data_out =&gt; din, data_in =&gt; dout,</text:p>
      <text:p text:style-name="P24"><text:s text:c="17"/>load =&gt; ld, ready =&gt; rxready);</text:p>
      <text:p text:style-name="P24"/>
      <text:p text:style-name="P24">end str_arch;</text:p>
      <text:p text:style-name="P24"/>
      <text:p text:style-name="P24">library ieee;</text:p>
      <text:p text:style-name="P24"><text:s text:c="4"/>use ieee.std_logic_1164.all;</text:p>
      <text:p text:style-name="P24"><text:s text:c="4"/>use ieee.numeric_std.all;</text:p>
      <text:p text:style-name="P24"/>
      <text:p text:style-name="P24">entity uart_test is port(</text:p>
      <text:p text:style-name="P24"><text:s text:c="4"/>clk, rst: in std_logic;</text:p>
      <text:p text:style-name="P24"><text:s text:c="4"/>btn: std_logic_vector(2 downto 0);</text:p>
      <text:p text:style-name="P24"><text:s text:c="4"/>rx: in std_logic;</text:p>
      <text:p text:style-name="P24"><text:s text:c="4"/>tx: out std_logic;</text:p>
      <text:p text:style-name="P24"><text:s text:c="4"/>led: out std_logic_vector(7 downto 0);</text:p>
      <text:p text:style-name="P24"><text:s text:c="4"/>sseg: out std_logic_vector(7 downto 0);</text:p>
      <text:p text:style-name="P24"><text:s text:c="4"/>an: out std_logic_vector(3 downto 0));</text:p>
      <text:p text:style-name="P24">end uart_test;</text:p>
      <text:p text:style-name="P24"/>
      <text:p text:style-name="P24">architecture arch of uart_test is</text:p>
      <text:p text:style-name="P24"><text:s text:c="4"/>signal tx_full, rx_empty: std_logic;</text:p>
      <text:p text:style-name="P24"><text:s text:c="4"/>signal rec_data, rec_data1: std_logic_vector(7 downto 0);</text:p>
      <text:p text:style-name="P24"><text:s text:c="4"/>signal btn_tick: std_logic;</text:p>
      <text:p text:style-name="P24">begin</text:p>
      <text:p text:style-name="P24"><text:s text:c="4"/>--instantiate uart</text:p>
      <text:p text:style-name="P24"><text:s text:c="4"/>uart_unit: entity work.uart(str_arch)</text:p>
      <text:p text:style-name="P24"><text:s text:c="8"/>port map(clk =&gt; clk, rst =&gt; rst, rd_uart =&gt; btn_tick,</text:p>
      <text:p text:style-name="P24"><text:s text:c="17"/>wr_uart =&gt; btn_tick, rx =&gt; rx, w_data =&gt; rec_data1,</text:p>
      <text:p text:style-name="P24"><text:s text:c="17"/>tx_full =&gt; tx_full, rx_empty =&gt; rx_empty,</text:p>
      <text:p text:style-name="P24"><text:s text:c="17"/>r_data =&gt; rec_data, tx =&gt; tx);</text:p>
      <text:p text:style-name="P24"/>
      <text:p text:style-name="P24"><text:s text:c="4"/>--increment data loop back</text:p>
      <text:p text:style-name="P24"><text:s text:c="4"/>rec_data1 &lt;= std_logic_vector(unsigned(rec_data)+1);</text:p>
      <text:p text:style-name="P24"><text:s text:c="4"/>--led display</text:p>
      <text:p text:style-name="P24"><text:s text:c="4"/>led &lt;= rec_data;</text:p>
      <text:p text:style-name="P24"><text:s text:c="4"/>an &lt;= "1110";</text:p>
      <text:p text:style-name="P24"><text:soft-page-break/><text:s text:c="4"/>sseg &lt;= '1' &amp; (not tx_full) &amp; "11" &amp; (not rx_empty) &amp; "111";</text:p>
      <text:p text:style-name="P24">end arch;</text:p>
      <text:p text:style-name="P24"/>
      <text:p text:style-name="P24">--https://www.youtube.com/watch?v=Fimf3jypV_o</text:p>
      <text:p text:style-name="P24"/>
      <text:p text:style-name="P24">library ieee;</text:p>
      <text:p text:style-name="P24"><text:s text:c="4"/>use ieee.std_logic_1164.all;</text:p>
      <text:p text:style-name="P24"><text:s text:c="4"/>use ieee.numeric_std.all;</text:p>
      <text:p text:style-name="P24"/>
      <text:p text:style-name="P24">entity uartmodule is port(</text:p>
      <text:p text:style-name="P24"><text:s text:c="4"/>clk, ld, rx : in std_logic;</text:p>
      <text:p text:style-name="P24"><text:s text:c="4"/>rst : in boolean; <text:s text:c="9"/></text:p>
      <text:p text:style-name="P24"><text:s text:c="4"/>din : in std_logic_vector(7 downto 0);</text:p>
      <text:p text:style-name="P24"><text:s text:c="4"/>dout : out std_logic_vector(7 downto 0);</text:p>
      <text:p text:style-name="P24"><text:s text:c="4"/>tx, txbusy, rxready <text:s text:c="3"/>: out std_logic);</text:p>
      <text:p text:style-name="P24">end uartmodule;</text:p>
      <text:p text:style-name="P24"/>
      <text:p text:style-name="P24">architecture arch of uartmodule is</text:p>
      <text:p text:style-name="P24"><text:s text:c="4"/>constant width_1 : natural := 8; <text:s text:c="3"/></text:p>
      <text:p text:style-name="P24"><text:s text:c="4"/>constant width_2 : natural := 7;</text:p>
      <text:p text:style-name="P24"/>
      <text:p text:style-name="P24"><text:s text:c="4"/>type tx_state is (idle_tx, shift_tx);</text:p>
      <text:p text:style-name="P24"><text:s text:c="4"/>signal txfsm : tx_state;</text:p>
      <text:p text:style-name="P24"/>
      <text:p text:style-name="P24"><text:s text:c="4"/>type rx_state is (idle_rx, shift_rx);</text:p>
      <text:p text:style-name="P24"><text:s text:c="4"/>signal rxfsm : rx_state;</text:p>
      <text:p text:style-name="P24"/>
      <text:p text:style-name="P24"><text:s text:c="4"/>signal tx_reg : std_logic_vector(9 downto 0); </text:p>
      <text:p text:style-name="P24"><text:s text:c="4"/>signal txbitcnt : unsigned(3 downto 0);</text:p>
      <text:p text:style-name="P24"><text:s text:c="4"/>signal txclkdiv : unsigned(width_1 downto 0);</text:p>
      <text:p text:style-name="P24"><text:s text:c="4"/>signal txclkdiv_sum : unsigned(width_1 +1 downto 0);</text:p>
      <text:p text:style-name="P24"><text:s text:c="4"/>signal ticktx : std_logic;</text:p>
      <text:p text:style-name="P24"><text:s text:c="4"/>signal txclkena : std_logic;</text:p>
      <text:p text:style-name="P24"/>
      <text:p text:style-name="P24"><text:s text:c="4"/>signal rx_reg : std_logic_vector(9 downto 0); </text:p>
      <text:p text:style-name="P24"><text:s text:c="4"/>signal rxbitcnt : unsigned(4 downto 0);</text:p>
      <text:p text:style-name="P24"><text:s text:c="4"/>signal rxclkdiv : unsigned(width_2 downto 0);</text:p>
      <text:p text:style-name="P24"><text:s text:c="4"/>signal rxclkdiv_sum : unsigned(width_2 +1 downto 0);</text:p>
      <text:p text:style-name="P24"><text:s text:c="4"/>signal tickrx : std_logic;</text:p>
      <text:p text:style-name="P24"><text:s text:c="4"/>signal rxclkena : std_logic; <text:s text:c="3"/></text:p>
      <text:p text:style-name="P24"/>
      <text:p text:style-name="P24">begin </text:p>
      <text:p text:style-name="P24"/>
      <text:p text:style-name="P24"><text:s text:c="4"/>--clk divider tx</text:p>
      <text:p text:style-name="P24"><text:s text:c="4"/>txclkdiv_sum &lt;= resize(txclkdiv,width_1 +2) -1; <text:s text:c="3"/></text:p>
      <text:p text:style-name="P24"><text:s text:c="4"/>process(clk,rst)</text:p>
      <text:p text:style-name="P24"><text:s text:c="4"/>begin</text:p>
      <text:p text:style-name="P24"><text:s text:c="8"/>if not rst then</text:p>
      <text:p text:style-name="P24"><text:s text:c="12"/>txclkdiv &lt;= "110110010";</text:p>
      <text:p text:style-name="P24"><text:s text:c="8"/>elsif rising_edge(clk) then</text:p>
      <text:p text:style-name="P24"><text:soft-page-break/><text:s text:c="12"/>if ticktx = '1' then</text:p>
      <text:p text:style-name="P24"><text:s text:c="16"/>txclkdiv &lt;= "110110010";</text:p>
      <text:p text:style-name="P24"><text:s text:c="12"/>elsif txclkena = '1' then</text:p>
      <text:p text:style-name="P24"><text:s text:c="16"/>txclkdiv &lt;= txclkdiv_sum(width_1 downto 0);</text:p>
      <text:p text:style-name="P24"><text:s text:c="12"/>end if;</text:p>
      <text:p text:style-name="P24"><text:s text:c="8"/>end if;</text:p>
      <text:p text:style-name="P24"><text:s text:c="4"/>end process; <text:s text:c="3"/></text:p>
      <text:p text:style-name="P24"><text:s text:c="4"/>ticktx &lt;= txclkdiv_sum(width_1 +1);</text:p>
      <text:p text:style-name="P24"/>
      <text:p text:style-name="P24"><text:s text:c="4"/>--clk divider rx</text:p>
      <text:p text:style-name="P24"><text:s text:c="4"/>rxclkdiv_sum &lt;= resize(rxclkdiv,width_2 +2) -1; <text:s text:c="3"/></text:p>
      <text:p text:style-name="P24"><text:s text:c="4"/>process(clk,rst)</text:p>
      <text:p text:style-name="P24"><text:s text:c="4"/>begin</text:p>
      <text:p text:style-name="P24"><text:s text:c="8"/>if not rst then</text:p>
      <text:p text:style-name="P24"><text:s text:c="12"/>rxclkdiv &lt;= "01101001";</text:p>
      <text:p text:style-name="P24"><text:s text:c="8"/>elsif rising_edge(clk) then</text:p>
      <text:p text:style-name="P24"><text:s text:c="12"/>if tickrx = '1' then</text:p>
      <text:p text:style-name="P24"><text:s text:c="16"/>rxclkdiv &lt;= "01101001";</text:p>
      <text:p text:style-name="P24"><text:s text:c="12"/>elsif rxclkena = '1' then</text:p>
      <text:p text:style-name="P24"><text:s text:c="16"/>rxclkdiv &lt;= rxclkdiv_sum(width_2 downto 0);</text:p>
      <text:p text:style-name="P24"><text:s text:c="12"/>end if;</text:p>
      <text:p text:style-name="P24"><text:s text:c="8"/>end if;</text:p>
      <text:p text:style-name="P24"><text:s text:c="4"/>end process; <text:s text:c="3"/></text:p>
      <text:p text:style-name="P24"><text:s text:c="4"/>tickrx &lt;= rxclkdiv_sum(width_2 +1);</text:p>
      <text:p text:style-name="P24"/>
      <text:p text:style-name="P24"><text:s text:c="4"/>--transmit state machine <text:s text:c="3"/></text:p>
      <text:p text:style-name="P24"><text:s text:c="4"/>tx_fsm: process(clk, rst)</text:p>
      <text:p text:style-name="P24"><text:s text:c="4"/>begin</text:p>
      <text:p text:style-name="P24"><text:s text:c="8"/>if not rst then</text:p>
      <text:p text:style-name="P24"><text:s text:c="12"/>tx_reg &lt;= (others =&gt; '1');</text:p>
      <text:p text:style-name="P24"><text:s text:c="12"/>txbitcnt &lt;= (others =&gt; '0');</text:p>
      <text:p text:style-name="P24"><text:s text:c="12"/>txfsm &lt;= idle_tx;</text:p>
      <text:p text:style-name="P24"><text:s text:c="12"/>txbusy &lt;= '0'; <text:s text:c="7"/></text:p>
      <text:p text:style-name="P24"><text:s text:c="8"/>elsif rising_edge(clk) then</text:p>
      <text:p text:style-name="P24"><text:s text:c="12"/>case txfsm is</text:p>
      <text:p text:style-name="P24"><text:s text:c="16"/>when idle_tx =&gt;</text:p>
      <text:p text:style-name="P24"><text:s text:c="20"/>if ld = '0' then --latch the input data immediately</text:p>
      <text:p text:style-name="P24"><text:s text:c="24"/>tx_reg &lt;= '1' &amp; din &amp; '0'; --stop bit &amp; data &amp; start bit</text:p>
      <text:p text:style-name="P24"><text:s text:c="24"/>txbusy &lt;= '1';</text:p>
      <text:p text:style-name="P24"><text:s text:c="24"/>txbitcnt &lt;= "1010";</text:p>
      <text:p text:style-name="P24"><text:s text:c="24"/>txfsm &lt;= shift_tx;</text:p>
      <text:p text:style-name="P24"><text:s text:c="24"/>txclkena &lt;= '1';</text:p>
      <text:p text:style-name="P24"><text:s text:c="20"/>else</text:p>
      <text:p text:style-name="P24"><text:s text:c="24"/>txbusy &lt;= '0';</text:p>
      <text:p text:style-name="P24"><text:s text:c="24"/>txclkena &lt;= '0';</text:p>
      <text:p text:style-name="P24"><text:s text:c="20"/>end if; <text:s text:c="15"/></text:p>
      <text:p text:style-name="P24"/>
      <text:p text:style-name="P24"><text:s text:c="16"/>when shift_tx =&gt;</text:p>
      <text:p text:style-name="P24"><text:s text:c="20"/>txbitcnt &lt;= txbitcnt -1;</text:p>
      <text:p text:style-name="P24"><text:s text:c="20"/>tx_reg &lt;= '1' &amp; tx_reg(tx_reg'high downto 1);</text:p>
      <text:p text:style-name="P24"><text:soft-page-break/><text:s text:c="20"/>if txbitcnt = 0 then</text:p>
      <text:p text:style-name="P24"><text:s text:c="24"/>txfsm &lt;= idle_tx;</text:p>
      <text:p text:style-name="P24"><text:s text:c="20"/>end if;</text:p>
      <text:p text:style-name="P24"/>
      <text:p text:style-name="P24"><text:s text:c="16"/>when others =&gt;</text:p>
      <text:p text:style-name="P24"><text:s text:c="20"/>txfsm &lt;= idle_tx; <text:s text:c="19"/></text:p>
      <text:p text:style-name="P24"><text:s text:c="12"/>end case; <text:s text:c="11"/></text:p>
      <text:p text:style-name="P24"><text:s text:c="8"/>end if;</text:p>
      <text:p text:style-name="P24"><text:s text:c="4"/>end process;</text:p>
      <text:p text:style-name="P24"><text:s text:c="4"/>tx &lt;= tx_reg(0);</text:p>
      <text:p text:style-name="P24"/>
      <text:p text:style-name="P24"><text:s text:c="4"/>--receive state machine</text:p>
      <text:p text:style-name="P24"><text:s text:c="4"/>rx_fsm: process(clk, rst)</text:p>
      <text:p text:style-name="P24"><text:s text:c="4"/>begin</text:p>
      <text:p text:style-name="P24"><text:s text:c="8"/>if not rst then</text:p>
      <text:p text:style-name="P24"><text:s text:c="12"/>rx_reg &lt;= (others =&gt; '0');</text:p>
      <text:p text:style-name="P24"><text:s text:c="12"/>rxbitcnt &lt;= (others =&gt; '0');</text:p>
      <text:p text:style-name="P24"><text:s text:c="12"/>rxfsm &lt;= idle_rx;</text:p>
      <text:p text:style-name="P24"><text:s text:c="8"/>elsif rising_edge(clk) then <text:s text:c="11"/></text:p>
      <text:p text:style-name="P24"><text:s text:c="12"/>case rxfsm is <text:s text:c="11"/></text:p>
      <text:p text:style-name="P24"><text:s text:c="16"/>when idle_rx =&gt; --wait on start bit</text:p>
      <text:p text:style-name="P24"><text:s text:c="20"/>if rx = '0' then</text:p>
      <text:p text:style-name="P24"><text:s text:c="24"/>rxfsm &lt;= shift_rx;</text:p>
      <text:p text:style-name="P24"><text:s text:c="24"/>rxbitcnt &lt;= "10101";</text:p>
      <text:p text:style-name="P24"><text:s text:c="24"/>rxclkena &lt;= '1'; --synchronize the divisor</text:p>
      <text:p text:style-name="P24"><text:s text:c="20"/>else </text:p>
      <text:p text:style-name="P24"><text:s text:c="24"/>rxclkena &lt;= '0';</text:p>
      <text:p text:style-name="P24"><text:s text:c="20"/>end if; --else false start, stay in idle</text:p>
      <text:p text:style-name="P24"/>
      <text:p text:style-name="P24"><text:s text:c="16"/>when shift_rx =&gt; --sample data</text:p>
      <text:p text:style-name="P24"><text:s text:c="20"/>if tickrx = '1' then</text:p>
      <text:p text:style-name="P24"><text:s text:c="24"/>rxbitcnt &lt;= rxbitcnt -1; --shift right</text:p>
      <text:p text:style-name="P24"><text:s text:c="24"/>rx_reg &lt;= rx &amp; rx_reg(rx_reg'high downto 1);</text:p>
      <text:p text:style-name="P24"><text:s text:c="24"/>if rxbitcnt &lt;= 0 then</text:p>
      <text:p text:style-name="P24"><text:s text:c="28"/>rxfsm &lt;= idle_rx;</text:p>
      <text:p text:style-name="P24"><text:s text:c="28"/>rxready &lt;= '1';</text:p>
      <text:p text:style-name="P24"><text:s text:c="24"/>else rxready &lt;= '0';</text:p>
      <text:p text:style-name="P24"><text:s text:c="20"/>end if; <text:s text:c="19"/></text:p>
      <text:p text:style-name="P24"><text:s text:c="16"/>end if;</text:p>
      <text:p text:style-name="P24"/>
      <text:p text:style-name="P24"><text:s text:c="12"/>when others =&gt;</text:p>
      <text:p text:style-name="P24"><text:s text:c="16"/>rxfsm &lt;= idle_rx;</text:p>
      <text:p text:style-name="P24"><text:s text:c="12"/>end case;</text:p>
      <text:p text:style-name="P24"><text:s text:c="8"/>end if;</text:p>
      <text:p text:style-name="P24"><text:s text:c="4"/>end process; <text:s text:c="3"/></text:p>
      <text:p text:style-name="P24"><text:s text:c="4"/>dout &lt;= rx_reg(8 downto 1);</text:p>
      <text:p text:style-name="P24">end arch; <text:s text:c="7"/></text:p>
      <text:p text:style-name="P24"/>
      <text:p text:style-name="P24">library ieee;</text:p>
      <text:p text:style-name="P24"><text:s text:c="4"/>use ieee.std_logic_1164.all;</text:p>
      <text:p text:style-name="P24"><text:soft-page-break/></text:p>
      <text:p text:style-name="P24">entity tbacnt is</text:p>
      <text:p text:style-name="P24">end tbacnt;</text:p>
      <text:p text:style-name="P24"/>
      <text:p text:style-name="P24">architecture beh of tbacnt is</text:p>
      <text:p text:style-name="P24"><text:s text:c="4"/>component acnt port( <text:s text:c="7"/></text:p>
      <text:p text:style-name="P24"><text:s text:c="8"/>rstn, en : in std_logic;</text:p>
      <text:p text:style-name="P24"><text:s text:c="8"/>cntr <text:s text:c="9"/>: out std_logic_vector(7 downto 0));</text:p>
      <text:p text:style-name="P24">end component;</text:p>
      <text:p text:style-name="P24"/>
      <text:p text:style-name="P24">signal rstn, en : std_logic;</text:p>
      <text:p text:style-name="P24">signal cntr <text:s text:c="5"/>: std_logic_vector(7 downto 0);</text:p>
      <text:p text:style-name="P24"/>
      <text:p text:style-name="P24">constant halfclk : time := 50 ns;</text:p>
      <text:p text:style-name="P24">constant delay : time := 30 ns;</text:p>
      <text:p text:style-name="P24"/>
      <text:p text:style-name="P24">begin</text:p>
      <text:p text:style-name="P24"><text:s text:c="4"/>rstn &lt;= '1', '0' after halfclk *3 + delay,</text:p>
      <text:p text:style-name="P24"><text:s text:c="4"/>'1' after halfclk *7 + delay;</text:p>
      <text:p text:style-name="P24"/>
      <text:p text:style-name="P24"><text:s text:c="4"/>datap : process</text:p>
      <text:p text:style-name="P24"><text:s text:c="8"/>variable vec : std_logic_vector(7 downto 0) := "01100101";</text:p>
      <text:p text:style-name="P24"><text:s text:c="4"/>begin</text:p>
      <text:p text:style-name="P24"><text:s text:c="8"/>vec := vec(6 downto 0) &amp; (vec(7) xor (not vec(2)));</text:p>
      <text:p text:style-name="P24"><text:s text:c="8"/>en &lt;= vec(7) after delay;</text:p>
      <text:p text:style-name="P24"><text:s text:c="8"/>wait for 2 * halfclk;</text:p>
      <text:p text:style-name="P24"><text:s text:c="4"/>end process;</text:p>
      <text:p text:style-name="P24"/>
      <text:p text:style-name="P24"><text:s text:c="4"/>acnt0 : acnt</text:p>
      <text:p text:style-name="P24"><text:s text:c="8"/>port map( rstn =&gt; rstn, en =&gt; en, cntr =&gt; cntr);</text:p>
      <text:p text:style-name="P24">end beh;</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pan text:style-name="T11">library</text:span><text:span text:style-name="T12"> </text:span><text:span text:style-name="T21">ieee</text:span><text:span text:style-name="T12">;</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scnt</text:span><text:span text:style-name="T13"> </text:span><text:span text:style-name="T6">is</text:span><text:span text:style-name="T13"> </text:span><text:span text:style-name="T6">port</text:span><text:span text:style-name="T13">( <text:s text:c="3"/></text:span></text:p>
      <text:p text:style-name="P15"><text:span text:style-name="T13"><text:s text:c="4"/></text:span><text:span text:style-name="T26">clk</text:span><text:span text:style-name="T13">, </text:span><text:span text:style-name="T26">rstn</text:span><text:span text:style-name="T13">, </text:span><text:span text:style-name="T26">en</text:span><text:span text:style-name="T13"> : </text:span><text:span text:style-name="T6">in</text:span><text:span text:style-name="T13"> </text:span><text:span text:style-name="T28">std_logic</text:span><text:span text:style-name="T13">;</text:span></text:p>
      <text:p text:style-name="P15"><text:soft-page-break/><text:span text:style-name="T13"><text:s text:c="4"/></text:span><text:span text:style-name="T26">cntr</text:span><text:span text:style-name="T13"> <text:s text:c="13"/>: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scnt</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scnt</text:span><text:span text:style-name="T13"> </text:span><text:span text:style-name="T6">is</text:span></text:p>
      <text:p text:style-name="P15"><text:span text:style-name="T13"><text:s text:c="4"/></text:span><text:span text:style-name="T6">signal</text:span><text:span text:style-name="T13"> </text:span><text:span text:style-name="T39">ff</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6">process</text:span><text:span text:style-name="T13">(</text:span><text:span text:style-name="T26">clk</text:span><text:span text:style-name="T13">, </text:span><text:span text:style-name="T26">rstn</text:span><text:span text:style-name="T13">)</text:span></text:p>
      <text:p text:style-name="P15"><text:span text:style-name="T13"><text:s text:c="4"/></text:span><text:span text:style-name="T6">begin</text:span><text:span text:style-name="T13"> <text:s text:c="3"/></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en</text:span><text:span text:style-name="T13"> = </text:span><text:span text:style-name="T34">'1'</text:span><text:span text:style-name="T13"> </text:span><text:span text:style-name="T6">then</text:span></text:p>
      <text:p text:style-name="P15"><text:span text:style-name="T13"><text:s text:c="16"/></text:span><text:span text:style-name="T39">ff</text:span><text:span text:style-name="T13"> &lt;= </text:span><text:span text:style-name="T39">ff</text:span><text:span text:style-name="T13"> </text:span><text:span text:style-name="T14">+</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cntr</text:span><text:span text:style-name="T13"> &lt;= </text:span><text:span text:style-name="T39">ff</text:span><text:span text:style-name="T13">;</text:span></text:p>
      <text:p text:style-name="P15"><text:span text:style-name="T6">end</text:span><text:span text:style-name="T13"> </text:span><text:span text:style-name="T22">rtl</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scnt32</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n</text:span><text:span text:style-name="T13">, </text:span><text:span text:style-name="T26">pl</text:span><text:span text:style-name="T13">, </text:span><text:span text:style-name="T26">en</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din</text:span><text:span text:style-name="T13"> <text:s text:c="19"/>: </text:span><text:span text:style-name="T6">in</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4"/></text:span><text:span text:style-name="T26">ec</text:span><text:span text:style-name="T13"> <text:s text:c="23"/>: </text:span><text:span text:style-name="T6">out</text:span><text:span text:style-name="T13"> </text:span><text:span text:style-name="T28">std_logic</text:span><text:span text:style-name="T13">;</text:span></text:p>
      <text:p text:style-name="P15"><text:span text:style-name="T13"><text:s text:c="4"/></text:span><text:span text:style-name="T26">cntr</text:span><text:span text:style-name="T13"> <text:s text:c="19"/>: </text:span><text:span text:style-name="T6">out</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scnt32</text:span><text:span text:style-name="T13">;</text:span></text:p>
      <text:p text:style-name="P16"/>
      <text:p text:style-name="P15"><text:span text:style-name="T6">architecture</text:span><text:span text:style-name="T13"> </text:span><text:span text:style-name="T22">rtl1</text:span><text:span text:style-name="T13"> </text:span><text:span text:style-name="T6">of</text:span><text:span text:style-name="T13"> </text:span><text:span text:style-name="T22">scnt32</text:span><text:span text:style-name="T13"> </text:span><text:span text:style-name="T6">is</text:span></text:p>
      <text:p text:style-name="P15"><text:span text:style-name="T13"><text:s text:c="4"/></text:span><text:span text:style-name="T6">signal</text:span><text:span text:style-name="T13"> </text:span><text:span text:style-name="T39">ff</text:span><text:span text:style-name="T13"> :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8">scnt32_0</text:span><text:span text:style-name="T13"> : </text:span><text:span text:style-name="T6">process</text:span><text:span text:style-name="T13">(</text:span><text:span text:style-name="T26">rstn</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pl</text:span><text:span text:style-name="T13"> = </text:span><text:span text:style-name="T34">'1'</text:span><text:span text:style-name="T13"> </text:span><text:span text:style-name="T6">then</text:span></text:p>
      <text:p text:style-name="P15"><text:span text:style-name="T13"><text:s text:c="16"/></text:span><text:span text:style-name="T39">ff</text:span><text:span text:style-name="T13"> &lt;= </text:span><text:span text:style-name="T26">din</text:span><text:span text:style-name="T13">;</text:span></text:p>
      <text:p text:style-name="P15"><text:span text:style-name="T13"><text:s text:c="12"/></text:span><text:span text:style-name="T6">elsif</text:span><text:span text:style-name="T13"> </text:span><text:span text:style-name="T26">en</text:span><text:span text:style-name="T13"> = </text:span><text:span text:style-name="T34">'1'</text:span><text:span text:style-name="T13"> </text:span><text:span text:style-name="T6">then</text:span></text:p>
      <text:p text:style-name="P15"><text:span text:style-name="T13"><text:s text:c="16"/></text:span><text:span text:style-name="T6">if</text:span><text:span text:style-name="T13"> </text:span><text:span text:style-name="T39">ff</text:span><text:span text:style-name="T13"> </text:span><text:span text:style-name="T14">&lt;</text:span><text:span text:style-name="T13"> </text:span><text:span text:style-name="T31">x"8CEF8CEF"</text:span><text:span text:style-name="T13"> </text:span><text:span text:style-name="T6">then</text:span></text:p>
      <text:p text:style-name="P15"><text:span text:style-name="T13"><text:s text:c="20"/></text:span><text:span text:style-name="T39">ff</text:span><text:span text:style-name="T13"> &lt;= </text:span><text:span text:style-name="T39">ff</text:span><text:span text:style-name="T13"> </text:span><text:span text:style-name="T14">+</text:span><text:span text:style-name="T31">1</text:span><text:span text:style-name="T13">;</text:span></text:p>
      <text:p text:style-name="P15"><text:span text:style-name="T13"><text:s text:c="16"/></text:span><text:span text:style-name="T6">else</text:span><text:span text:style-name="T13"> </text:span><text:span text:style-name="T39">ff</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if</text:span><text:span text:style-name="T13">;</text:span></text:p>
      <text:p text:style-name="P15"><text:span text:style-name="T6">end</text:span><text:span text:style-name="T13"> </text:span><text:span text:style-name="T6">process</text:span><text:span text:style-name="T13">;</text:span></text:p>
      <text:p text:style-name="P16"/>
      <text:p text:style-name="P15"><text:span text:style-name="T26">cntr</text:span><text:span text:style-name="T13"> &lt;= </text:span><text:span text:style-name="T39">ff</text:span><text:span text:style-name="T13">;</text:span></text:p>
      <text:p text:style-name="P15"><text:soft-page-break/><text:span text:style-name="T26">ec</text:span><text:span text:style-name="T13"> &lt;= </text:span><text:span text:style-name="T34">'1'</text:span><text:span text:style-name="T6">when</text:span><text:span text:style-name="T13"> </text:span><text:span text:style-name="T39">ff</text:span><text:span text:style-name="T13"> = </text:span><text:span text:style-name="T31">x"8CEF8CEF"</text:span><text:span text:style-name="T13"> </text:span><text:span text:style-name="T6">and</text:span><text:span text:style-name="T13"> </text:span><text:span text:style-name="T26">en</text:span><text:span text:style-name="T13"> = </text:span><text:span text:style-name="T34">'1'</text:span><text:span text:style-name="T13"> </text:span><text:span text:style-name="T6">else</text:span><text:span text:style-name="T13"> </text:span><text:span text:style-name="T34">'0'</text:span><text:span text:style-name="T13">;</text:span></text:p>
      <text:p text:style-name="P15"><text:span text:style-name="T6">end</text:span><text:span text:style-name="T13"> </text:span><text:span text:style-name="T22">rtl1</text:span><text:span text:style-name="T13">;</text:span></text:p>
      <text:p text:style-name="P16"/>
      <text:p text:style-name="P15"><text:span text:style-name="T6">architecture</text:span><text:span text:style-name="T13"> </text:span><text:span text:style-name="T22">rtl2</text:span><text:span text:style-name="T13"> </text:span><text:span text:style-name="T6">of</text:span><text:span text:style-name="T13"> </text:span><text:span text:style-name="T22">scnt32</text:span><text:span text:style-name="T13"> </text:span><text:span text:style-name="T6">is</text:span></text:p>
      <text:p text:style-name="P15"><text:span text:style-name="T13"><text:s text:c="4"/></text:span><text:span text:style-name="T6">signal</text:span><text:span text:style-name="T13"> </text:span><text:span text:style-name="T39">ff</text:span><text:span text:style-name="T13"> :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8">scnt32_1</text:span><text:span text:style-name="T13"> : </text:span><text:span text:style-name="T6">process</text:span><text:span text:style-name="T13">(</text:span><text:span text:style-name="T26">rstn</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26">ec</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pl</text:span><text:span text:style-name="T13"> = </text:span><text:span text:style-name="T34">'1'</text:span><text:span text:style-name="T13"> </text:span><text:span text:style-name="T6">then</text:span></text:p>
      <text:p text:style-name="P15"><text:span text:style-name="T13"><text:s text:c="16"/></text:span><text:span text:style-name="T39">ff</text:span><text:span text:style-name="T13"> &lt;= </text:span><text:span text:style-name="T26">din</text:span><text:span text:style-name="T13">;</text:span></text:p>
      <text:p text:style-name="P15"><text:span text:style-name="T13"><text:s text:c="16"/></text:span><text:span text:style-name="T26">ec</text:span><text:span text:style-name="T13"> &lt;= </text:span><text:span text:style-name="T34">'0'</text:span><text:span text:style-name="T13">;</text:span></text:p>
      <text:p text:style-name="P15"><text:span text:style-name="T13"><text:s text:c="12"/></text:span><text:span text:style-name="T6">elsif</text:span><text:span text:style-name="T13"> </text:span><text:span text:style-name="T26">en</text:span><text:span text:style-name="T13"> = </text:span><text:span text:style-name="T34">'1'</text:span><text:span text:style-name="T13"> </text:span><text:span text:style-name="T6">then</text:span></text:p>
      <text:p text:style-name="P15"><text:span text:style-name="T13"><text:s text:c="16"/></text:span><text:span text:style-name="T6">if</text:span><text:span text:style-name="T13"> </text:span><text:span text:style-name="T39">ff</text:span><text:span text:style-name="T13"> </text:span><text:span text:style-name="T14">&lt;</text:span><text:span text:style-name="T13"> </text:span><text:span text:style-name="T31">x"8CEF8CEF"</text:span><text:span text:style-name="T13"> </text:span><text:span text:style-name="T6">then</text:span></text:p>
      <text:p text:style-name="P15"><text:span text:style-name="T13"><text:s text:c="20"/></text:span><text:span text:style-name="T26">ec</text:span><text:span text:style-name="T13"> &lt;= </text:span><text:span text:style-name="T34">'1'</text:span><text:span text:style-name="T13">;</text:span></text:p>
      <text:p text:style-name="P15"><text:span text:style-name="T13"><text:s text:c="20"/></text:span><text:span text:style-name="T39">ff</text:span><text:span text:style-name="T13"> &lt;= (</text:span><text:span text:style-name="T6">others</text:span><text:span text:style-name="T13"> =&gt; </text:span><text:span text:style-name="T34">'0'</text:span><text:span text:style-name="T13">);</text:span></text:p>
      <text:p text:style-name="P15"><text:span text:style-name="T13"><text:s text:c="16"/></text:span><text:span text:style-name="T6">else</text:span></text:p>
      <text:p text:style-name="P15"><text:span text:style-name="T13"><text:s text:c="20"/></text:span><text:span text:style-name="T26">ec</text:span><text:span text:style-name="T13"> &lt;= </text:span><text:span text:style-name="T34">'0'</text:span><text:span text:style-name="T13">;</text:span></text:p>
      <text:p text:style-name="P15"><text:span text:style-name="T13"><text:s text:c="20"/></text:span><text:span text:style-name="T39">ff</text:span><text:span text:style-name="T13"> &lt;= </text:span><text:span text:style-name="T39">ff</text:span><text:span text:style-name="T13"> </text:span><text:span text:style-name="T14">+</text:span><text:span text:style-name="T31">1</text:span><text:span text:style-name="T13">;</text:span></text:p>
      <text:p text:style-name="P15"><text:span text:style-name="T13"><text:s text:c="16"/></text:span><text:span text:style-name="T6">end</text:span><text:span text:style-name="T13"> </text:span><text:span text:style-name="T6">if</text:span><text:span text:style-name="T13">; <text:s text:c="31"/></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cntr</text:span><text:span text:style-name="T13"> &lt;= </text:span><text:span text:style-name="T39">ff</text:span><text:span text:style-name="T13">;</text:span></text:p>
      <text:p text:style-name="P15"><text:span text:style-name="T6">end</text:span><text:span text:style-name="T13"> </text:span><text:span text:style-name="T22">rtl2</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tbscnt32</text:span><text:span text:style-name="T13"> </text:span><text:span text:style-name="T6">i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scnt32</text:span><text:span text:style-name="T13"> </text:span><text:span text:style-name="T6">is</text:span></text:p>
      <text:p text:style-name="P15"><text:span text:style-name="T13"><text:s text:c="4"/></text:span><text:span text:style-name="T6">component</text:span><text:span text:style-name="T13"> </text:span><text:span text:style-name="T22">scnt32</text:span><text:span text:style-name="T13"> </text:span><text:span text:style-name="T6">is</text:span><text:span text:style-name="T13"> </text:span><text:span text:style-name="T6">port</text:span><text:span text:style-name="T13">(</text:span></text:p>
      <text:p text:style-name="P15"><text:span text:style-name="T13"><text:s text:c="8"/></text:span><text:span text:style-name="T26">clk</text:span><text:span text:style-name="T13">, </text:span><text:span text:style-name="T26">rstn</text:span><text:span text:style-name="T13">, </text:span><text:span text:style-name="T26">pl</text:span><text:span text:style-name="T13">, </text:span><text:span text:style-name="T26">en</text:span><text:span text:style-name="T13"> : </text:span><text:span text:style-name="T6">in</text:span><text:span text:style-name="T13"> </text:span><text:span text:style-name="T28">std_logic</text:span><text:span text:style-name="T13">;</text:span></text:p>
      <text:p text:style-name="P15"><text:span text:style-name="T13"><text:s text:c="8"/></text:span><text:span text:style-name="T26">din</text:span><text:span text:style-name="T13"> <text:s text:c="19"/>: </text:span><text:span text:style-name="T6">in</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13"><text:s text:c="8"/></text:span><text:span text:style-name="T26">ec</text:span><text:span text:style-name="T13"> <text:s text:c="23"/>: </text:span><text:span text:style-name="T6">out</text:span><text:span text:style-name="T13"> </text:span><text:span text:style-name="T28">std_logic</text:span><text:span text:style-name="T13">;</text:span></text:p>
      <text:p text:style-name="P15"><text:span text:style-name="T13"><text:s text:c="8"/></text:span><text:span text:style-name="T26">cntr</text:span><text:span text:style-name="T13"> <text:s text:c="19"/>: </text:span><text:span text:style-name="T6">out</text:span><text:span text:style-name="T13">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pan><text:span text:style-name="T31">50</text:span><text:span text:style-name="T13"> </text:span><text:span text:style-name="T7">ns</text:span><text:span text:style-name="T13">;</text:span></text:p>
      <text:p text:style-name="P15"><text:span text:style-name="T6">constant</text:span><text:span text:style-name="T13"> </text:span><text:span text:style-name="T7">delay</text:span><text:span text:style-name="T13"> <text:s/>: </text:span><text:span text:style-name="T28">time</text:span><text:span text:style-name="T13"> := </text:span><text:span text:style-name="T31">80</text:span><text:span text:style-name="T13"> </text:span><text:span text:style-name="T7">ns</text:span><text:span text:style-name="T13">;</text:span></text:p>
      <text:p text:style-name="P15"><text:span text:style-name="T6">constant</text:span><text:span text:style-name="T13"> </text:span><text:span text:style-name="T7">strobe</text:span><text:span text:style-name="T13"> : </text:span><text:span text:style-name="T28">time</text:span><text:span text:style-name="T13"> := </text:span><text:span text:style-name="T31">2</text:span><text:span text:style-name="T13"> </text:span><text:span text:style-name="T14">*</text:span><text:span text:style-name="T7">period</text:span><text:span text:style-name="T13"> </text:span><text:span text:style-name="T14">-</text:span><text:span text:style-name="T31">5</text:span><text:span text:style-name="T13"> </text:span><text:span text:style-name="T7">ns</text:span><text:span text:style-name="T13">; <text:s text:c="3"/></text:span></text:p>
      <text:p text:style-name="P16"/>
      <text:p text:style-name="P15"><text:span text:style-name="T6">signal</text:span><text:span text:style-name="T13"> </text:span><text:span text:style-name="T39">clk</text:span><text:span text:style-name="T13">, </text:span><text:span text:style-name="T39">rstn</text:span><text:span text:style-name="T13">, </text:span><text:span text:style-name="T39">pl</text:span><text:span text:style-name="T13">, </text:span><text:span text:style-name="T39">en</text:span><text:span text:style-name="T13"> : </text:span><text:span text:style-name="T28">std_logic</text:span><text:span text:style-name="T13">;</text:span></text:p>
      <text:p text:style-name="P15"><text:soft-page-break/><text:span text:style-name="T6">signal</text:span><text:span text:style-name="T13"> </text:span><text:span text:style-name="T39">din</text:span><text:span text:style-name="T13">, </text:span><text:span text:style-name="T39">cntr1</text:span><text:span text:style-name="T13">, </text:span><text:span text:style-name="T39">cntr2</text:span><text:span text:style-name="T13"> : </text:span><text:span text:style-name="T28">std_logic_vector</text:span><text:span text:style-name="T13">(</text:span><text:span text:style-name="T31">31</text:span><text:span text:style-name="T13"> </text:span><text:span text:style-name="T6">downto</text:span><text:span text:style-name="T13"> </text:span><text:span text:style-name="T31">0</text:span><text:span text:style-name="T13">);</text:span></text:p>
      <text:p text:style-name="P15"><text:span text:style-name="T6">signal</text:span><text:span text:style-name="T13"> </text:span><text:span text:style-name="T39">ec1</text:span><text:span text:style-name="T13">, </text:span><text:span text:style-name="T39">ec2</text:span><text:span text:style-name="T13">, </text:span><text:span text:style-name="T39">diff</text:span><text:span text:style-name="T13"> <text:s text:c="5"/>: </text:span><text:span text:style-name="T28">std_logic</text:span><text:span text:style-name="T13">;</text:span></text:p>
      <text:p text:style-name="P16"/>
      <text:p text:style-name="P23">begin</text:p>
      <text:p text:style-name="P15"><text:span text:style-name="T13"><text:s text:c="4"/></text:span><text:span text:style-name="T39">rstn</text:span><text:span text:style-name="T13"> &lt;= </text:span><text:span text:style-name="T34">'0'</text:span><text:span text:style-name="T13">, </text:span><text:span text:style-name="T34">'1'</text:span><text:span text:style-name="T13"> </text:span><text:span text:style-name="T6">after</text:span><text:span text:style-name="T13"> </text:span><text:span text:style-name="T31">10</text:span><text:span text:style-name="T13"> </text:span><text:span text:style-name="T14">*</text:span><text:span text:style-name="T13"> </text:span><text:span text:style-name="T7">period</text:span><text:span text:style-name="T13">;</text:span></text:p>
      <text:p text:style-name="P15"><text:span text:style-name="T13"><text:s text:c="4"/></text:span><text:span text:style-name="T38">clkgen</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0'</text:span><text:span text:style-name="T13">; </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39">clk</text:span><text:span text:style-name="T13"> &lt;= </text:span><text:span text:style-name="T34">'1'</text:span><text:span text:style-name="T13">; </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dgen</text:span><text:span text:style-name="T13"> : </text:span><text:span text:style-name="T6">process</text:span><text:span text:style-name="T13"> </text:span></text:p>
      <text:p text:style-name="P15"><text:span text:style-name="T13"><text:s text:c="4"/></text:span><text:span text:style-name="T6">begin</text:span></text:p>
      <text:p text:style-name="P15"><text:span text:style-name="T13"><text:s text:c="8"/></text:span><text:span text:style-name="T39">pl</text:span><text:span text:style-name="T13"> &lt;= </text:span><text:span text:style-name="T34">'0'</text:span><text:span text:style-name="T13">; </text:span><text:span text:style-name="T39">en</text:span><text:span text:style-name="T13"> &lt;= </text:span><text:span text:style-name="T34">'0'</text:span><text:span text:style-name="T13">;</text:span></text:p>
      <text:p text:style-name="P15"><text:span text:style-name="T13"><text:s text:c="8"/></text:span><text:span text:style-name="T39">din</text:span><text:span text:style-name="T13"> &lt;= (</text:span><text:span text:style-name="T6">others</text:span><text:span text:style-name="T13"> =&gt; </text:span><text:span text:style-name="T34">'0'</text:span><text:span text:style-name="T13">); </text:span><text:span text:style-name="T39">din</text:span><text:span text:style-name="T13">(</text:span><text:span text:style-name="T31">1</text:span><text:span text:style-name="T13">) &lt;= </text:span><text:span text:style-name="T34">'1'</text:span><text:span text:style-name="T13">;</text:span></text:p>
      <text:p text:style-name="P15"><text:span text:style-name="T13"><text:s text:c="8"/></text:span><text:span text:style-name="T6">for</text:span><text:span text:style-name="T13"> k </text:span><text:span text:style-name="T6">in</text:span><text:span text:style-name="T13"> </text:span><text:span text:style-name="T31">0</text:span><text:span text:style-name="T13"> </text:span><text:span text:style-name="T6">to</text:span><text:span text:style-name="T13"> </text:span><text:span text:style-name="T31">15</text:span><text:span text:style-name="T13"> </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loop</text:span><text:span text:style-name="T13">;</text:span></text:p>
      <text:p text:style-name="P16"/>
      <text:p text:style-name="P15"><text:span text:style-name="T13"><text:s text:c="8"/></text:span><text:span text:style-name="T39">en</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6"/>
      <text:p text:style-name="P15"><text:span text:style-name="T13"><text:s text:c="8"/></text:span><text:span text:style-name="T6">for</text:span><text:span text:style-name="T13"> k </text:span><text:span text:style-name="T6">in</text:span><text:span text:style-name="T13"> </text:span><text:span text:style-name="T31">0</text:span><text:span text:style-name="T13"> </text:span><text:span text:style-name="T6">to</text:span><text:span text:style-name="T13"> </text:span><text:span text:style-name="T31">15</text:span><text:span text:style-name="T13"> </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loop</text:span><text:span text:style-name="T13">;</text:span></text:p>
      <text:p text:style-name="P16"/>
      <text:p text:style-name="P15"><text:span text:style-name="T13"><text:s text:c="8"/></text:span><text:span text:style-name="T39">pl</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5"><text:span text:style-name="T13"><text:s text:c="8"/></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39">pl</text:span><text:span text:style-name="T13"> &lt;= </text:span><text:span text:style-name="T34">'0'</text:span><text:span text:style-name="T13"> </text:span><text:span text:style-name="T6">after</text:span><text:span text:style-name="T13"> </text:span><text:span text:style-name="T7">delay</text:span><text:span text:style-name="T13">;</text:span></text:p>
      <text:p text:style-name="P16"/>
      <text:p text:style-name="P15"><text:span text:style-name="T13"><text:s text:c="8"/></text:span><text:span text:style-name="T6">for</text:span><text:span text:style-name="T13"> k </text:span><text:span text:style-name="T6">in</text:span><text:span text:style-name="T13"> </text:span><text:span text:style-name="T31">0</text:span><text:span text:style-name="T13"> </text:span><text:span text:style-name="T6">to</text:span><text:span text:style-name="T13"> </text:span><text:span text:style-name="T31">15</text:span><text:span text:style-name="T13"> </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loop</text:span><text:span text:style-name="T13">;</text:span></text:p>
      <text:p text:style-name="P16"/>
      <text:p text:style-name="P15"><text:span text:style-name="T13"><text:s text:c="8"/></text:span><text:span text:style-name="T39">din</text:span><text:span text:style-name="T13"> &lt;= </text:span><text:span text:style-name="T31">x"8CEF8CED"</text:span><text:span text:style-name="T13"> </text:span><text:span text:style-name="T6">after</text:span><text:span text:style-name="T13"> </text:span><text:span text:style-name="T7">delay</text:span><text:span text:style-name="T13">;</text:span></text:p>
      <text:p text:style-name="P16"/>
      <text:p text:style-name="P15"><text:span text:style-name="T13"><text:s text:c="8"/></text:span><text:span text:style-name="T39">pl</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5"><text:span text:style-name="T13"><text:s text:c="8"/></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39">pl</text:span><text:span text:style-name="T13"> &lt;= </text:span><text:span text:style-name="T34">'0'</text:span><text:span text:style-name="T13"> </text:span><text:span text:style-name="T6">after</text:span><text:span text:style-name="T13"> </text:span><text:span text:style-name="T7">delay</text:span><text:span text:style-name="T13">;</text:span></text:p>
      <text:p text:style-name="P16"/>
      <text:p text:style-name="P15"><text:span text:style-name="T13"><text:s text:c="8"/></text:span><text:span text:style-name="T6">for</text:span><text:span text:style-name="T13"> k </text:span><text:span text:style-name="T6">in</text:span><text:span text:style-name="T13"> </text:span><text:span text:style-name="T31">0</text:span><text:span text:style-name="T13"> </text:span><text:span text:style-name="T6">to</text:span><text:span text:style-name="T13"> </text:span><text:span text:style-name="T31">15</text:span><text:span text:style-name="T13"> </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6">end</text:span><text:span text:style-name="T13"> </text:span><text:span text:style-name="T6">loop</text:span><text:span text:style-name="T13">;</text:span></text:p>
      <text:p text:style-name="P16"/>
      <text:p text:style-name="P15"><text:span text:style-name="T13"><text:s text:c="8"/></text:span><text:span text:style-name="T39">pl</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5"><text:span text:style-name="T13"><text:s text:c="8"/></text:span><text:span text:style-name="T39">din</text:span><text:span text:style-name="T13"> &lt;= </text:span><text:span text:style-name="T31">x"8CEF8CFF"</text:span><text:span text:style-name="T13"> </text:span><text:span text:style-name="T6">after</text:span><text:span text:style-name="T13"> </text:span><text:span text:style-name="T7">delay</text:span><text:span text:style-name="T13">;</text:span></text:p>
      <text:p text:style-name="P15"><text:span text:style-name="T13"><text:s text:c="8"/></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39">pl</text:span><text:span text:style-name="T13"> &lt;= </text:span><text:span text:style-name="T34">'0'</text:span><text:span text:style-name="T13"> </text:span><text:span text:style-name="T6">after</text:span><text:span text:style-name="T13"> </text:span><text:span text:style-name="T7">delay</text:span><text:span text:style-name="T13">;</text:span></text:p>
      <text:p text:style-name="P16"/>
      <text:p text:style-name="P15"><text:span text:style-name="T13"><text:s text:c="8"/></text:span><text:span text:style-name="T6">for</text:span><text:span text:style-name="T13"> k </text:span><text:span text:style-name="T6">in</text:span><text:span text:style-name="T13"> </text:span><text:span text:style-name="T31">0</text:span><text:span text:style-name="T13"> </text:span><text:span text:style-name="T6">to</text:span><text:span text:style-name="T13"> </text:span><text:span text:style-name="T31">15</text:span><text:span text:style-name="T13"> </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oft-page-break/><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9">diff</text:span><text:span text:style-name="T13"> &lt;= </text:span><text:span text:style-name="T34">'0'</text:span><text:span text:style-name="T13"> </text:span><text:span text:style-name="T6">when</text:span><text:span text:style-name="T13">(</text:span><text:span text:style-name="T39">ec1</text:span><text:span text:style-name="T13"> = </text:span><text:span text:style-name="T39">ec2</text:span><text:span text:style-name="T13">) </text:span><text:span text:style-name="T6">and</text:span><text:span text:style-name="T13"> (</text:span><text:span text:style-name="T39">cntr1</text:span><text:span text:style-name="T13"> = </text:span><text:span text:style-name="T39">cntr2</text:span><text:span text:style-name="T13">) </text:span><text:span text:style-name="T6">else</text:span><text:span text:style-name="T13"> </text:span><text:span text:style-name="T34">'1'</text:span><text:span text:style-name="T13">;</text:span></text:p>
      <text:p text:style-name="P16"/>
      <text:p text:style-name="P15"><text:span text:style-name="T13"><text:s text:c="4"/></text:span><text:span text:style-name="T38">check</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12"/></text:span><text:span text:style-name="T6">wait</text:span><text:span text:style-name="T13"> </text:span><text:span text:style-name="T6">for</text:span><text:span text:style-name="T13"> </text:span><text:span text:style-name="T7">strobe</text:span><text:span text:style-name="T13">;</text:span></text:p>
      <text:p text:style-name="P15"><text:span text:style-name="T13"><text:s text:c="12"/></text:span><text:span text:style-name="T6">assert</text:span><text:span text:style-name="T13"> (</text:span><text:span text:style-name="T39">diff</text:span><text:span text:style-name="T13"> = </text:span><text:span text:style-name="T34">'0'</text:span><text:span text:style-name="T13">) </text:span><text:span text:style-name="T6">report</text:span><text:span text:style-name="T13"> </text:span><text:span text:style-name="T34">"not equal"</text:span><text:span text:style-name="T13"> </text:span><text:span text:style-name="T6">severity</text:span><text:span text:style-name="T13"> </text:span><text:span text:style-name="T7">note</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8">scnt32_0</text:span><text:span text:style-name="T13"> : </text:span><text:span text:style-name="T22">scnt32</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39">clk</text:span><text:span text:style-name="T13">, </text:span><text:span text:style-name="T26">rstn</text:span><text:span text:style-name="T13"> =&gt; </text:span><text:span text:style-name="T39">rstn</text:span><text:span text:style-name="T13">, </text:span><text:span text:style-name="T26">pl</text:span><text:span text:style-name="T13"> =&gt; </text:span><text:span text:style-name="T39">pl</text:span><text:span text:style-name="T13">, </text:span><text:span text:style-name="T26">en</text:span><text:span text:style-name="T13"> =&gt; </text:span><text:span text:style-name="T39">en</text:span><text:span text:style-name="T13">, </text:span><text:span text:style-name="T26">din</text:span><text:span text:style-name="T13"> =&gt; </text:span><text:span text:style-name="T39">din</text:span><text:span text:style-name="T13">, </text:span><text:span text:style-name="T26">ec</text:span><text:span text:style-name="T13"> =&gt; </text:span><text:span text:style-name="T39">ec1</text:span><text:span text:style-name="T13">, </text:span><text:span text:style-name="T26">cntr</text:span><text:span text:style-name="T13"> =&gt; </text:span><text:span text:style-name="T39">cntr1</text:span><text:span text:style-name="T13">);</text:span></text:p>
      <text:p text:style-name="P15"><text:span text:style-name="T13"><text:s text:c="4"/></text:span><text:span text:style-name="T38">scnt32_1</text:span><text:span text:style-name="T13"> : </text:span><text:span text:style-name="T22">scnt32</text:span></text:p>
      <text:p text:style-name="P15"><text:span text:style-name="T13"><text:s text:c="8"/></text:span><text:span text:style-name="T6">port</text:span><text:span text:style-name="T13"> </text:span><text:span text:style-name="T6">map</text:span><text:span text:style-name="T13">(</text:span><text:span text:style-name="T26">clk</text:span><text:span text:style-name="T13"> =&gt; </text:span><text:span text:style-name="T39">clk</text:span><text:span text:style-name="T13">, </text:span><text:span text:style-name="T26">rstn</text:span><text:span text:style-name="T13"> =&gt; </text:span><text:span text:style-name="T39">rstn</text:span><text:span text:style-name="T13">, </text:span><text:span text:style-name="T26">pl</text:span><text:span text:style-name="T13"> =&gt; </text:span><text:span text:style-name="T39">pl</text:span><text:span text:style-name="T13">, </text:span><text:span text:style-name="T26">en</text:span><text:span text:style-name="T13"> =&gt; </text:span><text:span text:style-name="T39">en</text:span><text:span text:style-name="T13">, </text:span><text:span text:style-name="T26">din</text:span><text:span text:style-name="T13"> =&gt; </text:span><text:span text:style-name="T39">din</text:span><text:span text:style-name="T13">, </text:span><text:span text:style-name="T26">ec</text:span><text:span text:style-name="T13"> =&gt; </text:span><text:span text:style-name="T39">ec2</text:span><text:span text:style-name="T13">, </text:span><text:span text:style-name="T26">cntr</text:span><text:span text:style-name="T13"> =&gt; </text:span><text:span text:style-name="T39">cntr2</text:span><text:span text:style-name="T13">); <text:s text:c="3"/></text:span></text:p>
      <text:p text:style-name="P15"><text:span text:style-name="T6">end</text:span><text:span text:style-name="T13"> </text:span><text:span text:style-name="T22">beh</text:span><text:span text:style-name="T13">;</text:span></text:p>
      <text:p text:style-name="P16"/>
      <text:p text:style-name="P15"><text:span text:style-name="T6">configuration</text:span><text:span text:style-name="T13"> cfg_tbscnt32 </text:span><text:span text:style-name="T6">of</text:span><text:span text:style-name="T13"> </text:span><text:span text:style-name="T22">tbscnt32</text:span><text:span text:style-name="T13"> </text:span><text:span text:style-name="T6">is</text:span></text:p>
      <text:p text:style-name="P15"><text:span text:style-name="T13"><text:s text:c="4"/></text:span><text:span text:style-name="T6">for</text:span><text:span text:style-name="T13"> </text:span><text:span text:style-name="T22">beh</text:span></text:p>
      <text:p text:style-name="P15"><text:span text:style-name="T13"><text:s text:c="4"/></text:span><text:span text:style-name="T6">for</text:span><text:span text:style-name="T13"> scnt32_0 : </text:span><text:span text:style-name="T22">scnt32</text:span></text:p>
      <text:p text:style-name="P15"><text:span text:style-name="T13"><text:s text:c="4"/></text:span><text:span text:style-name="T6">use</text:span><text:span text:style-name="T13"> </text:span><text:span text:style-name="T6">entity</text:span><text:span text:style-name="T13"> </text:span><text:span text:style-name="T22">work</text:span><text:span text:style-name="T13">.</text:span><text:span text:style-name="T22">scnt32</text:span><text:span text:style-name="T13">(</text:span><text:span text:style-name="T22">rtl1</text:span><text:span text:style-name="T13">);</text:span></text:p>
      <text:p text:style-name="P15"><text:span text:style-name="T6">end</text:span><text:span text:style-name="T13"> </text:span><text:span text:style-name="T6">for</text:span><text:span text:style-name="T13">;</text:span></text:p>
      <text:p text:style-name="P15"><text:span text:style-name="T6">for</text:span><text:span text:style-name="T13"> scnt32_1 : </text:span><text:span text:style-name="T22">scnt32</text:span></text:p>
      <text:p text:style-name="P15"><text:span text:style-name="T6">use</text:span><text:span text:style-name="T13"> </text:span><text:span text:style-name="T6">entity</text:span><text:span text:style-name="T13"> </text:span><text:span text:style-name="T22">work</text:span><text:span text:style-name="T13">.</text:span><text:span text:style-name="T22">scnt32</text:span><text:span text:style-name="T13">(</text:span><text:span text:style-name="T22">rtl2</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cfg_tbscnt32;</text:span></text:p>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shiftr</text:span><text:span text:style-name="T13"> </text:span><text:span text:style-name="T6">is</text:span><text:span text:style-name="T13"> </text:span><text:span text:style-name="T6">port</text:span><text:span text:style-name="T13">(</text:span></text:p>
      <text:p text:style-name="P15"><text:span text:style-name="T13"><text:s text:c="4"/></text:span><text:span text:style-name="T26">clk</text:span><text:span text:style-name="T13">, </text:span><text:span text:style-name="T26">rstn</text:span><text:span text:style-name="T13">, </text:span><text:span text:style-name="T26">si</text:span><text:span text:style-name="T13">, </text:span><text:span text:style-name="T26">pl</text:span><text:span text:style-name="T13">, </text:span><text:span text:style-name="T26">en</text:span><text:span text:style-name="T13">, </text:span><text:span text:style-name="T26">lrn</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d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o</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rtl1</text:span><text:span text:style-name="T13"> </text:span><text:span text:style-name="T6">of</text:span><text:span text:style-name="T13"> </text:span><text:span text:style-name="T22">shiftr</text:span><text:span text:style-name="T13"> </text:span><text:span text:style-name="T6">is</text:span></text:p>
      <text:p text:style-name="P15"><text:span text:style-name="T13"><text:s text:c="4"/></text:span><text:span text:style-name="T6">signal</text:span><text:span text:style-name="T13"> </text:span><text:span text:style-name="T39">ff8</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23">begin</text:p>
      <text:p text:style-name="P15"><text:span text:style-name="T13"><text:s text:c="4"/></text:span><text:span text:style-name="T38">posedge</text:span><text:span text:style-name="T13"> : </text:span><text:span text:style-name="T6">process</text:span><text:span text:style-name="T13">(</text:span><text:span text:style-name="T26">clk</text:span><text:span text:style-name="T13">, </text:span><text:span text:style-name="T26">rstn</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8</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pl</text:span><text:span text:style-name="T13"> = </text:span><text:span text:style-name="T34">'1'</text:span><text:span text:style-name="T13"> </text:span><text:span text:style-name="T6">then</text:span></text:p>
      <text:p text:style-name="P15"><text:span text:style-name="T13"><text:s text:c="16"/></text:span><text:span text:style-name="T39">ff8</text:span><text:span text:style-name="T13"> &lt;= </text:span><text:span text:style-name="T26">din</text:span><text:span text:style-name="T13">;</text:span></text:p>
      <text:p text:style-name="P15"><text:soft-page-break/><text:span text:style-name="T13"><text:s text:c="12"/></text:span><text:span text:style-name="T6">elsif</text:span><text:span text:style-name="T13"> </text:span><text:span text:style-name="T26">en</text:span><text:span text:style-name="T13"> = </text:span><text:span text:style-name="T34">'1'</text:span><text:span text:style-name="T13"> </text:span><text:span text:style-name="T6">then</text:span></text:p>
      <text:p text:style-name="P15"><text:span text:style-name="T13"><text:s text:c="16"/></text:span><text:span text:style-name="T6">if</text:span><text:span text:style-name="T13"> </text:span><text:span text:style-name="T26">lrn</text:span><text:span text:style-name="T13"> = </text:span><text:span text:style-name="T34">'1'</text:span><text:span text:style-name="T13"> </text:span><text:span text:style-name="T6">then</text:span></text:p>
      <text:p text:style-name="P15"><text:span text:style-name="T13"><text:s text:c="20"/></text:span><text:span text:style-name="T39">ff8</text:span><text:span text:style-name="T13"> &lt;= </text:span><text:span text:style-name="T26">si</text:span><text:span text:style-name="T13"> </text:span><text:span text:style-name="T14">&amp;</text:span><text:span text:style-name="T13"> </text:span><text:span text:style-name="T39">ff8</text:span><text:span text:style-name="T13">(</text:span><text:span text:style-name="T39">ff8</text:span><text:span text:style-name="T33">'high</text:span><text:span text:style-name="T13"> </text:span><text:span text:style-name="T6">downto</text:span><text:span text:style-name="T13"> </text:span><text:span text:style-name="T31">1</text:span><text:span text:style-name="T13">);</text:span></text:p>
      <text:p text:style-name="P15"><text:span text:style-name="T13"><text:s text:c="16"/></text:span><text:span text:style-name="T6">else</text:span><text:span text:style-name="T13"> </text:span><text:span text:style-name="T39">ff8</text:span><text:span text:style-name="T13"> &lt;= </text:span><text:span text:style-name="T39">ff8</text:span><text:span text:style-name="T13">(</text:span><text:span text:style-name="T39">ff8</text:span><text:span text:style-name="T33">'high</text:span><text:span text:style-name="T13"> </text:span><text:span text:style-name="T14">-</text:span><text:span text:style-name="T31">1</text:span><text:span text:style-name="T13"> </text:span><text:span text:style-name="T6">downto</text:span><text:span text:style-name="T13"> </text:span><text:span text:style-name="T31">0</text:span><text:span text:style-name="T13">) </text:span><text:span text:style-name="T14">&amp;</text:span><text:span text:style-name="T13"> </text:span><text:span text:style-name="T26">si</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if</text:span><text:span text:style-name="T13">;</text:span></text:p>
      <text:p text:style-name="P15"><text:span text:style-name="T6">end</text:span><text:span text:style-name="T13"> </text:span><text:span text:style-name="T6">process</text:span><text:span text:style-name="T13">;</text:span></text:p>
      <text:p text:style-name="P16"/>
      <text:p text:style-name="P15"><text:span text:style-name="T26">so</text:span><text:span text:style-name="T13"> &lt;= </text:span><text:span text:style-name="T39">ff8</text:span><text:span text:style-name="T13">(</text:span><text:span text:style-name="T39">ff8</text:span><text:span text:style-name="T33">'low</text:span><text:span text:style-name="T13">) </text:span><text:span text:style-name="T6">when</text:span><text:span text:style-name="T13"> </text:span><text:span text:style-name="T26">lrn</text:span><text:span text:style-name="T13"> = </text:span><text:span text:style-name="T34">'1'</text:span><text:span text:style-name="T13"> </text:span><text:span text:style-name="T6">else</text:span><text:span text:style-name="T13"> </text:span><text:span text:style-name="T39">ff8</text:span><text:span text:style-name="T13">(</text:span><text:span text:style-name="T39">ff8</text:span><text:span text:style-name="T33">'high</text:span><text:span text:style-name="T13">);</text:span></text:p>
      <text:p text:style-name="P15"><text:span text:style-name="T6">end</text:span><text:span text:style-name="T13"> </text:span><text:span text:style-name="T22">rtl1</text:span><text:span text:style-name="T13">;</text:span></text:p>
      <text:p text:style-name="P16"/>
      <text:p text:style-name="P16"/>
      <text:p text:style-name="P15"><text:span text:style-name="T6">architecture</text:span><text:span text:style-name="T13"> </text:span><text:span text:style-name="T22">rtl2</text:span><text:span text:style-name="T13"> </text:span><text:span text:style-name="T6">of</text:span><text:span text:style-name="T13"> </text:span><text:span text:style-name="T22">shiftr</text:span><text:span text:style-name="T13"> </text:span><text:span text:style-name="T6">is</text:span></text:p>
      <text:p text:style-name="P15"><text:span text:style-name="T13"><text:s text:c="4"/></text:span><text:span text:style-name="T6">signal</text:span><text:span text:style-name="T13"> </text:span><text:span text:style-name="T39">ff8</text:span><text:span text:style-name="T13"> : </text:span><text:span text:style-name="T28">std_logic_vector</text:span><text:span text:style-name="T13">(</text:span><text:span text:style-name="T26">din</text:span><text:span text:style-name="T33">'range</text:span><text:span text:style-name="T13">);</text:span></text:p>
      <text:p text:style-name="P23">begin</text:p>
      <text:p text:style-name="P15"><text:span text:style-name="T13"><text:s text:c="4"/></text:span><text:span text:style-name="T38">posedge</text:span><text:span text:style-name="T13"> : </text:span><text:span text:style-name="T6">process</text:span><text:span text:style-name="T13">(</text:span><text:span text:style-name="T26">clk</text:span><text:span text:style-name="T13">, </text:span><text:span text:style-name="T26">rstn</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ff8</text:span><text:span text:style-name="T13"> &lt;= (</text:span><text:span text:style-name="T6">others</text:span><text:span text:style-name="T13"> =&gt; </text:span><text:span text:style-name="T34">'0'</text:span><text:span text:style-name="T13">);</text:span></text:p>
      <text:p text:style-name="P15"><text:span text:style-name="T13"><text:s text:c="12"/></text:span><text:span text:style-name="T26">so</text:span><text:span text:style-name="T13"> &l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pl</text:span><text:span text:style-name="T13"> = </text:span><text:span text:style-name="T34">'1'</text:span><text:span text:style-name="T13"> </text:span><text:span text:style-name="T6">then</text:span></text:p>
      <text:p text:style-name="P15"><text:span text:style-name="T13"><text:s text:c="16"/></text:span><text:span text:style-name="T39">ff8</text:span><text:span text:style-name="T13"> &lt;= </text:span><text:span text:style-name="T26">din</text:span><text:span text:style-name="T13">;</text:span></text:p>
      <text:p text:style-name="P15"><text:span text:style-name="T13"><text:s text:c="16"/></text:span><text:span text:style-name="T36">--so &lt;= '0';</text:span></text:p>
      <text:p text:style-name="P15"><text:span text:style-name="T13"><text:s text:c="12"/></text:span><text:span text:style-name="T6">elsif</text:span><text:span text:style-name="T13"> </text:span><text:span text:style-name="T26">en</text:span><text:span text:style-name="T13"> = </text:span><text:span text:style-name="T34">'1'</text:span><text:span text:style-name="T13"> </text:span><text:span text:style-name="T6">then</text:span></text:p>
      <text:p text:style-name="P15"><text:span text:style-name="T13"><text:s text:c="16"/></text:span><text:span text:style-name="T6">if</text:span><text:span text:style-name="T13"> </text:span><text:span text:style-name="T26">lrn</text:span><text:span text:style-name="T13"> = </text:span><text:span text:style-name="T34">'1'</text:span><text:span text:style-name="T13"> </text:span><text:span text:style-name="T6">then</text:span></text:p>
      <text:p text:style-name="P15"><text:span text:style-name="T13"><text:s text:c="20"/></text:span><text:span text:style-name="T39">ff8</text:span><text:span text:style-name="T13"> &lt;= </text:span><text:span text:style-name="T26">si</text:span><text:span text:style-name="T13"> </text:span><text:span text:style-name="T14">&amp;</text:span><text:span text:style-name="T13"> </text:span><text:span text:style-name="T39">ff8</text:span><text:span text:style-name="T13">(</text:span><text:span text:style-name="T39">ff8</text:span><text:span text:style-name="T33">'high</text:span><text:span text:style-name="T13"> </text:span><text:span text:style-name="T6">downto</text:span><text:span text:style-name="T13"> </text:span><text:span text:style-name="T31">1</text:span><text:span text:style-name="T13">);</text:span></text:p>
      <text:p text:style-name="P15"><text:span text:style-name="T13"><text:s text:c="20"/></text:span><text:span text:style-name="T26">so</text:span><text:span text:style-name="T13"> &lt;= </text:span><text:span text:style-name="T39">ff8</text:span><text:span text:style-name="T13">(</text:span><text:span text:style-name="T39">ff8</text:span><text:span text:style-name="T33">'low</text:span><text:span text:style-name="T13">);</text:span></text:p>
      <text:p text:style-name="P15"><text:span text:style-name="T13"><text:s text:c="16"/></text:span><text:span text:style-name="T6">else</text:span><text:span text:style-name="T13"> </text:span></text:p>
      <text:p text:style-name="P15"><text:span text:style-name="T13"><text:s text:c="20"/></text:span><text:span text:style-name="T39">ff8</text:span><text:span text:style-name="T13"> &lt;= </text:span><text:span text:style-name="T39">ff8</text:span><text:span text:style-name="T13">(</text:span><text:span text:style-name="T39">ff8</text:span><text:span text:style-name="T33">'high</text:span><text:span text:style-name="T13"> </text:span><text:span text:style-name="T14">-</text:span><text:span text:style-name="T31">1</text:span><text:span text:style-name="T13"> </text:span><text:span text:style-name="T6">downto</text:span><text:span text:style-name="T13"> </text:span><text:span text:style-name="T31">0</text:span><text:span text:style-name="T13">) </text:span><text:span text:style-name="T14">&amp;</text:span><text:span text:style-name="T13"> </text:span><text:span text:style-name="T26">si</text:span><text:span text:style-name="T13">; </text:span></text:p>
      <text:p text:style-name="P15"><text:span text:style-name="T13"><text:s text:c="20"/></text:span><text:span text:style-name="T26">so</text:span><text:span text:style-name="T13"> &lt;= </text:span><text:span text:style-name="T39">ff8</text:span><text:span text:style-name="T13">(</text:span><text:span text:style-name="T39">ff8</text:span><text:span text:style-name="T33">'high</text:span><text:span text:style-name="T13">);</text:span></text:p>
      <text:p text:style-name="P15"><text:span text:style-name="T13"><text:s text:c="16"/></text:span><text:span text:style-name="T6">end</text:span><text:span text:style-name="T13"> </text:span><text:span text:style-name="T6">if</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6">end</text:span><text:span text:style-name="T13"> </text:span><text:span text:style-name="T22">rtl2</text:span><text:span text:style-name="T13">;</text:span></text:p>
      <text:p text:style-name="P16"/>
      <text:p text:style-name="P16"/>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tbshiftr</text:span><text:span text:style-name="T13"> </text:span><text:span text:style-name="T6">is</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shiftr</text:span><text:span text:style-name="T13"> </text:span><text:span text:style-name="T6">is</text:span></text:p>
      <text:p text:style-name="P15"><text:span text:style-name="T13"><text:s text:c="4"/></text:span><text:span text:style-name="T6">component</text:span><text:span text:style-name="T13"> </text:span><text:span text:style-name="T22">shiftr</text:span><text:span text:style-name="T13"> </text:span><text:span text:style-name="T6">port</text:span><text:span text:style-name="T13">(</text:span></text:p>
      <text:p text:style-name="P15"><text:soft-page-break/><text:span text:style-name="T13"><text:s text:c="8"/></text:span><text:span text:style-name="T26">clk</text:span><text:span text:style-name="T13">, </text:span><text:span text:style-name="T26">rstn</text:span><text:span text:style-name="T13">, </text:span><text:span text:style-name="T26">si</text:span><text:span text:style-name="T13">, </text:span><text:span text:style-name="T26">pl</text:span><text:span text:style-name="T13">, </text:span><text:span text:style-name="T26">en</text:span><text:span text:style-name="T13">, </text:span><text:span text:style-name="T26">lrn</text:span><text:span text:style-name="T13"> : </text:span><text:span text:style-name="T6">in</text:span><text:span text:style-name="T13"> </text:span><text:span text:style-name="T28">std_logic</text:span><text:span text:style-name="T13">;</text:span></text:p>
      <text:p text:style-name="P15"><text:span text:style-name="T13"><text:s text:c="8"/></text:span><text:span text:style-name="T26">d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8"/></text:span><text:span text:style-name="T26">so</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text:span><text:span text:style-name="T31">50</text:span><text:span text:style-name="T13"> </text:span><text:span text:style-name="T7">ns</text:span><text:span text:style-name="T13">;</text:span></text:p>
      <text:p text:style-name="P15"><text:span text:style-name="T6">constant</text:span><text:span text:style-name="T13"> </text:span><text:span text:style-name="T7">delay</text:span><text:span text:style-name="T13"> <text:s/>: </text:span><text:span text:style-name="T28">time</text:span><text:span text:style-name="T13"> := <text:s/></text:span><text:span text:style-name="T31">80</text:span><text:span text:style-name="T13"> </text:span><text:span text:style-name="T7">ns</text:span><text:span text:style-name="T13">;</text:span></text:p>
      <text:p text:style-name="P15"><text:span text:style-name="T6">constant</text:span><text:span text:style-name="T13"> </text:span><text:span text:style-name="T7">strobe</text:span><text:span text:style-name="T13"> : </text:span><text:span text:style-name="T28">time</text:span><text:span text:style-name="T13"> := <text:s/></text:span><text:span text:style-name="T31">2</text:span><text:span text:style-name="T13"> </text:span><text:span text:style-name="T14">*</text:span><text:span text:style-name="T7">period</text:span><text:span text:style-name="T13"> </text:span><text:span text:style-name="T14">-</text:span><text:span text:style-name="T31">5</text:span><text:span text:style-name="T13"> </text:span><text:span text:style-name="T7">ns</text:span><text:span text:style-name="T13">;</text:span></text:p>
      <text:p text:style-name="P16"/>
      <text:p text:style-name="P15"><text:span text:style-name="T6">signal</text:span><text:span text:style-name="T13"> </text:span><text:span text:style-name="T39">clk</text:span><text:span text:style-name="T13">, </text:span><text:span text:style-name="T39">rstn</text:span><text:span text:style-name="T13">, </text:span><text:span text:style-name="T39">si</text:span><text:span text:style-name="T13">, </text:span><text:span text:style-name="T39">pl</text:span><text:span text:style-name="T13">, </text:span><text:span text:style-name="T39">en</text:span><text:span text:style-name="T13">, </text:span><text:span text:style-name="T39">lrn</text:span><text:span text:style-name="T13"> : </text:span><text:span text:style-name="T28">std_logic</text:span><text:span text:style-name="T13">;</text:span></text:p>
      <text:p text:style-name="P15"><text:span text:style-name="T6">signal</text:span><text:span text:style-name="T13"> </text:span><text:span text:style-name="T39">din</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 (</text:span><text:span text:style-name="T6">others</text:span><text:span text:style-name="T13"> =&gt; </text:span><text:span text:style-name="T34">'0'</text:span><text:span text:style-name="T13">);</text:span></text:p>
      <text:p text:style-name="P15"><text:span text:style-name="T6">signal</text:span><text:span text:style-name="T13"> </text:span><text:span text:style-name="T39">so1</text:span><text:span text:style-name="T13">, </text:span><text:span text:style-name="T39">so2</text:span><text:span text:style-name="T13"> : </text:span><text:span text:style-name="T28">std_logic</text:span><text:span text:style-name="T13">;</text:span></text:p>
      <text:p text:style-name="P23">begin</text:p>
      <text:p text:style-name="P15"><text:span text:style-name="T13"><text:s text:c="4"/></text:span><text:span text:style-name="T39">rstn</text:span><text:span text:style-name="T13"> &lt;= </text:span><text:span text:style-name="T34">'0'</text:span><text:span text:style-name="T13">,</text:span><text:span text:style-name="T34">'1'</text:span><text:span text:style-name="T13"> </text:span><text:span text:style-name="T6">after</text:span><text:span text:style-name="T13"> </text:span><text:span text:style-name="T7">period</text:span><text:span text:style-name="T13"> </text:span><text:span text:style-name="T14">*</text:span><text:span text:style-name="T31">3</text:span><text:span text:style-name="T13">; </text:span><text:span text:style-name="T36">--1 after 150ns</text:span></text:p>
      <text:p text:style-name="P16"/>
      <text:p text:style-name="P15"><text:span text:style-name="T13"><text:s text:c="4"/></text:span><text:span text:style-name="T38">clkgen</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1'</text:span><text:span text:style-name="T13">; </text:span><text:span text:style-name="T6">wait</text:span><text:span text:style-name="T13"> </text:span><text:span text:style-name="T6">for</text:span><text:span text:style-name="T13"> </text:span><text:span text:style-name="T7">period</text:span><text:span text:style-name="T13">; </text:span><text:span text:style-name="T36">--change ebery 50ns</text:span></text:p>
      <text:p text:style-name="P15"><text:span text:style-name="T13"><text:s text:c="8"/></text:span><text:span text:style-name="T39">clk</text:span><text:span text:style-name="T13"> &lt;= </text:span><text:span text:style-name="T34">'0'</text:span><text:span text:style-name="T13">; </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dgen</text:span><text:span text:style-name="T13"> : </text:span><text:span text:style-name="T6">process</text:span><text:span text:style-name="T13"> </text:span><text:span text:style-name="T36">--all 'after 80ns happen together at the same time until rising_edge</text:span></text:p>
      <text:p text:style-name="P15"><text:span text:style-name="T13"><text:s text:c="4"/></text:span><text:span text:style-name="T6">begin</text:span></text:p>
      <text:p text:style-name="P15"><text:span text:style-name="T13"><text:s text:c="8"/></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31">1</text:span><text:span text:style-name="T13"> </text:span><text:span text:style-name="T6">loop</text:span><text:span text:style-name="T13"> </text:span><text:span text:style-name="T36">--resets after 1 to 0</text:span></text:p>
      <text:p text:style-name="P15"><text:span text:style-name="T13"><text:s text:c="12"/></text:span><text:span text:style-name="T6">if</text:span><text:span text:style-name="T13"> (i = </text:span><text:span text:style-name="T31">0</text:span><text:span text:style-name="T13">) </text:span><text:span text:style-name="T6">then</text:span></text:p>
      <text:p text:style-name="P15"><text:span text:style-name="T13"><text:s text:c="16"/></text:span><text:span text:style-name="T39">si</text:span><text:span text:style-name="T13"> &lt;= </text:span><text:span text:style-name="T34">'0'</text:span><text:span text:style-name="T13"> </text:span><text:span text:style-name="T6">after</text:span><text:span text:style-name="T13"> </text:span><text:span text:style-name="T7">delay</text:span><text:span text:style-name="T13">; </text:span><text:span text:style-name="T36">--after 80ns AA</text:span></text:p>
      <text:p text:style-name="P15"><text:span text:style-name="T13"><text:s text:c="12"/></text:span><text:span text:style-name="T6">else</text:span><text:span text:style-name="T13"> </text:span></text:p>
      <text:p text:style-name="P15"><text:span text:style-name="T13"><text:s text:c="16"/></text:span><text:span text:style-name="T39">si</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31">1</text:span><text:span text:style-name="T13"> </text:span><text:span text:style-name="T6">loop</text:span></text:p>
      <text:p text:style-name="P15"><text:span text:style-name="T13"><text:s text:c="16"/></text:span><text:span text:style-name="T39">din</text:span><text:span text:style-name="T13"> &lt;= </text:span><text:span text:style-name="T39">din</text:span><text:span text:style-name="T13">(</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6">not</text:span><text:span text:style-name="T13"> </text:span><text:span text:style-name="T39">din</text:span><text:span text:style-name="T13">(</text:span><text:span text:style-name="T31">7</text:span><text:span text:style-name="T13">) </text:span><text:span text:style-name="T6">xor</text:span><text:span text:style-name="T13"> </text:span><text:span text:style-name="T39">din</text:span><text:span text:style-name="T13">(</text:span><text:span text:style-name="T31">2</text:span><text:span text:style-name="T13">)) </text:span><text:span text:style-name="T6">after</text:span><text:span text:style-name="T13"> </text:span><text:span text:style-name="T7">delay</text:span><text:span text:style-name="T13">; </text:span><text:span text:style-name="T36">--after 80ns AA</text:span></text:p>
      <text:p text:style-name="P15"><text:span text:style-name="T13"><text:s text:c="16"/></text:span><text:span text:style-name="T39">lrn</text:span><text:span text:style-name="T13"> &lt;= </text:span><text:span text:style-name="T39">din</text:span><text:span text:style-name="T13">(</text:span><text:span text:style-name="T31">7</text:span><text:span text:style-name="T13">) </text:span><text:span text:style-name="T6">after</text:span><text:span text:style-name="T13"> </text:span><text:span text:style-name="T7">delay</text:span><text:span text:style-name="T13">; </text:span><text:span text:style-name="T36">--after 80ns AA</text:span></text:p>
      <text:p text:style-name="P15"><text:span text:style-name="T13"><text:s text:c="16"/></text:span><text:span text:style-name="T39">pl</text:span><text:span text:style-name="T13"> &lt;= </text:span><text:span text:style-name="T34">'1'</text:span><text:span text:style-name="T13"> </text:span><text:span text:style-name="T6">after</text:span><text:span text:style-name="T13"> </text:span><text:span text:style-name="T7">delay</text:span><text:span text:style-name="T13">; </text:span><text:span text:style-name="T36">--after 80ns AA</text:span></text:p>
      <text:p text:style-name="P15"><text:span text:style-name="T13"><text:s text:c="16"/></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16"/></text:span><text:span text:style-name="T39">lrn</text:span><text:span text:style-name="T13"> &lt;= </text:span><text:span text:style-name="T39">din</text:span><text:span text:style-name="T13">(</text:span><text:span text:style-name="T31">4</text:span><text:span text:style-name="T13">) </text:span><text:span text:style-name="T6">after</text:span><text:span text:style-name="T13"> </text:span><text:span text:style-name="T7">delay</text:span><text:span text:style-name="T13">; </text:span><text:span text:style-name="T36">--after 180ns BB</text:span></text:p>
      <text:p text:style-name="P15"><text:span text:style-name="T13"><text:s text:c="16"/></text:span><text:span text:style-name="T39">pl</text:span><text:span text:style-name="T13"> &lt;= </text:span><text:span text:style-name="T34">'0'</text:span><text:span text:style-name="T13"> </text:span><text:span text:style-name="T6">after</text:span><text:span text:style-name="T13"> </text:span><text:span text:style-name="T7">delay</text:span><text:span text:style-name="T13">; </text:span><text:span text:style-name="T36">--after 180ns BB</text:span></text:p>
      <text:p text:style-name="P15"><text:span text:style-name="T13"><text:s text:c="16"/></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16"/></text:span><text:span text:style-name="T6">for</text:span><text:span text:style-name="T13"> k </text:span><text:span text:style-name="T6">in</text:span><text:span text:style-name="T13"> </text:span><text:span text:style-name="T31">0</text:span><text:span text:style-name="T13"> </text:span><text:span text:style-name="T6">to</text:span><text:span text:style-name="T13"> </text:span><text:span text:style-name="T31">15</text:span><text:span text:style-name="T13"> </text:span><text:span text:style-name="T6">loop</text:span></text:p>
      <text:p text:style-name="P15"><text:span text:style-name="T13"><text:s text:c="20"/></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16"/></text:span><text:span text:style-name="T6">end</text:span><text:span text:style-name="T13"> </text:span><text:span text:style-name="T6">loop</text:span><text:span text:style-name="T13">;</text:span></text:p>
      <text:p text:style-name="P15"><text:span text:style-name="T13"><text:s text:c="12"/></text:span><text:span text:style-name="T6">end</text:span><text:span text:style-name="T13"> </text:span><text:span text:style-name="T6">loop</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check</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6">loop</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12"/></text:span><text:span text:style-name="T6">wait</text:span><text:span text:style-name="T13"> </text:span><text:span text:style-name="T6">for</text:span><text:span text:style-name="T13"> </text:span><text:span text:style-name="T7">strobe</text:span><text:span text:style-name="T13">;</text:span></text:p>
      <text:p text:style-name="P15"><text:span text:style-name="T13"><text:s text:c="12"/></text:span><text:span text:style-name="T6">assert</text:span><text:span text:style-name="T13"> (</text:span><text:span text:style-name="T39">so1</text:span><text:span text:style-name="T13"> = </text:span><text:span text:style-name="T39">so2</text:span><text:span text:style-name="T13">) </text:span><text:span text:style-name="T6">report</text:span><text:span text:style-name="T13"> </text:span><text:span text:style-name="T34">"not compared"</text:span><text:span text:style-name="T13"> </text:span><text:span text:style-name="T6">severity</text:span><text:span text:style-name="T13"> </text:span><text:span text:style-name="T7">note</text:span><text:span text:style-name="T13">;</text:span></text:p>
      <text:p text:style-name="P15"><text:soft-page-break/><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6"/>
      <text:p text:style-name="P15"><text:span text:style-name="T13"><text:s text:c="4"/></text:span><text:span text:style-name="T38">shiftr0</text:span><text:span text:style-name="T13"> : </text:span><text:span text:style-name="T22">shiftr</text:span></text:p>
      <text:p text:style-name="P15"><text:span text:style-name="T13"><text:s text:c="8"/></text:span><text:span text:style-name="T6">port</text:span><text:span text:style-name="T13"> </text:span><text:span text:style-name="T6">map</text:span><text:span text:style-name="T13"> (</text:span><text:span text:style-name="T26">clk</text:span><text:span text:style-name="T13"> =&gt; </text:span><text:span text:style-name="T39">clk</text:span><text:span text:style-name="T13">, </text:span><text:span text:style-name="T26">rstn</text:span><text:span text:style-name="T13"> =&gt; </text:span><text:span text:style-name="T39">rstn</text:span><text:span text:style-name="T13">, </text:span><text:span text:style-name="T26">si</text:span><text:span text:style-name="T13"> =&gt; </text:span><text:span text:style-name="T39">si</text:span><text:span text:style-name="T13">, </text:span><text:span text:style-name="T26">pl</text:span><text:span text:style-name="T13"> =&gt; </text:span><text:span text:style-name="T39">pl</text:span><text:span text:style-name="T13">, </text:span><text:span text:style-name="T26">en</text:span><text:span text:style-name="T13"> =&gt; </text:span><text:span text:style-name="T39">en</text:span><text:span text:style-name="T13">, </text:span><text:span text:style-name="T26">lrn</text:span><text:span text:style-name="T13"> =&gt; </text:span><text:span text:style-name="T39">lrn</text:span><text:span text:style-name="T13">, </text:span><text:span text:style-name="T26">din</text:span><text:span text:style-name="T13"> =&gt; </text:span><text:span text:style-name="T39">din</text:span><text:span text:style-name="T13">, </text:span><text:span text:style-name="T26">so</text:span><text:span text:style-name="T13"> =&gt; </text:span><text:span text:style-name="T39">so1</text:span><text:span text:style-name="T13">);</text:span></text:p>
      <text:p text:style-name="P16"/>
      <text:p text:style-name="P15"><text:span text:style-name="T13"><text:s text:c="4"/></text:span><text:span text:style-name="T38">shiftr1</text:span><text:span text:style-name="T13"> : </text:span><text:span text:style-name="T22">shiftr</text:span></text:p>
      <text:p text:style-name="P15"><text:span text:style-name="T13"><text:s text:c="8"/></text:span><text:span text:style-name="T6">port</text:span><text:span text:style-name="T13"> </text:span><text:span text:style-name="T6">map</text:span><text:span text:style-name="T13"> (</text:span><text:span text:style-name="T26">clk</text:span><text:span text:style-name="T13"> =&gt; </text:span><text:span text:style-name="T39">clk</text:span><text:span text:style-name="T13">, </text:span><text:span text:style-name="T26">rstn</text:span><text:span text:style-name="T13"> =&gt; </text:span><text:span text:style-name="T39">rstn</text:span><text:span text:style-name="T13">, </text:span><text:span text:style-name="T26">si</text:span><text:span text:style-name="T13"> =&gt; </text:span><text:span text:style-name="T39">si</text:span><text:span text:style-name="T13">, </text:span><text:span text:style-name="T26">pl</text:span><text:span text:style-name="T13"> =&gt; </text:span><text:span text:style-name="T39">pl</text:span><text:span text:style-name="T13">, </text:span><text:span text:style-name="T26">en</text:span><text:span text:style-name="T13"> =&gt; </text:span><text:span text:style-name="T39">en</text:span><text:span text:style-name="T13">, </text:span><text:span text:style-name="T26">lrn</text:span><text:span text:style-name="T13"> =&gt; </text:span><text:span text:style-name="T39">lrn</text:span><text:span text:style-name="T13">, </text:span><text:span text:style-name="T26">din</text:span><text:span text:style-name="T13"> =&gt; </text:span><text:span text:style-name="T39">din</text:span><text:span text:style-name="T13">, </text:span><text:span text:style-name="T26">so</text:span><text:span text:style-name="T13"> =&gt; </text:span><text:span text:style-name="T39">so2</text:span><text:span text:style-name="T13">);</text:span></text:p>
      <text:p text:style-name="P16"/>
      <text:p text:style-name="P15"><text:span text:style-name="T6">end</text:span><text:span text:style-name="T13"> </text:span><text:span text:style-name="T22">beh</text:span><text:span text:style-name="T13">;</text:span></text:p>
      <text:p text:style-name="P16"/>
      <text:p text:style-name="P15"><text:span text:style-name="T6">configuration</text:span><text:span text:style-name="T13"> cfg_tbshift </text:span><text:span text:style-name="T6">of</text:span><text:span text:style-name="T13"> </text:span><text:span text:style-name="T22">tbshiftr</text:span><text:span text:style-name="T13"> </text:span><text:span text:style-name="T6">is</text:span></text:p>
      <text:p text:style-name="P15"><text:span text:style-name="T13"><text:s text:c="4"/></text:span><text:span text:style-name="T6">for</text:span><text:span text:style-name="T13"> </text:span><text:span text:style-name="T22">beh</text:span></text:p>
      <text:p text:style-name="P15"><text:span text:style-name="T13"><text:s text:c="4"/></text:span><text:span text:style-name="T6">for</text:span><text:span text:style-name="T13"> shiftr0 : </text:span><text:span text:style-name="T22">shiftr</text:span></text:p>
      <text:p text:style-name="P15"><text:span text:style-name="T13"><text:s text:c="4"/></text:span><text:span text:style-name="T6">use</text:span><text:span text:style-name="T13"> </text:span><text:span text:style-name="T6">entity</text:span><text:span text:style-name="T13"> </text:span><text:span text:style-name="T22">work</text:span><text:span text:style-name="T13">.</text:span><text:span text:style-name="T22">shiftr</text:span><text:span text:style-name="T13">(</text:span><text:span text:style-name="T22">rtl1</text:span><text:span text:style-name="T13">);</text:span></text:p>
      <text:p text:style-name="P15"><text:span text:style-name="T6">end</text:span><text:span text:style-name="T13"> </text:span><text:span text:style-name="T6">for</text:span><text:span text:style-name="T13">;</text:span></text:p>
      <text:p text:style-name="P16"/>
      <text:p text:style-name="P15"><text:span text:style-name="T6">for</text:span><text:span text:style-name="T13"> shiftr1 : </text:span><text:span text:style-name="T22">shiftr</text:span></text:p>
      <text:p text:style-name="P15"><text:span text:style-name="T6">use</text:span><text:span text:style-name="T13"> </text:span><text:span text:style-name="T6">entity</text:span><text:span text:style-name="T13"> </text:span><text:span text:style-name="T22">work</text:span><text:span text:style-name="T13">.</text:span><text:span text:style-name="T22">shiftr</text:span><text:span text:style-name="T13">(</text:span><text:span text:style-name="T22">rtl2</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for</text:span><text:span text:style-name="T13">;</text:span></text:p>
      <text:p text:style-name="P15"><text:span text:style-name="T6">end</text:span><text:span text:style-name="T13"> </text:span><text:span text:style-name="T6">configuration</text:span><text:span text:style-name="T13">;</text:span></text:p>
      <text:p text:style-name="P24"/>
      <text:p text:style-name="P24"/>
      <text:p text:style-name="P24"><text:span text:style-name="T11">library</text:span><text:span text:style-name="T12"> </text:span><text:span text:style-name="T21">ieee</text:span><text:span text:style-name="T12">;</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 </text:span><text:span text:style-name="T22">std_logic_unsigned</text:span><text:span text:style-name="T13">.</text:span><text:span text:style-name="T6">all</text:span><text:span text:style-name="T13">;</text:span></text:p>
      <text:p text:style-name="P16"/>
      <text:p text:style-name="P15"><text:span text:style-name="T6">entity</text:span><text:span text:style-name="T13"> </text:span><text:span text:style-name="T22">lfsr</text:span><text:span text:style-name="T13"> </text:span><text:span text:style-name="T6">is</text:span><text:span text:style-name="T13"> </text:span><text:span text:style-name="T6">port</text:span><text:span text:style-name="T13">( <text:s text:c="3"/></text:span></text:p>
      <text:p text:style-name="P15"><text:span text:style-name="T13"><text:s text:c="4"/></text:span><text:span text:style-name="T26">clk</text:span><text:span text:style-name="T13">, </text:span><text:span text:style-name="T26">rstn</text:span><text:span text:style-name="T13"> : </text:span><text:span text:style-name="T6">in</text:span><text:span text:style-name="T13"> </text:span><text:span text:style-name="T28">std_logic</text:span><text:span text:style-name="T13">; <text:s text:c="3"/></text:span></text:p>
      <text:p text:style-name="P15"><text:span text:style-name="T13"><text:s text:c="4"/></text:span><text:span text:style-name="T26">cnt</text:span><text:span text:style-name="T13"> : </text:span><text:span text:style-name="T6">out</text:span><text:span text:style-name="T13"> </text:span><text:span text:style-name="T28">std_logic_vector</text:span><text:span text:style-name="T13">(</text:span><text:span text:style-name="T31">3</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22">lfsr</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lfsr</text:span><text:span text:style-name="T13"> </text:span><text:span text:style-name="T6">is</text:span></text:p>
      <text:p text:style-name="P15"><text:span text:style-name="T13"><text:s text:c="4"/></text:span><text:span text:style-name="T6">signal</text:span><text:span text:style-name="T13"> </text:span><text:span text:style-name="T39">ff</text:span><text:span text:style-name="T13"> : </text:span><text:span text:style-name="T28">std_logic_vector</text:span><text:span text:style-name="T13">(</text:span><text:span text:style-name="T26">cnt</text:span><text:span text:style-name="T33">'range</text:span><text:span text:style-name="T13">);</text:span></text:p>
      <text:p text:style-name="P23">begin</text:p>
      <text:p text:style-name="P15"><text:span text:style-name="T13"><text:s text:c="4"/></text:span><text:span text:style-name="T38">posedge</text:span><text:span text:style-name="T13"> : </text:span><text:span text:style-name="T6">process</text:span><text:span text:style-name="T13">(</text:span><text:span text:style-name="T26">clk</text:span><text:span text:style-name="T13">, </text:span><text:span text:style-name="T26">rstn</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span text:style-name="T13"> </text:span></text:p>
      <text:p text:style-name="P15"><text:span text:style-name="T13"><text:s text:c="12"/></text:span><text:span text:style-name="T39">ff</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39">ff</text:span><text:span text:style-name="T13"> &lt;= </text:span><text:span text:style-name="T39">ff</text:span><text:span text:style-name="T13">(</text:span><text:span text:style-name="T31">2</text:span><text:span text:style-name="T13"> </text:span><text:span text:style-name="T6">downto</text:span><text:span text:style-name="T13"> </text:span><text:span text:style-name="T31">0</text:span><text:span text:style-name="T13">) </text:span><text:span text:style-name="T14">&amp;</text:span><text:span text:style-name="T13"> </text:span><text:span text:style-name="T6">not</text:span><text:span text:style-name="T13">(</text:span><text:span text:style-name="T39">ff</text:span><text:span text:style-name="T13">(</text:span><text:span text:style-name="T31">0</text:span><text:span text:style-name="T13">) </text:span><text:span text:style-name="T6">xor</text:span><text:span text:style-name="T13"> </text:span><text:span text:style-name="T39">ff</text:span><text:span text:style-name="T13">(</text:span><text:span text:style-name="T31">3</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cnt</text:span><text:span text:style-name="T13"> &lt;= </text:span><text:span text:style-name="T39">ff</text:span><text:span text:style-name="T13">;</text:span></text:p>
      <text:p text:style-name="P15"><text:span text:style-name="T6">end</text:span><text:span text:style-name="T13"> </text:span><text:span text:style-name="T22">rtl</text:span><text:span text:style-name="T13">;</text:span></text:p>
      <text:p text:style-name="P16"/>
      <text:p text:style-name="P24">--architecture rtl1 of lfsr is </text:p>
      <text:p text:style-name="P24">-- <text:s text:c="3"/>signal ff : std_logic_vector(3 downto 0);</text:p>
      <text:p text:style-name="P24"><text:soft-page-break/>--begin</text:p>
      <text:p text:style-name="P24">-- <text:s text:c="3"/>posedge : process(clk, rstn)</text:p>
      <text:p text:style-name="P24">-- <text:s text:c="3"/>begin</text:p>
      <text:p text:style-name="P24">-- <text:s text:c="7"/>if rstn = '0' then</text:p>
      <text:p text:style-name="P24">-- <text:s text:c="11"/>ff &lt;= (others =&gt; '0');</text:p>
      <text:p text:style-name="P24">-- <text:s text:c="7"/>elsif rising_edge(clk) then</text:p>
      <text:p text:style-name="P24">-- <text:s text:c="11"/>ff(0) &lt;= not(ff(3) xor ff(0));</text:p>
      <text:p text:style-name="P24">-- <text:s text:c="11"/>ff(1) &lt;= ff(0);</text:p>
      <text:p text:style-name="P24">-- <text:s text:c="11"/>ff(2) &lt;= ff(1);</text:p>
      <text:p text:style-name="P24">-- <text:s text:c="11"/>ff(3) &lt;= ff(2);</text:p>
      <text:p text:style-name="P24">-- <text:s text:c="7"/>end if;</text:p>
      <text:p text:style-name="P24">-- <text:s text:c="3"/>end process;</text:p>
      <text:p text:style-name="P24">-- <text:s text:c="3"/></text:p>
      <text:p text:style-name="P24">-- <text:s text:c="3"/>cnt &lt;= ff;</text:p>
      <text:p text:style-name="P24">--end rtl1;</text:p>
      <text:p text:style-name="P16"/>
      <text:p text:style-name="P16"/>
      <text:p text:style-name="P16"/>
      <text:p text:style-name="P24">--architecture rtl of lfsr is</text:p>
      <text:p text:style-name="P24">-- <text:s text:c="3"/>signal ff : std_logic_vector(cnt'range);</text:p>
      <text:p text:style-name="P24">--begin</text:p>
      <text:p text:style-name="P24">-- <text:s text:c="3"/>posedge : process(clk, rstn)</text:p>
      <text:p text:style-name="P24">-- <text:s text:c="3"/>begin</text:p>
      <text:p text:style-name="P24">-- <text:s text:c="7"/>if rstn = '0' then </text:p>
      <text:p text:style-name="P24">-- <text:s text:c="11"/>ff &lt;= (others =&gt; '0');</text:p>
      <text:p text:style-name="P24">-- <text:s text:c="7"/>elsif rising_edge(clk) then</text:p>
      <text:p text:style-name="P24">-- <text:s text:c="11"/>ff &lt;= ff +1;</text:p>
      <text:p text:style-name="P24">-- <text:s text:c="7"/>end if;</text:p>
      <text:p text:style-name="P24">-- <text:s text:c="3"/>end process;</text:p>
      <text:p text:style-name="P24">-- <text:s text:c="3"/>cnt &lt;= ff;</text:p>
      <text:p text:style-name="P24">--end rtl;</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pan text:style-name="T6">entity</text:span><text:span text:style-name="T13"> </text:span><text:span text:style-name="T22">otm</text:span><text:span text:style-name="T13"> </text:span><text:span text:style-name="T6">is</text:span><text:span text:style-name="T13"> </text:span><text:span text:style-name="T6">port</text:span><text:span text:style-name="T13">(</text:span></text:p>
      <text:p text:style-name="P15"><text:span text:style-name="T13"><text:s text:c="4"/></text:span><text:span text:style-name="T26">rstn</text:span><text:span text:style-name="T13">, </text:span><text:span text:style-name="T26">clk</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so</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entity</text:span><text:span text:style-name="T13">;</text:span></text:p>
      <text:p text:style-name="P16"/>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otm</text:span><text:span text:style-name="T13"> </text:span><text:span text:style-name="T6">is</text:span></text:p>
      <text:p text:style-name="P15"><text:span text:style-name="T13"><text:s text:c="4"/></text:span><text:span text:style-name="T6">signal</text:span><text:span text:style-name="T13"> </text:span><text:span text:style-name="T39">ff</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constant</text:span><text:span text:style-name="T13"> </text:span><text:span text:style-name="T7">seed</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 (</text:span><text:span text:style-name="T6">others</text:span><text:span text:style-name="T13"> =&gt; </text:span><text:span text:style-name="T34">'1'</text:span><text:span text:style-name="T13">); <text:s text:c="3"/></text:span></text:p>
      <text:p text:style-name="P23">begin</text:p>
      <text:p text:style-name="P15"><text:span text:style-name="T13"><text:s text:c="4"/></text:span><text:span text:style-name="T38">lfsr</text:span><text:span text:style-name="T13"> : </text:span><text:span text:style-name="T6">process</text:span><text:span text:style-name="T13">(</text:span><text:span text:style-name="T26">rstn</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span text:style-name="T13"> </text:span></text:p>
      <text:p text:style-name="P15"><text:span text:style-name="T13"><text:s text:c="12"/></text:span><text:span text:style-name="T39">ff</text:span><text:span text:style-name="T13"> &lt;= </text:span><text:span text:style-name="T7">seed</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oft-page-break/><text:span text:style-name="T13"><text:s text:c="12"/></text:span><text:span text:style-name="T39">ff</text:span><text:span text:style-name="T13">(</text:span><text:span text:style-name="T31">0</text:span><text:span text:style-name="T13">) &lt;= </text:span><text:span text:style-name="T39">ff</text:span><text:span text:style-name="T13">(</text:span><text:span text:style-name="T31">7</text:span><text:span text:style-name="T13">);</text:span></text:p>
      <text:p text:style-name="P15"><text:span text:style-name="T13"><text:s text:c="12"/></text:span><text:span text:style-name="T39">ff</text:span><text:span text:style-name="T13">(</text:span><text:span text:style-name="T31">1</text:span><text:span text:style-name="T13">) <text:s text:c="3"/>&lt;= </text:span><text:span text:style-name="T39">ff</text:span><text:span text:style-name="T13">(</text:span><text:span text:style-name="T31">0</text:span><text:span text:style-name="T13">);</text:span></text:p>
      <text:p text:style-name="P15"><text:span text:style-name="T13"><text:s text:c="12"/></text:span><text:span text:style-name="T39">ff</text:span><text:span text:style-name="T13">(</text:span><text:span text:style-name="T31">2</text:span><text:span text:style-name="T13">) &lt;= </text:span><text:span text:style-name="T39">ff</text:span><text:span text:style-name="T13">(</text:span><text:span text:style-name="T31">1</text:span><text:span text:style-name="T13">) </text:span><text:span text:style-name="T6">xor</text:span><text:span text:style-name="T13"> </text:span><text:span text:style-name="T39">ff</text:span><text:span text:style-name="T13">(</text:span><text:span text:style-name="T31">7</text:span><text:span text:style-name="T13">);</text:span></text:p>
      <text:p text:style-name="P15"><text:span text:style-name="T13"><text:s text:c="12"/></text:span><text:span text:style-name="T39">ff</text:span><text:span text:style-name="T13">(</text:span><text:span text:style-name="T31">3</text:span><text:span text:style-name="T13">) &lt;= </text:span><text:span text:style-name="T39">ff</text:span><text:span text:style-name="T13">(</text:span><text:span text:style-name="T31">2</text:span><text:span text:style-name="T13">) </text:span><text:span text:style-name="T6">xor</text:span><text:span text:style-name="T13"> </text:span><text:span text:style-name="T39">ff</text:span><text:span text:style-name="T13">(</text:span><text:span text:style-name="T31">7</text:span><text:span text:style-name="T13">);</text:span></text:p>
      <text:p text:style-name="P15"><text:span text:style-name="T13"><text:s text:c="12"/></text:span><text:span text:style-name="T39">ff</text:span><text:span text:style-name="T13">(</text:span><text:span text:style-name="T31">4</text:span><text:span text:style-name="T13">) &lt;= </text:span><text:span text:style-name="T39">ff</text:span><text:span text:style-name="T13">(</text:span><text:span text:style-name="T31">3</text:span><text:span text:style-name="T13">) </text:span><text:span text:style-name="T6">xor</text:span><text:span text:style-name="T13"> </text:span><text:span text:style-name="T39">ff</text:span><text:span text:style-name="T13">(</text:span><text:span text:style-name="T31">7</text:span><text:span text:style-name="T13">);</text:span></text:p>
      <text:p text:style-name="P15"><text:span text:style-name="T13"><text:s text:c="12"/></text:span><text:span text:style-name="T39">ff</text:span><text:span text:style-name="T13">(</text:span><text:span text:style-name="T31">7</text:span><text:span text:style-name="T13"> </text:span><text:span text:style-name="T6">downto</text:span><text:span text:style-name="T13"> </text:span><text:span text:style-name="T31">5</text:span><text:span text:style-name="T13">) &lt;= </text:span><text:span text:style-name="T39">ff</text:span><text:span text:style-name="T13">(</text:span><text:span text:style-name="T31">6</text:span><text:span text:style-name="T13"> </text:span><text:span text:style-name="T6">downto</text:span><text:span text:style-name="T13"> </text:span><text:span text:style-name="T31">4</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26">so</text:span><text:span text:style-name="T13"> &lt;= </text:span><text:span text:style-name="T39">ff</text:span><text:span text:style-name="T13">(</text:span><text:span text:style-name="T31">7</text:span><text:span text:style-name="T13">);</text:span></text:p>
      <text:p text:style-name="P15"><text:span text:style-name="T6">end</text:span><text:span text:style-name="T13"> </text:span><text:span text:style-name="T22">rtl</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pack</text:span><text:span text:style-name="T13">.</text:span><text:span text:style-name="T6">all</text:span><text:span text:style-name="T13">;</text:span></text:p>
      <text:p text:style-name="P16"/>
      <text:p text:style-name="P15"><text:span text:style-name="T6">entity</text:span><text:span text:style-name="T13"> </text:span><text:span text:style-name="T22">p2s</text:span><text:span text:style-name="T13"> </text:span><text:span text:style-name="T6">is</text:span><text:span text:style-name="T13"> </text:span><text:span text:style-name="T6">port</text:span><text:span text:style-name="T13">(</text:span></text:p>
      <text:p text:style-name="P15"><text:span text:style-name="T13"><text:s text:c="4"/></text:span><text:span text:style-name="T26">rstn</text:span><text:span text:style-name="T13">, </text:span><text:span text:style-name="T26">clk</text:span><text:span text:style-name="T13">, </text:span><text:span text:style-name="T26">pl</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d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26">ser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22">p2s</text:span><text:span text:style-name="T13">;</text:span></text:p>
      <text:p text:style-name="P16"/>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p2s</text:span><text:span text:style-name="T13"> </text:span><text:span text:style-name="T6">is</text:span></text:p>
      <text:p text:style-name="P15"><text:span text:style-name="T13"><text:s text:c="4"/></text:span><text:span text:style-name="T6">signal</text:span><text:span text:style-name="T13"> </text:span><text:span text:style-name="T39">dff</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start</text:span><text:span text:style-name="T13">, </text:span><text:span text:style-name="T39">parbit</text:span><text:span text:style-name="T13"> : </text:span><text:span text:style-name="T28">std_logic</text:span><text:span text:style-name="T13">;</text:span></text:p>
      <text:p text:style-name="P23">begin</text:p>
      <text:p text:style-name="P15"><text:span text:style-name="T13"><text:s text:c="4"/></text:span><text:span text:style-name="T38">p0</text:span><text:span text:style-name="T13"> : </text:span><text:span text:style-name="T6">process</text:span><text:span text:style-name="T13">(</text:span><text:span text:style-name="T26">rstn</text:span><text:span text:style-name="T13">, </text:span><text:span text:style-name="T26">clk</text:span><text:span text:style-name="T13">)</text:span></text:p>
      <text:p text:style-name="P15"><text:span text:style-name="T13"><text:s text:c="4"/></text:span><text:span text:style-name="T6">begin</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start</text:span><text:span text:style-name="T13"> &lt;= </text:span><text:span text:style-name="T34">'0'</text:span><text:span text:style-name="T13">;</text:span></text:p>
      <text:p text:style-name="P15"><text:span text:style-name="T13"><text:s text:c="12"/></text:span><text:span text:style-name="T39">parbit</text:span><text:span text:style-name="T13"> &lt;= </text:span><text:span text:style-name="T34">'0'</text:span><text:span text:style-name="T13">;</text:span></text:p>
      <text:p text:style-name="P15"><text:span text:style-name="T13"><text:s text:c="12"/></text:span><text:span text:style-name="T39">dff</text:span><text:span text:style-name="T13"> &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26">pl</text:span><text:span text:style-name="T13"> = </text:span><text:span text:style-name="T34">'1'</text:span><text:span text:style-name="T13"> </text:span><text:span text:style-name="T6">then</text:span></text:p>
      <text:p text:style-name="P15"><text:span text:style-name="T13"><text:s text:c="16"/></text:span><text:span text:style-name="T39">start</text:span><text:span text:style-name="T13"> &lt;= </text:span><text:span text:style-name="T34">'1'</text:span><text:span text:style-name="T13">;</text:span></text:p>
      <text:p text:style-name="P15"><text:span text:style-name="T13"><text:s text:c="16"/></text:span><text:span text:style-name="T39">dff</text:span><text:span text:style-name="T13"> &lt;= </text:span><text:span text:style-name="T26">din</text:span><text:span text:style-name="T13">;</text:span></text:p>
      <text:p text:style-name="P15"><text:span text:style-name="T13"><text:s text:c="16"/></text:span><text:span text:style-name="T39">parbit</text:span><text:span text:style-name="T13"> &lt;= </text:span><text:span text:style-name="T14">reduce_xor</text:span><text:span text:style-name="T13">(</text:span><text:span text:style-name="T26">din</text:span><text:span text:style-name="T13">);</text:span></text:p>
      <text:p text:style-name="P15"><text:span text:style-name="T13"><text:s text:c="12"/></text:span><text:span text:style-name="T6">else</text:span></text:p>
      <text:p text:style-name="P15"><text:span text:style-name="T13"><text:s text:c="16"/></text:span><text:span text:style-name="T39">start</text:span><text:span text:style-name="T13"> &lt;= </text:span><text:span text:style-name="T39">dff</text:span><text:span text:style-name="T13">(</text:span><text:span text:style-name="T31">7</text:span><text:span text:style-name="T13">);</text:span></text:p>
      <text:p text:style-name="P15"><text:span text:style-name="T13"><text:s text:c="16"/></text:span><text:span text:style-name="T39">dff</text:span><text:span text:style-name="T13"> &lt;= </text:span><text:span text:style-name="T39">dff</text:span><text:span text:style-name="T13">(</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39">parbit</text:span><text:span text:style-name="T13">;</text:span></text:p>
      <text:p text:style-name="P15"><text:span text:style-name="T13"><text:s text:c="16"/></text:span><text:span text:style-name="T39">parbit</text:span><text:span text:style-name="T13"> &lt;= </text:span><text:span text:style-name="T34">'0'</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26">serout</text:span><text:span text:style-name="T13"> &lt;= </text:span><text:span text:style-name="T39">start</text:span><text:span text:style-name="T13">;</text:span></text:p>
      <text:p text:style-name="P15"><text:span text:style-name="T6">end</text:span><text:span text:style-name="T13"> </text:span><text:span text:style-name="T22">rtl</text:span><text:span text:style-name="T13">;</text:span></text:p>
      <text:p text:style-name="P16"/>
      <text:p text:style-name="P16"/>
      <text:p text:style-name="P15"><text:span text:style-name="T6">library</text:span><text:span text:style-name="T13"> </text:span><text:span text:style-name="T22">ieee</text:span><text:span text:style-name="T13">;</text:span></text:p>
      <text:p text:style-name="P15"><text:soft-page-break/><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6">package</text:span><text:span text:style-name="T13"> </text:span><text:span text:style-name="T22">pack</text:span><text:span text:style-name="T13"> </text:span><text:span text:style-name="T6">is</text:span></text:p>
      <text:p text:style-name="P15"><text:span text:style-name="T13"><text:s text:c="4"/></text:span><text:span text:style-name="T6">function</text:span><text:span text:style-name="T13"> </text:span><text:span text:style-name="T14">reduce_xor</text:span><text:span text:style-name="T13">(</text:span><text:span text:style-name="T26">din</text:span><text:span text:style-name="T13"> : </text:span><text:span text:style-name="T6">in</text:span><text:span text:style-name="T13"> </text:span><text:span text:style-name="T28">std_logic_vector</text:span><text:span text:style-name="T13">) </text:span><text:span text:style-name="T6">return</text:span><text:span text:style-name="T13"> </text:span><text:span text:style-name="T28">std_logic</text:span><text:span text:style-name="T13">;</text:span></text:p>
      <text:p text:style-name="P15"><text:span text:style-name="T6">end</text:span><text:span text:style-name="T13"> </text:span><text:span text:style-name="T22">pack</text:span><text:span text:style-name="T13">;</text:span></text:p>
      <text:p text:style-name="P16"/>
      <text:p text:style-name="P15"><text:span text:style-name="T6">package</text:span><text:span text:style-name="T13"> </text:span><text:span text:style-name="T6">body</text:span><text:span text:style-name="T13"> </text:span><text:span text:style-name="T22">pack</text:span><text:span text:style-name="T13"> </text:span><text:span text:style-name="T6">is</text:span></text:p>
      <text:p text:style-name="P15"><text:span text:style-name="T13"><text:s text:c="4"/></text:span><text:span text:style-name="T6">function</text:span><text:span text:style-name="T13"> </text:span><text:span text:style-name="T14">reduce_xor</text:span><text:span text:style-name="T13">(</text:span><text:span text:style-name="T26">din</text:span><text:span text:style-name="T13"> : </text:span><text:span text:style-name="T6">in</text:span><text:span text:style-name="T13"> </text:span><text:span text:style-name="T28">std_logic_vector</text:span><text:span text:style-name="T13">) </text:span><text:span text:style-name="T6">return</text:span><text:span text:style-name="T13"> </text:span><text:span text:style-name="T28">std_logic</text:span><text:span text:style-name="T13"> </text:span><text:span text:style-name="T6">is</text:span></text:p>
      <text:p text:style-name="P15"><text:span text:style-name="T13"><text:s text:c="8"/></text:span><text:span text:style-name="T6">variable</text:span><text:span text:style-name="T13"> </text:span><text:span text:style-name="T30">result</text:span><text:span text:style-name="T13"> : </text:span><text:span text:style-name="T28">std_logic</text:span><text:span text:style-name="T13">;</text:span></text:p>
      <text:p text:style-name="P15"><text:span text:style-name="T13"><text:s text:c="4"/></text:span><text:span text:style-name="T6">begin</text:span></text:p>
      <text:p text:style-name="P15"><text:span text:style-name="T13"><text:s text:c="8"/></text:span><text:span text:style-name="T30">result</text:span><text:span text:style-name="T13"> := </text:span><text:span text:style-name="T34">'0'</text:span><text:span text:style-name="T13">;</text:span></text:p>
      <text:p text:style-name="P15"><text:span text:style-name="T13"><text:s text:c="8"/></text:span><text:span text:style-name="T6">for</text:span><text:span text:style-name="T13"> i </text:span><text:span text:style-name="T6">in</text:span><text:span text:style-name="T13"> </text:span><text:span text:style-name="T26">din</text:span><text:span text:style-name="T33">'range</text:span><text:span text:style-name="T13"> </text:span><text:span text:style-name="T6">loop</text:span><text:span text:style-name="T13"> <text:s/></text:span><text:span text:style-name="T36">-- range' (high downto low)</text:span></text:p>
      <text:p text:style-name="P15"><text:span text:style-name="T13"><text:s text:c="12"/></text:span><text:span text:style-name="T30">result</text:span><text:span text:style-name="T13"> := </text:span><text:span text:style-name="T30">result</text:span><text:span text:style-name="T13"> </text:span><text:span text:style-name="T6">xor</text:span><text:span text:style-name="T13"> </text:span><text:span text:style-name="T26">din</text:span><text:span text:style-name="T13">(i);</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8"/></text:span><text:span text:style-name="T6">return</text:span><text:span text:style-name="T13"> </text:span><text:span text:style-name="T30">result</text:span><text:span text:style-name="T13">;</text:span></text:p>
      <text:p text:style-name="P15"><text:span text:style-name="T13"><text:s text:c="4"/></text:span><text:span text:style-name="T6">end</text:span><text:span text:style-name="T13"> </text:span><text:span text:style-name="T14">reduce_xor</text:span><text:span text:style-name="T13">;</text:span></text:p>
      <text:p text:style-name="P15"><text:span text:style-name="T6">end</text:span><text:span text:style-name="T13"> </text:span><text:span text:style-name="T22">pack</text:span><text:span text:style-name="T13">;</text:span></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p>
      <text:p text:style-name="P16"/>
      <text:p text:style-name="P15"><text:span text:style-name="T6">entity</text:span><text:span text:style-name="T13"> </text:span><text:span text:style-name="T22">tbp2s</text:span><text:span text:style-name="T13"> </text:span><text:span text:style-name="T6">is</text:span><text:span text:style-name="T13"> </text:span><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beh</text:span><text:span text:style-name="T13"> </text:span><text:span text:style-name="T6">of</text:span><text:span text:style-name="T13"> </text:span><text:span text:style-name="T22">tbp2s</text:span><text:span text:style-name="T13"> </text:span><text:span text:style-name="T6">is</text:span></text:p>
      <text:p text:style-name="P15"><text:span text:style-name="T13"><text:s text:c="4"/></text:span><text:span text:style-name="T6">component</text:span><text:span text:style-name="T13"> </text:span><text:span text:style-name="T22">p2s</text:span><text:span text:style-name="T13"> </text:span><text:span text:style-name="T6">is</text:span><text:span text:style-name="T13"> </text:span><text:span text:style-name="T6">port</text:span><text:span text:style-name="T13">(</text:span></text:p>
      <text:p text:style-name="P15"><text:span text:style-name="T13"><text:s text:c="8"/></text:span><text:span text:style-name="T26">rstn</text:span><text:span text:style-name="T13">, </text:span><text:span text:style-name="T26">clk</text:span><text:span text:style-name="T13">, </text:span><text:span text:style-name="T26">pl</text:span><text:span text:style-name="T13"> : </text:span><text:span text:style-name="T6">in</text:span><text:span text:style-name="T13"> </text:span><text:span text:style-name="T28">std_logic</text:span><text:span text:style-name="T13">;</text:span></text:p>
      <text:p text:style-name="P15"><text:span text:style-name="T13"><text:s text:c="8"/></text:span><text:span text:style-name="T26">din</text:span><text:span text:style-name="T13"> : </text:span><text:span text:style-name="T6">in</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8"/></text:span><text:span text:style-name="T26">serout</text:span><text:span text:style-name="T13"> : </text:span><text:span text:style-name="T6">out</text:span><text:span text:style-name="T13"> </text:span><text:span text:style-name="T28">std_logic</text:span><text:span text:style-name="T13">);</text:span></text:p>
      <text:p text:style-name="P15"><text:span text:style-name="T6">end</text:span><text:span text:style-name="T13"> </text:span><text:span text:style-name="T6">component</text:span><text:span text:style-name="T13">;</text:span></text:p>
      <text:p text:style-name="P16"/>
      <text:p text:style-name="P15"><text:span text:style-name="T6">signal</text:span><text:span text:style-name="T13"> </text:span><text:span text:style-name="T39">rstn</text:span><text:span text:style-name="T13">, </text:span><text:span text:style-name="T39">clk</text:span><text:span text:style-name="T13">, </text:span><text:span text:style-name="T39">pl</text:span><text:span text:style-name="T13"> : </text:span><text:span text:style-name="T28">std_logic</text:span><text:span text:style-name="T13">;</text:span></text:p>
      <text:p text:style-name="P15"><text:span text:style-name="T6">signal</text:span><text:span text:style-name="T13"> </text:span><text:span text:style-name="T39">din</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 := (</text:span><text:span text:style-name="T6">others</text:span><text:span text:style-name="T13"> =&gt; </text:span><text:span text:style-name="T34">'0'</text:span><text:span text:style-name="T13">);</text:span></text:p>
      <text:p text:style-name="P15"><text:span text:style-name="T6">signal</text:span><text:span text:style-name="T13"> </text:span><text:span text:style-name="T39">serout</text:span><text:span text:style-name="T13"> : <text:s/></text:span><text:span text:style-name="T28">std_logic</text:span><text:span text:style-name="T13">;</text:span></text:p>
      <text:p text:style-name="P16"/>
      <text:p text:style-name="P15"><text:span text:style-name="T6">constant</text:span><text:span text:style-name="T13"> </text:span><text:span text:style-name="T7">period</text:span><text:span text:style-name="T13"> : </text:span><text:span text:style-name="T28">time</text:span><text:span text:style-name="T13"> := </text:span><text:span text:style-name="T31">50</text:span><text:span text:style-name="T13"> </text:span><text:span text:style-name="T7">ns</text:span><text:span text:style-name="T13">;</text:span></text:p>
      <text:p text:style-name="P15"><text:span text:style-name="T6">constant</text:span><text:span text:style-name="T13"> </text:span><text:span text:style-name="T7">delay</text:span><text:span text:style-name="T13"> : </text:span><text:span text:style-name="T28">time</text:span><text:span text:style-name="T13"> := </text:span><text:span text:style-name="T31">80</text:span><text:span text:style-name="T13"> </text:span><text:span text:style-name="T7">ns</text:span><text:span text:style-name="T13">;</text:span></text:p>
      <text:p text:style-name="P16"/>
      <text:p text:style-name="P23">begin</text:p>
      <text:p text:style-name="P16"/>
      <text:p text:style-name="P15"><text:span text:style-name="T13"><text:s text:c="4"/></text:span><text:span text:style-name="T39">rstn</text:span><text:span text:style-name="T13"> &lt;= </text:span><text:span text:style-name="T34">'0'</text:span><text:span text:style-name="T13">, </text:span><text:span text:style-name="T34">'1'</text:span><text:span text:style-name="T13"> </text:span><text:span text:style-name="T6">after</text:span><text:span text:style-name="T13"> </text:span><text:span text:style-name="T7">period</text:span><text:span text:style-name="T13"> </text:span><text:span text:style-name="T14">*</text:span><text:span text:style-name="T31">3</text:span><text:span text:style-name="T13">;</text:span></text:p>
      <text:p text:style-name="P16"/>
      <text:p text:style-name="P15"><text:span text:style-name="T13"><text:s text:c="4"/></text:span><text:span text:style-name="T38">clock0</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0'</text:span><text:span text:style-name="T13">; </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39">clk</text:span><text:span text:style-name="T13"> &lt;= </text:span><text:span text:style-name="T34">'1'</text:span><text:span text:style-name="T13">; </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tx0</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6">for</text:span><text:span text:style-name="T13"> i </text:span><text:span text:style-name="T6">in</text:span><text:span text:style-name="T13"> </text:span><text:span text:style-name="T31">0</text:span><text:span text:style-name="T13"> </text:span><text:span text:style-name="T6">to</text:span><text:span text:style-name="T13"> </text:span><text:span text:style-name="T31">1</text:span><text:span text:style-name="T13"> </text:span><text:span text:style-name="T6">loop</text:span></text:p>
      <text:p text:style-name="P15"><text:soft-page-break/><text:span text:style-name="T13"><text:s text:c="12"/></text:span><text:span text:style-name="T39">din</text:span><text:span text:style-name="T13"> &lt;= </text:span><text:span text:style-name="T39">din</text:span><text:span text:style-name="T13">(</text:span><text:span text:style-name="T39">din</text:span><text:span text:style-name="T33">'high</text:span><text:span text:style-name="T13"> </text:span><text:span text:style-name="T14">-</text:span><text:span text:style-name="T31">1</text:span><text:span text:style-name="T13"> </text:span><text:span text:style-name="T6">downto</text:span><text:span text:style-name="T13"> </text:span><text:span text:style-name="T31">0</text:span><text:span text:style-name="T13">) </text:span><text:span text:style-name="T14">&amp;</text:span><text:span text:style-name="T13"> (</text:span><text:span text:style-name="T6">not</text:span><text:span text:style-name="T13"> </text:span><text:span text:style-name="T39">din</text:span><text:span text:style-name="T13">(</text:span><text:span text:style-name="T39">din</text:span><text:span text:style-name="T33">'high</text:span><text:span text:style-name="T13">) </text:span><text:span text:style-name="T6">xor</text:span><text:span text:style-name="T13"> </text:span><text:span text:style-name="T39">din</text:span><text:span text:style-name="T13">(</text:span><text:span text:style-name="T31">2</text:span><text:span text:style-name="T13">)) </text:span><text:span text:style-name="T6">after</text:span><text:span text:style-name="T13"> </text:span><text:span text:style-name="T7">delay</text:span><text:span text:style-name="T13">; <text:s text:c="11"/></text:span></text:p>
      <text:p text:style-name="P15"><text:span text:style-name="T13"><text:s text:c="12"/></text:span><text:span text:style-name="T39">pl</text:span><text:span text:style-name="T13"> &lt;= </text:span><text:span text:style-name="T34">'1'</text:span><text:span text:style-name="T13"> </text:span><text:span text:style-name="T6">after</text:span><text:span text:style-name="T13"> </text:span><text:span text:style-name="T7">delay</text:span><text:span text:style-name="T13">;</text:span></text:p>
      <text:p text:style-name="P15"><text:span text:style-name="T13"><text:s text:c="12"/></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12"/></text:span><text:span text:style-name="T39">pl</text:span><text:span text:style-name="T13"> &lt;= </text:span><text:span text:style-name="T34">'0'</text:span><text:span text:style-name="T13"> </text:span><text:span text:style-name="T6">after</text:span><text:span text:style-name="T13"> </text:span><text:span text:style-name="T7">delay</text:span><text:span text:style-name="T13">;</text:span></text:p>
      <text:p text:style-name="P15"><text:span text:style-name="T13"><text:s text:c="12"/></text:span><text:span text:style-name="T6">for</text:span><text:span text:style-name="T13"> j </text:span><text:span text:style-name="T6">in</text:span><text:span text:style-name="T13"> </text:span><text:span text:style-name="T31">0</text:span><text:span text:style-name="T13"> </text:span><text:span text:style-name="T6">to</text:span><text:span text:style-name="T13"> </text:span><text:span text:style-name="T31">8</text:span><text:span text:style-name="T13"> </text:span><text:span text:style-name="T6">loop</text:span></text:p>
      <text:p text:style-name="P15"><text:span text:style-name="T13"><text:s text:c="16"/></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12"/></text:span><text:span text:style-name="T6">end</text:span><text:span text:style-name="T13"> </text:span><text:span text:style-name="T6">loop</text:span><text:span text:style-name="T13">;</text:span></text:p>
      <text:p text:style-name="P15"><text:span text:style-name="T13"><text:s text:c="8"/></text:span><text:span text:style-name="T6">end</text:span><text:span text:style-name="T13"> </text:span><text:span text:style-name="T6">loop</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p2s0</text:span><text:span text:style-name="T13"> : </text:span><text:span text:style-name="T22">p2s</text:span></text:p>
      <text:p text:style-name="P15"><text:span text:style-name="T13"><text:s text:c="8"/></text:span><text:span text:style-name="T6">port</text:span><text:span text:style-name="T13"> </text:span><text:span text:style-name="T6">map</text:span><text:span text:style-name="T13">(</text:span><text:span text:style-name="T26">rstn</text:span><text:span text:style-name="T13"> =&gt; </text:span><text:span text:style-name="T39">rstn</text:span><text:span text:style-name="T13">, </text:span><text:span text:style-name="T26">clk</text:span><text:span text:style-name="T13"> =&gt; </text:span><text:span text:style-name="T39">clk</text:span><text:span text:style-name="T13">, </text:span><text:span text:style-name="T26">pl</text:span><text:span text:style-name="T13"> =&gt; </text:span><text:span text:style-name="T39">pl</text:span><text:span text:style-name="T13">, </text:span><text:span text:style-name="T26">din</text:span><text:span text:style-name="T13"> =&gt; </text:span><text:span text:style-name="T39">din</text:span><text:span text:style-name="T13"> ,</text:span><text:span text:style-name="T26">serout</text:span><text:span text:style-name="T13"> =&gt; </text:span><text:span text:style-name="T39">serout</text:span><text:span text:style-name="T13">);</text:span></text:p>
      <text:p text:style-name="P16"/>
      <text:p text:style-name="P15"><text:span text:style-name="T6">end</text:span><text:span text:style-name="T13"> </text:span><text:span text:style-name="T22">beh</text:span><text:span text:style-name="T13">;</text:span></text:p>
      <text:p text:style-name="P16"/>
      <text:p text:style-name="P15"><text:span text:style-name="T6">configuration</text:span><text:span text:style-name="T13"> cfg_tbp2s </text:span><text:span text:style-name="T6">of</text:span><text:span text:style-name="T13"> </text:span><text:span text:style-name="T22">tbp2s</text:span><text:span text:style-name="T13"> </text:span><text:span text:style-name="T6">is</text:span></text:p>
      <text:p text:style-name="P15"><text:span text:style-name="T13"><text:s text:c="4"/></text:span><text:span text:style-name="T6">for</text:span><text:span text:style-name="T13"> </text:span><text:span text:style-name="T22">beh</text:span><text:span text:style-name="T13"> </text:span><text:span text:style-name="T6">end</text:span><text:span text:style-name="T13"> </text:span><text:span text:style-name="T6">for</text:span><text:span text:style-name="T13">;</text:span></text:p>
      <text:p text:style-name="P15"><text:span text:style-name="T6">end</text:span><text:span text:style-name="T13"> </text:span><text:span text:style-name="T6">configuration</text:span><text:span text:style-name="T13">;</text:span></text:p>
      <text:p text:style-name="P16"/>
      <text:p text:style-name="P24">-- <text:s text:c="3"/>signal clkdiv : std_logic_vector(4 downto 0);</text:p>
      <text:p text:style-name="P24">--</text:p>
      <text:p text:style-name="P24">-- <text:s text:c="3"/>clkdiv0 : process(clk, rstn)</text:p>
      <text:p text:style-name="P24">-- <text:s text:c="3"/>begin</text:p>
      <text:p text:style-name="P24">-- <text:s text:c="7"/>if rstn = '0' then</text:p>
      <text:p text:style-name="P24">-- <text:s text:c="11"/>clkdiv &lt;= (others =&gt; '0');</text:p>
      <text:p text:style-name="P24">-- <text:s text:c="7"/>elsif rising_edge(clk) then</text:p>
      <text:p text:style-name="P24">-- <text:s text:c="11"/>clkdiv &lt;= clkdiv(3 downto 0) &amp; not(clkdiv(4) xor clkdiv(1));</text:p>
      <text:p text:style-name="P24">-- <text:s text:c="7"/>end if;</text:p>
      <text:p text:style-name="P24">-- <text:s text:c="3"/>end process;</text:p>
      <text:p text:style-name="P24">-- <text:s text:c="3"/></text:p>
      <text:p text:style-name="P24">-- <text:s text:c="3"/>clk_trg &lt;= not(clkdiv(4) or clkdiv(3) or clkdiv(2) or clkdiv(1) or clkdiv(0));</text:p>
      <text:p text:style-name="P16"/>
      <text:p text:style-name="P24">-- the transmission begins with the start bit, '1', serial data, 8-bit, followed by even parity.</text:p>
      <text:p text:style-name="P24">-- after parity, drdy outputs '1' in the next clock cycle. Drdy is used to tell another circuit block to get the parallel data from dout right away, </text:p>
      <text:p text:style-name="P24">-- <text:s text:c="3"/>otherwise data is lost when next word comes. This allows drdy and the start bit to be asserted at the same time.</text:p>
      <text:p text:style-name="P24">-- dout's value is changed right after drdy is deasserted.</text:p>
      <text:p text:style-name="P16"/>
      <text:p text:style-name="P15"><text:span text:style-name="T6">library</text:span><text:span text:style-name="T13"> </text:span><text:span text:style-name="T22">ieee</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5"><text:span text:style-name="T13"><text:s text:c="4"/></text:span><text:span text:style-name="T6">use</text:span><text:span text:style-name="T13"> </text:span><text:span text:style-name="T22">ieee</text:span><text:span text:style-name="T13">.</text:span><text:span text:style-name="T22">std_logic_unsigned</text:span><text:span text:style-name="T13">.</text:span><text:span text:style-name="T6">all</text:span><text:span text:style-name="T13">;</text:span></text:p>
      <text:p text:style-name="P15"><text:span text:style-name="T13"><text:s text:c="4"/></text:span><text:span text:style-name="T6">use</text:span><text:span text:style-name="T13"> </text:span><text:span text:style-name="T22">work</text:span><text:span text:style-name="T13">.</text:span><text:span text:style-name="T22">pack</text:span><text:span text:style-name="T13">.</text:span><text:span text:style-name="T6">all</text:span><text:span text:style-name="T13">;</text:span></text:p>
      <text:p text:style-name="P16"/>
      <text:p text:style-name="P24">--drdy is asserted when start bit, 8 data bits and parity are received. '1' when bit counter is max;</text:p>
      <text:p text:style-name="P24">--perrn is deasserted whenthe parity received doesn't match the internaly generated parity</text:p>
      <text:p text:style-name="P24">--parity error resets the circuit</text:p>
      <text:p text:style-name="P16"/>
      <text:p text:style-name="P15"><text:span text:style-name="T6">entity</text:span><text:span text:style-name="T13"> </text:span><text:span text:style-name="T22">s2p</text:span><text:span text:style-name="T13"> </text:span><text:span text:style-name="T6">is</text:span><text:span text:style-name="T13"> </text:span><text:span text:style-name="T6">port</text:span><text:span text:style-name="T13">(</text:span></text:p>
      <text:p text:style-name="P15"><text:span text:style-name="T13"><text:s text:c="4"/></text:span><text:span text:style-name="T26">rstn</text:span><text:span text:style-name="T13">, </text:span><text:span text:style-name="T26">clk</text:span><text:span text:style-name="T13">, </text:span><text:span text:style-name="T26">sin</text:span><text:span text:style-name="T13"> : </text:span><text:span text:style-name="T6">in</text:span><text:span text:style-name="T13"> </text:span><text:span text:style-name="T28">std_logic</text:span><text:span text:style-name="T13">;</text:span></text:p>
      <text:p text:style-name="P15"><text:span text:style-name="T13"><text:s text:c="4"/></text:span><text:span text:style-name="T26">perrn</text:span><text:span text:style-name="T13">, </text:span><text:span text:style-name="T26">drdy</text:span><text:span text:style-name="T13"> : </text:span><text:span text:style-name="T6">out</text:span><text:span text:style-name="T13"> </text:span><text:span text:style-name="T28">std_logic</text:span><text:span text:style-name="T13">;</text:span></text:p>
      <text:p text:style-name="P15"><text:soft-page-break/><text:span text:style-name="T13"><text:s text:c="4"/></text:span><text:span text:style-name="T26">dout</text:span><text:span text:style-name="T13">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6">end</text:span><text:span text:style-name="T13"> </text:span><text:span text:style-name="T6">entity</text:span><text:span text:style-name="T13">;</text:span></text:p>
      <text:p text:style-name="P16"/>
      <text:p text:style-name="P15"><text:span text:style-name="T6">architecture</text:span><text:span text:style-name="T13"> </text:span><text:span text:style-name="T22">rtl</text:span><text:span text:style-name="T13"> </text:span><text:span text:style-name="T6">of</text:span><text:span text:style-name="T13"> </text:span><text:span text:style-name="T22">s2p</text:span><text:span text:style-name="T13"> </text:span><text:span text:style-name="T6">is</text:span></text:p>
      <text:p text:style-name="P15"><text:span text:style-name="T13"><text:s text:c="4"/></text:span><text:span text:style-name="T6">signal</text:span><text:span text:style-name="T13"> </text:span><text:span text:style-name="T39">dff</text:span><text:span text:style-name="T13"> : </text:span><text:span text:style-name="T28">std_logic_vector</text:span><text:span text:style-name="T13">(</text:span><text:span text:style-name="T26">dout</text:span><text:span text:style-name="T33">'range</text:span><text:span text:style-name="T13">);</text:span></text:p>
      <text:p text:style-name="P15"><text:span text:style-name="T13"><text:s text:c="4"/></text:span><text:span text:style-name="T6">signal</text:span><text:span text:style-name="T13"> </text:span><text:span text:style-name="T39">cnt</text:span><text:span text:style-name="T13"> : </text:span><text:span text:style-name="T28">std_logic_vector</text:span><text:span text:style-name="T13">(</text:span><text:span text:style-name="T31">2</text:span><text:span text:style-name="T13"> </text:span><text:span text:style-name="T6">downto</text:span><text:span text:style-name="T13"> </text:span><text:span text:style-name="T31">0</text:span><text:span text:style-name="T13">);</text:span></text:p>
      <text:p text:style-name="P15"><text:span text:style-name="T13"><text:s text:c="4"/></text:span><text:span text:style-name="T6">signal</text:span><text:span text:style-name="T13"> </text:span><text:span text:style-name="T39">cnt7_ff</text:span><text:span text:style-name="T13">, </text:span><text:span text:style-name="T39">sl_en</text:span><text:span text:style-name="T13">, </text:span><text:span text:style-name="T39">normal</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perrn_ff</text:span><text:span text:style-name="T13">, </text:span><text:span text:style-name="T39">par_en</text:span><text:span text:style-name="T13">, </text:span><text:span text:style-name="T39">cnt_en</text:span><text:span text:style-name="T13"> : </text:span><text:span text:style-name="T28">std_logic</text:span><text:span text:style-name="T13">;</text:span></text:p>
      <text:p text:style-name="P23">begin</text:p>
      <text:p text:style-name="P15"><text:span text:style-name="T13"><text:s text:c="4"/></text:span><text:span text:style-name="T38">regs</text:span><text:span text:style-name="T13"> : </text:span><text:span text:style-name="T6">process</text:span><text:span text:style-name="T13">(</text:span><text:span text:style-name="T26">clk</text:span><text:span text:style-name="T13">, </text:span><text:span text:style-name="T26">rstn</text:span><text:span text:style-name="T13">)</text:span></text:p>
      <text:p text:style-name="P15"><text:span text:style-name="T13"><text:s text:c="4"/></text:span><text:span text:style-name="T6">begin</text:span><text:span text:style-name="T13"> <text:s text:c="7"/></text:span></text:p>
      <text:p text:style-name="P15"><text:span text:style-name="T13"><text:s text:c="8"/></text:span><text:span text:style-name="T6">if</text:span><text:span text:style-name="T13"> </text:span><text:span text:style-name="T26">rstn</text:span><text:span text:style-name="T13"> = </text:span><text:span text:style-name="T34">'0'</text:span><text:span text:style-name="T13"> </text:span><text:span text:style-name="T6">then</text:span></text:p>
      <text:p text:style-name="P15"><text:span text:style-name="T13"><text:s text:c="12"/></text:span><text:span text:style-name="T39">dff</text:span><text:span text:style-name="T13"> <text:s text:c="8"/>&lt;= (</text:span><text:span text:style-name="T6">others</text:span><text:span text:style-name="T13"> =&gt; </text:span><text:span text:style-name="T34">'0'</text:span><text:span text:style-name="T13">);</text:span></text:p>
      <text:p text:style-name="P15"><text:span text:style-name="T13"><text:s text:c="12"/></text:span><text:span text:style-name="T39">normal</text:span><text:span text:style-name="T13"> <text:s text:c="4"/>&lt;= </text:span><text:span text:style-name="T34">'1'</text:span><text:span text:style-name="T13">;</text:span></text:p>
      <text:p text:style-name="P15"><text:span text:style-name="T13"><text:s text:c="12"/></text:span><text:span text:style-name="T39">perrn_ff</text:span><text:span text:style-name="T13"> &lt;= </text:span><text:span text:style-name="T34">'1'</text:span><text:span text:style-name="T13">;</text:span></text:p>
      <text:p text:style-name="P15"><text:span text:style-name="T13"><text:s text:c="12"/></text:span><text:span text:style-name="T26">drdy</text:span><text:span text:style-name="T13"> <text:s text:c="8"/>&lt;= </text:span><text:span text:style-name="T34">'0'</text:span><text:span text:style-name="T13">;</text:span></text:p>
      <text:p text:style-name="P15"><text:span text:style-name="T13"><text:s text:c="12"/></text:span><text:span text:style-name="T39">par_en</text:span><text:span text:style-name="T13"> <text:s text:c="4"/>&lt;= </text:span><text:span text:style-name="T34">'0'</text:span><text:span text:style-name="T13">;</text:span></text:p>
      <text:p text:style-name="P15"><text:span text:style-name="T13"><text:s text:c="12"/></text:span><text:span text:style-name="T39">cnt7_ff</text:span><text:span text:style-name="T13"> <text:s text:c="4"/>&lt;= </text:span><text:span text:style-name="T34">'0'</text:span><text:span text:style-name="T13">;</text:span></text:p>
      <text:p text:style-name="P15"><text:span text:style-name="T13"><text:s text:c="12"/></text:span><text:span text:style-name="T39">cnt</text:span><text:span text:style-name="T13"> <text:s text:c="8"/>&lt;= (</text:span><text:span text:style-name="T6">others</text:span><text:span text:style-name="T13"> =&gt; </text:span><text:span text:style-name="T34">'0'</text:span><text:span text:style-name="T13">);</text:span></text:p>
      <text:p text:style-name="P15"><text:span text:style-name="T13"><text:s text:c="8"/></text:span><text:span text:style-name="T6">elsif</text:span><text:span text:style-name="T13"> </text:span><text:span text:style-name="T14">rising_edge</text:span><text:span text:style-name="T13">(</text:span><text:span text:style-name="T26">clk</text:span><text:span text:style-name="T13">) </text:span><text:span text:style-name="T6">then</text:span></text:p>
      <text:p text:style-name="P15"><text:span text:style-name="T13"><text:s text:c="12"/></text:span><text:span text:style-name="T6">if</text:span><text:span text:style-name="T13"> </text:span><text:span text:style-name="T39">sl_en</text:span><text:span text:style-name="T13"> = </text:span><text:span text:style-name="T34">'1'</text:span><text:span text:style-name="T13"> </text:span><text:span text:style-name="T6">then</text:span></text:p>
      <text:p text:style-name="P15"><text:span text:style-name="T13"><text:s text:c="16"/></text:span><text:span text:style-name="T39">dff</text:span><text:span text:style-name="T13"> &lt;= </text:span><text:span text:style-name="T39">dff</text:span><text:span text:style-name="T13">(</text:span><text:span text:style-name="T31">6</text:span><text:span text:style-name="T13"> </text:span><text:span text:style-name="T6">downto</text:span><text:span text:style-name="T13"> </text:span><text:span text:style-name="T31">0</text:span><text:span text:style-name="T13">) </text:span><text:span text:style-name="T14">&amp;</text:span><text:span text:style-name="T13"> </text:span><text:span text:style-name="T26">sin</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if</text:span><text:span text:style-name="T13"> </text:span><text:span text:style-name="T39">perrn_ff</text:span><text:span text:style-name="T13"> = </text:span><text:span text:style-name="T34">'0'</text:span><text:span text:style-name="T13"> </text:span><text:span text:style-name="T6">then</text:span></text:p>
      <text:p text:style-name="P15"><text:span text:style-name="T13"><text:s text:c="16"/></text:span><text:span text:style-name="T39">normal</text:span><text:span text:style-name="T13"> &lt;= </text:span><text:span text:style-name="T34">'0'</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if</text:span><text:span text:style-name="T13"> </text:span><text:span text:style-name="T39">cnt_en</text:span><text:span text:style-name="T13"> = </text:span><text:span text:style-name="T34">'1'</text:span><text:span text:style-name="T13"> </text:span><text:span text:style-name="T6">then</text:span></text:p>
      <text:p text:style-name="P15"><text:span text:style-name="T13"><text:s text:c="16"/></text:span><text:span text:style-name="T39">cnt</text:span><text:span text:style-name="T13"> &lt;= </text:span><text:span text:style-name="T39">cnt</text:span><text:span text:style-name="T13"> </text:span><text:span text:style-name="T14">+</text:span><text:span text:style-name="T31">1</text:span><text:span text:style-name="T13">;</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6">if</text:span><text:span text:style-name="T13"> </text:span><text:span text:style-name="T39">par_en</text:span><text:span text:style-name="T13"> = </text:span><text:span text:style-name="T34">'1'</text:span><text:span text:style-name="T13"> </text:span><text:span text:style-name="T6">then</text:span><text:span text:style-name="T13"> </text:span><text:span text:style-name="T36">--par_en is for parity check ff <text:s text:c="11"/></text:span></text:p>
      <text:p text:style-name="P15"><text:span text:style-name="T13"><text:s text:c="16"/></text:span><text:span text:style-name="T39">perrn_ff</text:span><text:span text:style-name="T13"> &lt;= </text:span><text:span text:style-name="T6">not</text:span><text:span text:style-name="T13"> (</text:span><text:span text:style-name="T14">reduce_xor</text:span><text:span text:style-name="T13">(</text:span><text:span text:style-name="T39">dff</text:span><text:span text:style-name="T13">) </text:span><text:span text:style-name="T6">xor</text:span><text:span text:style-name="T13"> </text:span><text:span text:style-name="T26">sin</text:span><text:span text:style-name="T13">);</text:span><text:span text:style-name="T36">-- compare generated parity with received parity</text:span></text:p>
      <text:p text:style-name="P15"><text:span text:style-name="T13"><text:s text:c="12"/></text:span><text:span text:style-name="T6">end</text:span><text:span text:style-name="T13"> </text:span><text:span text:style-name="T6">if</text:span><text:span text:style-name="T13">;</text:span></text:p>
      <text:p text:style-name="P15"><text:span text:style-name="T13"><text:s text:c="12"/></text:span><text:span text:style-name="T26">drdy</text:span><text:span text:style-name="T13"> <text:s text:c="8"/>&lt;= </text:span><text:span text:style-name="T39">par_en</text:span><text:span text:style-name="T13">;</text:span></text:p>
      <text:p text:style-name="P15"><text:span text:style-name="T13"><text:s text:c="12"/></text:span><text:span text:style-name="T39">cnt7_ff</text:span><text:span text:style-name="T13"> <text:s text:c="4"/>&lt;= <text:s text:c="3"/></text:span><text:span text:style-name="T39">cnt</text:span><text:span text:style-name="T13">(</text:span><text:span text:style-name="T31">2</text:span><text:span text:style-name="T13">) </text:span><text:span text:style-name="T6">and</text:span><text:span text:style-name="T13"> </text:span><text:span text:style-name="T39">cnt</text:span><text:span text:style-name="T13">(</text:span><text:span text:style-name="T31">1</text:span><text:span text:style-name="T13">) </text:span><text:span text:style-name="T6">and</text:span><text:span text:style-name="T13"> </text:span><text:span text:style-name="T39">cnt</text:span><text:span text:style-name="T13">(</text:span><text:span text:style-name="T31">0</text:span><text:span text:style-name="T13">);</text:span></text:p>
      <text:p text:style-name="P15"><text:span text:style-name="T13"><text:s text:c="12"/></text:span><text:span text:style-name="T39">par_en</text:span><text:span text:style-name="T13"> <text:s text:c="3"/>&lt;= </text:span><text:span text:style-name="T39">cnt7_ff</text:span><text:span text:style-name="T1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5"><text:span text:style-name="T13"><text:s text:c="4"/></text:span><text:span text:style-name="T39">sl_en</text:span><text:span text:style-name="T13"> &lt;= </text:span><text:span text:style-name="T39">normal</text:span><text:span text:style-name="T13"> </text:span><text:span text:style-name="T6">and</text:span><text:span text:style-name="T13"> (</text:span><text:span text:style-name="T39">cnt7_ff</text:span><text:span text:style-name="T13"> </text:span><text:span text:style-name="T6">or</text:span><text:span text:style-name="T13"> </text:span><text:span text:style-name="T39">cnt</text:span><text:span text:style-name="T13">(</text:span><text:span text:style-name="T31">2</text:span><text:span text:style-name="T13">) </text:span><text:span text:style-name="T6">or</text:span><text:span text:style-name="T13"> </text:span><text:span text:style-name="T39">cnt</text:span><text:span text:style-name="T13">(</text:span><text:span text:style-name="T31">1</text:span><text:span text:style-name="T13">) </text:span><text:span text:style-name="T6">or</text:span><text:span text:style-name="T13"> </text:span><text:span text:style-name="T39">cnt</text:span><text:span text:style-name="T13">(</text:span><text:span text:style-name="T31">0</text:span><text:span text:style-name="T13">));</text:span></text:p>
      <text:p text:style-name="P15"><text:span text:style-name="T13"><text:s text:c="4"/></text:span><text:span text:style-name="T39">cnt_en</text:span><text:span text:style-name="T13"> &lt;= </text:span><text:span text:style-name="T34">'1'</text:span><text:span text:style-name="T13"> </text:span><text:span text:style-name="T6">when</text:span><text:span text:style-name="T13">(</text:span><text:span text:style-name="T39">normal</text:span><text:span text:style-name="T13"> = </text:span><text:span text:style-name="T34">'1'</text:span><text:span text:style-name="T13">) </text:span><text:span text:style-name="T6">and</text:span><text:span text:style-name="T13"> (</text:span><text:span text:style-name="T39">par_en</text:span><text:span text:style-name="T13"> = </text:span><text:span text:style-name="T34">'0'</text:span><text:span text:style-name="T13">) </text:span><text:span text:style-name="T6">and</text:span><text:span text:style-name="T13"> </text:span></text:p>
      <text:p text:style-name="P15"><text:span text:style-name="T13"><text:s text:c="4"/>(</text:span><text:span text:style-name="T39">cnt7_ff</text:span><text:span text:style-name="T13"> = </text:span><text:span text:style-name="T34">'0'</text:span><text:span text:style-name="T13">) </text:span><text:span text:style-name="T6">and</text:span><text:span text:style-name="T13"> (</text:span><text:span text:style-name="T39">perrn_ff</text:span><text:span text:style-name="T13"> = </text:span><text:span text:style-name="T34">'1'</text:span><text:span text:style-name="T13">) </text:span><text:span text:style-name="T6">and</text:span><text:span text:style-name="T13"> </text:span></text:p>
      <text:p text:style-name="P15"><text:span text:style-name="T13"><text:s text:c="4"/>((</text:span><text:span text:style-name="T39">cnt</text:span><text:span text:style-name="T13"> = </text:span><text:span text:style-name="T34">"000"</text:span><text:span text:style-name="T13"> </text:span><text:span text:style-name="T6">and</text:span><text:span text:style-name="T13"> </text:span><text:span text:style-name="T26">sin</text:span><text:span text:style-name="T13"> = </text:span><text:span text:style-name="T34">'1'</text:span><text:span text:style-name="T13">) </text:span><text:span text:style-name="T6">or</text:span><text:span text:style-name="T13"> </text:span></text:p>
      <text:p text:style-name="P15"><text:span text:style-name="T13"><text:s text:c="5"/>(</text:span><text:span text:style-name="T39">cnt</text:span><text:span text:style-name="T13"> /= </text:span><text:span text:style-name="T34">"000"</text:span><text:span text:style-name="T13">)) </text:span><text:span text:style-name="T6">else</text:span><text:span text:style-name="T13"> </text:span><text:span text:style-name="T34">'0'</text:span><text:span text:style-name="T13">;</text:span></text:p>
      <text:p text:style-name="P15"><text:span text:style-name="T13"><text:s text:c="8"/></text:span><text:span text:style-name="T26">perrn</text:span><text:span text:style-name="T13"> &lt;= </text:span><text:span text:style-name="T39">perrn_ff</text:span><text:span text:style-name="T13">;</text:span></text:p>
      <text:p text:style-name="P15"><text:span text:style-name="T13"><text:s text:c="8"/></text:span><text:span text:style-name="T26">dout</text:span><text:span text:style-name="T13"> &lt;= </text:span><text:span text:style-name="T39">dff</text:span><text:span text:style-name="T13">;</text:span></text:p>
      <text:p text:style-name="P15"><text:span text:style-name="T13"><text:s text:c="4"/></text:span><text:span text:style-name="T6">end</text:span><text:span text:style-name="T13"> </text:span><text:span text:style-name="T22">rtl</text:span><text:span text:style-name="T13">;</text:span></text:p>
      <text:p text:style-name="P16"/>
      <text:p text:style-name="P16"/>
      <text:p text:style-name="P15"><text:span text:style-name="T13"><text:s text:c="4"/></text:span><text:span text:style-name="T6">library</text:span><text:span text:style-name="T13"> </text:span><text:span text:style-name="T22">ieee</text:span><text:span text:style-name="T13">;</text:span></text:p>
      <text:p text:style-name="P15"><text:span text:style-name="T13"><text:s text:c="8"/></text:span><text:span text:style-name="T6">use</text:span><text:span text:style-name="T13"> </text:span><text:span text:style-name="T22">ieee</text:span><text:span text:style-name="T13">.</text:span><text:span text:style-name="T22">std_logic_1164</text:span><text:span text:style-name="T13">.</text:span><text:span text:style-name="T6">all</text:span><text:span text:style-name="T13">;</text:span></text:p>
      <text:p text:style-name="P16"/>
      <text:p text:style-name="P15"><text:soft-page-break/><text:span text:style-name="T13"><text:s text:c="4"/></text:span><text:span text:style-name="T6">entity</text:span><text:span text:style-name="T13"> </text:span><text:span text:style-name="T22">tbs2p</text:span><text:span text:style-name="T13"> </text:span><text:span text:style-name="T6">is</text:span><text:span text:style-name="T13"> </text:span><text:span text:style-name="T6">end</text:span><text:span text:style-name="T13"> </text:span><text:span text:style-name="T6">entity</text:span><text:span text:style-name="T13">;</text:span></text:p>
      <text:p text:style-name="P16"/>
      <text:p text:style-name="P15"><text:span text:style-name="T13"><text:s text:c="4"/></text:span><text:span text:style-name="T6">architecture</text:span><text:span text:style-name="T13"> </text:span><text:span text:style-name="T22">beh</text:span><text:span text:style-name="T13"> </text:span><text:span text:style-name="T6">of</text:span><text:span text:style-name="T13"> </text:span><text:span text:style-name="T22">tbs2p</text:span><text:span text:style-name="T13"> </text:span><text:span text:style-name="T6">is</text:span></text:p>
      <text:p text:style-name="P16"/>
      <text:p text:style-name="P15"><text:span text:style-name="T13"><text:s text:c="8"/></text:span><text:span text:style-name="T6">component</text:span><text:span text:style-name="T13"> </text:span><text:span text:style-name="T22">s2p</text:span><text:span text:style-name="T13"> </text:span><text:span text:style-name="T6">is</text:span><text:span text:style-name="T13"> </text:span><text:span text:style-name="T6">port</text:span><text:span text:style-name="T13">(</text:span></text:p>
      <text:p text:style-name="P15"><text:span text:style-name="T13"><text:s text:c="12"/></text:span><text:span text:style-name="T26">rstn</text:span><text:span text:style-name="T13">, </text:span><text:span text:style-name="T26">clk</text:span><text:span text:style-name="T13">, </text:span><text:span text:style-name="T26">sin</text:span><text:span text:style-name="T13"> : </text:span><text:span text:style-name="T6">in</text:span><text:span text:style-name="T13"> </text:span><text:span text:style-name="T28">std_logic</text:span><text:span text:style-name="T13">;</text:span></text:p>
      <text:p text:style-name="P15"><text:span text:style-name="T13"><text:s text:c="12"/></text:span><text:span text:style-name="T26">perrn</text:span><text:span text:style-name="T13">, </text:span><text:span text:style-name="T26">drdy</text:span><text:span text:style-name="T13"> : </text:span><text:span text:style-name="T6">out</text:span><text:span text:style-name="T13"> </text:span><text:span text:style-name="T28">std_logic</text:span><text:span text:style-name="T13">;</text:span></text:p>
      <text:p text:style-name="P15"><text:span text:style-name="T13"><text:s text:c="12"/></text:span><text:span text:style-name="T26">dout</text:span><text:span text:style-name="T13"> : </text:span><text:span text:style-name="T6">out</text:span><text:span text:style-name="T13">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5"><text:span text:style-name="T13"><text:s text:c="4"/></text:span><text:span text:style-name="T6">end</text:span><text:span text:style-name="T13"> </text:span><text:span text:style-name="T6">component</text:span><text:span text:style-name="T13">;</text:span></text:p>
      <text:p text:style-name="P16"/>
      <text:p text:style-name="P15"><text:span text:style-name="T13"><text:s text:c="4"/></text:span><text:span text:style-name="T6">signal</text:span><text:span text:style-name="T13"> </text:span><text:span text:style-name="T39">rstn</text:span><text:span text:style-name="T13">, </text:span><text:span text:style-name="T39">clk</text:span><text:span text:style-name="T13">, </text:span><text:span text:style-name="T39">sin</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perrn</text:span><text:span text:style-name="T13">, </text:span><text:span text:style-name="T39">drdy</text:span><text:span text:style-name="T13"> : </text:span><text:span text:style-name="T28">std_logic</text:span><text:span text:style-name="T13">;</text:span></text:p>
      <text:p text:style-name="P15"><text:span text:style-name="T13"><text:s text:c="4"/></text:span><text:span text:style-name="T6">signal</text:span><text:span text:style-name="T13"> </text:span><text:span text:style-name="T39">dout</text:span><text:span text:style-name="T13"> : </text:span><text:span text:style-name="T28">std_logic_vector</text:span><text:span text:style-name="T13">(</text:span><text:span text:style-name="T31">7</text:span><text:span text:style-name="T13"> </text:span><text:span text:style-name="T6">downto</text:span><text:span text:style-name="T13"> </text:span><text:span text:style-name="T31">0</text:span><text:span text:style-name="T13">);</text:span></text:p>
      <text:p text:style-name="P16"/>
      <text:p text:style-name="P15"><text:span text:style-name="T13"><text:s text:c="4"/></text:span><text:span text:style-name="T6">constant</text:span><text:span text:style-name="T13"> </text:span><text:span text:style-name="T7">period</text:span><text:span text:style-name="T13"> : </text:span><text:span text:style-name="T28">time</text:span><text:span text:style-name="T13"> := </text:span><text:span text:style-name="T31">50</text:span><text:span text:style-name="T13"> </text:span><text:span text:style-name="T7">ns</text:span><text:span text:style-name="T13">;</text:span></text:p>
      <text:p text:style-name="P15"><text:span text:style-name="T13"><text:s text:c="4"/></text:span><text:span text:style-name="T6">constant</text:span><text:span text:style-name="T13"> </text:span><text:span text:style-name="T7">delay</text:span><text:span text:style-name="T13"> : </text:span><text:span text:style-name="T28">time</text:span><text:span text:style-name="T13"> := </text:span><text:span text:style-name="T31">25</text:span><text:span text:style-name="T13"> </text:span><text:span text:style-name="T7">ns</text:span><text:span text:style-name="T13">;</text:span></text:p>
      <text:p text:style-name="P16"/>
      <text:p text:style-name="P23">begin</text:p>
      <text:p text:style-name="P16"/>
      <text:p text:style-name="P15"><text:span text:style-name="T13"><text:s text:c="4"/></text:span><text:span text:style-name="T39">rstn</text:span><text:span text:style-name="T13"> &lt;= </text:span><text:span text:style-name="T34">'0'</text:span><text:span text:style-name="T13">, </text:span><text:span text:style-name="T34">'1'</text:span><text:span text:style-name="T13"> </text:span><text:span text:style-name="T6">after</text:span><text:span text:style-name="T13"> </text:span><text:span text:style-name="T7">period</text:span><text:span text:style-name="T13"> </text:span><text:span text:style-name="T14">*</text:span><text:span text:style-name="T31">3</text:span><text:span text:style-name="T13">;</text:span></text:p>
      <text:p text:style-name="P16"/>
      <text:p text:style-name="P15"><text:span text:style-name="T13"><text:s text:c="4"/></text:span><text:span text:style-name="T38">clk0</text:span><text:span text:style-name="T13"> : </text:span><text:span text:style-name="T6">process</text:span></text:p>
      <text:p text:style-name="P15"><text:span text:style-name="T13"><text:s text:c="4"/></text:span><text:span text:style-name="T6">begin</text:span></text:p>
      <text:p text:style-name="P15"><text:span text:style-name="T13"><text:s text:c="8"/></text:span><text:span text:style-name="T39">clk</text:span><text:span text:style-name="T13"> &lt;= </text:span><text:span text:style-name="T34">'1'</text:span><text:span text:style-name="T13">; </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39">clk</text:span><text:span text:style-name="T13"> &lt;= </text:span><text:span text:style-name="T34">'0'</text:span><text:span text:style-name="T13">; </text:span><text:span text:style-name="T6">wait</text:span><text:span text:style-name="T13"> </text:span><text:span text:style-name="T6">for</text:span><text:span text:style-name="T13"> </text:span><text:span text:style-name="T7">period</text:span><text:span text:style-name="T13">;</text:span></text:p>
      <text:p text:style-name="P15"><text:span text:style-name="T13"><text:s text:c="8"/></text:span><text:span text:style-name="T6">if</text:span><text:span text:style-name="T13"> </text:span><text:span text:style-name="T39">perrn</text:span><text:span text:style-name="T13"> = </text:span><text:span text:style-name="T34">'0'</text:span><text:span text:style-name="T13"> </text:span><text:span text:style-name="T6">then</text:span></text:p>
      <text:p text:style-name="P15"><text:span text:style-name="T13"><text:s text:c="12"/></text:span><text:span text:style-name="T36">-- <text:s text:c="11"/>rstn &lt;= '0'; wait for delay *3;</text:span></text:p>
      <text:p text:style-name="P15"><text:span text:style-name="T13"><text:s text:c="12"/></text:span><text:span text:style-name="T36">-- <text:s text:c="11"/>rstn &lt;= '1'; wait for delay *3;</text:span></text:p>
      <text:p text:style-name="P15"><text:span text:style-name="T13"><text:s text:c="8"/></text:span><text:span text:style-name="T6">end</text:span><text:span text:style-name="T13"> </text:span><text:span text:style-name="T6">if</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rx0</text:span><text:span text:style-name="T13"> : </text:span><text:span text:style-name="T6">process</text:span></text:p>
      <text:p text:style-name="P15"><text:span text:style-name="T13"><text:s text:c="8"/></text:span><text:span text:style-name="T6">variable</text:span><text:span text:style-name="T13"> </text:span><text:span text:style-name="T30">var</text:span><text:span text:style-name="T13"> : </text:span><text:span text:style-name="T28">std_logic_vector</text:span><text:span text:style-name="T13">(</text:span><text:span text:style-name="T31">4</text:span><text:span text:style-name="T13"> </text:span><text:span text:style-name="T6">downto</text:span><text:span text:style-name="T13"> </text:span><text:span text:style-name="T31">0</text:span><text:span text:style-name="T13">) := </text:span><text:span text:style-name="T34">"01001"</text:span><text:span text:style-name="T13">;</text:span></text:p>
      <text:p text:style-name="P15"><text:span text:style-name="T13"><text:s text:c="4"/></text:span><text:span text:style-name="T6">begin</text:span></text:p>
      <text:p text:style-name="P15"><text:span text:style-name="T13"><text:s text:c="8"/></text:span><text:span text:style-name="T6">wait</text:span><text:span text:style-name="T13"> </text:span><text:span text:style-name="T6">until</text:span><text:span text:style-name="T13"> </text:span><text:span text:style-name="T14">rising_edge</text:span><text:span text:style-name="T13">(</text:span><text:span text:style-name="T39">clk</text:span><text:span text:style-name="T13">);</text:span></text:p>
      <text:p text:style-name="P15"><text:span text:style-name="T13"><text:s text:c="8"/></text:span><text:span text:style-name="T30">var</text:span><text:span text:style-name="T13"> := </text:span><text:span text:style-name="T30">var</text:span><text:span text:style-name="T13">(</text:span><text:span text:style-name="T31">3</text:span><text:span text:style-name="T13"> </text:span><text:span text:style-name="T6">downto</text:span><text:span text:style-name="T13"> </text:span><text:span text:style-name="T31">0</text:span><text:span text:style-name="T13">) </text:span><text:span text:style-name="T14">&amp;</text:span><text:span text:style-name="T13"> (</text:span><text:span text:style-name="T30">var</text:span><text:span text:style-name="T13">(</text:span><text:span text:style-name="T31">4</text:span><text:span text:style-name="T13">) </text:span><text:span text:style-name="T6">xor</text:span><text:span text:style-name="T13"> </text:span><text:span text:style-name="T30">var</text:span><text:span text:style-name="T13">(</text:span><text:span text:style-name="T31">2</text:span><text:span text:style-name="T13">));</text:span></text:p>
      <text:p text:style-name="P15"><text:span text:style-name="T13"><text:s text:c="8"/></text:span><text:span text:style-name="T39">sin</text:span><text:span text:style-name="T13"> &lt;= </text:span><text:span text:style-name="T30">var</text:span><text:span text:style-name="T13">(</text:span><text:span text:style-name="T31">3</text:span><text:span text:style-name="T13">) </text:span><text:span text:style-name="T6">after</text:span><text:span text:style-name="T13"> </text:span><text:span text:style-name="T31">1.5</text:span><text:span text:style-name="T13"> </text:span><text:span text:style-name="T7">us</text:span><text:span text:style-name="T13">;</text:span></text:p>
      <text:p text:style-name="P15"><text:span text:style-name="T13"><text:s text:c="4"/></text:span><text:span text:style-name="T6">end</text:span><text:span text:style-name="T13"> </text:span><text:span text:style-name="T6">process</text:span><text:span text:style-name="T13">;</text:span></text:p>
      <text:p text:style-name="P16"/>
      <text:p text:style-name="P15"><text:span text:style-name="T13"><text:s text:c="4"/></text:span><text:span text:style-name="T38">s2p0</text:span><text:span text:style-name="T13"> : </text:span><text:span text:style-name="T22">s2p</text:span><text:span text:style-name="T13"> </text:span></text:p>
      <text:p text:style-name="P15"><text:span text:style-name="T13"><text:s text:c="8"/></text:span><text:span text:style-name="T6">port</text:span><text:span text:style-name="T13"> </text:span><text:span text:style-name="T6">map</text:span><text:span text:style-name="T13">(</text:span><text:span text:style-name="T26">rstn</text:span><text:span text:style-name="T13"> =&gt; </text:span><text:span text:style-name="T39">rstn</text:span><text:span text:style-name="T13">, </text:span><text:span text:style-name="T26">clk</text:span><text:span text:style-name="T13"> =&gt; </text:span><text:span text:style-name="T39">clk</text:span><text:span text:style-name="T13">, </text:span><text:span text:style-name="T26">sin</text:span><text:span text:style-name="T13"> =&gt; </text:span><text:span text:style-name="T39">sin</text:span><text:span text:style-name="T13">, </text:span><text:span text:style-name="T26">perrn</text:span><text:span text:style-name="T13"> =&gt; </text:span><text:span text:style-name="T39">perrn</text:span><text:span text:style-name="T13">, </text:span><text:span text:style-name="T26">drdy</text:span><text:span text:style-name="T13"> =&gt; </text:span><text:span text:style-name="T39">drdy</text:span><text:span text:style-name="T13">, </text:span><text:span text:style-name="T26">dout</text:span><text:span text:style-name="T13"> =&gt; </text:span><text:span text:style-name="T39">dout</text:span><text:span text:style-name="T13">);</text:span></text:p>
      <text:p text:style-name="P15"><text:span text:style-name="T6">end</text:span><text:span text:style-name="T13"> </text:span><text:span text:style-name="T22">beh</text:span><text:span text:style-name="T13">;</text:span></text:p>
      <text:p text:style-name="P16"/>
      <text:p text:style-name="P15"><text:span text:style-name="T6">configuration</text:span><text:span text:style-name="T13"> cfg_tbs2p </text:span><text:span text:style-name="T6">of</text:span><text:span text:style-name="T13"> </text:span><text:span text:style-name="T22">tbs2p</text:span><text:span text:style-name="T13"> </text:span><text:span text:style-name="T6">is</text:span></text:p>
      <text:p text:style-name="P15"><text:span text:style-name="T13"><text:s text:c="4"/></text:span><text:span text:style-name="T6">for</text:span><text:span text:style-name="T13"> </text:span><text:span text:style-name="T22">beh</text:span><text:span text:style-name="T13"> </text:span><text:span text:style-name="T6">end</text:span><text:span text:style-name="T13"> </text:span><text:span text:style-name="T6">for</text:span><text:span text:style-name="T13">;</text:span></text:p>
      <text:p text:style-name="P15"><text:span text:style-name="T6">end</text:span><text:span text:style-name="T13"> </text:span><text:span text:style-name="T6">configuration</text:span><text:span text:style-name="T13">;</text:span></text:p>
      <text:p text:style-name="P16"/>
      <text:p text:style-name="P16"/>
      <text:p text:style-name="P16"/>
      <text:p text:style-name="P16"/>
      <text:p text:style-name="P16"><text:soft-page-break/></text:p>
      <text:p text:style-name="P16"/>
      <text:p text:style-name="P24">library ieee;</text:p>
      <text:p text:style-name="P24"><text:s text:c="4"/>use ieee.std_logic_1164.all;</text:p>
      <text:p text:style-name="P24"/>
      <text:p text:style-name="P24">entity itreg is port(</text:p>
      <text:p text:style-name="P24"><text:s text:c="4"/>rstn, clk : in std_logic;</text:p>
      <text:p text:style-name="P24"><text:s text:c="4"/>addr : in std_logic_vector(5 downto 0); -- 6 bit address input</text:p>
      <text:p text:style-name="P24"><text:s text:c="4"/>cben : in std_logic_vector(3 downto 0); -- command byte enable 4 bit active low. each bit controlls a byte lane</text:p>
      <text:p text:style-name="P24"><text:s text:c="4"/>adi <text:s/>: in std_logic_vector(31 downto 0); -- data to be written to registers</text:p>
      <text:p text:style-name="P24"><text:s text:c="4"/>wren : in std_logic;</text:p>
      <text:p text:style-name="P24"><text:s text:c="4"/>fifo_ovf : in std_logic; <text:s text:c="3"/>--indictes overflow</text:p>
      <text:p text:style-name="P24"><text:s text:c="4"/>dma_done : in std_logic; <text:s text:c="3"/>--indictes dma is done</text:p>
      <text:p text:style-name="P24"><text:s text:c="4"/>timer_int : in std_logic_vector(3 downto 0); <text:s text:c="3"/>--indictes timers are time out</text:p>
      <text:p text:style-name="P24"><text:s text:c="4"/>intn : in std_logic_vector(3 downto 0);</text:p>
      <text:p text:style-name="P24"><text:s text:c="4"/>intan : out std_logic; --active low indicated when interrupt is generated</text:p>
      <text:p text:style-name="P24"><text:s text:c="4"/>int_req : out std_logic_vector(9 downto 0); <text:s text:c="3"/>-- interrupt registers</text:p>
      <text:p text:style-name="P24"><text:s text:c="4"/>int_mask : out std_logic_vector(9 downto 0); <text:s text:c="3"/>-- interrupt registers</text:p>
      <text:p text:style-name="P24"><text:s text:c="4"/>int_pend : out std_logic_vector(9 downto 0));-- interrupt registers</text:p>
      <text:p text:style-name="P24">end itreg;</text:p>
      <text:p text:style-name="P24"/>
      <text:p text:style-name="P24"/>
      <text:p text:style-name="P24">architecture rtl of itreg is</text:p>
      <text:p text:style-name="P24"><text:s text:c="4"/>signal req, maskff, pendff : std_logic_vector(9 downto 0);</text:p>
      <text:p text:style-name="P24">begin</text:p>
      <text:p text:style-name="P24"><text:s text:c="4"/>fegn : process(rstn, clk)</text:p>
      <text:p text:style-name="P24"><text:s text:c="8"/>variable int_or : std_logic;</text:p>
      <text:p text:style-name="P24">begin</text:p>
      <text:p text:style-name="P24"><text:s text:c="4"/>if rstn = '0' then</text:p>
      <text:p text:style-name="P24"><text:s text:c="8"/>maskff &lt;= (others =&gt; '0'); --interrupt mask register</text:p>
      <text:p text:style-name="P24"><text:s text:c="8"/>pendff &lt;= (others =&gt; '0'); <text:s text:c="3"/>--interrupt pending register</text:p>
      <text:p text:style-name="P24"><text:s text:c="8"/>intan &lt;= '1';</text:p>
      <text:p text:style-name="P24"><text:s text:c="4"/>elsif rising_edge(clk) then</text:p>
      <text:p text:style-name="P24"><text:s text:c="8"/>--interrupt mask register</text:p>
      <text:p text:style-name="P24"><text:s text:c="8"/>if wren = '1' and addr = "000000" and cben(0) = '0' then</text:p>
      <text:p text:style-name="P24"><text:s text:c="12"/>maskff(7 downto 0) &lt;= adi(7 downto 0);</text:p>
      <text:p text:style-name="P24"><text:s text:c="12"/>--int mask reg is used to ena/dis any one of the interrupt sources</text:p>
      <text:p text:style-name="P24"><text:s text:c="8"/>end if;</text:p>
      <text:p text:style-name="P24"><text:s text:c="8"/>--interrupt mask register</text:p>
      <text:p text:style-name="P24"><text:s text:c="8"/>if wren = '1' and addr = "000000" and cben(1) = '0' then</text:p>
      <text:p text:style-name="P24"><text:s text:c="12"/>maskff(9 downto 8) &lt;= adi(9 downto 8);</text:p>
      <text:p text:style-name="P24"><text:s text:c="8"/>end if;</text:p>
      <text:p text:style-name="P24"><text:s text:c="8"/>-- interrupt request register</text:p>
      <text:p text:style-name="P24"><text:s text:c="8"/>if wren = '1' and addr = "000010" and cben(0) = '0' then</text:p>
      <text:p text:style-name="P24"><text:s text:c="12"/>--clears all int pend reg when int req reg is written</text:p>
      <text:p text:style-name="P24"><text:s text:c="12"/>pendff(7 downto 0) &lt;= "00000000";</text:p>
      <text:p text:style-name="P24"><text:s text:c="12"/>--interrupt pending register</text:p>
      <text:p text:style-name="P24"><text:s text:c="8"/>elsif wren = '1' and addr = "000001" and cben(0) = '0' then</text:p>
      <text:p text:style-name="P24"><text:s text:c="12"/>-- each individual interrupt pending bit can be cleared by writing '1';</text:p>
      <text:p text:style-name="P24"><text:s text:c="12"/>--int pend reg remembers interrupt sources that are in queue</text:p>
      <text:p text:style-name="P24"><text:soft-page-break/><text:s text:c="12"/>for j in 0 to 7 loop</text:p>
      <text:p text:style-name="P24"><text:s text:c="16"/>if adi(j) = '1' then</text:p>
      <text:p text:style-name="P24"><text:s text:c="20"/>pendff(j) &lt;= '0';</text:p>
      <text:p text:style-name="P24"><text:s text:c="16"/>end if;</text:p>
      <text:p text:style-name="P24"><text:s text:c="12"/>end loop;</text:p>
      <text:p text:style-name="P24"><text:s text:c="8"/>else</text:p>
      <text:p text:style-name="P24"><text:s text:c="12"/>pendff(7 downto 0) &lt;= (timer_int &amp; (not intn)) or pendff(7 downto 0);</text:p>
      <text:p text:style-name="P24"><text:s text:c="12"/>-- if neither req / pend reg are written, pend reg remembers states and </text:p>
      <text:p text:style-name="P24"><text:s text:c="12"/>-- records incomming interrupts.</text:p>
      <text:p text:style-name="P24"><text:s text:c="8"/>end if;</text:p>
      <text:p text:style-name="P24"/>
      <text:p text:style-name="P24"><text:s text:c="8"/>if wren = '1' and addr = "000010" and cben(1) = '0' then</text:p>
      <text:p text:style-name="P24"><text:s text:c="12"/>pendff(9 downto 8) &lt;= "00";</text:p>
      <text:p text:style-name="P24"><text:s text:c="8"/>elsif wren = '1' and addr = "000001" and cben (1) = '0' then</text:p>
      <text:p text:style-name="P24"><text:s text:c="12"/>for j in 8 to 9 loop</text:p>
      <text:p text:style-name="P24"><text:s text:c="16"/>if adi(j) = '1' then</text:p>
      <text:p text:style-name="P24"><text:s text:c="20"/>pendff(j) &lt;= '0';</text:p>
      <text:p text:style-name="P24"><text:s text:c="16"/>end if;</text:p>
      <text:p text:style-name="P24"><text:s text:c="12"/>end loop;</text:p>
      <text:p text:style-name="P24"><text:s text:c="8"/>else</text:p>
      <text:p text:style-name="P24"><text:s text:c="12"/>pendff(9 downto 8) &lt;= (fifo_ovf &amp; dma_done) or pendff(9 downto 8);</text:p>
      <text:p text:style-name="P24"><text:s text:c="8"/>end if;</text:p>
      <text:p text:style-name="P24"><text:s text:c="8"/>int_or := req(0);</text:p>
      <text:p text:style-name="P24"><text:s text:c="8"/>for i in 1 to req'length -1 loop</text:p>
      <text:p text:style-name="P24"><text:s text:c="12"/>int_or := int_or or req(i);</text:p>
      <text:p text:style-name="P24"><text:s text:c="8"/>end loop;</text:p>
      <text:p text:style-name="P24"><text:s text:c="8"/>intan &lt;= not int_or;</text:p>
      <text:p text:style-name="P24"><text:s text:c="4"/>end if;</text:p>
      <text:p text:style-name="P24">end process;</text:p>
      <text:p text:style-name="P24">int_mask &lt;= maskff;</text:p>
      <text:p text:style-name="P24">int_pend &lt;= pendff; <text:s text:c="3"/></text:p>
      <text:p text:style-name="P24">req <text:s text:c="7"/>&lt;= pendff and maskff;</text:p>
      <text:p text:style-name="P24">-- req reg is logic and of mask and pending regs. </text:p>
      <text:p text:style-name="P24">int_req <text:s text:c="3"/>&lt;= req;</text:p>
      <text:p text:style-name="P24">end rtl;</text:p>
      <text:p text:style-name="P24"/>
      <text:p text:style-name="P24">-- the dma controller will start to transfer the data to the starting address. the </text:p>
      <text:p text:style-name="P24">-- address is automatically incremented to transfer the next data until all the </text:p>
      <text:p text:style-name="P24">-- words are transfered. </text:p>
      <text:p text:style-name="P24"/>
      <text:p text:style-name="P24">library ieee;</text:p>
      <text:p text:style-name="P24"><text:s text:c="4"/>use ieee.std_logic_1164.all;</text:p>
      <text:p text:style-name="P24"/>
      <text:p text:style-name="P24">entity spreg is port(</text:p>
      <text:p text:style-name="P24"><text:s text:c="4"/>rstn0, rstn1, clk0, clk1 : in std_logic;</text:p>
      <text:p text:style-name="P24"><text:s text:c="4"/>addr <text:s text:c="12"/>: in std_logic_vector(5 downto 0);</text:p>
      <text:p text:style-name="P24"><text:s text:c="4"/>cben <text:s text:c="12"/>: in std_logic_vector(3 downto 0); -- command byte enable 4 bit active low. each bit controlls a byte lane</text:p>
      <text:p text:style-name="P24"><text:s text:c="4"/>adi <text:s text:c="12"/>: in std_logic_vector(31 downto 0); -- data/control to be written to registers</text:p>
      <text:p text:style-name="P24"><text:s text:c="4"/>wren <text:s text:c="12"/>: in std_logic;</text:p>
      <text:p text:style-name="P24"><text:s text:c="4"/>dma_done <text:s text:c="4"/>: in std_logic; --indictes dma is done</text:p>
      <text:p text:style-name="P24"><text:soft-page-break/><text:s text:c="4"/>dma_en <text:s text:c="8"/>: out std_logic; -- control wheter the dma or fifo are enabled</text:p>
      <text:p text:style-name="P24"><text:s text:c="4"/>fifo_en <text:s text:c="8"/>: out std_logic; --dma control register bit 1</text:p>
      <text:p text:style-name="P24"><text:s text:c="4"/>soft_rstn <text:s text:c="4"/>: out std_logic; --dma control register bit 0</text:p>
      <text:p text:style-name="P24"><text:s text:c="4"/>dmaad <text:s text:c="8"/>: out std_logic_vector(31 downto 2); -- starting address register for data trasnfer</text:p>
      <text:p text:style-name="P24"><text:s text:c="4"/>dmaword <text:s text:c="8"/>: out std_logic_vector(31 downto 0)); -- number of words to transfer</text:p>
      <text:p text:style-name="P24">end spreg;</text:p>
      <text:p text:style-name="P24"/>
      <text:p text:style-name="P24">architecture rtl of spreg is</text:p>
      <text:p text:style-name="P24">begin</text:p>
      <text:p text:style-name="P24"><text:s text:c="4"/>fgen : process(rstn0, clk0)</text:p>
      <text:p text:style-name="P24"><text:s text:c="4"/>begin</text:p>
      <text:p text:style-name="P24"><text:s text:c="8"/>if rstn0 = '0' then</text:p>
      <text:p text:style-name="P24"><text:s text:c="12"/>soft_rstn &lt;= '1';</text:p>
      <text:p text:style-name="P24"><text:s text:c="12"/>dma_en &lt;= '0';</text:p>
      <text:p text:style-name="P24"><text:s text:c="12"/>fifo_en &lt;= '0';</text:p>
      <text:p text:style-name="P24"><text:s text:c="8"/>elsif rising_edge(clk0) then</text:p>
      <text:p text:style-name="P24"><text:s text:c="12"/>soft_rstn &lt;= '1';</text:p>
      <text:p text:style-name="P24"><text:s text:c="12"/>-- dma control</text:p>
      <text:p text:style-name="P24"><text:s text:c="12"/>if wren = '1' and addr = "010000" and cben(0) = '0' then</text:p>
      <text:p text:style-name="P24"><text:s text:c="16"/>dma_en &lt;= adi(2);</text:p>
      <text:p text:style-name="P24"><text:s text:c="16"/>fifo_en &lt;= adi(1);</text:p>
      <text:p text:style-name="P24"><text:s text:c="16"/>soft_rstn &lt;= not adi(0);</text:p>
      <text:p text:style-name="P24"><text:s text:c="12"/>elsif dma_done = '1' then</text:p>
      <text:p text:style-name="P24"><text:s text:c="16"/>dma_en &lt;= '0';</text:p>
      <text:p text:style-name="P24"><text:s text:c="12"/>end if;</text:p>
      <text:p text:style-name="P24"><text:s text:c="8"/>end if;</text:p>
      <text:p text:style-name="P24"><text:s text:c="4"/>end process;</text:p>
      <text:p text:style-name="P24"/>
      <text:p text:style-name="P24"><text:s text:c="4"/>dmasgen : process(rstn0, clk0)</text:p>
      <text:p text:style-name="P24"><text:s text:c="4"/>begin</text:p>
      <text:p text:style-name="P24"><text:s text:c="8"/>if rstn0 = '0' then</text:p>
      <text:p text:style-name="P24"><text:s text:c="12"/>dmaad &lt;= (others =&gt; '0');</text:p>
      <text:p text:style-name="P24"><text:s text:c="8"/>elsif rising_edge(clk0) then</text:p>
      <text:p text:style-name="P24"><text:s text:c="12"/>-- dma address</text:p>
      <text:p text:style-name="P24"><text:s text:c="12"/>if wren = '1' and addr = "010001" then</text:p>
      <text:p text:style-name="P24"><text:s text:c="16"/>for j in 1 to 3 loop</text:p>
      <text:p text:style-name="P24"><text:s text:c="20"/>if cben(j) = '0' then</text:p>
      <text:p text:style-name="P24"><text:s text:c="24"/>dmaad((j +1) *8 -1 downto j *8) &lt;= adi((j +1) *8 -1 downto j *8);</text:p>
      <text:p text:style-name="P24"><text:s text:c="20"/>end if;</text:p>
      <text:p text:style-name="P24"><text:s text:c="20"/>if cben(0) = '0' then</text:p>
      <text:p text:style-name="P24"><text:s text:c="24"/>dmaad(7 downto 2) &lt;= adi(7 downto 2);</text:p>
      <text:p text:style-name="P24"><text:s text:c="20"/>end if;</text:p>
      <text:p text:style-name="P24"><text:s text:c="16"/>end loop;</text:p>
      <text:p text:style-name="P24"><text:s text:c="12"/>end if;</text:p>
      <text:p text:style-name="P24"><text:s text:c="8"/>end if;</text:p>
      <text:p text:style-name="P24"><text:s text:c="4"/>end process;</text:p>
      <text:p text:style-name="P24"/>
      <text:p text:style-name="P24"><text:s text:c="4"/>dmacntgen : process(rstn1, clk1)</text:p>
      <text:p text:style-name="P24"><text:s text:c="4"/>begin</text:p>
      <text:p text:style-name="P24"><text:s text:c="8"/>if rstn1 = '0' then</text:p>
      <text:p text:style-name="P24"><text:soft-page-break/><text:s text:c="12"/>dmaword &lt;= (others =&gt; '0');</text:p>
      <text:p text:style-name="P24"><text:s text:c="8"/>elsif rising_edge(clk1) then</text:p>
      <text:p text:style-name="P24"><text:s text:c="12"/>-- dma word -&gt; for dma to know how many words to transfer before dma_done is asserted. </text:p>
      <text:p text:style-name="P24"><text:s text:c="12"/>if wren = '1' and addr = "010010" then</text:p>
      <text:p text:style-name="P24"><text:s text:c="16"/>for j in 0 to 3 loop</text:p>
      <text:p text:style-name="P24"><text:s text:c="20"/>if cben(j) = '0' then</text:p>
      <text:p text:style-name="P24"><text:s text:c="24"/>dmaword((j +1) *8 -1 downto j *8) &lt;= adi((j +1) *8 -1 downto j *8);</text:p>
      <text:p text:style-name="P24"><text:s text:c="20"/>end if;</text:p>
      <text:p text:style-name="P24"><text:s text:c="16"/>end loop;</text:p>
      <text:p text:style-name="P24"><text:s text:c="12"/>end if;</text:p>
      <text:p text:style-name="P24"><text:s text:c="8"/>end if;</text:p>
      <text:p text:style-name="P24"><text:s text:c="4"/>end process;</text:p>
      <text:p text:style-name="P24">end rtl;</text:p>
      <text:p text:style-name="P24"/>
      <text:p text:style-name="P24">library ieee;</text:p>
      <text:p text:style-name="P24"><text:s text:c="4"/>use ieee.std_logic_1164.all;</text:p>
      <text:p text:style-name="P24"/>
      <text:p text:style-name="P24">entity regmux is port(</text:p>
      <text:p text:style-name="P24"><text:s text:c="4"/>clk <text:s text:c="12"/>: in std_logic;</text:p>
      <text:p text:style-name="P24"><text:s text:c="4"/>rstn <text:s text:c="11"/>: in std_logic;</text:p>
      <text:p text:style-name="P24"><text:s text:c="4"/>addr <text:s text:c="11"/>: in std_logic_vector(3 downto 0);</text:p>
      <text:p text:style-name="P24"><text:s text:c="4"/>adi <text:s text:c="11"/>: in std_logic_vector(31 downto 0);</text:p>
      <text:p text:style-name="P24"><text:s text:c="4"/>cben <text:s text:c="11"/>: in std_logic_vector(3 downto 0);</text:p>
      <text:p text:style-name="P24"><text:s text:c="4"/>cfg_wrn <text:s text:c="7"/>: in std_logic;</text:p>
      <text:p text:style-name="P24"><text:s text:c="4"/>m_abort <text:s text:c="7"/>: in std_logic; -- pci protocol</text:p>
      <text:p text:style-name="P24"><text:s text:c="4"/>t_abort <text:s text:c="7"/>: in std_logic; -- pci protocol</text:p>
      <text:p text:style-name="P24"><text:s text:c="4"/>bist_code <text:s text:c="3"/>: in std_logic_vector(4 downto 0);</text:p>
      <text:p text:style-name="P24"><text:s text:c="4"/>int_req <text:s text:c="7"/>: in std_logic_vector(9 downto 0);</text:p>
      <text:p text:style-name="P24"><text:s text:c="4"/>int_mask <text:s text:c="7"/>: in std_logic_vector(9 downto 0);</text:p>
      <text:p text:style-name="P24"><text:s text:c="4"/>int_pend <text:s text:c="7"/>: in std_logic_vector(9 downto 0);</text:p>
      <text:p text:style-name="P24"><text:s text:c="4"/>dma_en <text:s text:c="7"/>: in std_logic;</text:p>
      <text:p text:style-name="P24"><text:s text:c="4"/>fifo_en <text:s text:c="7"/>: in std_logic;</text:p>
      <text:p text:style-name="P24"><text:s text:c="4"/>fifocnt <text:s text:c="7"/>: in std_logic_vector(5 downto 0);</text:p>
      <text:p text:style-name="P24"><text:s text:c="4"/>dmaad <text:s text:c="11"/>: in std_logic_vector(31 downto 2);</text:p>
      <text:p text:style-name="P24"><text:s text:c="4"/>dmaword <text:s text:c="7"/>: in std_logic_vector(31 downto 0);</text:p>
      <text:p text:style-name="P24"><text:s text:c="4"/>dmacntr <text:s text:c="7"/>: in std_logic_vector(31 downto 0);</text:p>
      <text:p text:style-name="P24"><text:s text:c="4"/>rdaddr <text:s text:c="7"/>: in std_logic_vector(5 downto 0);</text:p>
      <text:p text:style-name="P24"><text:s text:c="4"/>bist_start <text:s text:c="3"/>: out std_logic; -- start build in self test circuit</text:p>
      <text:p text:style-name="P24"><text:s text:c="4"/>target_b2b <text:s text:c="3"/>: out std_logic;</text:p>
      <text:p text:style-name="P24"><text:s text:c="4"/>master_en <text:s text:c="3"/>: out std_logic; <text:s text:c="3"/></text:p>
      <text:p text:style-name="P24"><text:s text:c="4"/>respond_en <text:s text:c="3"/>: out std_logic;</text:p>
      <text:p text:style-name="P24"><text:s text:c="4"/>base_addr <text:s text:c="3"/>: out std_logic_vector(11 downto 0);</text:p>
      <text:p text:style-name="P24"><text:s text:c="4"/>latency_pci <text:s text:c="3"/>: out std_logic_vector(4 downto 0);</text:p>
      <text:p text:style-name="P24"><text:s text:c="4"/>dout <text:s text:c="11"/>: out std_logic_vector(31 downto 0));</text:p>
      <text:p text:style-name="P24">end regmux;</text:p>
      <text:p text:style-name="P24"/>
      <text:p text:style-name="P24">architecture rtl of regmux is</text:p>
      <text:p text:style-name="P24"><text:s text:c="4"/>constant asic_id : std_logic_vector(15 downto 0) := "0101010100100100";</text:p>
      <text:p text:style-name="P24"><text:s text:c="4"/>constant comp_id : std_logic_vector(15 downto 0) := "0001010101011100";</text:p>
      <text:p text:style-name="P24"><text:s text:c="4"/>constant class_code : std_logic_vector(23 downto 0) := "111111110000000000000000";</text:p>
      <text:p text:style-name="P24"><text:soft-page-break/><text:s text:c="4"/>constant revision : std_logic_vector(7 downto 0) := "00000010";</text:p>
      <text:p text:style-name="P24"><text:s text:c="4"/>constant basereg19_0 : std_logic_vector(19 downto 0) := "00000000000000000000";</text:p>
      <text:p text:style-name="P24"><text:s text:c="4"/>constant int_pin : std_logic_vector(7 downto 0) := "00000001";</text:p>
      <text:p text:style-name="P24"/>
      <text:p text:style-name="P24"><text:s text:c="4"/>signal devid_reg <text:s text:c="7"/>: std_logic_vector(31 downto 0);</text:p>
      <text:p text:style-name="P24"><text:s text:c="4"/>signal devctl_reg <text:s text:c="7"/>: std_logic_vector(31 downto 0);</text:p>
      <text:p text:style-name="P24"><text:s text:c="4"/>signal revid_reg <text:s text:c="7"/>: std_logic_vector(31 downto 0);</text:p>
      <text:p text:style-name="P24"><text:s text:c="4"/>signal latency_reg <text:s text:c="3"/>: std_logic_vector(31 downto 0);</text:p>
      <text:p text:style-name="P24"><text:s text:c="4"/>signal base_reg <text:s text:c="7"/>: std_logic_vector(31 downto 0);</text:p>
      <text:p text:style-name="P24"><text:s text:c="4"/>signal basereg31_20 <text:s text:c="3"/>: std_logic_vector(11 downto 0);</text:p>
      <text:p text:style-name="P24"><text:s text:c="4"/>signal int_pin_reg <text:s text:c="3"/>: std_logic_vector(31 downto 0);</text:p>
      <text:p text:style-name="P24"><text:s text:c="4"/>signal mabort_ff <text:s text:c="7"/>: std_logic;</text:p>
      <text:p text:style-name="P24"><text:s text:c="4"/>signal tabort_ff <text:s text:c="7"/>: std_logic;</text:p>
      <text:p text:style-name="P24"><text:s text:c="4"/>signal target_b2b_ff <text:s text:c="3"/>: std_logic;</text:p>
      <text:p text:style-name="P24"><text:s text:c="4"/>signal master_en_ff <text:s text:c="3"/>: std_logic;</text:p>
      <text:p text:style-name="P24"><text:s text:c="4"/>signal respond_en_ff <text:s text:c="3"/>: std_logic;</text:p>
      <text:p text:style-name="P24"><text:s text:c="4"/>signal latency_ff <text:s text:c="7"/>: std_logic_vector(4 downto 0);</text:p>
      <text:p text:style-name="P24"><text:s text:c="4"/>signal int_line_ff <text:s text:c="3"/>: std_logic_vector(7 downto 0);</text:p>
      <text:p text:style-name="P24"><text:s text:c="4"/>signal bist_code_ff <text:s text:c="3"/>: std_logic_vector(3 downto 0);</text:p>
      <text:p text:style-name="P24"><text:s text:c="4"/>signal bist_start_ff, bist_start_dl <text:s text:c="3"/>: std_logic;</text:p>
      <text:p text:style-name="P24"><text:s text:c="4"/>signal ad3_0 <text:s text:c="11"/>: std_logic_vector(3 downto 0);</text:p>
      <text:p text:style-name="P24"><text:s text:c="4"/>signal ad1_0, ad5_4 <text:s text:c="3"/>: std_logic_vector(1 downto 0);</text:p>
      <text:p text:style-name="P24"><text:s text:c="4"/>signal itout, mask_reg, pend_reg, req_reg, dmaout, </text:p>
      <text:p text:style-name="P24"><text:s text:c="4"/>dmaad_reg, cfgout, dmactl_reg : std_logic_vector(31 downto 0);</text:p>
      <text:p text:style-name="P24"/>
      <text:p text:style-name="P24">begin</text:p>
      <text:p text:style-name="P24"><text:s text:c="4"/>target_b2b <text:s text:c="4"/>&lt;= target_b2b_ff;</text:p>
      <text:p text:style-name="P24"><text:s text:c="4"/>master_en <text:s text:c="4"/>&lt;= master_en_ff;</text:p>
      <text:p text:style-name="P24"><text:s text:c="4"/>respond_en <text:s text:c="3"/>&lt;= respond_en_ff;</text:p>
      <text:p text:style-name="P24"><text:s text:c="4"/>devid_reg <text:s text:c="4"/>&lt;= asic_id &amp; comp_id;</text:p>
      <text:p text:style-name="P24"><text:s text:c="4"/>revid_reg <text:s text:c="4"/>&lt;= class_code &amp; revision;</text:p>
      <text:p text:style-name="P24"><text:s text:c="4"/>base_addr <text:s text:c="4"/>&lt;= basereg31_20;</text:p>
      <text:p text:style-name="P24"><text:s text:c="4"/>latency_pci &lt;= latency_ff;</text:p>
      <text:p text:style-name="P24"><text:s text:c="4"/>devctl_gen : process(rstn, clk)</text:p>
      <text:p text:style-name="P24"><text:s text:c="4"/>begin</text:p>
      <text:p text:style-name="P24"><text:s text:c="8"/>if rstn = '0' then</text:p>
      <text:p text:style-name="P24"><text:s text:c="12"/>mabort_ff &lt;= '0';</text:p>
      <text:p text:style-name="P24"><text:s text:c="12"/>tabort_ff &lt;= '0';</text:p>
      <text:p text:style-name="P24"><text:s text:c="12"/>target_b2b_ff &lt;= '0'; -- default no back to back</text:p>
      <text:p text:style-name="P24"><text:s text:c="12"/>master_en_ff &lt;= '0'; --default master not enabled</text:p>
      <text:p text:style-name="P24"><text:s text:c="12"/>respond_en_ff &lt;= '0'; --default no respond</text:p>
      <text:p text:style-name="P24"><text:s text:c="8"/>elsif rising_edge(clk) then</text:p>
      <text:p text:style-name="P24"><text:s text:c="12"/>if cfg_wrn = '0' and addr = "0001" then</text:p>
      <text:p text:style-name="P24"><text:s text:c="16"/>if cben(1) = '0' then</text:p>
      <text:p text:style-name="P24"><text:s text:c="20"/>target_b2b_ff &lt;= adi(9);</text:p>
      <text:p text:style-name="P24"><text:s text:c="16"/>end if;</text:p>
      <text:p text:style-name="P24"><text:s text:c="16"/>if cben(0) = '0' then</text:p>
      <text:p text:style-name="P24"><text:s text:c="20"/>master_en_ff &lt;= adi(2);</text:p>
      <text:p text:style-name="P24"><text:s text:c="20"/>respond_en_ff &lt;= adi(1);</text:p>
      <text:p text:style-name="P24"><text:s text:c="16"/>end if;</text:p>
      <text:p text:style-name="P24"><text:soft-page-break/><text:s text:c="12"/>end if;</text:p>
      <text:p text:style-name="P24"><text:s text:c="12"/>if(cfg_wrn = '0') and addr = "0001" and </text:p>
      <text:p text:style-name="P24"><text:s text:c="16"/>cben(3) = '0' and adi(29) = '1' then</text:p>
      <text:p text:style-name="P24"><text:s text:c="16"/>mabort_ff &lt;= '0';</text:p>
      <text:p text:style-name="P24"><text:s text:c="12"/>elsif mabort_ff = '0' then</text:p>
      <text:p text:style-name="P24"><text:s text:c="16"/>mabort_ff &lt;= m_abort;</text:p>
      <text:p text:style-name="P24"><text:s text:c="12"/>end if;</text:p>
      <text:p text:style-name="P24"><text:s text:c="12"/>if cfg_wrn = '0' and addr = "0001" and </text:p>
      <text:p text:style-name="P24"><text:s text:c="16"/>cben(3) = '0' and adi(28) = '1' then</text:p>
      <text:p text:style-name="P24"><text:s text:c="16"/>tabort_ff &lt;= '0'; -- clear by writing 1</text:p>
      <text:p text:style-name="P24"><text:s text:c="12"/>elsif tabort_ff = '0' then -- when 0 clock in</text:p>
      <text:p text:style-name="P24"><text:s text:c="16"/>tabort_ff &lt;= t_abort;</text:p>
      <text:p text:style-name="P24"><text:s text:c="12"/>end if;</text:p>
      <text:p text:style-name="P24"><text:s text:c="8"/>end if;</text:p>
      <text:p text:style-name="P24"><text:s text:c="4"/>end process;</text:p>
      <text:p text:style-name="P24"/>
      <text:p text:style-name="P24"><text:s text:c="4"/>devctl_reg &lt;= "00" &amp; mabort_ff &amp; tabort_ff &amp; "001010000000" &amp; "000000" &amp;</text:p>
      <text:p text:style-name="P24"><text:s text:c="8"/>target_b2b_ff &amp; "000000" <text:s/>&amp; master_en_ff &amp; respond_en_ff &amp; '0';</text:p>
      <text:p text:style-name="P24"/>
      <text:p text:style-name="P24"/>
      <text:p text:style-name="P24"><text:s text:c="4"/>bist_start &lt;= bist_start_ff and (not bist_start_dl);</text:p>
      <text:p text:style-name="P24"/>
      <text:p text:style-name="P24"><text:s text:c="4"/>basereg_gen : process(rstn, clk)</text:p>
      <text:p text:style-name="P24"><text:s text:c="4"/>begin</text:p>
      <text:p text:style-name="P24"><text:s text:c="8"/>if rstn = '0' then</text:p>
      <text:p text:style-name="P24"><text:s text:c="12"/>basereg31_20 &lt;= "111111000000";</text:p>
      <text:p text:style-name="P24"><text:s text:c="12"/>latency_ff &lt;= "00000";</text:p>
      <text:p text:style-name="P24"><text:s text:c="12"/>int_line_ff &lt;= "00000000";</text:p>
      <text:p text:style-name="P24"><text:s text:c="12"/>bist_start_ff &lt;= '0';</text:p>
      <text:p text:style-name="P24"><text:s text:c="12"/>bist_start_dl &lt;= '0';</text:p>
      <text:p text:style-name="P24"><text:s text:c="12"/>bist_code_ff &lt;= "0000";</text:p>
      <text:p text:style-name="P24"><text:s text:c="8"/>elsif rising_edge(clk) then</text:p>
      <text:p text:style-name="P24"><text:s text:c="12"/>if cfg_wrn = '0' and addr = "0100" then</text:p>
      <text:p text:style-name="P24"><text:s text:c="16"/>if cben(3) = '0' then</text:p>
      <text:p text:style-name="P24"><text:s text:c="20"/>basereg31_20(11 downto 4) &lt;= adi(31 downto 24);</text:p>
      <text:p text:style-name="P24"><text:s text:c="16"/>end if;</text:p>
      <text:p text:style-name="P24"><text:s text:c="16"/>if cben(2) = '0' then</text:p>
      <text:p text:style-name="P24"><text:s text:c="20"/>basereg31_20(3 downto 0) &lt;= adi(23 downto 20);</text:p>
      <text:p text:style-name="P24"><text:s text:c="16"/>end if;</text:p>
      <text:p text:style-name="P24"><text:s text:c="12"/>end if;</text:p>
      <text:p text:style-name="P24"><text:s text:c="12"/>if cfg_wrn = '0' and addr = "0011" and cben(1) = '0' then</text:p>
      <text:p text:style-name="P24"><text:s text:c="16"/>latency_ff &lt;= adi(15 downto 11);</text:p>
      <text:p text:style-name="P24"><text:s text:c="12"/>end if;</text:p>
      <text:p text:style-name="P24"><text:s text:c="12"/>if cfg_wrn = '0' and addr = "0011" and </text:p>
      <text:p text:style-name="P24"><text:s text:c="16"/>cben(3) = '0' and adi(30) = '1' then</text:p>
      <text:p text:style-name="P24"><text:s text:c="16"/>bist_start_ff &lt;= '1'; --when write '1' start bist_code</text:p>
      <text:p text:style-name="P24"><text:s text:c="12"/>elsif (bist_code(4) = '0') then</text:p>
      <text:p text:style-name="P24"><text:s text:c="16"/>bist_start_ff &lt;= '0'; -- clear when bist done</text:p>
      <text:p text:style-name="P24"><text:s text:c="12"/>end if;</text:p>
      <text:p text:style-name="P24"><text:s text:c="12"/>bist_start_dl &lt;= bist_start_ff;</text:p>
      <text:p text:style-name="P24"><text:soft-page-break/><text:s text:c="12"/>bist_code_ff &lt;= bist_code(3 downto 0);</text:p>
      <text:p text:style-name="P24"><text:s text:c="12"/>if cfg_wrn = '0' and addr = "1111" and cben(0) = '0' then</text:p>
      <text:p text:style-name="P24"><text:s text:c="16"/>int_line_ff &lt;= adi(7 downto 0);</text:p>
      <text:p text:style-name="P24"><text:s text:c="12"/>end if;</text:p>
      <text:p text:style-name="P24"><text:s text:c="8"/>end if;</text:p>
      <text:p text:style-name="P24"><text:s text:c="4"/>end process;</text:p>
      <text:p text:style-name="P24"/>
      <text:p text:style-name="P24"><text:s text:c="4"/>base_reg &lt;= basereg31_20 &amp; basereg19_0;</text:p>
      <text:p text:style-name="P24"><text:s text:c="4"/>latency_reg &lt;= '1' &amp; bist_start_ff &amp; "00" &amp; bist_code_ff &amp; "00000000" </text:p>
      <text:p text:style-name="P24"><text:s text:c="4"/>&amp; latency_ff &amp; "00000000000";</text:p>
      <text:p text:style-name="P24"><text:s text:c="4"/>int_pin_reg &lt;= "0000000000000000" &amp; int_pin &amp; int_line_ff;</text:p>
      <text:p text:style-name="P24"/>
      <text:p text:style-name="P24"><text:s text:c="4"/>ad3_0 &lt;= rdaddr(3 downto 0); ad1_0 &lt;= rdaddr(1 downto 0);</text:p>
      <text:p text:style-name="P24"><text:s text:c="4"/>ad5_4 &lt;= rdaddr(5 downto 4);</text:p>
      <text:p text:style-name="P24"/>
      <text:p text:style-name="P24"><text:s text:c="4"/>cfggen : process(ad3_0, devid_reg, devctl_reg, revid_reg, latency_reg, base_reg, int_pin_reg)</text:p>
      <text:p text:style-name="P24"><text:s text:c="4"/>begin</text:p>
      <text:p text:style-name="P24"><text:s text:c="8"/>case ad3_0 is</text:p>
      <text:p text:style-name="P24"><text:s text:c="12"/>when "0000" =&gt; cfgout &lt;= devid_reg;</text:p>
      <text:p text:style-name="P24"><text:s text:c="12"/>when "0001" =&gt; cfgout &lt;= devctl_reg;</text:p>
      <text:p text:style-name="P24"><text:s text:c="12"/>when "0010" =&gt; cfgout &lt;= revid_reg;</text:p>
      <text:p text:style-name="P24"><text:s text:c="12"/>when "0011" =&gt; cfgout &lt;= latency_reg;</text:p>
      <text:p text:style-name="P24"><text:s text:c="12"/>when "0100" =&gt; cfgout &lt;= base_reg;</text:p>
      <text:p text:style-name="P24"><text:s text:c="12"/>when "1111" =&gt; cfgout &lt;= int_pin_reg;</text:p>
      <text:p text:style-name="P24"><text:s text:c="12"/>when others =&gt; cfgout &lt;= (others =&gt; '0');</text:p>
      <text:p text:style-name="P24"><text:s text:c="8"/>end case;</text:p>
      <text:p text:style-name="P24"><text:s text:c="4"/>end process;</text:p>
      <text:p text:style-name="P24"/>
      <text:p text:style-name="P24"><text:s text:c="4"/>mask_reg &lt;= "0000000000000000000000" &amp; int_mask;</text:p>
      <text:p text:style-name="P24"><text:s text:c="4"/>pend_reg &lt;= "0000000000000000000000" &amp; int_pend;</text:p>
      <text:p text:style-name="P24"><text:s text:c="4"/>req_reg <text:s/>&lt;= "0000000000000000000000" &amp; int_req;</text:p>
      <text:p text:style-name="P24"/>
      <text:p text:style-name="P24"><text:s text:c="4"/>itmux : with ad1_0 select</text:p>
      <text:p text:style-name="P24"><text:s text:c="4"/>itout &lt;= mask_reg when "00",</text:p>
      <text:p text:style-name="P24"><text:s text:c="4"/>pend_reg when "01",</text:p>
      <text:p text:style-name="P24"><text:s text:c="4"/>req_reg when others;</text:p>
      <text:p text:style-name="P24"><text:s text:c="4"/>dmaad_reg &lt;= dmaad &amp; "00";</text:p>
      <text:p text:style-name="P24"><text:s text:c="4"/>dmactl_reg &lt;= "000000000000000000" &amp; fifocnt &amp; "00000" &amp; fifo_en &amp; dma_en &amp; '0';</text:p>
      <text:p text:style-name="P24"/>
      <text:p text:style-name="P24"><text:s text:c="4"/>dmamux : with ad1_0 select</text:p>
      <text:p text:style-name="P24"><text:s text:c="4"/>dmaout &lt;= dmactl_reg when "00",</text:p>
      <text:p text:style-name="P24"><text:s text:c="4"/>dmaad_reg when "01",</text:p>
      <text:p text:style-name="P24"><text:s text:c="4"/>dmaword when "10",</text:p>
      <text:p text:style-name="P24"><text:s text:c="4"/>dmacntr when others;</text:p>
      <text:p text:style-name="P24">end rtl; <text:s text:c="16"/></text:p>
      <text:p text:style-name="P24"/>
      <text:p text:style-name="P24">library ieee;</text:p>
      <text:p text:style-name="P24"><text:s text:c="4"/>use ieee. std_logic_1164.all;</text:p>
      <text:p text:style-name="P24"/>
      <text:p text:style-name="P24">entity reg is port(</text:p>
      <text:p text:style-name="P24"><text:soft-page-break/><text:s text:c="4"/>rstn <text:s text:c="11"/>: in std_logic_vector(3 downto 0);</text:p>
      <text:p text:style-name="P24"><text:s text:c="4"/>clk <text:s text:c="11"/>: in std_logic_vector(3 downto 0);</text:p>
      <text:p text:style-name="P24"><text:s text:c="4"/>wraddr <text:s text:c="7"/>: in std_logic_vector(5 downto 0);</text:p>
      <text:p text:style-name="P24"><text:s text:c="4"/>cben <text:s text:c="11"/>: in std_logic_vector(3 downto 0);</text:p>
      <text:p text:style-name="P24"><text:s text:c="4"/>adi <text:s text:c="11"/>: in std_logic_vector(31 downto 0);</text:p>
      <text:p text:style-name="P24"><text:s text:c="4"/>wren <text:s text:c="11"/>: in std_logic;</text:p>
      <text:p text:style-name="P24"><text:s text:c="4"/>fifo_ovf <text:s text:c="7"/>: in std_logic;</text:p>
      <text:p text:style-name="P24"><text:s text:c="4"/>dma_done <text:s text:c="7"/>: in std_logic;</text:p>
      <text:p text:style-name="P24"><text:s text:c="4"/>timer_int <text:s text:c="3"/>: in std_logic_vector(3 downto 0);</text:p>
      <text:p text:style-name="P24"><text:s text:c="4"/>intn <text:s text:c="11"/>: in std_logic_vector(3 downto 0);</text:p>
      <text:p text:style-name="P24"><text:s text:c="4"/>intan <text:s text:c="11"/>: out std_logic;</text:p>
      <text:p text:style-name="P24"><text:s text:c="4"/>dma_en <text:s text:c="7"/>: out std_logic;</text:p>
      <text:p text:style-name="P24"><text:s text:c="4"/>fifo_en <text:s text:c="7"/>: out std_logic;</text:p>
      <text:p text:style-name="P24"><text:s text:c="4"/>soft_rstn <text:s text:c="3"/>: out std_logic;</text:p>
      <text:p text:style-name="P24"><text:s text:c="4"/>dmaad <text:s text:c="11"/>: out std_logic_vector(31 downto 2);</text:p>
      <text:p text:style-name="P24"><text:s text:c="4"/>dmaword <text:s text:c="7"/>: out std_logic_vector(31 downto 0);</text:p>
      <text:p text:style-name="P24"><text:s text:c="4"/>cfg_wrn <text:s text:c="7"/>: in std_logic;</text:p>
      <text:p text:style-name="P24"><text:s text:c="4"/>m_abort <text:s text:c="7"/>: in std_logic;</text:p>
      <text:p text:style-name="P24"><text:s text:c="4"/>t_abort <text:s text:c="7"/>: in std_logic;</text:p>
      <text:p text:style-name="P24"><text:s text:c="4"/>bist_code <text:s text:c="3"/>: in std_logic_vector(4 downto 0);</text:p>
      <text:p text:style-name="P24"><text:s text:c="4"/>fifocnt <text:s text:c="7"/>: in std_logic_vector(5 downto 0);</text:p>
      <text:p text:style-name="P24"><text:s text:c="4"/>dmacntr <text:s text:c="7"/>: in std_logic_vector(31 downto 0);</text:p>
      <text:p text:style-name="P24"><text:s text:c="4"/>rdaddr <text:s text:c="7"/>: in std_logic_vector(5 downto 0);</text:p>
      <text:p text:style-name="P24"><text:s text:c="4"/>bist_start <text:s text:c="3"/>: out std_logic;</text:p>
      <text:p text:style-name="P24"><text:s text:c="4"/>target_b2b <text:s text:c="3"/>: out std_logic; <text:s text:c="4"/></text:p>
      <text:p text:style-name="P24"><text:s text:c="4"/>master_en <text:s text:c="3"/>: out std_logic;</text:p>
      <text:p text:style-name="P24"><text:s text:c="4"/>respond_en <text:s text:c="3"/>: out std_logic;</text:p>
      <text:p text:style-name="P24"><text:s text:c="4"/>base_addr <text:s text:c="3"/>: out std_logic_vector(11 downto 0); <text:s text:c="3"/></text:p>
      <text:p text:style-name="P24"><text:s text:c="4"/>latency_pci <text:s text:c="3"/>: out std_logic_vector(4 downto 0);</text:p>
      <text:p text:style-name="P24"><text:s text:c="4"/>dout <text:s text:c="11"/>: out std_logic_vector(31 downto 0));</text:p>
      <text:p text:style-name="P24">end reg;</text:p>
      <text:p text:style-name="P24"/>
      <text:p text:style-name="P24">architecture rtl of reg is</text:p>
      <text:p text:style-name="P24"><text:s text:c="4"/>component itreg port(</text:p>
      <text:p text:style-name="P24"><text:s text:c="8"/>rstn, clk : in std_logic;</text:p>
      <text:p text:style-name="P24"><text:s text:c="8"/>addr : in std_logic_vector(5 downto 0); -- 6 bit address input</text:p>
      <text:p text:style-name="P24"><text:s text:c="8"/>cben : in std_logic_vector(3 downto 0); -- command byte enable 4 bit active low. each bit controlls a byte lane</text:p>
      <text:p text:style-name="P24"><text:s text:c="8"/>adi <text:s/>: in std_logic_vector(31 downto 0); -- data to be written to registers</text:p>
      <text:p text:style-name="P24"><text:s text:c="8"/>wren : in std_logic;</text:p>
      <text:p text:style-name="P24"><text:s text:c="8"/>fifo_ovf : in std_logic; <text:s text:c="3"/>--indictes overflow</text:p>
      <text:p text:style-name="P24"><text:s text:c="8"/>dma_done : in std_logic; <text:s text:c="3"/>--indictes dma is done</text:p>
      <text:p text:style-name="P24"><text:s text:c="8"/>timer_int : in std_logic_vector(3 downto 0); <text:s text:c="3"/>--indictes timers are time out</text:p>
      <text:p text:style-name="P24"><text:s text:c="8"/>intn : in std_logic_vector(3 downto 0);</text:p>
      <text:p text:style-name="P24"><text:s text:c="8"/>intan : out std_logic; --active low indicated when interrupt is generated</text:p>
      <text:p text:style-name="P24"><text:s text:c="8"/>int_req : out std_logic_vector(9 downto 0); <text:s text:c="3"/>-- interrupt registers</text:p>
      <text:p text:style-name="P24"><text:s text:c="8"/>int_mask : out std_logic_vector(9 downto 0); <text:s text:c="3"/>-- interrupt registers</text:p>
      <text:p text:style-name="P24"><text:s text:c="8"/>int_pend : out std_logic_vector(9 downto 0));-- interrupt registers</text:p>
      <text:p text:style-name="P24">end component;</text:p>
      <text:p text:style-name="P24"/>
      <text:p text:style-name="P24">component spreg port(</text:p>
      <text:p text:style-name="P24"><text:soft-page-break/><text:s text:c="4"/>rstn0, rstn1, clk0, clk1 : in std_logic;</text:p>
      <text:p text:style-name="P24"><text:s text:c="4"/>addr <text:s text:c="12"/>: in std_logic_vector(5 downto 0);</text:p>
      <text:p text:style-name="P24"><text:s text:c="4"/>cben <text:s text:c="12"/>: in std_logic_vector(3 downto 0); -- command byte enable 4 bit active low. each bit controlls a byte lane</text:p>
      <text:p text:style-name="P24"><text:s text:c="4"/>adi <text:s text:c="12"/>: in std_logic_vector(31 downto 0); -- data to be written to registers</text:p>
      <text:p text:style-name="P24"><text:s text:c="4"/>wren <text:s text:c="12"/>: in std_logic;</text:p>
      <text:p text:style-name="P24"><text:s text:c="4"/>dma_done <text:s text:c="4"/>: in std_logic; --indictes dma is done</text:p>
      <text:p text:style-name="P24"><text:s text:c="4"/>dma_en <text:s text:c="8"/>: out std_logic; -- control wheter the dma or fifo are enabled</text:p>
      <text:p text:style-name="P24"><text:s text:c="4"/>fifo_en <text:s text:c="8"/>: out std_logic; --dma control register bit 1</text:p>
      <text:p text:style-name="P24"><text:s text:c="4"/>soft_rstn <text:s text:c="4"/>: out std_logic; --dma control register bit 0</text:p>
      <text:p text:style-name="P24"><text:s text:c="4"/>dmaad <text:s text:c="8"/>: out std_logic_vector(31 downto 2); -- starting address register for data trasnfer</text:p>
      <text:p text:style-name="P24"><text:s text:c="4"/>dmaword <text:s text:c="8"/>: out std_logic_vector(31 downto 0)); -- number of words to transfer</text:p>
      <text:p text:style-name="P24">end component;</text:p>
      <text:p text:style-name="P24"/>
      <text:p text:style-name="P24">component regmux port(</text:p>
      <text:p text:style-name="P24"><text:s text:c="4"/>clk <text:s text:c="12"/>: in std_logic;</text:p>
      <text:p text:style-name="P24"><text:s text:c="4"/>rstn <text:s text:c="11"/>: in std_logic;</text:p>
      <text:p text:style-name="P24"><text:s text:c="4"/>addr <text:s text:c="11"/>: in std_logic_vector(3 downto 0);</text:p>
      <text:p text:style-name="P24"><text:s text:c="4"/>adi <text:s text:c="11"/>: in std_logic_vector(31 downto 0);</text:p>
      <text:p text:style-name="P24"><text:s text:c="4"/>cben <text:s text:c="11"/>: in std_logic_vector(3 downto 0);</text:p>
      <text:p text:style-name="P24"><text:s text:c="4"/>cfg_wrn <text:s text:c="7"/>: in std_logic;</text:p>
      <text:p text:style-name="P24"><text:s text:c="4"/>m_abort <text:s text:c="7"/>: in std_logic;</text:p>
      <text:p text:style-name="P24"><text:s text:c="4"/>t_abort <text:s text:c="7"/>: in std_logic;</text:p>
      <text:p text:style-name="P24"><text:s text:c="4"/>bist_code <text:s text:c="3"/>: in std_logic_vector(4 downto 0);</text:p>
      <text:p text:style-name="P24"><text:s text:c="4"/>int_req <text:s text:c="7"/>: in std_logic_vector(9 downto 0);</text:p>
      <text:p text:style-name="P24"><text:s text:c="4"/>int_mask <text:s text:c="7"/>: in std_logic_vector(9 downto 0);</text:p>
      <text:p text:style-name="P24"><text:s text:c="4"/>int_pend <text:s text:c="7"/>: in std_logic_vector(9 downto 0);</text:p>
      <text:p text:style-name="P24"><text:s text:c="4"/>dma_en <text:s text:c="7"/>: in std_logic;</text:p>
      <text:p text:style-name="P24"><text:s text:c="4"/>fifo_en <text:s text:c="7"/>: in std_logic;</text:p>
      <text:p text:style-name="P24"><text:s text:c="4"/>fifocnt <text:s text:c="7"/>: in std_logic_vector(5 downto 0);</text:p>
      <text:p text:style-name="P24"><text:s text:c="4"/>dmaad <text:s text:c="11"/>: in std_logic_vector(31 downto 2);</text:p>
      <text:p text:style-name="P24"><text:s text:c="4"/>dmaword <text:s text:c="7"/>: in std_logic_vector(31 downto 0);</text:p>
      <text:p text:style-name="P24"><text:s text:c="4"/>dmacntr <text:s text:c="7"/>: in std_logic_vector(31 downto 0);</text:p>
      <text:p text:style-name="P24"><text:s text:c="4"/>rdaddr <text:s text:c="7"/>: in std_logic_vector(5 downto 0);</text:p>
      <text:p text:style-name="P24"><text:s text:c="4"/>bist_start <text:s text:c="3"/>: out std_logic;</text:p>
      <text:p text:style-name="P24"><text:s text:c="4"/>target_b2b <text:s text:c="3"/>: out std_logic;</text:p>
      <text:p text:style-name="P24"><text:s text:c="4"/>master_en <text:s text:c="3"/>: out std_logic; <text:s text:c="3"/></text:p>
      <text:p text:style-name="P24"><text:s text:c="4"/>respond_en <text:s text:c="3"/>: out std_logic;</text:p>
      <text:p text:style-name="P24"><text:s text:c="4"/>base_addr <text:s text:c="3"/>: out std_logic_vector(11 downto 0);</text:p>
      <text:p text:style-name="P24"><text:s text:c="4"/>latency_pci <text:s text:c="3"/>: out std_logic_vector(4 downto 0);</text:p>
      <text:p text:style-name="P24"><text:s text:c="4"/>dout <text:s text:c="11"/>: out std_logic_vector(31 downto 0));</text:p>
      <text:p text:style-name="P24">end component;</text:p>
      <text:p text:style-name="P24"/>
      <text:p text:style-name="P24">signal int_req <text:s text:c="11"/>: std_logic_vector(9 downto 0);</text:p>
      <text:p text:style-name="P24">signal int_mask <text:s text:c="7"/>: std_logic_vector(9 downto 0);</text:p>
      <text:p text:style-name="P24">signal int_pend <text:s text:c="7"/>: std_logic_vector(9 downto 0);</text:p>
      <text:p text:style-name="P24">signal dma_en_s <text:s text:c="7"/>: std_logic;</text:p>
      <text:p text:style-name="P24">signal fifo_en_s <text:s text:c="7"/>: std_logic;</text:p>
      <text:p text:style-name="P24">signal dmaad_s <text:s text:c="11"/>: std_logic_vector(31 downto 2);</text:p>
      <text:p text:style-name="P24">signal dmaword_s <text:s text:c="7"/>: std_logic_vector(31 downto 0);</text:p>
      <text:p text:style-name="P24">signal target_b2b_s <text:s text:c="3"/>: std_logic;</text:p>
      <text:p text:style-name="P24"><text:soft-page-break/>signal master_en_s <text:s text:c="3"/>: std_logic;</text:p>
      <text:p text:style-name="P24">signal respond_en_s <text:s text:c="3"/>: std_logic;</text:p>
      <text:p text:style-name="P24">signal base_addr_s <text:s text:c="3"/>: std_logic_vector(11 downto 0);</text:p>
      <text:p text:style-name="P24">signal latency_pci_s <text:s text:c="3"/>: std_logic_vector(4 downto 0);</text:p>
      <text:p text:style-name="P24">begin</text:p>
      <text:p text:style-name="P24"><text:s text:c="4"/>dma_en <text:s text:c="8"/>&lt;= dma_en_s;</text:p>
      <text:p text:style-name="P24"><text:s text:c="4"/>fifo_en <text:s text:c="8"/>&lt;= fifo_en_s;</text:p>
      <text:p text:style-name="P24"><text:s text:c="4"/>dmaad <text:s text:c="8"/>&lt;= dmaad_s;</text:p>
      <text:p text:style-name="P24"><text:s text:c="4"/>dmaword <text:s text:c="8"/>&lt;= dmaword_s;</text:p>
      <text:p text:style-name="P24"><text:s text:c="4"/>target_b2b <text:s text:c="4"/>&lt;= target_b2b_s;</text:p>
      <text:p text:style-name="P24"><text:s text:c="4"/>master_en <text:s text:c="4"/>&lt;= master_en_s;</text:p>
      <text:p text:style-name="P24"><text:s text:c="4"/>respond_en <text:s text:c="4"/>&lt;= respond_en_s;</text:p>
      <text:p text:style-name="P24"><text:s text:c="4"/>base_addr <text:s text:c="4"/>&lt;= base_addr_s;</text:p>
      <text:p text:style-name="P24"/>
      <text:p text:style-name="P24"><text:s text:c="4"/>itreg0 : itreg</text:p>
      <text:p text:style-name="P24"><text:s text:c="8"/>port map( rstn =&gt; rstn(1), <text:s text:c="3"/>clk =&gt; clk(1), <text:s text:c="3"/>addr =&gt; wraddr, cben =&gt; cben,</text:p>
      <text:p text:style-name="P24"><text:s text:c="18"/>adi =&gt; adi, wren =&gt; wren, <text:s text:c="3"/>fifo_ovf =&gt; fifo_ovf,</text:p>
      <text:p text:style-name="P24"><text:s text:c="18"/>dma_done =&gt; dma_done, timer_int =&gt; timer_int,</text:p>
      <text:p text:style-name="P24"><text:s text:c="18"/>intn =&gt; intn, intan =&gt; intan, int_req =&gt; int_req,</text:p>
      <text:p text:style-name="P24"><text:s text:c="18"/>int_mask =&gt; int_mask, int_pend =&gt; int_pend);</text:p>
      <text:p text:style-name="P24"/>
      <text:p text:style-name="P24"><text:s text:c="4"/>spreg0 : spreg</text:p>
      <text:p text:style-name="P24"><text:s text:c="8"/>port map(rstn0 =&gt; rstn(1), rstn1 =&gt; rstn(2), <text:s text:c="3"/>clk0 =&gt; clk(1),</text:p>
      <text:p text:style-name="P24"><text:s text:c="17"/>clk1 =&gt; clk(2), addr =&gt; wraddr, cben =&gt; cben,</text:p>
      <text:p text:style-name="P24"><text:s text:c="17"/>adi =&gt; adi, wren =&gt; wren, dma_done =&gt; dma_done,</text:p>
      <text:p text:style-name="P24"><text:s text:c="17"/>dma_en =&gt; dma_en_s, fifo_en =&gt; fifo_en_s,</text:p>
      <text:p text:style-name="P24"><text:s text:c="17"/>soft_rstn =&gt; soft_rstn, <text:s text:c="3"/>dmaad =&gt; dmaad_s,</text:p>
      <text:p text:style-name="P24"><text:s text:c="17"/>dmaword =&gt; dmaword_s);</text:p>
      <text:p text:style-name="P24"/>
      <text:p text:style-name="P24"><text:s text:c="4"/>regmux0 : regmux</text:p>
      <text:p text:style-name="P24"><text:s text:c="8"/>port map(clk =&gt; clk(3), rstn =&gt; rstn(3), addr =&gt; wraddr(3 downto 0),</text:p>
      <text:p text:style-name="P24"><text:s text:c="17"/>adi =&gt; adi, cben =&gt; cben, cfg_wrn =&gt; cfg_wrn, m_abort =&gt; m_abort,</text:p>
      <text:p text:style-name="P24"><text:s text:c="17"/>t_abort =&gt; t_abort, bist_code =&gt; bist_code, int_req =&gt; int_req,</text:p>
      <text:p text:style-name="P24"><text:s text:c="17"/>int_mask =&gt; int_mask, int_pend =&gt; int_pend, dma_en =&gt; dma_en_s,</text:p>
      <text:p text:style-name="P24"><text:s text:c="17"/>fifo_en =&gt; fifo_en_s, fifocnt =&gt; fifocnt, <text:s text:c="3"/>dmaad =&gt; dmaad_s,</text:p>
      <text:p text:style-name="P24"><text:s text:c="17"/>dmaword =&gt; dmaword_s, dmacntr =&gt; dmacntr, <text:s text:c="3"/>rdaddr =&gt; rdaddr,</text:p>
      <text:p text:style-name="P24"><text:s text:c="17"/>bist_start =&gt; bist_start, target_b2b =&gt; target_b2b_s,</text:p>
      <text:p text:style-name="P24"><text:s text:c="17"/>master_en =&gt; master_en_s, respond_en =&gt; respond_en_s,</text:p>
      <text:p text:style-name="P24"><text:s text:c="17"/>base_addr =&gt; base_addr_s, latency_pci =&gt; latency_pci,</text:p>
      <text:p text:style-name="P24"><text:s text:c="17"/>dout =&gt; dout);</text:p>
      <text:p text:style-name="P24">end rtl;</text:p>
      <text:p text:style-name="P24"/>
      <text:p text:style-name="P24">library ieee;</text:p>
      <text:p text:style-name="P24"><text:s text:c="4"/>use ieee.std_logic_1164.all;</text:p>
      <text:p text:style-name="P24"><text:s text:c="4"/>use ieee.std_logic_unsigned.all;</text:p>
      <text:p text:style-name="P24"/>
      <text:p text:style-name="P24">entity tbreg is end tbreg;</text:p>
      <text:p text:style-name="P24"/>
      <text:p text:style-name="P24">architecture beh of tbreg is</text:p>
      <text:p text:style-name="P24"><text:s text:c="4"/>component reg port(</text:p>
      <text:p text:style-name="P24"><text:soft-page-break/><text:s text:c="8"/>rstn <text:s text:c="11"/>: in std_logic_vector(3 downto 0);</text:p>
      <text:p text:style-name="P24"><text:s text:c="8"/>clk <text:s text:c="11"/>: in std_logic_vector(3 downto 0);</text:p>
      <text:p text:style-name="P24"><text:s text:c="8"/>wraddr <text:s text:c="7"/>: in std_logic_vector(5 downto 0);</text:p>
      <text:p text:style-name="P24"><text:s text:c="8"/>cben <text:s text:c="11"/>: in std_logic_vector(3 downto 0);</text:p>
      <text:p text:style-name="P24"><text:s text:c="8"/>adi <text:s text:c="11"/>: in std_logic_vector(31 downto 0);</text:p>
      <text:p text:style-name="P24"><text:s text:c="8"/>wren <text:s text:c="11"/>: in std_logic;</text:p>
      <text:p text:style-name="P24"><text:s text:c="8"/>fifo_ovf <text:s text:c="7"/>: in std_logic;</text:p>
      <text:p text:style-name="P24"><text:s text:c="8"/>dma_done <text:s text:c="7"/>: in std_logic;</text:p>
      <text:p text:style-name="P24"><text:s text:c="8"/>timer_int <text:s text:c="3"/>: in std_logic_vector(3 downto 0);</text:p>
      <text:p text:style-name="P24"><text:s text:c="8"/>intn <text:s text:c="11"/>: in std_logic_vector(3 downto 0);</text:p>
      <text:p text:style-name="P24"><text:s text:c="8"/>intan <text:s text:c="11"/>: out std_logic;</text:p>
      <text:p text:style-name="P24"><text:s text:c="8"/>dma_en <text:s text:c="7"/>: out std_logic;</text:p>
      <text:p text:style-name="P24"><text:s text:c="8"/>fifo_en <text:s text:c="7"/>: out std_logic;</text:p>
      <text:p text:style-name="P24"><text:s text:c="8"/>soft_rstn <text:s text:c="3"/>: out std_logic;</text:p>
      <text:p text:style-name="P24"><text:s text:c="8"/>dmaad <text:s text:c="11"/>: out std_logic_vector(31 downto 2);</text:p>
      <text:p text:style-name="P24"><text:s text:c="8"/>dmaword <text:s text:c="7"/>: out std_logic_vector(31 downto 0);</text:p>
      <text:p text:style-name="P24"><text:s text:c="8"/>cfg_wrn <text:s text:c="7"/>: in std_logic;</text:p>
      <text:p text:style-name="P24"><text:s text:c="8"/>m_abort <text:s text:c="7"/>: in std_logic;</text:p>
      <text:p text:style-name="P24"><text:s text:c="8"/>t_abort <text:s text:c="7"/>: in std_logic;</text:p>
      <text:p text:style-name="P24"><text:s text:c="8"/>bist_code <text:s text:c="3"/>: in std_logic_vector(4 downto 0);</text:p>
      <text:p text:style-name="P24"><text:s text:c="8"/>fifocnt <text:s text:c="7"/>: in std_logic_vector(5 downto 0);</text:p>
      <text:p text:style-name="P24"><text:s text:c="8"/>dmacntr <text:s text:c="7"/>: in std_logic_vector(31 downto 0);</text:p>
      <text:p text:style-name="P24"><text:s text:c="8"/>rdaddr <text:s text:c="7"/>: in std_logic_vector(5 downto 0);</text:p>
      <text:p text:style-name="P24"><text:s text:c="8"/>bist_start <text:s text:c="3"/>: out std_logic;</text:p>
      <text:p text:style-name="P24"><text:s text:c="8"/>target_b2b <text:s text:c="3"/>: out std_logic; <text:s text:c="4"/></text:p>
      <text:p text:style-name="P24"><text:s text:c="8"/>master_en <text:s text:c="3"/>: out std_logic;</text:p>
      <text:p text:style-name="P24"><text:s text:c="8"/>respond_en <text:s text:c="3"/>: out std_logic;</text:p>
      <text:p text:style-name="P24"><text:s text:c="8"/>base_addr <text:s text:c="3"/>: out std_logic_vector(11 downto 0); <text:s text:c="3"/></text:p>
      <text:p text:style-name="P24"><text:s text:c="8"/>latency_pci <text:s text:c="3"/>: out std_logic_vector(4 downto 0);</text:p>
      <text:p text:style-name="P24"><text:s text:c="8"/>dout <text:s text:c="11"/>: out std_logic_vector(31 downto 0));</text:p>
      <text:p text:style-name="P24">end component;</text:p>
      <text:p text:style-name="P24"/>
      <text:p text:style-name="P24">constant period : time := 50 ns;</text:p>
      <text:p text:style-name="P24">constant delay <text:s/>: time := 80 ns;</text:p>
      <text:p text:style-name="P24"/>
      <text:p text:style-name="P24">signal rstn, clk : std_logic;</text:p>
      <text:p text:style-name="P24">signal wren, fifo_ovf, dma_done, intan : std_logic;</text:p>
      <text:p text:style-name="P24">signal dma_en, fifo_en, soft_rstn : std_logic;</text:p>
      <text:p text:style-name="P24">signal cfg_wrn, m_abort, t_abort : std_logic;</text:p>
      <text:p text:style-name="P24">signal bist_start, target_b2b, master_en, respond_en : std_logic;</text:p>
      <text:p text:style-name="P24">signal cben, timer_int, intn, rstns, clks : std_logic_vector(3 downto 0);</text:p>
      <text:p text:style-name="P24">signal dmaword, adi, dmacntr, dout : std_logic_vector(31 downto 0);</text:p>
      <text:p text:style-name="P24">signal bist_code, <text:s text:c="3"/>latency_pci <text:s text:c="3"/>: std_logic_vector(4 downto 0);</text:p>
      <text:p text:style-name="P24">signal fifocnt, wraddr, rdaddr : std_logic_vector(5 downto 0);</text:p>
      <text:p text:style-name="P24">signal base_addr : std_logic_vector(11 downto 0); <text:s text:c="3"/></text:p>
      <text:p text:style-name="P24">signal dmaad : std_logic_vector(31 downto 2);</text:p>
      <text:p text:style-name="P24">begin</text:p>
      <text:p text:style-name="P24"><text:s text:c="4"/>rstn &lt;= '0', '1' after 10 *period;</text:p>
      <text:p text:style-name="P24"><text:s text:c="4"/>clkgen : process</text:p>
      <text:p text:style-name="P24"><text:s text:c="4"/>begin</text:p>
      <text:p text:style-name="P24"><text:soft-page-break/><text:s text:c="8"/>clk &lt;= '0'; wait for period;</text:p>
      <text:p text:style-name="P24"><text:s text:c="8"/>clk &lt;= '1'; wait for period;</text:p>
      <text:p text:style-name="P24"><text:s text:c="4"/>end process;</text:p>
      <text:p text:style-name="P24"/>
      <text:p text:style-name="P24"><text:s text:c="4"/>clks &lt;= clk &amp; clk &amp; clk &amp; clk;</text:p>
      <text:p text:style-name="P24"><text:s text:c="4"/>rstns &lt;= rstn &amp; rstn &amp; rstn &amp; rstn;</text:p>
      <text:p text:style-name="P24"/>
      <text:p text:style-name="P24"><text:s text:c="4"/>adgen : process</text:p>
      <text:p text:style-name="P24"><text:s text:c="8"/>variable d6 : std_logic_vector(5 downto 0) := "000000";</text:p>
      <text:p text:style-name="P24"><text:s text:c="4"/>begin</text:p>
      <text:p text:style-name="P24"><text:s text:c="8"/>d6 := d6 +1;</text:p>
      <text:p text:style-name="P24"><text:s text:c="8"/>rdaddr &lt;= d6 after period;</text:p>
      <text:p text:style-name="P24"><text:s text:c="8"/>wraddr &lt;= d6 after period;</text:p>
      <text:p text:style-name="P24"/>
      <text:p text:style-name="P24"><text:s text:c="8"/>wait until rising_edge(clk);</text:p>
      <text:p text:style-name="P24"><text:s text:c="4"/>end process;</text:p>
      <text:p text:style-name="P24"/>
      <text:p text:style-name="P24"><text:s text:c="4"/>dgen : process</text:p>
      <text:p text:style-name="P24"><text:s text:c="8"/>variable d32 : std_logic_vector(31 downto 0) := (others =&gt; '0');</text:p>
      <text:p text:style-name="P24"><text:s text:c="4"/>begin</text:p>
      <text:p text:style-name="P24"><text:s text:c="8"/>bist_code &lt;= d32(31 downto 27) after delay;</text:p>
      <text:p text:style-name="P24"><text:s text:c="8"/>for i in 0 to 31 loop</text:p>
      <text:p text:style-name="P24"><text:s text:c="12"/>d32 <text:s text:c="8"/>:= d32(30 downto 0) &amp; (not d32(31) xor d32(2));</text:p>
      <text:p text:style-name="P24"><text:s text:c="12"/>dmacntr <text:s text:c="4"/>&lt;= d32(20 downto 1) &amp; d32(11 downto 0) after 1 ns; <text:s text:c="11"/></text:p>
      <text:p text:style-name="P24"><text:s text:c="12"/>adi <text:s text:c="8"/>&lt;= d32 after delay;</text:p>
      <text:p text:style-name="P24"><text:s text:c="12"/>cben <text:s text:c="8"/>&lt;= d32(27 downto 24) after delay;</text:p>
      <text:p text:style-name="P24"><text:s text:c="12"/>fifocnt <text:s text:c="4"/>&lt;= d32(17 downto 12) after 1 ns;</text:p>
      <text:p text:style-name="P24"><text:s text:c="12"/>intn <text:s text:c="8"/>&lt;= d32(19 downto 16) after delay;</text:p>
      <text:p text:style-name="P24"><text:s text:c="12"/>cfg_wrn <text:s text:c="4"/>&lt;= d32(12) after delay;</text:p>
      <text:p text:style-name="P24"><text:s text:c="12"/>wren <text:s text:c="8"/>&lt;=d32(13) or d32(12) after delay;</text:p>
      <text:p text:style-name="P24"><text:s text:c="12"/>m_abort <text:s text:c="4"/>&lt;= d32(11) after delay;</text:p>
      <text:p text:style-name="P24"><text:s text:c="12"/>t_abort <text:s text:c="4"/>&lt;= d32(12) after delay;</text:p>
      <text:p text:style-name="P24"><text:s text:c="12"/>dma_done &lt;= d32(9) after delay;</text:p>
      <text:p text:style-name="P24"><text:s text:c="12"/>fifo_ovf &lt;= d32(10) after delay;</text:p>
      <text:p text:style-name="P24"><text:s text:c="12"/>wait until rising_edge(clk);</text:p>
      <text:p text:style-name="P24"><text:s text:c="8"/>end loop;</text:p>
      <text:p text:style-name="P24"><text:s text:c="4"/>end process;</text:p>
      <text:p text:style-name="P24"/>
      <text:p text:style-name="P24"><text:s text:c="4"/>reg0 : reg </text:p>
      <text:p text:style-name="P24"><text:s text:c="8"/>port map(rstn =&gt; rstns, clk =&gt; clks, wraddr =&gt; wraddr, cben =&gt; cben,</text:p>
      <text:p text:style-name="P24"><text:s text:c="17"/>adi =&gt; adi, wren =&gt; wren, fifo_ovf =&gt; fifo_ovf,</text:p>
      <text:p text:style-name="P24"><text:s text:c="17"/>dma_done =&gt; dma_done, timer_int =&gt; timer_int,</text:p>
      <text:p text:style-name="P24"><text:s text:c="17"/>intn =&gt; intn, intan =&gt; intan, dma_en =&gt; dma_en,</text:p>
      <text:p text:style-name="P24"><text:s text:c="17"/>fifo_en =&gt; fifo_en, soft_rstn =&gt; soft_rstn,</text:p>
      <text:p text:style-name="P24"><text:s text:c="17"/>dmaad =&gt; dmaad, dmaword =&gt; dmaword, cfg_wrn =&gt; cfg_wrn,</text:p>
      <text:p text:style-name="P24"><text:s text:c="17"/>m_abort =&gt; m_abort, t_abort =&gt; t_abort, bist_code =&gt; bist_code,</text:p>
      <text:p text:style-name="P24"><text:s text:c="17"/>fifocnt =&gt; fifocnt, dmacntr =&gt; dmacntr, rdaddr =&gt; rdaddr,</text:p>
      <text:p text:style-name="P24"><text:s text:c="17"/>bist_start =&gt; bist_start, target_b2b =&gt; target_b2b,</text:p>
      <text:p text:style-name="P24"><text:s text:c="17"/>master_en =&gt; master_en, respond_en =&gt; respond_en,</text:p>
      <text:p text:style-name="P24"><text:s text:c="17"/>base_addr =&gt; base_addr, latency_pci =&gt; latency_pci, dout =&gt; dout);</text:p>
      <text:p text:style-name="P24"><text:soft-page-break/>end beh;</text:p>
      <text:p text:style-name="P24"/>
      <text:p text:style-name="P24">configuration cfg_tbreg of tbreg is</text:p>
      <text:p text:style-name="P24"><text:s text:c="4"/>for beh end for;</text:p>
      <text:p text:style-name="P24">end configuration;</text:p>
      <text:p text:style-name="P24"/>
      <text:p text:style-name="P24"/>
      <text:p text:style-name="P24"/>
      <text:p text:style-name="P24">library ieee;</text:p>
      <text:p text:style-name="P24"><text:s text:c="4"/>use ieee.std_logic_1164.all;</text:p>
      <text:p text:style-name="P24"/>
      <text:p text:style-name="P24">entity itreg is port(</text:p>
      <text:p text:style-name="P24"><text:s text:c="4"/>rstn, clk : in std_logic;</text:p>
      <text:p text:style-name="P24"><text:s text:c="4"/>addr : in std_logic_vector(5 downto 0); -- 6 bit address input</text:p>
      <text:p text:style-name="P24"><text:s text:c="4"/>cben : in std_logic_vector(3 downto 0); -- command byte enable 4 bit active low. each bit controlls a byte lane</text:p>
      <text:p text:style-name="P24"><text:s text:c="4"/>adi <text:s/>: in std_logic_vector(31 downto 0); -- data to be written to registers</text:p>
      <text:p text:style-name="P24"><text:s text:c="4"/>wren : in std_logic;</text:p>
      <text:p text:style-name="P24"><text:s text:c="4"/>fifo_ovf : in std_logic; <text:s text:c="3"/>--indictes overflow</text:p>
      <text:p text:style-name="P24"><text:s text:c="4"/>dma_done : in std_logic; <text:s text:c="3"/>--indictes dma is done</text:p>
      <text:p text:style-name="P24"><text:s text:c="4"/>timer_int : in std_logic_vector(3 downto 0); <text:s text:c="3"/>--indictes timers are time out</text:p>
      <text:p text:style-name="P24"><text:s text:c="4"/>intn : in std_logic_vector(3 downto 0);</text:p>
      <text:p text:style-name="P24"><text:s text:c="4"/>intan : out std_logic; --active low indicated when interrupt is generated</text:p>
      <text:p text:style-name="P24"><text:s text:c="4"/>int_req : out std_logic_vector(9 downto 0); <text:s text:c="3"/>-- interrupt registers</text:p>
      <text:p text:style-name="P24"><text:s text:c="4"/>int_mask : out std_logic_vector(9 downto 0); <text:s text:c="3"/>-- interrupt registers</text:p>
      <text:p text:style-name="P24"><text:s text:c="4"/>int_pend : out std_logic_vector(9 downto 0));-- interrupt registers</text:p>
      <text:p text:style-name="P24">end itreg;</text:p>
      <text:p text:style-name="P24"/>
      <text:p text:style-name="P24"/>
      <text:p text:style-name="P24">architecture rtl of itreg is</text:p>
      <text:p text:style-name="P24"><text:s text:c="4"/>signal req, maskff, pendff : std_logic_vector(9 downto 0);</text:p>
      <text:p text:style-name="P24">begin</text:p>
      <text:p text:style-name="P24"><text:s text:c="4"/>fegn : process(rstn, clk)</text:p>
      <text:p text:style-name="P24"><text:s text:c="8"/>variable int_or : std_logic;</text:p>
      <text:p text:style-name="P24">begin</text:p>
      <text:p text:style-name="P24"><text:s text:c="4"/>if rstn = '0' then</text:p>
      <text:p text:style-name="P24"><text:s text:c="8"/>maskff &lt;= (others =&gt; '0'); --interrupt mask register</text:p>
      <text:p text:style-name="P24"><text:s text:c="8"/>pendff &lt;= (others =&gt; '0'); <text:s text:c="3"/>--interrupt pending register</text:p>
      <text:p text:style-name="P24"><text:s text:c="8"/>intan &lt;= '1';</text:p>
      <text:p text:style-name="P24"><text:s text:c="4"/>elsif rising_edge(clk) then</text:p>
      <text:p text:style-name="P24"><text:s text:c="8"/>--interrupt mask register</text:p>
      <text:p text:style-name="P24"><text:s text:c="8"/>if wren = '1' and addr = "000000" and cben(0) = '0' then</text:p>
      <text:p text:style-name="P24"><text:s text:c="12"/>maskff(7 downto 0) &lt;= adi(7 downto 0);</text:p>
      <text:p text:style-name="P24"><text:s text:c="12"/>--int mask reg is used to ena/dis any one of the interrupt sources</text:p>
      <text:p text:style-name="P24"><text:s text:c="8"/>end if;</text:p>
      <text:p text:style-name="P24"><text:s text:c="8"/>--interrupt mask register</text:p>
      <text:p text:style-name="P24"><text:s text:c="8"/>if wren = '1' and addr = "000000" and cben(1) = '0' then</text:p>
      <text:p text:style-name="P24"><text:s text:c="12"/>maskff(9 downto 8) &lt;= adi(9 downto 8);</text:p>
      <text:p text:style-name="P24"><text:s text:c="8"/>end if;</text:p>
      <text:p text:style-name="P24"><text:s text:c="8"/>-- interrupt request register</text:p>
      <text:p text:style-name="P24"><text:s text:c="8"/>if wren = '1' and addr = "000010" and cben(0) = '0' then</text:p>
      <text:p text:style-name="P24"><text:soft-page-break/><text:s text:c="12"/>--clears all int pend reg when int req reg is written</text:p>
      <text:p text:style-name="P24"><text:s text:c="12"/>pendff(7 downto 0) &lt;= "00000000";</text:p>
      <text:p text:style-name="P24"><text:s text:c="12"/>--interrupt pending register</text:p>
      <text:p text:style-name="P24"><text:s text:c="8"/>elsif wren = '1' and addr = "000001" and cben(0) = '0' then</text:p>
      <text:p text:style-name="P24"><text:s text:c="12"/>-- each individual interrupt pending bit can be cleared by writing '1';</text:p>
      <text:p text:style-name="P24"><text:s text:c="12"/>--int pend reg remembers interrupt sources that are in queue</text:p>
      <text:p text:style-name="P24"><text:s text:c="12"/>for j in 0 to 7 loop</text:p>
      <text:p text:style-name="P24"><text:s text:c="16"/>if adi(j) = '1' then</text:p>
      <text:p text:style-name="P24"><text:s text:c="20"/>pendff(j) &lt;= '0';</text:p>
      <text:p text:style-name="P24"><text:s text:c="16"/>end if;</text:p>
      <text:p text:style-name="P24"><text:s text:c="12"/>end loop;</text:p>
      <text:p text:style-name="P24"><text:s text:c="8"/>else</text:p>
      <text:p text:style-name="P24"><text:s text:c="12"/>pendff(7 downto 0) &lt;= (timer_int &amp; (not intn)) or pendff(7 downto 0);</text:p>
      <text:p text:style-name="P24"><text:s text:c="12"/>-- if neither req / pend reg are written, pend reg remembers states and </text:p>
      <text:p text:style-name="P24"><text:s text:c="12"/>-- records incomming interrupts.</text:p>
      <text:p text:style-name="P24"><text:s text:c="8"/>end if;</text:p>
      <text:p text:style-name="P24"/>
      <text:p text:style-name="P24"><text:s text:c="8"/>if wren = '1' and addr = "000010" and cben(1) = '0' then</text:p>
      <text:p text:style-name="P24"><text:s text:c="12"/>pendff(9 downto 8) &lt;= "00";</text:p>
      <text:p text:style-name="P24"><text:s text:c="8"/>elsif wren = '1' and addr = "000001" and cben (1) = '0' then</text:p>
      <text:p text:style-name="P24"><text:s text:c="12"/>for j in 8 to 9 loop</text:p>
      <text:p text:style-name="P24"><text:s text:c="16"/>if adi(j) = '1' then</text:p>
      <text:p text:style-name="P24"><text:s text:c="20"/>pendff(j) &lt;= '0';</text:p>
      <text:p text:style-name="P24"><text:s text:c="16"/>end if;</text:p>
      <text:p text:style-name="P24"><text:s text:c="12"/>end loop;</text:p>
      <text:p text:style-name="P24"><text:s text:c="8"/>else</text:p>
      <text:p text:style-name="P24"><text:s text:c="12"/>pendff(9 downto 8) &lt;= (fifo_ovf &amp; dma_done) or pendff(9 downto 8);</text:p>
      <text:p text:style-name="P24"><text:s text:c="8"/>end if;</text:p>
      <text:p text:style-name="P24"><text:s text:c="8"/>int_or := req(0);</text:p>
      <text:p text:style-name="P24"><text:s text:c="8"/>for i in 1 to req'length -1 loop</text:p>
      <text:p text:style-name="P24"><text:s text:c="12"/>int_or := int_or or req(i);</text:p>
      <text:p text:style-name="P24"><text:s text:c="8"/>end loop;</text:p>
      <text:p text:style-name="P24"><text:s text:c="8"/>intan &lt;= not int_or;</text:p>
      <text:p text:style-name="P24"><text:s text:c="4"/>end if;</text:p>
      <text:p text:style-name="P24">end process;</text:p>
      <text:p text:style-name="P24">int_mask &lt;= maskff;</text:p>
      <text:p text:style-name="P24">int_pend &lt;= pendff; <text:s text:c="3"/></text:p>
      <text:p text:style-name="P24">req <text:s text:c="7"/>&lt;= pendff and maskff;</text:p>
      <text:p text:style-name="P24">-- req reg is logic and of mask and pending regs. </text:p>
      <text:p text:style-name="P24">int_req <text:s text:c="3"/>&lt;= req;</text:p>
      <text:p text:style-name="P24">end rtl;</text:p>
      <text:p text:style-name="P24"/>
      <text:p text:style-name="P24">-- the dma controller will start to transfer the data to the starting address. the </text:p>
      <text:p text:style-name="P24">-- address is automatically incremented to transfer the next data until all the </text:p>
      <text:p text:style-name="P24">-- words are transfered. </text:p>
      <text:p text:style-name="P24"/>
      <text:p text:style-name="P24">library ieee;</text:p>
      <text:p text:style-name="P24"><text:s text:c="4"/>use ieee.std_logic_1164.all;</text:p>
      <text:p text:style-name="P24"/>
      <text:p text:style-name="P24">entity spreg is port(</text:p>
      <text:p text:style-name="P24"><text:soft-page-break/><text:s text:c="4"/>rstn0, rstn1, clk0, clk1 : in std_logic;</text:p>
      <text:p text:style-name="P24"><text:s text:c="4"/>addr <text:s text:c="12"/>: in std_logic_vector(5 downto 0);</text:p>
      <text:p text:style-name="P24"><text:s text:c="4"/>cben <text:s text:c="12"/>: in std_logic_vector(3 downto 0); -- command byte enable 4 bit active low. each bit controlls a byte lane</text:p>
      <text:p text:style-name="P24"><text:s text:c="4"/>adi <text:s text:c="12"/>: in std_logic_vector(31 downto 0); -- data/control to be written to registers</text:p>
      <text:p text:style-name="P24"><text:s text:c="4"/>wren <text:s text:c="12"/>: in std_logic;</text:p>
      <text:p text:style-name="P24"><text:s text:c="4"/>dma_done <text:s text:c="4"/>: in std_logic; --indictes dma is done</text:p>
      <text:p text:style-name="P24"><text:s text:c="4"/>dma_en <text:s text:c="8"/>: out std_logic; -- control wheter the dma or fifo are enabled</text:p>
      <text:p text:style-name="P24"><text:s text:c="4"/>fifo_en <text:s text:c="8"/>: out std_logic; --dma control register bit 1</text:p>
      <text:p text:style-name="P24"><text:s text:c="4"/>soft_rstn <text:s text:c="4"/>: out std_logic; --dma control register bit 0</text:p>
      <text:p text:style-name="P24"><text:s text:c="4"/>dmaad <text:s text:c="8"/>: out std_logic_vector(31 downto 2); -- starting address register for data trasnfer</text:p>
      <text:p text:style-name="P24"><text:s text:c="4"/>dmaword <text:s text:c="8"/>: out std_logic_vector(31 downto 0)); -- number of words to transfer</text:p>
      <text:p text:style-name="P24">end spreg;</text:p>
      <text:p text:style-name="P24"/>
      <text:p text:style-name="P24">architecture rtl of spreg is</text:p>
      <text:p text:style-name="P24">begin</text:p>
      <text:p text:style-name="P24"><text:s text:c="4"/>fgen : process(rstn0, clk0)</text:p>
      <text:p text:style-name="P24"><text:s text:c="4"/>begin</text:p>
      <text:p text:style-name="P24"><text:s text:c="8"/>if rstn0 = '0' then</text:p>
      <text:p text:style-name="P24"><text:s text:c="12"/>soft_rstn &lt;= '1';</text:p>
      <text:p text:style-name="P24"><text:s text:c="12"/>dma_en &lt;= '0';</text:p>
      <text:p text:style-name="P24"><text:s text:c="12"/>fifo_en &lt;= '0';</text:p>
      <text:p text:style-name="P24"><text:s text:c="8"/>elsif rising_edge(clk0) then</text:p>
      <text:p text:style-name="P24"><text:s text:c="12"/>soft_rstn &lt;= '1';</text:p>
      <text:p text:style-name="P24"><text:s text:c="12"/>-- dma control</text:p>
      <text:p text:style-name="P24"><text:s text:c="12"/>if wren = '1' and addr = "010000" and cben(0) = '0' then</text:p>
      <text:p text:style-name="P24"><text:s text:c="16"/>dma_en &lt;= adi(2);</text:p>
      <text:p text:style-name="P24"><text:s text:c="16"/>fifo_en &lt;= adi(1);</text:p>
      <text:p text:style-name="P24"><text:s text:c="16"/>soft_rstn &lt;= not adi(0);</text:p>
      <text:p text:style-name="P24"><text:s text:c="12"/>elsif dma_done = '1' then</text:p>
      <text:p text:style-name="P24"><text:s text:c="16"/>dma_en &lt;= '0';</text:p>
      <text:p text:style-name="P24"><text:s text:c="12"/>end if;</text:p>
      <text:p text:style-name="P24"><text:s text:c="8"/>end if;</text:p>
      <text:p text:style-name="P24"><text:s text:c="4"/>end process;</text:p>
      <text:p text:style-name="P24"/>
      <text:p text:style-name="P24"><text:s text:c="4"/>dmasgen : process(rstn0, clk0)</text:p>
      <text:p text:style-name="P24"><text:s text:c="4"/>begin</text:p>
      <text:p text:style-name="P24"><text:s text:c="8"/>if rstn0 = '0' then</text:p>
      <text:p text:style-name="P24"><text:s text:c="12"/>dmaad &lt;= (others =&gt; '0');</text:p>
      <text:p text:style-name="P24"><text:s text:c="8"/>elsif rising_edge(clk0) then</text:p>
      <text:p text:style-name="P24"><text:s text:c="12"/>-- dma address</text:p>
      <text:p text:style-name="P24"><text:s text:c="12"/>if wren = '1' and addr = "010001" then</text:p>
      <text:p text:style-name="P24"><text:s text:c="16"/>for j in 1 to 3 loop</text:p>
      <text:p text:style-name="P24"><text:s text:c="20"/>if cben(j) = '0' then</text:p>
      <text:p text:style-name="P24"><text:s text:c="24"/>dmaad((j +1) *8 -1 downto j *8) &lt;= adi((j +1) *8 -1 downto j *8);</text:p>
      <text:p text:style-name="P24"><text:s text:c="20"/>end if;</text:p>
      <text:p text:style-name="P24"><text:s text:c="20"/>if cben(0) = '0' then</text:p>
      <text:p text:style-name="P24"><text:s text:c="24"/>dmaad(7 downto 2) &lt;= adi(7 downto 2);</text:p>
      <text:p text:style-name="P24"><text:s text:c="20"/>end if;</text:p>
      <text:p text:style-name="P24"><text:s text:c="16"/>end loop;</text:p>
      <text:p text:style-name="P24"><text:s text:c="12"/>end if;</text:p>
      <text:p text:style-name="P24"><text:soft-page-break/><text:s text:c="8"/>end if;</text:p>
      <text:p text:style-name="P24"><text:s text:c="4"/>end process;</text:p>
      <text:p text:style-name="P24"/>
      <text:p text:style-name="P24"><text:s text:c="4"/>dmacntgen : process(rstn1, clk1)</text:p>
      <text:p text:style-name="P24"><text:s text:c="4"/>begin</text:p>
      <text:p text:style-name="P24"><text:s text:c="8"/>if rstn1 = '0' then</text:p>
      <text:p text:style-name="P24"><text:s text:c="12"/>dmaword &lt;= (others =&gt; '0');</text:p>
      <text:p text:style-name="P24"><text:s text:c="8"/>elsif rising_edge(clk1) then</text:p>
      <text:p text:style-name="P24"><text:s text:c="12"/>-- dma word -&gt; for dma to know how many words to transfer before dma_done is asserted. </text:p>
      <text:p text:style-name="P24"><text:s text:c="12"/>if wren = '1' and addr = "010010" then</text:p>
      <text:p text:style-name="P24"><text:s text:c="16"/>for j in 0 to 3 loop</text:p>
      <text:p text:style-name="P24"><text:s text:c="20"/>if cben(j) = '0' then</text:p>
      <text:p text:style-name="P24"><text:s text:c="24"/>dmaword((j +1) *8 -1 downto j *8) &lt;= adi((j +1) *8 -1 downto j *8);</text:p>
      <text:p text:style-name="P24"><text:s text:c="20"/>end if;</text:p>
      <text:p text:style-name="P24"><text:s text:c="16"/>end loop;</text:p>
      <text:p text:style-name="P24"><text:s text:c="12"/>end if;</text:p>
      <text:p text:style-name="P24"><text:s text:c="8"/>end if;</text:p>
      <text:p text:style-name="P24"><text:s text:c="4"/>end process;</text:p>
      <text:p text:style-name="P24">end rtl;</text:p>
      <text:p text:style-name="P24"/>
      <text:p text:style-name="P24">library ieee;</text:p>
      <text:p text:style-name="P24"><text:s text:c="4"/>use ieee.std_logic_1164.all;</text:p>
      <text:p text:style-name="P24"/>
      <text:p text:style-name="P24">entity regmux is port(</text:p>
      <text:p text:style-name="P24"><text:s text:c="4"/>clk <text:s text:c="12"/>: in std_logic;</text:p>
      <text:p text:style-name="P24"><text:s text:c="4"/>rstn <text:s text:c="11"/>: in std_logic;</text:p>
      <text:p text:style-name="P24"><text:s text:c="4"/>addr <text:s text:c="11"/>: in std_logic_vector(3 downto 0);</text:p>
      <text:p text:style-name="P24"><text:s text:c="4"/>adi <text:s text:c="11"/>: in std_logic_vector(31 downto 0);</text:p>
      <text:p text:style-name="P24"><text:s text:c="4"/>cben <text:s text:c="11"/>: in std_logic_vector(3 downto 0);</text:p>
      <text:p text:style-name="P24"><text:s text:c="4"/>cfg_wrn <text:s text:c="7"/>: in std_logic;</text:p>
      <text:p text:style-name="P24"><text:s text:c="4"/>m_abort <text:s text:c="7"/>: in std_logic; -- pci protocol</text:p>
      <text:p text:style-name="P24"><text:s text:c="4"/>t_abort <text:s text:c="7"/>: in std_logic; -- pci protocol</text:p>
      <text:p text:style-name="P24"><text:s text:c="4"/>bist_code <text:s text:c="3"/>: in std_logic_vector(4 downto 0);</text:p>
      <text:p text:style-name="P24"><text:s text:c="4"/>int_req <text:s text:c="7"/>: in std_logic_vector(9 downto 0);</text:p>
      <text:p text:style-name="P24"><text:s text:c="4"/>int_mask <text:s text:c="7"/>: in std_logic_vector(9 downto 0);</text:p>
      <text:p text:style-name="P24"><text:s text:c="4"/>int_pend <text:s text:c="7"/>: in std_logic_vector(9 downto 0);</text:p>
      <text:p text:style-name="P24"><text:s text:c="4"/>dma_en <text:s text:c="7"/>: in std_logic;</text:p>
      <text:p text:style-name="P24"><text:s text:c="4"/>fifo_en <text:s text:c="7"/>: in std_logic;</text:p>
      <text:p text:style-name="P24"><text:s text:c="4"/>fifocnt <text:s text:c="7"/>: in std_logic_vector(5 downto 0);</text:p>
      <text:p text:style-name="P24"><text:s text:c="4"/>dmaad <text:s text:c="11"/>: in std_logic_vector(31 downto 2);</text:p>
      <text:p text:style-name="P24"><text:s text:c="4"/>dmaword <text:s text:c="7"/>: in std_logic_vector(31 downto 0);</text:p>
      <text:p text:style-name="P24"><text:s text:c="4"/>dmacntr <text:s text:c="7"/>: in std_logic_vector(31 downto 0);</text:p>
      <text:p text:style-name="P24"><text:s text:c="4"/>rdaddr <text:s text:c="7"/>: in std_logic_vector(5 downto 0);</text:p>
      <text:p text:style-name="P24"><text:s text:c="4"/>bist_start <text:s text:c="3"/>: out std_logic; -- start build in self test circuit</text:p>
      <text:p text:style-name="P24"><text:s text:c="4"/>target_b2b <text:s text:c="3"/>: out std_logic;</text:p>
      <text:p text:style-name="P24"><text:s text:c="4"/>master_en <text:s text:c="3"/>: out std_logic; <text:s text:c="3"/></text:p>
      <text:p text:style-name="P24"><text:s text:c="4"/>respond_en <text:s text:c="3"/>: out std_logic;</text:p>
      <text:p text:style-name="P24"><text:s text:c="4"/>base_addr <text:s text:c="3"/>: out std_logic_vector(11 downto 0);</text:p>
      <text:p text:style-name="P24"><text:s text:c="4"/>latency_pci <text:s text:c="3"/>: out std_logic_vector(4 downto 0);</text:p>
      <text:p text:style-name="P24"><text:s text:c="4"/>dout <text:s text:c="11"/>: out std_logic_vector(31 downto 0));</text:p>
      <text:p text:style-name="P24"><text:soft-page-break/>end regmux;</text:p>
      <text:p text:style-name="P24"/>
      <text:p text:style-name="P24">architecture rtl of regmux is</text:p>
      <text:p text:style-name="P24"><text:s text:c="4"/>constant asic_id : std_logic_vector(15 downto 0) := "0101010100100100";</text:p>
      <text:p text:style-name="P24"><text:s text:c="4"/>constant comp_id : std_logic_vector(15 downto 0) := "0001010101011100";</text:p>
      <text:p text:style-name="P24"><text:s text:c="4"/>constant class_code : std_logic_vector(23 downto 0) := "111111110000000000000000";</text:p>
      <text:p text:style-name="P24"><text:s text:c="4"/>constant revision : std_logic_vector(7 downto 0) := "00000010";</text:p>
      <text:p text:style-name="P24"><text:s text:c="4"/>constant basereg19_0 : std_logic_vector(19 downto 0) := "00000000000000000000";</text:p>
      <text:p text:style-name="P24"><text:s text:c="4"/>constant int_pin : std_logic_vector(7 downto 0) := "00000001";</text:p>
      <text:p text:style-name="P24"/>
      <text:p text:style-name="P24"><text:s text:c="4"/>signal devid_reg <text:s text:c="7"/>: std_logic_vector(31 downto 0);</text:p>
      <text:p text:style-name="P24"><text:s text:c="4"/>signal devctl_reg <text:s text:c="7"/>: std_logic_vector(31 downto 0);</text:p>
      <text:p text:style-name="P24"><text:s text:c="4"/>signal revid_reg <text:s text:c="7"/>: std_logic_vector(31 downto 0);</text:p>
      <text:p text:style-name="P24"><text:s text:c="4"/>signal latency_reg <text:s text:c="3"/>: std_logic_vector(31 downto 0);</text:p>
      <text:p text:style-name="P24"><text:s text:c="4"/>signal base_reg <text:s text:c="7"/>: std_logic_vector(31 downto 0);</text:p>
      <text:p text:style-name="P24"><text:s text:c="4"/>signal basereg31_20 <text:s text:c="3"/>: std_logic_vector(11 downto 0);</text:p>
      <text:p text:style-name="P24"><text:s text:c="4"/>signal int_pin_reg <text:s text:c="3"/>: std_logic_vector(31 downto 0);</text:p>
      <text:p text:style-name="P24"><text:s text:c="4"/>signal mabort_ff <text:s text:c="7"/>: std_logic;</text:p>
      <text:p text:style-name="P24"><text:s text:c="4"/>signal tabort_ff <text:s text:c="7"/>: std_logic;</text:p>
      <text:p text:style-name="P24"><text:s text:c="4"/>signal target_b2b_ff <text:s text:c="3"/>: std_logic;</text:p>
      <text:p text:style-name="P24"><text:s text:c="4"/>signal master_en_ff <text:s text:c="3"/>: std_logic;</text:p>
      <text:p text:style-name="P24"><text:s text:c="4"/>signal respond_en_ff <text:s text:c="3"/>: std_logic;</text:p>
      <text:p text:style-name="P24"><text:s text:c="4"/>signal latency_ff <text:s text:c="7"/>: std_logic_vector(4 downto 0);</text:p>
      <text:p text:style-name="P24"><text:s text:c="4"/>signal int_line_ff <text:s text:c="3"/>: std_logic_vector(7 downto 0);</text:p>
      <text:p text:style-name="P24"><text:s text:c="4"/>signal bist_code_ff <text:s text:c="3"/>: std_logic_vector(3 downto 0);</text:p>
      <text:p text:style-name="P24"><text:s text:c="4"/>signal bist_start_ff, bist_start_dl <text:s text:c="3"/>: std_logic;</text:p>
      <text:p text:style-name="P24"><text:s text:c="4"/>signal ad3_0 <text:s text:c="11"/>: std_logic_vector(3 downto 0);</text:p>
      <text:p text:style-name="P24"><text:s text:c="4"/>signal ad1_0, ad5_4 <text:s text:c="3"/>: std_logic_vector(1 downto 0);</text:p>
      <text:p text:style-name="P24"><text:s text:c="4"/>signal itout, mask_reg, pend_reg, req_reg, dmaout, </text:p>
      <text:p text:style-name="P24"><text:s text:c="4"/>dmaad_reg, cfgout, dmactl_reg : std_logic_vector(31 downto 0);</text:p>
      <text:p text:style-name="P24"/>
      <text:p text:style-name="P24">begin</text:p>
      <text:p text:style-name="P24"><text:s text:c="4"/>target_b2b <text:s text:c="4"/>&lt;= target_b2b_ff;</text:p>
      <text:p text:style-name="P24"><text:s text:c="4"/>master_en <text:s text:c="4"/>&lt;= master_en_ff;</text:p>
      <text:p text:style-name="P24"><text:s text:c="4"/>respond_en <text:s text:c="3"/>&lt;= respond_en_ff;</text:p>
      <text:p text:style-name="P24"><text:s text:c="4"/>devid_reg <text:s text:c="4"/>&lt;= asic_id &amp; comp_id;</text:p>
      <text:p text:style-name="P24"><text:s text:c="4"/>revid_reg <text:s text:c="4"/>&lt;= class_code &amp; revision;</text:p>
      <text:p text:style-name="P24"><text:s text:c="4"/>base_addr <text:s text:c="4"/>&lt;= basereg31_20;</text:p>
      <text:p text:style-name="P24"><text:s text:c="4"/>latency_pci &lt;= latency_ff;</text:p>
      <text:p text:style-name="P24"><text:s text:c="4"/>devctl_gen : process(rstn, clk)</text:p>
      <text:p text:style-name="P24"><text:s text:c="4"/>begin</text:p>
      <text:p text:style-name="P24"><text:s text:c="8"/>if rstn = '0' then</text:p>
      <text:p text:style-name="P24"><text:s text:c="12"/>mabort_ff &lt;= '0';</text:p>
      <text:p text:style-name="P24"><text:s text:c="12"/>tabort_ff &lt;= '0';</text:p>
      <text:p text:style-name="P24"><text:s text:c="12"/>target_b2b_ff &lt;= '0'; -- default no back to back</text:p>
      <text:p text:style-name="P24"><text:s text:c="12"/>master_en_ff &lt;= '0'; --default master not enabled</text:p>
      <text:p text:style-name="P24"><text:s text:c="12"/>respond_en_ff &lt;= '0'; --default no respond</text:p>
      <text:p text:style-name="P24"><text:s text:c="8"/>elsif rising_edge(clk) then</text:p>
      <text:p text:style-name="P24"><text:s text:c="12"/>if cfg_wrn = '0' and addr = "0001" then</text:p>
      <text:p text:style-name="P24"><text:s text:c="16"/>if cben(1) = '0' then</text:p>
      <text:p text:style-name="P24"><text:soft-page-break/><text:s text:c="20"/>target_b2b_ff &lt;= adi(9);</text:p>
      <text:p text:style-name="P24"><text:s text:c="16"/>end if;</text:p>
      <text:p text:style-name="P24"><text:s text:c="16"/>if cben(0) = '0' then</text:p>
      <text:p text:style-name="P24"><text:s text:c="20"/>master_en_ff &lt;= adi(2);</text:p>
      <text:p text:style-name="P24"><text:s text:c="20"/>respond_en_ff &lt;= adi(1);</text:p>
      <text:p text:style-name="P24"><text:s text:c="16"/>end if;</text:p>
      <text:p text:style-name="P24"><text:s text:c="12"/>end if;</text:p>
      <text:p text:style-name="P24"><text:s text:c="12"/>if(cfg_wrn = '0') and addr = "0001" and </text:p>
      <text:p text:style-name="P24"><text:s text:c="16"/>cben(3) = '0' and adi(29) = '1' then</text:p>
      <text:p text:style-name="P24"><text:s text:c="16"/>mabort_ff &lt;= '0';</text:p>
      <text:p text:style-name="P24"><text:s text:c="12"/>elsif mabort_ff = '0' then</text:p>
      <text:p text:style-name="P24"><text:s text:c="16"/>mabort_ff &lt;= m_abort;</text:p>
      <text:p text:style-name="P24"><text:s text:c="12"/>end if;</text:p>
      <text:p text:style-name="P24"><text:s text:c="12"/>if cfg_wrn = '0' and addr = "0001" and </text:p>
      <text:p text:style-name="P24"><text:s text:c="16"/>cben(3) = '0' and adi(28) = '1' then</text:p>
      <text:p text:style-name="P24"><text:s text:c="16"/>tabort_ff &lt;= '0'; -- clear by writing 1</text:p>
      <text:p text:style-name="P24"><text:s text:c="12"/>elsif tabort_ff = '0' then -- when 0 clock in</text:p>
      <text:p text:style-name="P24"><text:s text:c="16"/>tabort_ff &lt;= t_abort;</text:p>
      <text:p text:style-name="P24"><text:s text:c="12"/>end if;</text:p>
      <text:p text:style-name="P24"><text:s text:c="8"/>end if;</text:p>
      <text:p text:style-name="P24"><text:s text:c="4"/>end process;</text:p>
      <text:p text:style-name="P24"/>
      <text:p text:style-name="P24"><text:s text:c="4"/>devctl_reg &lt;= "00" &amp; mabort_ff &amp; tabort_ff &amp; "001010000000" &amp; "000000" &amp;</text:p>
      <text:p text:style-name="P24"><text:s text:c="8"/>target_b2b_ff &amp; "000000" <text:s/>&amp; master_en_ff &amp; respond_en_ff &amp; '0';</text:p>
      <text:p text:style-name="P24"/>
      <text:p text:style-name="P24"/>
      <text:p text:style-name="P24"><text:s text:c="4"/>bist_start &lt;= bist_start_ff and (not bist_start_dl);</text:p>
      <text:p text:style-name="P24"/>
      <text:p text:style-name="P24"><text:s text:c="4"/>basereg_gen : process(rstn, clk)</text:p>
      <text:p text:style-name="P24"><text:s text:c="4"/>begin</text:p>
      <text:p text:style-name="P24"><text:s text:c="8"/>if rstn = '0' then</text:p>
      <text:p text:style-name="P24"><text:s text:c="12"/>basereg31_20 &lt;= "111111000000";</text:p>
      <text:p text:style-name="P24"><text:s text:c="12"/>latency_ff &lt;= "00000";</text:p>
      <text:p text:style-name="P24"><text:s text:c="12"/>int_line_ff &lt;= "00000000";</text:p>
      <text:p text:style-name="P24"><text:s text:c="12"/>bist_start_ff &lt;= '0';</text:p>
      <text:p text:style-name="P24"><text:s text:c="12"/>bist_start_dl &lt;= '0';</text:p>
      <text:p text:style-name="P24"><text:s text:c="12"/>bist_code_ff &lt;= "0000";</text:p>
      <text:p text:style-name="P24"><text:s text:c="8"/>elsif rising_edge(clk) then</text:p>
      <text:p text:style-name="P24"><text:s text:c="12"/>if cfg_wrn = '0' and addr = "0100" then</text:p>
      <text:p text:style-name="P24"><text:s text:c="16"/>if cben(3) = '0' then</text:p>
      <text:p text:style-name="P24"><text:s text:c="20"/>basereg31_20(11 downto 4) &lt;= adi(31 downto 24);</text:p>
      <text:p text:style-name="P24"><text:s text:c="16"/>end if;</text:p>
      <text:p text:style-name="P24"><text:s text:c="16"/>if cben(2) = '0' then</text:p>
      <text:p text:style-name="P24"><text:s text:c="20"/>basereg31_20(3 downto 0) &lt;= adi(23 downto 20);</text:p>
      <text:p text:style-name="P24"><text:s text:c="16"/>end if;</text:p>
      <text:p text:style-name="P24"><text:s text:c="12"/>end if;</text:p>
      <text:p text:style-name="P24"><text:s text:c="12"/>if cfg_wrn = '0' and addr = "0011" and cben(1) = '0' then</text:p>
      <text:p text:style-name="P24"><text:s text:c="16"/>latency_ff &lt;= adi(15 downto 11);</text:p>
      <text:p text:style-name="P24"><text:s text:c="12"/>end if;</text:p>
      <text:p text:style-name="P24"><text:s text:c="12"/>if cfg_wrn = '0' and addr = "0011" and </text:p>
      <text:p text:style-name="P24"><text:soft-page-break/><text:s text:c="16"/>cben(3) = '0' and adi(30) = '1' then</text:p>
      <text:p text:style-name="P24"><text:s text:c="16"/>bist_start_ff &lt;= '1'; --when write '1' start bist_code</text:p>
      <text:p text:style-name="P24"><text:s text:c="12"/>elsif (bist_code(4) = '0') then</text:p>
      <text:p text:style-name="P24"><text:s text:c="16"/>bist_start_ff &lt;= '0'; -- clear when bist done</text:p>
      <text:p text:style-name="P24"><text:s text:c="12"/>end if;</text:p>
      <text:p text:style-name="P24"><text:s text:c="12"/>bist_start_dl &lt;= bist_start_ff;</text:p>
      <text:p text:style-name="P24"><text:s text:c="12"/>bist_code_ff &lt;= bist_code(3 downto 0);</text:p>
      <text:p text:style-name="P24"><text:s text:c="12"/>if cfg_wrn = '0' and addr = "1111" and cben(0) = '0' then</text:p>
      <text:p text:style-name="P24"><text:s text:c="16"/>int_line_ff &lt;= adi(7 downto 0);</text:p>
      <text:p text:style-name="P24"><text:s text:c="12"/>end if;</text:p>
      <text:p text:style-name="P24"><text:s text:c="8"/>end if;</text:p>
      <text:p text:style-name="P24"><text:s text:c="4"/>end process;</text:p>
      <text:p text:style-name="P24"/>
      <text:p text:style-name="P24"><text:s text:c="4"/>base_reg &lt;= basereg31_20 &amp; basereg19_0;</text:p>
      <text:p text:style-name="P24"><text:s text:c="4"/>latency_reg &lt;= '1' &amp; bist_start_ff &amp; "00" &amp; bist_code_ff &amp; "00000000" </text:p>
      <text:p text:style-name="P24"><text:s text:c="4"/>&amp; latency_ff &amp; "00000000000";</text:p>
      <text:p text:style-name="P24"><text:s text:c="4"/>int_pin_reg &lt;= "0000000000000000" &amp; int_pin &amp; int_line_ff;</text:p>
      <text:p text:style-name="P24"/>
      <text:p text:style-name="P24"><text:s text:c="4"/>ad3_0 &lt;= rdaddr(3 downto 0); ad1_0 &lt;= rdaddr(1 downto 0);</text:p>
      <text:p text:style-name="P24"><text:s text:c="4"/>ad5_4 &lt;= rdaddr(5 downto 4);</text:p>
      <text:p text:style-name="P24"/>
      <text:p text:style-name="P24"><text:s text:c="4"/>cfggen : process(ad3_0, devid_reg, devctl_reg, revid_reg, latency_reg, base_reg, int_pin_reg)</text:p>
      <text:p text:style-name="P24"><text:s text:c="4"/>begin</text:p>
      <text:p text:style-name="P24"><text:s text:c="8"/>case ad3_0 is</text:p>
      <text:p text:style-name="P24"><text:s text:c="12"/>when "0000" =&gt; cfgout &lt;= devid_reg;</text:p>
      <text:p text:style-name="P24"><text:s text:c="12"/>when "0001" =&gt; cfgout &lt;= devctl_reg;</text:p>
      <text:p text:style-name="P24"><text:s text:c="12"/>when "0010" =&gt; cfgout &lt;= revid_reg;</text:p>
      <text:p text:style-name="P24"><text:s text:c="12"/>when "0011" =&gt; cfgout &lt;= latency_reg;</text:p>
      <text:p text:style-name="P24"><text:s text:c="12"/>when "0100" =&gt; cfgout &lt;= base_reg;</text:p>
      <text:p text:style-name="P24"><text:s text:c="12"/>when "1111" =&gt; cfgout &lt;= int_pin_reg;</text:p>
      <text:p text:style-name="P24"><text:s text:c="12"/>when others =&gt; cfgout &lt;= (others =&gt; '0');</text:p>
      <text:p text:style-name="P24"><text:s text:c="8"/>end case;</text:p>
      <text:p text:style-name="P24"><text:s text:c="4"/>end process;</text:p>
      <text:p text:style-name="P24"/>
      <text:p text:style-name="P24"><text:s text:c="4"/>mask_reg &lt;= "0000000000000000000000" &amp; int_mask;</text:p>
      <text:p text:style-name="P24"><text:s text:c="4"/>pend_reg &lt;= "0000000000000000000000" &amp; int_pend;</text:p>
      <text:p text:style-name="P24"><text:s text:c="4"/>req_reg <text:s/>&lt;= "0000000000000000000000" &amp; int_req;</text:p>
      <text:p text:style-name="P24"/>
      <text:p text:style-name="P24"><text:s text:c="4"/>itmux : with ad1_0 select</text:p>
      <text:p text:style-name="P24"><text:s text:c="4"/>itout &lt;= mask_reg when "00",</text:p>
      <text:p text:style-name="P24"><text:s text:c="4"/>pend_reg when "01",</text:p>
      <text:p text:style-name="P24"><text:s text:c="4"/>req_reg when others;</text:p>
      <text:p text:style-name="P24"><text:s text:c="4"/>dmaad_reg &lt;= dmaad &amp; "00";</text:p>
      <text:p text:style-name="P24"><text:s text:c="4"/>dmactl_reg &lt;= "000000000000000000" &amp; fifocnt &amp; "00000" &amp; fifo_en &amp; dma_en &amp; '0';</text:p>
      <text:p text:style-name="P24"/>
      <text:p text:style-name="P24"><text:s text:c="4"/>dmamux : with ad1_0 select</text:p>
      <text:p text:style-name="P24"><text:s text:c="4"/>dmaout &lt;= dmactl_reg when "00",</text:p>
      <text:p text:style-name="P24"><text:s text:c="4"/>dmaad_reg when "01",</text:p>
      <text:p text:style-name="P24"><text:s text:c="4"/>dmaword when "10",</text:p>
      <text:p text:style-name="P24"><text:s text:c="4"/>dmacntr when others;</text:p>
      <text:p text:style-name="P24"><text:soft-page-break/>end rtl; <text:s text:c="16"/></text:p>
      <text:p text:style-name="P24"/>
      <text:p text:style-name="P24">library ieee;</text:p>
      <text:p text:style-name="P24"><text:s text:c="4"/>use ieee. std_logic_1164.all;</text:p>
      <text:p text:style-name="P24"/>
      <text:p text:style-name="P24">entity reg is port(</text:p>
      <text:p text:style-name="P24"><text:s text:c="4"/>rstn <text:s text:c="11"/>: in std_logic_vector(3 downto 0);</text:p>
      <text:p text:style-name="P24"><text:s text:c="4"/>clk <text:s text:c="11"/>: in std_logic_vector(3 downto 0);</text:p>
      <text:p text:style-name="P24"><text:s text:c="4"/>wraddr <text:s text:c="7"/>: in std_logic_vector(5 downto 0);</text:p>
      <text:p text:style-name="P24"><text:s text:c="4"/>cben <text:s text:c="11"/>: in std_logic_vector(3 downto 0);</text:p>
      <text:p text:style-name="P24"><text:s text:c="4"/>adi <text:s text:c="11"/>: in std_logic_vector(31 downto 0);</text:p>
      <text:p text:style-name="P24"><text:s text:c="4"/>wren <text:s text:c="11"/>: in std_logic;</text:p>
      <text:p text:style-name="P24"><text:s text:c="4"/>fifo_ovf <text:s text:c="7"/>: in std_logic;</text:p>
      <text:p text:style-name="P24"><text:s text:c="4"/>dma_done <text:s text:c="7"/>: in std_logic;</text:p>
      <text:p text:style-name="P24"><text:s text:c="4"/>timer_int <text:s text:c="3"/>: in std_logic_vector(3 downto 0);</text:p>
      <text:p text:style-name="P24"><text:s text:c="4"/>intn <text:s text:c="11"/>: in std_logic_vector(3 downto 0);</text:p>
      <text:p text:style-name="P24"><text:s text:c="4"/>intan <text:s text:c="11"/>: out std_logic;</text:p>
      <text:p text:style-name="P24"><text:s text:c="4"/>dma_en <text:s text:c="7"/>: out std_logic;</text:p>
      <text:p text:style-name="P24"><text:s text:c="4"/>fifo_en <text:s text:c="7"/>: out std_logic;</text:p>
      <text:p text:style-name="P24"><text:s text:c="4"/>soft_rstn <text:s text:c="3"/>: out std_logic;</text:p>
      <text:p text:style-name="P24"><text:s text:c="4"/>dmaad <text:s text:c="11"/>: out std_logic_vector(31 downto 2);</text:p>
      <text:p text:style-name="P24"><text:s text:c="4"/>dmaword <text:s text:c="7"/>: out std_logic_vector(31 downto 0);</text:p>
      <text:p text:style-name="P24"><text:s text:c="4"/>cfg_wrn <text:s text:c="7"/>: in std_logic;</text:p>
      <text:p text:style-name="P24"><text:s text:c="4"/>m_abort <text:s text:c="7"/>: in std_logic;</text:p>
      <text:p text:style-name="P24"><text:s text:c="4"/>t_abort <text:s text:c="7"/>: in std_logic;</text:p>
      <text:p text:style-name="P24"><text:s text:c="4"/>bist_code <text:s text:c="3"/>: in std_logic_vector(4 downto 0);</text:p>
      <text:p text:style-name="P24"><text:s text:c="4"/>fifocnt <text:s text:c="7"/>: in std_logic_vector(5 downto 0);</text:p>
      <text:p text:style-name="P24"><text:s text:c="4"/>dmacntr <text:s text:c="7"/>: in std_logic_vector(31 downto 0);</text:p>
      <text:p text:style-name="P24"><text:s text:c="4"/>rdaddr <text:s text:c="7"/>: in std_logic_vector(5 downto 0);</text:p>
      <text:p text:style-name="P24"><text:s text:c="4"/>bist_start <text:s text:c="3"/>: out std_logic;</text:p>
      <text:p text:style-name="P24"><text:s text:c="4"/>target_b2b <text:s text:c="3"/>: out std_logic; <text:s text:c="4"/></text:p>
      <text:p text:style-name="P24"><text:s text:c="4"/>master_en <text:s text:c="3"/>: out std_logic;</text:p>
      <text:p text:style-name="P24"><text:s text:c="4"/>respond_en <text:s text:c="3"/>: out std_logic;</text:p>
      <text:p text:style-name="P24"><text:s text:c="4"/>base_addr <text:s text:c="3"/>: out std_logic_vector(11 downto 0); <text:s text:c="3"/></text:p>
      <text:p text:style-name="P24"><text:s text:c="4"/>latency_pci <text:s text:c="3"/>: out std_logic_vector(4 downto 0);</text:p>
      <text:p text:style-name="P24"><text:s text:c="4"/>dout <text:s text:c="11"/>: out std_logic_vector(31 downto 0));</text:p>
      <text:p text:style-name="P24">end reg;</text:p>
      <text:p text:style-name="P24"/>
      <text:p text:style-name="P24">architecture rtl of reg is</text:p>
      <text:p text:style-name="P24"><text:s text:c="4"/>component itreg port(</text:p>
      <text:p text:style-name="P24"><text:s text:c="8"/>rstn, clk : in std_logic;</text:p>
      <text:p text:style-name="P24"><text:s text:c="8"/>addr : in std_logic_vector(5 downto 0); -- 6 bit address input</text:p>
      <text:p text:style-name="P24"><text:s text:c="8"/>cben : in std_logic_vector(3 downto 0); -- command byte enable 4 bit active low. each bit controlls a byte lane</text:p>
      <text:p text:style-name="P24"><text:s text:c="8"/>adi <text:s/>: in std_logic_vector(31 downto 0); -- data to be written to registers</text:p>
      <text:p text:style-name="P24"><text:s text:c="8"/>wren : in std_logic;</text:p>
      <text:p text:style-name="P24"><text:s text:c="8"/>fifo_ovf : in std_logic; <text:s text:c="3"/>--indictes overflow</text:p>
      <text:p text:style-name="P24"><text:s text:c="8"/>dma_done : in std_logic; <text:s text:c="3"/>--indictes dma is done</text:p>
      <text:p text:style-name="P24"><text:s text:c="8"/>timer_int : in std_logic_vector(3 downto 0); <text:s text:c="3"/>--indictes timers are time out</text:p>
      <text:p text:style-name="P24"><text:s text:c="8"/>intn : in std_logic_vector(3 downto 0);</text:p>
      <text:p text:style-name="P24"><text:s text:c="8"/>intan : out std_logic; --active low indicated when interrupt is generated</text:p>
      <text:p text:style-name="P24"><text:soft-page-break/><text:s text:c="8"/>int_req : out std_logic_vector(9 downto 0); <text:s text:c="3"/>-- interrupt registers</text:p>
      <text:p text:style-name="P24"><text:s text:c="8"/>int_mask : out std_logic_vector(9 downto 0); <text:s text:c="3"/>-- interrupt registers</text:p>
      <text:p text:style-name="P24"><text:s text:c="8"/>int_pend : out std_logic_vector(9 downto 0));-- interrupt registers</text:p>
      <text:p text:style-name="P24">end component;</text:p>
      <text:p text:style-name="P24"/>
      <text:p text:style-name="P24">component spreg port(</text:p>
      <text:p text:style-name="P24"><text:s text:c="4"/>rstn0, rstn1, clk0, clk1 : in std_logic;</text:p>
      <text:p text:style-name="P24"><text:s text:c="4"/>addr <text:s text:c="12"/>: in std_logic_vector(5 downto 0);</text:p>
      <text:p text:style-name="P24"><text:s text:c="4"/>cben <text:s text:c="12"/>: in std_logic_vector(3 downto 0); -- command byte enable 4 bit active low. each bit controlls a byte lane</text:p>
      <text:p text:style-name="P24"><text:s text:c="4"/>adi <text:s text:c="12"/>: in std_logic_vector(31 downto 0); -- data to be written to registers</text:p>
      <text:p text:style-name="P24"><text:s text:c="4"/>wren <text:s text:c="12"/>: in std_logic;</text:p>
      <text:p text:style-name="P24"><text:s text:c="4"/>dma_done <text:s text:c="4"/>: in std_logic; --indictes dma is done</text:p>
      <text:p text:style-name="P24"><text:s text:c="4"/>dma_en <text:s text:c="8"/>: out std_logic; -- control wheter the dma or fifo are enabled</text:p>
      <text:p text:style-name="P24"><text:s text:c="4"/>fifo_en <text:s text:c="8"/>: out std_logic; --dma control register bit 1</text:p>
      <text:p text:style-name="P24"><text:s text:c="4"/>soft_rstn <text:s text:c="4"/>: out std_logic; --dma control register bit 0</text:p>
      <text:p text:style-name="P24"><text:s text:c="4"/>dmaad <text:s text:c="8"/>: out std_logic_vector(31 downto 2); -- starting address register for data trasnfer</text:p>
      <text:p text:style-name="P24"><text:s text:c="4"/>dmaword <text:s text:c="8"/>: out std_logic_vector(31 downto 0)); -- number of words to transfer</text:p>
      <text:p text:style-name="P24">end component;</text:p>
      <text:p text:style-name="P24"/>
      <text:p text:style-name="P24">component regmux port(</text:p>
      <text:p text:style-name="P24"><text:s text:c="4"/>clk <text:s text:c="12"/>: in std_logic;</text:p>
      <text:p text:style-name="P24"><text:s text:c="4"/>rstn <text:s text:c="11"/>: in std_logic;</text:p>
      <text:p text:style-name="P24"><text:s text:c="4"/>addr <text:s text:c="11"/>: in std_logic_vector(3 downto 0);</text:p>
      <text:p text:style-name="P24"><text:s text:c="4"/>adi <text:s text:c="11"/>: in std_logic_vector(31 downto 0);</text:p>
      <text:p text:style-name="P24"><text:s text:c="4"/>cben <text:s text:c="11"/>: in std_logic_vector(3 downto 0);</text:p>
      <text:p text:style-name="P24"><text:s text:c="4"/>cfg_wrn <text:s text:c="7"/>: in std_logic;</text:p>
      <text:p text:style-name="P24"><text:s text:c="4"/>m_abort <text:s text:c="7"/>: in std_logic;</text:p>
      <text:p text:style-name="P24"><text:s text:c="4"/>t_abort <text:s text:c="7"/>: in std_logic;</text:p>
      <text:p text:style-name="P24"><text:s text:c="4"/>bist_code <text:s text:c="3"/>: in std_logic_vector(4 downto 0);</text:p>
      <text:p text:style-name="P24"><text:s text:c="4"/>int_req <text:s text:c="7"/>: in std_logic_vector(9 downto 0);</text:p>
      <text:p text:style-name="P24"><text:s text:c="4"/>int_mask <text:s text:c="7"/>: in std_logic_vector(9 downto 0);</text:p>
      <text:p text:style-name="P24"><text:s text:c="4"/>int_pend <text:s text:c="7"/>: in std_logic_vector(9 downto 0);</text:p>
      <text:p text:style-name="P24"><text:s text:c="4"/>dma_en <text:s text:c="7"/>: in std_logic;</text:p>
      <text:p text:style-name="P24"><text:s text:c="4"/>fifo_en <text:s text:c="7"/>: in std_logic;</text:p>
      <text:p text:style-name="P24"><text:s text:c="4"/>fifocnt <text:s text:c="7"/>: in std_logic_vector(5 downto 0);</text:p>
      <text:p text:style-name="P24"><text:s text:c="4"/>dmaad <text:s text:c="11"/>: in std_logic_vector(31 downto 2);</text:p>
      <text:p text:style-name="P24"><text:s text:c="4"/>dmaword <text:s text:c="7"/>: in std_logic_vector(31 downto 0);</text:p>
      <text:p text:style-name="P24"><text:s text:c="4"/>dmacntr <text:s text:c="7"/>: in std_logic_vector(31 downto 0);</text:p>
      <text:p text:style-name="P24"><text:s text:c="4"/>rdaddr <text:s text:c="7"/>: in std_logic_vector(5 downto 0);</text:p>
      <text:p text:style-name="P24"><text:s text:c="4"/>bist_start <text:s text:c="3"/>: out std_logic;</text:p>
      <text:p text:style-name="P24"><text:s text:c="4"/>target_b2b <text:s text:c="3"/>: out std_logic;</text:p>
      <text:p text:style-name="P24"><text:s text:c="4"/>master_en <text:s text:c="3"/>: out std_logic; <text:s text:c="3"/></text:p>
      <text:p text:style-name="P24"><text:s text:c="4"/>respond_en <text:s text:c="3"/>: out std_logic;</text:p>
      <text:p text:style-name="P24"><text:s text:c="4"/>base_addr <text:s text:c="3"/>: out std_logic_vector(11 downto 0);</text:p>
      <text:p text:style-name="P24"><text:s text:c="4"/>latency_pci <text:s text:c="3"/>: out std_logic_vector(4 downto 0);</text:p>
      <text:p text:style-name="P24"><text:s text:c="4"/>dout <text:s text:c="11"/>: out std_logic_vector(31 downto 0));</text:p>
      <text:p text:style-name="P24">end component;</text:p>
      <text:p text:style-name="P24"/>
      <text:p text:style-name="P24">signal int_req <text:s text:c="11"/>: std_logic_vector(9 downto 0);</text:p>
      <text:p text:style-name="P24">signal int_mask <text:s text:c="7"/>: std_logic_vector(9 downto 0);</text:p>
      <text:p text:style-name="P24"><text:soft-page-break/>signal int_pend <text:s text:c="7"/>: std_logic_vector(9 downto 0);</text:p>
      <text:p text:style-name="P24">signal dma_en_s <text:s text:c="7"/>: std_logic;</text:p>
      <text:p text:style-name="P24">signal fifo_en_s <text:s text:c="7"/>: std_logic;</text:p>
      <text:p text:style-name="P24">signal dmaad_s <text:s text:c="11"/>: std_logic_vector(31 downto 2);</text:p>
      <text:p text:style-name="P24">signal dmaword_s <text:s text:c="7"/>: std_logic_vector(31 downto 0);</text:p>
      <text:p text:style-name="P24">signal target_b2b_s <text:s text:c="3"/>: std_logic;</text:p>
      <text:p text:style-name="P24">signal master_en_s <text:s text:c="3"/>: std_logic;</text:p>
      <text:p text:style-name="P24">signal respond_en_s <text:s text:c="3"/>: std_logic;</text:p>
      <text:p text:style-name="P24">signal base_addr_s <text:s text:c="3"/>: std_logic_vector(11 downto 0);</text:p>
      <text:p text:style-name="P24">signal latency_pci_s <text:s text:c="3"/>: std_logic_vector(4 downto 0);</text:p>
      <text:p text:style-name="P24">begin</text:p>
      <text:p text:style-name="P24"><text:s text:c="4"/>dma_en <text:s text:c="8"/>&lt;= dma_en_s;</text:p>
      <text:p text:style-name="P24"><text:s text:c="4"/>fifo_en <text:s text:c="8"/>&lt;= fifo_en_s;</text:p>
      <text:p text:style-name="P24"><text:s text:c="4"/>dmaad <text:s text:c="8"/>&lt;= dmaad_s;</text:p>
      <text:p text:style-name="P24"><text:s text:c="4"/>dmaword <text:s text:c="8"/>&lt;= dmaword_s;</text:p>
      <text:p text:style-name="P24"><text:s text:c="4"/>target_b2b <text:s text:c="4"/>&lt;= target_b2b_s;</text:p>
      <text:p text:style-name="P24"><text:s text:c="4"/>master_en <text:s text:c="4"/>&lt;= master_en_s;</text:p>
      <text:p text:style-name="P24"><text:s text:c="4"/>respond_en <text:s text:c="4"/>&lt;= respond_en_s;</text:p>
      <text:p text:style-name="P24"><text:s text:c="4"/>base_addr <text:s text:c="4"/>&lt;= base_addr_s;</text:p>
      <text:p text:style-name="P24"/>
      <text:p text:style-name="P24"><text:s text:c="4"/>itreg0 : itreg</text:p>
      <text:p text:style-name="P24"><text:s text:c="8"/>port map( rstn =&gt; rstn(1), <text:s text:c="3"/>clk =&gt; clk(1), <text:s text:c="3"/>addr =&gt; wraddr, cben =&gt; cben,</text:p>
      <text:p text:style-name="P24"><text:s text:c="18"/>adi =&gt; adi, wren =&gt; wren, <text:s text:c="3"/>fifo_ovf =&gt; fifo_ovf,</text:p>
      <text:p text:style-name="P24"><text:s text:c="18"/>dma_done =&gt; dma_done, timer_int =&gt; timer_int,</text:p>
      <text:p text:style-name="P24"><text:s text:c="18"/>intn =&gt; intn, intan =&gt; intan, int_req =&gt; int_req,</text:p>
      <text:p text:style-name="P24"><text:s text:c="18"/>int_mask =&gt; int_mask, int_pend =&gt; int_pend);</text:p>
      <text:p text:style-name="P24"/>
      <text:p text:style-name="P24"><text:s text:c="4"/>spreg0 : spreg</text:p>
      <text:p text:style-name="P24"><text:s text:c="8"/>port map(rstn0 =&gt; rstn(1), rstn1 =&gt; rstn(2), <text:s text:c="3"/>clk0 =&gt; clk(1),</text:p>
      <text:p text:style-name="P24"><text:s text:c="17"/>clk1 =&gt; clk(2), addr =&gt; wraddr, cben =&gt; cben,</text:p>
      <text:p text:style-name="P24"><text:s text:c="17"/>adi =&gt; adi, wren =&gt; wren, dma_done =&gt; dma_done,</text:p>
      <text:p text:style-name="P24"><text:s text:c="17"/>dma_en =&gt; dma_en_s, fifo_en =&gt; fifo_en_s,</text:p>
      <text:p text:style-name="P24"><text:s text:c="17"/>soft_rstn =&gt; soft_rstn, <text:s text:c="3"/>dmaad =&gt; dmaad_s,</text:p>
      <text:p text:style-name="P24"><text:s text:c="17"/>dmaword =&gt; dmaword_s);</text:p>
      <text:p text:style-name="P24"/>
      <text:p text:style-name="P24"><text:s text:c="4"/>regmux0 : regmux</text:p>
      <text:p text:style-name="P24"><text:s text:c="8"/>port map(clk =&gt; clk(3), rstn =&gt; rstn(3), addr =&gt; wraddr(3 downto 0),</text:p>
      <text:p text:style-name="P24"><text:s text:c="17"/>adi =&gt; adi, cben =&gt; cben, cfg_wrn =&gt; cfg_wrn, m_abort =&gt; m_abort,</text:p>
      <text:p text:style-name="P24"><text:s text:c="17"/>t_abort =&gt; t_abort, bist_code =&gt; bist_code, int_req =&gt; int_req,</text:p>
      <text:p text:style-name="P24"><text:s text:c="17"/>int_mask =&gt; int_mask, int_pend =&gt; int_pend, dma_en =&gt; dma_en_s,</text:p>
      <text:p text:style-name="P24"><text:s text:c="17"/>fifo_en =&gt; fifo_en_s, fifocnt =&gt; fifocnt, <text:s text:c="3"/>dmaad =&gt; dmaad_s,</text:p>
      <text:p text:style-name="P24"><text:s text:c="17"/>dmaword =&gt; dmaword_s, dmacntr =&gt; dmacntr, <text:s text:c="3"/>rdaddr =&gt; rdaddr,</text:p>
      <text:p text:style-name="P24"><text:s text:c="17"/>bist_start =&gt; bist_start, target_b2b =&gt; target_b2b_s,</text:p>
      <text:p text:style-name="P24"><text:s text:c="17"/>master_en =&gt; master_en_s, respond_en =&gt; respond_en_s,</text:p>
      <text:p text:style-name="P24"><text:s text:c="17"/>base_addr =&gt; base_addr_s, latency_pci =&gt; latency_pci,</text:p>
      <text:p text:style-name="P24"><text:s text:c="17"/>dout =&gt; dout);</text:p>
      <text:p text:style-name="P24">end rtl;</text:p>
      <text:p text:style-name="P24"/>
      <text:p text:style-name="P24">library ieee;</text:p>
      <text:p text:style-name="P24"><text:s text:c="4"/>use ieee.std_logic_1164.all;</text:p>
      <text:p text:style-name="P24"><text:soft-page-break/><text:s text:c="4"/>use ieee.std_logic_unsigned.all;</text:p>
      <text:p text:style-name="P24"/>
      <text:p text:style-name="P24">entity tbreg is end tbreg;</text:p>
      <text:p text:style-name="P24"/>
      <text:p text:style-name="P24">architecture beh of tbreg is</text:p>
      <text:p text:style-name="P24"><text:s text:c="4"/>component reg port(</text:p>
      <text:p text:style-name="P24"><text:s text:c="8"/>rstn <text:s text:c="11"/>: in std_logic_vector(3 downto 0);</text:p>
      <text:p text:style-name="P24"><text:s text:c="8"/>clk <text:s text:c="11"/>: in std_logic_vector(3 downto 0);</text:p>
      <text:p text:style-name="P24"><text:s text:c="8"/>wraddr <text:s text:c="7"/>: in std_logic_vector(5 downto 0);</text:p>
      <text:p text:style-name="P24"><text:s text:c="8"/>cben <text:s text:c="11"/>: in std_logic_vector(3 downto 0);</text:p>
      <text:p text:style-name="P24"><text:s text:c="8"/>adi <text:s text:c="11"/>: in std_logic_vector(31 downto 0);</text:p>
      <text:p text:style-name="P24"><text:s text:c="8"/>wren <text:s text:c="11"/>: in std_logic;</text:p>
      <text:p text:style-name="P24"><text:s text:c="8"/>fifo_ovf <text:s text:c="7"/>: in std_logic;</text:p>
      <text:p text:style-name="P24"><text:s text:c="8"/>dma_done <text:s text:c="7"/>: in std_logic;</text:p>
      <text:p text:style-name="P24"><text:s text:c="8"/>timer_int <text:s text:c="3"/>: in std_logic_vector(3 downto 0);</text:p>
      <text:p text:style-name="P24"><text:s text:c="8"/>intn <text:s text:c="11"/>: in std_logic_vector(3 downto 0);</text:p>
      <text:p text:style-name="P24"><text:s text:c="8"/>intan <text:s text:c="11"/>: out std_logic;</text:p>
      <text:p text:style-name="P24"><text:s text:c="8"/>dma_en <text:s text:c="7"/>: out std_logic;</text:p>
      <text:p text:style-name="P24"><text:s text:c="8"/>fifo_en <text:s text:c="7"/>: out std_logic;</text:p>
      <text:p text:style-name="P24"><text:s text:c="8"/>soft_rstn <text:s text:c="3"/>: out std_logic;</text:p>
      <text:p text:style-name="P24"><text:s text:c="8"/>dmaad <text:s text:c="11"/>: out std_logic_vector(31 downto 2);</text:p>
      <text:p text:style-name="P24"><text:s text:c="8"/>dmaword <text:s text:c="7"/>: out std_logic_vector(31 downto 0);</text:p>
      <text:p text:style-name="P24"><text:s text:c="8"/>cfg_wrn <text:s text:c="7"/>: in std_logic;</text:p>
      <text:p text:style-name="P24"><text:s text:c="8"/>m_abort <text:s text:c="7"/>: in std_logic;</text:p>
      <text:p text:style-name="P24"><text:s text:c="8"/>t_abort <text:s text:c="7"/>: in std_logic;</text:p>
      <text:p text:style-name="P24"><text:s text:c="8"/>bist_code <text:s text:c="3"/>: in std_logic_vector(4 downto 0);</text:p>
      <text:p text:style-name="P24"><text:s text:c="8"/>fifocnt <text:s text:c="7"/>: in std_logic_vector(5 downto 0);</text:p>
      <text:p text:style-name="P24"><text:s text:c="8"/>dmacntr <text:s text:c="7"/>: in std_logic_vector(31 downto 0);</text:p>
      <text:p text:style-name="P24"><text:s text:c="8"/>rdaddr <text:s text:c="7"/>: in std_logic_vector(5 downto 0);</text:p>
      <text:p text:style-name="P24"><text:s text:c="8"/>bist_start <text:s text:c="3"/>: out std_logic;</text:p>
      <text:p text:style-name="P24"><text:s text:c="8"/>target_b2b <text:s text:c="3"/>: out std_logic; <text:s text:c="4"/></text:p>
      <text:p text:style-name="P24"><text:s text:c="8"/>master_en <text:s text:c="3"/>: out std_logic;</text:p>
      <text:p text:style-name="P24"><text:s text:c="8"/>respond_en <text:s text:c="3"/>: out std_logic;</text:p>
      <text:p text:style-name="P24"><text:s text:c="8"/>base_addr <text:s text:c="3"/>: out std_logic_vector(11 downto 0); <text:s text:c="3"/></text:p>
      <text:p text:style-name="P24"><text:s text:c="8"/>latency_pci <text:s text:c="3"/>: out std_logic_vector(4 downto 0);</text:p>
      <text:p text:style-name="P24"><text:s text:c="8"/>dout <text:s text:c="11"/>: out std_logic_vector(31 downto 0));</text:p>
      <text:p text:style-name="P24">end component;</text:p>
      <text:p text:style-name="P24"/>
      <text:p text:style-name="P24">constant period : time := 50 ns;</text:p>
      <text:p text:style-name="P24">constant delay <text:s/>: time := 80 ns;</text:p>
      <text:p text:style-name="P24"/>
      <text:p text:style-name="P24">signal rstn, clk : std_logic;</text:p>
      <text:p text:style-name="P24">signal wren, fifo_ovf, dma_done, intan : std_logic;</text:p>
      <text:p text:style-name="P24">signal dma_en, fifo_en, soft_rstn : std_logic;</text:p>
      <text:p text:style-name="P24">signal cfg_wrn, m_abort, t_abort : std_logic;</text:p>
      <text:p text:style-name="P24">signal bist_start, target_b2b, master_en, respond_en : std_logic;</text:p>
      <text:p text:style-name="P24">signal cben, timer_int, intn, rstns, clks : std_logic_vector(3 downto 0);</text:p>
      <text:p text:style-name="P24">signal dmaword, adi, dmacntr, dout : std_logic_vector(31 downto 0);</text:p>
      <text:p text:style-name="P24">signal bist_code, <text:s text:c="3"/>latency_pci <text:s text:c="3"/>: std_logic_vector(4 downto 0);</text:p>
      <text:p text:style-name="P24">signal fifocnt, wraddr, rdaddr : std_logic_vector(5 downto 0);</text:p>
      <text:p text:style-name="P24"><text:soft-page-break/>signal base_addr : std_logic_vector(11 downto 0); <text:s text:c="3"/></text:p>
      <text:p text:style-name="P24">signal dmaad : std_logic_vector(31 downto 2);</text:p>
      <text:p text:style-name="P24">begin</text:p>
      <text:p text:style-name="P24"><text:s text:c="4"/>rstn &lt;= '0', '1' after 10 *period;</text:p>
      <text:p text:style-name="P24"><text:s text:c="4"/>clkgen : process</text:p>
      <text:p text:style-name="P24"><text:s text:c="4"/>begin</text:p>
      <text:p text:style-name="P24"><text:s text:c="8"/>clk &lt;= '0'; wait for period;</text:p>
      <text:p text:style-name="P24"><text:s text:c="8"/>clk &lt;= '1'; wait for period;</text:p>
      <text:p text:style-name="P24"><text:s text:c="4"/>end process;</text:p>
      <text:p text:style-name="P24"/>
      <text:p text:style-name="P24"><text:s text:c="4"/>clks &lt;= clk &amp; clk &amp; clk &amp; clk;</text:p>
      <text:p text:style-name="P24"><text:s text:c="4"/>rstns &lt;= rstn &amp; rstn &amp; rstn &amp; rstn;</text:p>
      <text:p text:style-name="P24"/>
      <text:p text:style-name="P24"><text:s text:c="4"/>adgen : process</text:p>
      <text:p text:style-name="P24"><text:s text:c="8"/>variable d6 : std_logic_vector(5 downto 0) := "000000";</text:p>
      <text:p text:style-name="P24"><text:s text:c="4"/>begin</text:p>
      <text:p text:style-name="P24"><text:s text:c="8"/>d6 := d6 +1;</text:p>
      <text:p text:style-name="P24"><text:s text:c="8"/>rdaddr &lt;= d6 after period;</text:p>
      <text:p text:style-name="P24"><text:s text:c="8"/>wraddr &lt;= d6 after period;</text:p>
      <text:p text:style-name="P24"/>
      <text:p text:style-name="P24"><text:s text:c="8"/>wait until rising_edge(clk);</text:p>
      <text:p text:style-name="P24"><text:s text:c="4"/>end process;</text:p>
      <text:p text:style-name="P24"/>
      <text:p text:style-name="P24"><text:s text:c="4"/>dgen : process</text:p>
      <text:p text:style-name="P24"><text:s text:c="8"/>variable d32 : std_logic_vector(31 downto 0) := (others =&gt; '0');</text:p>
      <text:p text:style-name="P24"><text:s text:c="4"/>begin</text:p>
      <text:p text:style-name="P24"><text:s text:c="8"/>bist_code &lt;= d32(31 downto 27) after delay;</text:p>
      <text:p text:style-name="P24"><text:s text:c="8"/>for i in 0 to 31 loop</text:p>
      <text:p text:style-name="P24"><text:s text:c="12"/>d32 <text:s text:c="8"/>:= d32(30 downto 0) &amp; (not d32(31) xor d32(2));</text:p>
      <text:p text:style-name="P24"><text:s text:c="12"/>dmacntr <text:s text:c="4"/>&lt;= d32(20 downto 1) &amp; d32(11 downto 0) after 1 ns; <text:s text:c="11"/></text:p>
      <text:p text:style-name="P24"><text:s text:c="12"/>adi <text:s text:c="8"/>&lt;= d32 after delay;</text:p>
      <text:p text:style-name="P24"><text:s text:c="12"/>cben <text:s text:c="8"/>&lt;= d32(27 downto 24) after delay;</text:p>
      <text:p text:style-name="P24"><text:s text:c="12"/>fifocnt <text:s text:c="4"/>&lt;= d32(17 downto 12) after 1 ns;</text:p>
      <text:p text:style-name="P24"><text:s text:c="12"/>intn <text:s text:c="8"/>&lt;= d32(19 downto 16) after delay;</text:p>
      <text:p text:style-name="P24"><text:s text:c="12"/>cfg_wrn <text:s text:c="4"/>&lt;= d32(12) after delay;</text:p>
      <text:p text:style-name="P24"><text:s text:c="12"/>wren <text:s text:c="8"/>&lt;=d32(13) or d32(12) after delay;</text:p>
      <text:p text:style-name="P24"><text:s text:c="12"/>m_abort <text:s text:c="4"/>&lt;= d32(11) after delay;</text:p>
      <text:p text:style-name="P24"><text:s text:c="12"/>t_abort <text:s text:c="4"/>&lt;= d32(12) after delay;</text:p>
      <text:p text:style-name="P24"><text:s text:c="12"/>dma_done &lt;= d32(9) after delay;</text:p>
      <text:p text:style-name="P24"><text:s text:c="12"/>fifo_ovf &lt;= d32(10) after delay;</text:p>
      <text:p text:style-name="P24"><text:s text:c="12"/>wait until rising_edge(clk);</text:p>
      <text:p text:style-name="P24"><text:s text:c="8"/>end loop;</text:p>
      <text:p text:style-name="P24"><text:s text:c="4"/>end process;</text:p>
      <text:p text:style-name="P24"/>
      <text:p text:style-name="P24"><text:s text:c="4"/>reg0 : reg </text:p>
      <text:p text:style-name="P24"><text:s text:c="8"/>port map(rstn =&gt; rstns, clk =&gt; clks, wraddr =&gt; wraddr, cben =&gt; cben,</text:p>
      <text:p text:style-name="P24"><text:s text:c="17"/>adi =&gt; adi, wren =&gt; wren, fifo_ovf =&gt; fifo_ovf,</text:p>
      <text:p text:style-name="P24"><text:s text:c="17"/>dma_done =&gt; dma_done, timer_int =&gt; timer_int,</text:p>
      <text:p text:style-name="P24"><text:s text:c="17"/>intn =&gt; intn, intan =&gt; intan, dma_en =&gt; dma_en,</text:p>
      <text:p text:style-name="P24"><text:s text:c="17"/>fifo_en =&gt; fifo_en, soft_rstn =&gt; soft_rstn,</text:p>
      <text:p text:style-name="P24"><text:soft-page-break/><text:s text:c="17"/>dmaad =&gt; dmaad, dmaword =&gt; dmaword, cfg_wrn =&gt; cfg_wrn,</text:p>
      <text:p text:style-name="P24"><text:s text:c="17"/>m_abort =&gt; m_abort, t_abort =&gt; t_abort, bist_code =&gt; bist_code,</text:p>
      <text:p text:style-name="P24"><text:s text:c="17"/>fifocnt =&gt; fifocnt, dmacntr =&gt; dmacntr, rdaddr =&gt; rdaddr,</text:p>
      <text:p text:style-name="P24"><text:s text:c="17"/>bist_start =&gt; bist_start, target_b2b =&gt; target_b2b,</text:p>
      <text:p text:style-name="P24"><text:s text:c="17"/>master_en =&gt; master_en, respond_en =&gt; respond_en,</text:p>
      <text:p text:style-name="P24"><text:s text:c="17"/>base_addr =&gt; base_addr, latency_pci =&gt; latency_pci, dout =&gt; dout);</text:p>
      <text:p text:style-name="P24">end beh;</text:p>
      <text:p text:style-name="P24"/>
      <text:p text:style-name="P24">configuration cfg_tbreg of tbreg is</text:p>
      <text:p text:style-name="P24"><text:s text:c="4"/>for beh end for;</text:p>
      <text:p text:style-name="P24">end configuration;</text:p>
      <text:p text:style-name="P24"/>
      <text:p text:style-name="P24">library ieee;</text:p>
      <text:p text:style-name="P24"><text:s text:c="4"/>use ieee.std_logic_1164.all;</text:p>
      <text:p text:style-name="P24"/>
      <text:p text:style-name="P24">entity regh is port(</text:p>
      <text:p text:style-name="P24"><text:s text:c="4"/>clk, rstn, en : in std_logic;</text:p>
      <text:p text:style-name="P24"><text:s text:c="4"/>din : in std_logic_vector(31 downto 0);</text:p>
      <text:p text:style-name="P24"><text:s text:c="4"/>dout : out std_logic_vector(31 downto 0));</text:p>
      <text:p text:style-name="P24">end entity;</text:p>
      <text:p text:style-name="P24"/>
      <text:p text:style-name="P24">architecture rtl of regh is</text:p>
      <text:p text:style-name="P24">begin</text:p>
      <text:p text:style-name="P24"><text:s text:c="4"/>process(clk, rstn)</text:p>
      <text:p text:style-name="P24"><text:s text:c="4"/>begin</text:p>
      <text:p text:style-name="P24"><text:s text:c="8"/>if rstn = '0' then</text:p>
      <text:p text:style-name="P24"><text:s text:c="12"/>dout &lt;= (others =&gt; '0');</text:p>
      <text:p text:style-name="P24"><text:s text:c="8"/>elsif rising_edge(clk) then</text:p>
      <text:p text:style-name="P24"><text:s text:c="12"/>if en = '1' then</text:p>
      <text:p text:style-name="P24"><text:s text:c="16"/>dout &lt;= din;</text:p>
      <text:p text:style-name="P24"><text:s text:c="12"/>end if;</text:p>
      <text:p text:style-name="P24"><text:s text:c="8"/>end if;</text:p>
      <text:p text:style-name="P24"><text:s text:c="4"/>end process;</text:p>
      <text:p text:style-name="P24">end rtl;</text:p>
      <text:p text:style-name="P24"/>
      <text:p text:style-name="P24"/>
      <text:p text:style-name="P24">library ieee;</text:p>
      <text:p text:style-name="P24"><text:s text:c="4"/>use ieee.std_logic_1164.all;</text:p>
      <text:p text:style-name="P24"><text:s text:c="4"/>use ieee.std_logic_unsigned.all;</text:p>
      <text:p text:style-name="P24"/>
      <text:p text:style-name="P24">entity regs is port(</text:p>
      <text:p text:style-name="P24"><text:s text:c="4"/>rstn, clk, wren : in std_logic;</text:p>
      <text:p text:style-name="P24"><text:s text:c="4"/>wad : in std_logic_vector(3 downto 0);</text:p>
      <text:p text:style-name="P24"><text:s text:c="4"/>din : in std_logic_vector(31 downto 0);</text:p>
      <text:p text:style-name="P24"><text:s text:c="4"/>rad1, rad2 : in std_logic_vector(3 downto 0);</text:p>
      <text:p text:style-name="P24"><text:s text:c="4"/>dout1, dout2 : out std_logic_vector(31 downto 0));</text:p>
      <text:p text:style-name="P24">end regs;</text:p>
      <text:p text:style-name="P24"/>
      <text:p text:style-name="P24">architecture rtl of regs is</text:p>
      <text:p text:style-name="P24"><text:s text:c="4"/>type regary is array(0 to 15 ) of std_logic_vector(31 downto 0);</text:p>
      <text:p text:style-name="P24"><text:soft-page-break/><text:s text:c="4"/>signal en : std_logic_vector(15 downto 0);</text:p>
      <text:p text:style-name="P24"><text:s text:c="4"/>signal ff : regary;</text:p>
      <text:p text:style-name="P24"/>
      <text:p text:style-name="P24"><text:s text:c="4"/>component regh port(</text:p>
      <text:p text:style-name="P24"><text:s text:c="8"/>clk, rstn, en : in std_logic;</text:p>
      <text:p text:style-name="P24"><text:s text:c="8"/>din : in std_logic_vector(31 downto 0);</text:p>
      <text:p text:style-name="P24"><text:s text:c="8"/>dout : out std_logic_vector(31 downto 0));</text:p>
      <text:p text:style-name="P24">end component;</text:p>
      <text:p text:style-name="P24">begin</text:p>
      <text:p text:style-name="P24"/>
      <text:p text:style-name="P24"><text:s text:c="4"/>p0 : process(wad, wren)</text:p>
      <text:p text:style-name="P24"><text:s text:c="4"/>begin</text:p>
      <text:p text:style-name="P24"><text:s text:c="8"/>en &lt;= (others =&gt; '0');</text:p>
      <text:p text:style-name="P24"><text:s text:c="8"/>en(conv_integer(wad)) &lt;= wren;</text:p>
      <text:p text:style-name="P24"><text:s text:c="4"/>end process;</text:p>
      <text:p text:style-name="P24"/>
      <text:p text:style-name="P24"><text:s text:c="4"/>g0 : for j in 0 to 15 generate</text:p>
      <text:p text:style-name="P24"><text:s text:c="8"/>regh0 : regh</text:p>
      <text:p text:style-name="P24"><text:s text:c="12"/>port map(clk =&gt; clk, rstn =&gt; rstn, en =&gt; en(j), din =&gt; din, dout =&gt; ff(j));</text:p>
      <text:p text:style-name="P24"><text:s text:c="4"/>end generate;</text:p>
      <text:p text:style-name="P24"/>
      <text:p text:style-name="P24"><text:s text:c="4"/>dout1 &lt;= ff(conv_integer(rad1));</text:p>
      <text:p text:style-name="P24"><text:s text:c="4"/>dout2 &lt;= ff(conv_integer(rad2));</text:p>
      <text:p text:style-name="P24">end rtl;</text:p>
      <text:p text:style-name="P24"/>
      <text:p text:style-name="P24">library ieee;</text:p>
      <text:p text:style-name="P24"><text:s text:c="4"/>use ieee.std_logic_1164.all;</text:p>
      <text:p text:style-name="P24"><text:s text:c="4"/>use ieee.numeric_std.all;</text:p>
      <text:p text:style-name="P24"/>
      <text:p text:style-name="P24">entity tbregs is end entity;</text:p>
      <text:p text:style-name="P24"/>
      <text:p text:style-name="P24">architecture beh of tbregs is</text:p>
      <text:p text:style-name="P24"><text:s text:c="4"/>component regs port(</text:p>
      <text:p text:style-name="P24"><text:s text:c="8"/>rstn, clk, wren : in std_logic;</text:p>
      <text:p text:style-name="P24"><text:s text:c="8"/>wad : in std_logic_vector(3 downto 0);</text:p>
      <text:p text:style-name="P24"><text:s text:c="8"/>din : in std_logic_vector(31 downto 0);</text:p>
      <text:p text:style-name="P24"><text:s text:c="8"/>rad1, rad2 : in std_logic_vector(3 downto 0);</text:p>
      <text:p text:style-name="P24"><text:s text:c="8"/>dout1, dout2 : out std_logic_vector(31 downto 0));</text:p>
      <text:p text:style-name="P24">end component;</text:p>
      <text:p text:style-name="P24"/>
      <text:p text:style-name="P24">signal rstn, clk, wren : std_logic;</text:p>
      <text:p text:style-name="P24">signal wad : std_logic_vector(3 downto 0);</text:p>
      <text:p text:style-name="P24">signal din : std_logic_vector(31 downto 0);</text:p>
      <text:p text:style-name="P24">signal rad1, rad2 : std_logic_vector(3 downto 0);</text:p>
      <text:p text:style-name="P24">signal dout1, dout2 : std_logic_vector(31 downto 0);</text:p>
      <text:p text:style-name="P24">signal data : std_logic_vector(31 downto 0) := (others =&gt; '0');</text:p>
      <text:p text:style-name="P24">signal sel : std_logic_vector(3 downto 0) := (others =&gt; '0');</text:p>
      <text:p text:style-name="P24"/>
      <text:p text:style-name="P24">constant period : time := 50 ns;</text:p>
      <text:p text:style-name="P24">constant delay : time := 80 ns;</text:p>
      <text:p text:style-name="P24"><text:soft-page-break/></text:p>
      <text:p text:style-name="P24">begin</text:p>
      <text:p text:style-name="P24"/>
      <text:p text:style-name="P24"><text:s text:c="4"/>rstn &lt;= '0', '1' after delay *3;</text:p>
      <text:p text:style-name="P24"/>
      <text:p text:style-name="P24"><text:s text:c="4"/>clk0 : process</text:p>
      <text:p text:style-name="P24"><text:s text:c="4"/>begin</text:p>
      <text:p text:style-name="P24"><text:s text:c="8"/>clk &lt;= '0'; wait for period;</text:p>
      <text:p text:style-name="P24"><text:s text:c="8"/>clk &lt;= '1'; wait for period;</text:p>
      <text:p text:style-name="P24"><text:s text:c="4"/>end process;</text:p>
      <text:p text:style-name="P24"/>
      <text:p text:style-name="P24"><text:s text:c="4"/>wren &lt;= '1'; </text:p>
      <text:p text:style-name="P24"/>
      <text:p text:style-name="P24"><text:s text:c="4"/>tbregs0 : process</text:p>
      <text:p text:style-name="P24"><text:s text:c="4"/>begin</text:p>
      <text:p text:style-name="P24"><text:s text:c="8"/>for i in 0 to 15 loop</text:p>
      <text:p text:style-name="P24"><text:s text:c="12"/>data &lt;= data(30 downto 0) &amp; not(data(1) xor data(5) xor data(6) xor data(31));</text:p>
      <text:p text:style-name="P24"><text:s text:c="12"/>din &lt;= data <text:s/>after delay;</text:p>
      <text:p text:style-name="P24"><text:s text:c="12"/>wad &lt;= std_logic_vector(to_unsigned(i,4)) after delay;</text:p>
      <text:p text:style-name="P24"/>
      <text:p text:style-name="P24"><text:s text:c="12"/>sel &lt;= sel(2 downto 0) &amp; not(sel(0) xor sel(3)) after delay;</text:p>
      <text:p text:style-name="P24"><text:s text:c="12"/>rad1 &lt;= sel after delay;</text:p>
      <text:p text:style-name="P24"><text:s text:c="12"/>rad2 &lt;= not(sel) after delay;</text:p>
      <text:p text:style-name="P24"><text:s text:c="12"/>wait until rising_edge(clk);</text:p>
      <text:p text:style-name="P24"><text:s text:c="8"/>end loop;</text:p>
      <text:p text:style-name="P24"><text:s text:c="4"/>end process;</text:p>
      <text:p text:style-name="P24"/>
      <text:p text:style-name="P24"><text:s text:c="4"/>regs0 : regs</text:p>
      <text:p text:style-name="P24"><text:s text:c="8"/>port map(rstn =&gt; rstn, clk =&gt; clk, wren =&gt; wren, </text:p>
      <text:p text:style-name="P24"><text:s text:c="17"/>wad =&gt; wad, din =&gt; din, rad1 =&gt; rad1, rad2 =&gt; rad2, </text:p>
      <text:p text:style-name="P24"><text:s text:c="17"/>dout1 =&gt; dout1, dout2 =&gt; dout2);</text:p>
      <text:p text:style-name="P24"/>
      <text:p text:style-name="P24">end beh; <text:s text:c="11"/></text:p>
      <text:p text:style-name="P24"/>
      <text:p text:style-name="P24"/>
      <text:p text:style-name="P24">library ieee;</text:p>
      <text:p text:style-name="P24"><text:s text:c="4"/>use ieee.std_logic_1164.all;</text:p>
      <text:p text:style-name="P24"><text:s text:c="4"/>use ieee.numeric_std.all;</text:p>
      <text:p text:style-name="P24"/>
      <text:p text:style-name="P24">entity dualram is </text:p>
      <text:p text:style-name="P24"><text:s text:c="4"/>generic( n <text:s text:c="15"/>: integer := 4; -- width of each data in the memory</text:p>
      <text:p text:style-name="P24"><text:s text:c="13"/>words <text:s text:c="11"/>: integer := 128; -- total number of memory words</text:p>
      <text:p text:style-name="P24"><text:s text:c="13"/>m <text:s text:c="15"/>: integer := 7; -- width of the address bus(2 **m words</text:p>
      <text:p text:style-name="P24"><text:s text:c="13"/>bpc <text:s text:c="11"/>: integer := 2;</text:p>
      <text:p text:style-name="P24"><text:s text:c="13"/>floopplan <text:s text:c="3"/>: integer := 0;</text:p>
      <text:p text:style-name="P24"><text:s text:c="13"/>buffer_size <text:s text:c="3"/>: string <text:s/>:= "default");</text:p>
      <text:p text:style-name="P24"/>
      <text:p text:style-name="P24"><text:s text:c="4"/>port( <text:s text:c="7"/>a <text:s text:c="7"/>: in std_logic_vector(m -1 <text:s/>downto 0); -- a address bus</text:p>
      <text:p text:style-name="P24"><text:s text:c="17"/>adin <text:s text:c="3"/>: in std_logic_vector(n -1 downto 0);</text:p>
      <text:p text:style-name="P24"><text:s text:c="17"/>awr <text:s text:c="4"/>: in std_logic; -- low pulse to write</text:p>
      <text:p text:style-name="P24"><text:soft-page-break/><text:s text:c="17"/>b <text:s text:c="7"/>: in std_logic_vector(m -1 downto 0); -- b address bus</text:p>
      <text:p text:style-name="P24"><text:s text:c="17"/>bdin <text:s/>: in std_logic_vector(n -1 downto 0);</text:p>
      <text:p text:style-name="P24"><text:s text:c="17"/>bwr <text:s text:c="4"/>: in std_logic; -- low pulse to write</text:p>
      <text:p text:style-name="P24"><text:s text:c="17"/>adout : out std_logic_vector(n -1 downto 0);</text:p>
      <text:p text:style-name="P24"><text:s text:c="17"/>bdout : out std_logic_vector(n -1 downto 0));</text:p>
      <text:p text:style-name="P24">end dualram;</text:p>
      <text:p text:style-name="P24"/>
      <text:p text:style-name="P24">architecture beh of dualram is</text:p>
      <text:p text:style-name="P24"><text:s text:c="4"/>constant dly : time := 3 ns;</text:p>
      <text:p text:style-name="P24"><text:s text:c="4"/>subtype bitsn is std_logic_vector(n -1 downto 0);</text:p>
      <text:p text:style-name="P24"><text:s text:c="4"/>type arytype is array(natural range &lt;&gt;) of bitsn;</text:p>
      <text:p text:style-name="P24"><text:s text:c="4"/>signal mem : arytype(0 to words -1);</text:p>
      <text:p text:style-name="P24"><text:s text:c="4"/>signal addr_match : std_logic; -- to indicate that hte addresses in both ports are identical</text:p>
      <text:p text:style-name="P24"><text:s text:c="4"/>signal abusyns, bbusyns : std_logic := '1'; -- indicate the busy situation</text:p>
      <text:p text:style-name="P24"><text:s text:c="4"/>signal writeas, writebs : std_logic := '1'; -- indicate the write operation</text:p>
      <text:p text:style-name="P24">begin</text:p>
      <text:p text:style-name="P24"/>
      <text:p text:style-name="P24"><text:s text:c="4"/>addr_match &lt;= '1' when(a = b) and (not is_x(a)) else '0';</text:p>
      <text:p text:style-name="P24"/>
      <text:p text:style-name="P24"><text:s text:c="4"/>p0 : process(a, awr, b, bwr, addr_match, mem)</text:p>
      <text:p text:style-name="P24"><text:s text:c="8"/>variable writea, writeb : std_logic := '0'; -- indicate write and busy status on both ports</text:p>
      <text:p text:style-name="P24"><text:s text:c="8"/>variable abusyn, bbusyn : std_logic := '1';</text:p>
      <text:p text:style-name="P24"><text:s text:c="4"/>begin</text:p>
      <text:p text:style-name="P24"><text:s text:c="8"/>if falling_edge(awr) then -- check status when awr is asserted low</text:p>
      <text:p text:style-name="P24"><text:s text:c="12"/>if abusyn = '1' then -- if port a is busy, the awr pulse is ignored</text:p>
      <text:p text:style-name="P24"><text:s text:c="16"/>if addr_match = '1' then -- checks whether the addresses are identical</text:p>
      <text:p text:style-name="P24"><text:s text:c="20"/>abusyn := not writeb; -- abusyn is asserted when port b has not completed its write operation</text:p>
      <text:p text:style-name="P24"><text:s text:c="20"/>bbusyn := writeb; writea := not writeb; -- if b does not have a pending write operation, bbusyn is asserted low and variable writea is set when port b does not have a pending write operation.</text:p>
      <text:p text:style-name="P24"><text:s text:c="16"/>else</text:p>
      <text:p text:style-name="P24"><text:s text:c="20"/>writea := '1'; -- always sets writeA variable when addresses don't match</text:p>
      <text:p text:style-name="P24"><text:s text:c="16"/>end if; -- this allows both ports to perform write operations independently since their addresses are not the same. </text:p>
      <text:p text:style-name="P24"><text:s text:c="12"/>end if;</text:p>
      <text:p text:style-name="P24"><text:s text:c="8"/>end if;</text:p>
      <text:p text:style-name="P24"/>
      <text:p text:style-name="P24"><text:s text:c="8"/>if falling_edge(bwr) then</text:p>
      <text:p text:style-name="P24"><text:s text:c="12"/>if bbusyn = '1' then</text:p>
      <text:p text:style-name="P24"><text:s text:c="16"/>if addr_match = '1' then</text:p>
      <text:p text:style-name="P24"><text:s text:c="20"/>bbusyn := not writea; abusyn := writea;</text:p>
      <text:p text:style-name="P24"><text:s text:c="20"/>writeb := not writea;</text:p>
      <text:p text:style-name="P24"><text:s text:c="16"/>else</text:p>
      <text:p text:style-name="P24"><text:s text:c="20"/>writeb := '1';</text:p>
      <text:p text:style-name="P24"><text:s text:c="16"/>end if;</text:p>
      <text:p text:style-name="P24"><text:s text:c="12"/>end if;</text:p>
      <text:p text:style-name="P24"><text:s text:c="8"/>end if;</text:p>
      <text:p text:style-name="P24"/>
      <text:p text:style-name="P24"><text:s text:c="8"/>if rising_edge(awr) then</text:p>
      <text:p text:style-name="P24"><text:s text:c="12"/>if abusyn = '1' and writea = '1' then</text:p>
      <text:p text:style-name="P24"><text:s text:c="16"/>mem(to_integer(unsigned(a))) &lt;= adin;</text:p>
      <text:p text:style-name="P24"><text:s text:c="16"/>writea := '0'; bbusyn := '1';</text:p>
      <text:p text:style-name="P24"><text:soft-page-break/><text:s text:c="12"/>end if;</text:p>
      <text:p text:style-name="P24"><text:s text:c="12"/>abusyn := '1';</text:p>
      <text:p text:style-name="P24"><text:s text:c="8"/>end if;</text:p>
      <text:p text:style-name="P24"/>
      <text:p text:style-name="P24"><text:s text:c="8"/>if rising_edge(bwr) then</text:p>
      <text:p text:style-name="P24"><text:s text:c="12"/>if bbusyn = '1' and writeb = '1' then</text:p>
      <text:p text:style-name="P24"><text:s text:c="16"/>mem(to_integer(unsigned(b))) &lt;= bdin;</text:p>
      <text:p text:style-name="P24"><text:s text:c="16"/>writeb := '0'; abusyn := '1';</text:p>
      <text:p text:style-name="P24"><text:s text:c="12"/>end if;</text:p>
      <text:p text:style-name="P24"><text:s text:c="12"/>bbusyn := '1';</text:p>
      <text:p text:style-name="P24"><text:s text:c="8"/>end if;</text:p>
      <text:p text:style-name="P24"/>
      <text:p text:style-name="P24"><text:s text:c="8"/>if abusyn = '1' then</text:p>
      <text:p text:style-name="P24"><text:s text:c="12"/>adout &lt;= mem(to_integer(unsigned(a))) after dly;</text:p>
      <text:p text:style-name="P24"><text:s text:c="8"/>end if;</text:p>
      <text:p text:style-name="P24"/>
      <text:p text:style-name="P24"><text:s text:c="8"/>if bbusyn = '1' then</text:p>
      <text:p text:style-name="P24"><text:s text:c="12"/>bdout &lt;= mem(to_integer(unsigned(b))) after dly;</text:p>
      <text:p text:style-name="P24"><text:s text:c="8"/>end if; <text:s text:c="7"/></text:p>
      <text:p text:style-name="P24"/>
      <text:p text:style-name="P24"><text:s text:c="8"/>abusyns &lt;= abusyn; bbusyns &lt;= bbusyn;</text:p>
      <text:p text:style-name="P24"><text:s text:c="8"/>writeas &lt;= writeA; writebs &lt;= writeb;</text:p>
      <text:p text:style-name="P24"><text:s text:c="4"/>end process;</text:p>
      <text:p text:style-name="P24">end beh;</text:p>
      <text:p text:style-name="P24"/>
      <text:p text:style-name="P24">library ieee;</text:p>
      <text:p text:style-name="P24"><text:s text:c="4"/>use ieee.std_logic_1164.all;</text:p>
      <text:p text:style-name="P24"><text:s text:c="4"/>use ieee.std_logic_unsigned.all;</text:p>
      <text:p text:style-name="P24"/>
      <text:p text:style-name="P24">entity tbdualram is end entity;</text:p>
      <text:p text:style-name="P24"/>
      <text:p text:style-name="P24">architecture beh of tbdualram is</text:p>
      <text:p text:style-name="P24"/>
      <text:p text:style-name="P24"><text:s text:c="4"/>component dualram is </text:p>
      <text:p text:style-name="P24"><text:s text:c="8"/>generic( n <text:s text:c="15"/>: integer := 4; -- width of each data in the memory</text:p>
      <text:p text:style-name="P24"><text:s text:c="17"/>words <text:s text:c="11"/>: integer := 128; -- total number of memory words</text:p>
      <text:p text:style-name="P24"><text:s text:c="17"/>m <text:s text:c="15"/>: integer := 7; -- width of the address bus(2 **m words</text:p>
      <text:p text:style-name="P24"><text:s text:c="17"/>bpc <text:s text:c="11"/>: integer := 2;</text:p>
      <text:p text:style-name="P24"><text:s text:c="17"/>floopplan <text:s text:c="3"/>: integer := 0;</text:p>
      <text:p text:style-name="P24"><text:s text:c="17"/>buffer_size <text:s text:c="3"/>: string <text:s/>:= "default");</text:p>
      <text:p text:style-name="P24"/>
      <text:p text:style-name="P24"><text:s text:c="8"/>port( <text:s text:c="7"/>a <text:s text:c="7"/>: in std_logic_vector(m -1 <text:s/>downto 0); -- a address bus</text:p>
      <text:p text:style-name="P24"><text:s text:c="21"/>adin <text:s text:c="3"/>: in std_logic_vector(n -1 downto 0);</text:p>
      <text:p text:style-name="P24"><text:s text:c="21"/>awr <text:s text:c="4"/>: in std_logic; -- low pulse to write</text:p>
      <text:p text:style-name="P24"><text:s text:c="21"/>b <text:s text:c="7"/>: in std_logic_vector(m -1 downto 0); -- b address bus</text:p>
      <text:p text:style-name="P24"><text:s text:c="21"/>bdin <text:s/>: in std_logic_vector(n -1 downto 0);</text:p>
      <text:p text:style-name="P24"><text:s text:c="21"/>bwr <text:s text:c="4"/>: in std_logic; -- low pulse to write</text:p>
      <text:p text:style-name="P24"><text:s text:c="21"/>adout : out std_logic_vector(n -1 downto 0);</text:p>
      <text:p text:style-name="P24"><text:s text:c="21"/>bdout : out std_logic_vector(n -1 downto 0));</text:p>
      <text:p text:style-name="P24"><text:s text:c="4"/>end component;</text:p>
      <text:p text:style-name="P24"><text:soft-page-break/></text:p>
      <text:p text:style-name="P24"><text:s text:c="4"/>constant dly : time := 10 ns;</text:p>
      <text:p text:style-name="P24"><text:s text:c="4"/>constant period : time := 50 ns;</text:p>
      <text:p text:style-name="P24"><text:s text:c="4"/>constant n : integer := 8;</text:p>
      <text:p text:style-name="P24"><text:s text:c="4"/>constant words : integer := 16;</text:p>
      <text:p text:style-name="P24"><text:s text:c="4"/>constant m : integer := 4;</text:p>
      <text:p text:style-name="P24"/>
      <text:p text:style-name="P24"><text:s text:c="4"/>signal a <text:s text:c="7"/>: std_logic_vector(m -1 <text:s/>downto 0); -- a address bus</text:p>
      <text:p text:style-name="P24"><text:s text:c="4"/>signal adin <text:s text:c="3"/>: std_logic_vector(n -1 downto 0);</text:p>
      <text:p text:style-name="P24"><text:s text:c="4"/>signal awr <text:s text:c="4"/>: std_logic; -- low pulse to write</text:p>
      <text:p text:style-name="P24"><text:s text:c="4"/>signal b <text:s text:c="7"/>: std_logic_vector(m -1 downto 0); -- b address bus</text:p>
      <text:p text:style-name="P24"><text:s text:c="4"/>signal bdin <text:s/>: std_logic_vector(n -1 downto 0);</text:p>
      <text:p text:style-name="P24"><text:s text:c="4"/>signal bwr <text:s text:c="5"/>: std_logic; -- low pulse to write</text:p>
      <text:p text:style-name="P24"><text:s text:c="4"/>signal adout : std_logic_vector(n -1 downto 0);</text:p>
      <text:p text:style-name="P24"><text:s text:c="4"/>signal bdout : std_logic_vector(n -1 downto 0);</text:p>
      <text:p text:style-name="P24"><text:s text:c="4"/>signal clk <text:s text:c="2"/>: std_logic;</text:p>
      <text:p text:style-name="P24"/>
      <text:p text:style-name="P24">begin</text:p>
      <text:p text:style-name="P24"><text:s text:c="4"/>p0 : process</text:p>
      <text:p text:style-name="P24"><text:s text:c="8"/>variable d : std_logic_vector(n -1 downto 0);</text:p>
      <text:p text:style-name="P24"><text:s text:c="4"/>begin</text:p>
      <text:p text:style-name="P24"><text:s text:c="8"/>a &lt;= (others =&gt; '0');</text:p>
      <text:p text:style-name="P24"><text:s text:c="8"/>adin &lt;= (others =&gt; '0');</text:p>
      <text:p text:style-name="P24"><text:s text:c="8"/>awr &lt;= '1';</text:p>
      <text:p text:style-name="P24"><text:s text:c="8"/>b &lt;= (others =&gt; '0');</text:p>
      <text:p text:style-name="P24"><text:s text:c="8"/>bdin &lt;= (others =&gt; '0');</text:p>
      <text:p text:style-name="P24"><text:s text:c="8"/>bwr &lt;= '1';</text:p>
      <text:p text:style-name="P24"><text:s text:c="8"/>d := (others =&gt; '0');</text:p>
      <text:p text:style-name="P24"><text:s text:c="8"/>-----write from A</text:p>
      <text:p text:style-name="P24"><text:s text:c="8"/>wait until rising_edge(clk);</text:p>
      <text:p text:style-name="P24"><text:s text:c="8"/>assert false report "write from A" severity note;</text:p>
      <text:p text:style-name="P24"><text:s text:c="8"/>for j in 1 to words loop</text:p>
      <text:p text:style-name="P24"><text:s text:c="12"/>a &lt;= a +1;</text:p>
      <text:p text:style-name="P24"><text:s text:c="12"/>adin &lt;= d;</text:p>
      <text:p text:style-name="P24"><text:s text:c="12"/>awr &lt;= '0' after dly, '1' after period;</text:p>
      <text:p text:style-name="P24"><text:s text:c="12"/>wait until rising_edge(clk);</text:p>
      <text:p text:style-name="P24"><text:s text:c="12"/>d := d(n -2 downto 0) &amp; not (d(n -1) xor d(0));</text:p>
      <text:p text:style-name="P24"><text:s text:c="8"/>end loop;</text:p>
      <text:p text:style-name="P24"/>
      <text:p text:style-name="P24"><text:s text:c="8"/>for j in 0 to 4 loop</text:p>
      <text:p text:style-name="P24"><text:s text:c="12"/>wait until rising_edge(clk);</text:p>
      <text:p text:style-name="P24"><text:s text:c="8"/>end loop;</text:p>
      <text:p text:style-name="P24"><text:s text:c="8"/>-----write from b</text:p>
      <text:p text:style-name="P24"><text:s text:c="8"/>assert false report "write from B" severity note;</text:p>
      <text:p text:style-name="P24"><text:s text:c="8"/>for j in 1 to words loop</text:p>
      <text:p text:style-name="P24"><text:s text:c="12"/>b &lt;= b +1;</text:p>
      <text:p text:style-name="P24"><text:s text:c="12"/>bdin &lt;= d;</text:p>
      <text:p text:style-name="P24"><text:s text:c="12"/>bwr &lt;= '0' after dly, '1' after period;</text:p>
      <text:p text:style-name="P24"><text:s text:c="12"/>wait until rising_edge(clk);</text:p>
      <text:p text:style-name="P24"><text:s text:c="12"/>d := d(n -2 downto 0) &amp; not (d(n -1) xor d(0));</text:p>
      <text:p text:style-name="P24"><text:soft-page-break/><text:s text:c="8"/>end loop;</text:p>
      <text:p text:style-name="P24"/>
      <text:p text:style-name="P24"><text:s text:c="8"/>for j in 0 to 4 loop</text:p>
      <text:p text:style-name="P24"><text:s text:c="12"/>wait until rising_edge(clk);</text:p>
      <text:p text:style-name="P24"><text:s text:c="8"/>end loop;</text:p>
      <text:p text:style-name="P24"><text:s text:c="8"/>-----write from both sides</text:p>
      <text:p text:style-name="P24"><text:s text:c="8"/>assert false report "write from both sides" severity note;</text:p>
      <text:p text:style-name="P24"><text:s text:c="8"/>loop -- infinte loop, interesting.... <text:s text:c="9"/></text:p>
      <text:p text:style-name="P24"><text:s text:c="12"/>a &lt;= d(a'range);</text:p>
      <text:p text:style-name="P24"><text:s text:c="12"/>adin &lt;= not(d(n -1) xor d(0)) &amp; d(n -1 downto 1);</text:p>
      <text:p text:style-name="P24"><text:s text:c="12"/>b &lt;= b +1;</text:p>
      <text:p text:style-name="P24"><text:s text:c="12"/>bdin &lt;= d;</text:p>
      <text:p text:style-name="P24"><text:s text:c="12"/>if d(0) = '0' then -- force the same address</text:p>
      <text:p text:style-name="P24"><text:s text:c="16"/>b &lt;= d(b'range);</text:p>
      <text:p text:style-name="P24"><text:s text:c="12"/>end if;</text:p>
      <text:p text:style-name="P24"><text:s text:c="12"/>case d(2 downto 0) is</text:p>
      <text:p text:style-name="P24"><text:s text:c="16"/>when "000" =&gt; -- awr first</text:p>
      <text:p text:style-name="P24"><text:s text:c="20"/>assert false report " <text:s/>awr first " severity note;</text:p>
      <text:p text:style-name="P24"><text:s text:c="20"/>awr &lt;= '0' after dly, '1' after period;</text:p>
      <text:p text:style-name="P24"><text:s text:c="20"/>bwr &lt;= '0' after 2 *dly, '1' after period;</text:p>
      <text:p text:style-name="P24"><text:s text:c="16"/>when "001" =&gt; -- bwr first</text:p>
      <text:p text:style-name="P24"><text:s text:c="20"/>assert false report " bwr first " severity note;</text:p>
      <text:p text:style-name="P24"><text:s text:c="20"/>awr &lt;= '0' after 2 *dly, '1' after period;</text:p>
      <text:p text:style-name="P24"><text:s text:c="20"/>bwr &lt;= '0' after dly, '1' after period;</text:p>
      <text:p text:style-name="P24"><text:s text:c="16"/>when "010" =&gt; </text:p>
      <text:p text:style-name="P24"><text:s text:c="20"/>assert false report " same same time" severity note;</text:p>
      <text:p text:style-name="P24"><text:s text:c="20"/>awr &lt;= '0' after dly, '1' after period;</text:p>
      <text:p text:style-name="P24"><text:s text:c="20"/>bwr &lt;= '0' after dly, '1' after period;</text:p>
      <text:p text:style-name="P24"><text:s text:c="16"/>when "011" =&gt; -- awr covers bwr </text:p>
      <text:p text:style-name="P24"><text:s text:c="20"/>assert false report " awr covers bwr" severity note;</text:p>
      <text:p text:style-name="P24"><text:s text:c="20"/>awr &lt;= '0' after dly, '1' after period +dly; <text:s text:c="19"/></text:p>
      <text:p text:style-name="P24"><text:s text:c="20"/>bwr &lt;= '0' after 2 *dly, '1' after period;</text:p>
      <text:p text:style-name="P24"><text:s text:c="16"/>when "100" =&gt; -- bwr covers awr</text:p>
      <text:p text:style-name="P24"><text:s text:c="20"/>assert false report " bwr covers awr" severity note;</text:p>
      <text:p text:style-name="P24"><text:s text:c="20"/>bwr &lt;= '0' after dly, '1' after period +dly;</text:p>
      <text:p text:style-name="P24"><text:s text:c="20"/>awr &lt;= '0' after 2 *dly, '1' after period;</text:p>
      <text:p text:style-name="P24"><text:s text:c="16"/>when "101" =&gt; --bwr overlap awr</text:p>
      <text:p text:style-name="P24"><text:s text:c="20"/>assert false report " bwr overlap awr" severity note; <text:s text:c="17"/></text:p>
      <text:p text:style-name="P24"><text:s text:c="20"/>bwr &lt;= '0' after dly, '1' after period -dly;</text:p>
      <text:p text:style-name="P24"><text:s text:c="20"/>awr &lt;= '0' after 2 *dly, '1' after period;</text:p>
      <text:p text:style-name="P24"><text:s text:c="16"/>when "110" =&gt; -- awr overlap 2 bwr </text:p>
      <text:p text:style-name="P24"><text:s text:c="20"/>assert false report " awr overlap 2 bwr" severity note; <text:s text:c="17"/></text:p>
      <text:p text:style-name="P24"><text:s text:c="20"/>awr &lt;= '0' after dly, '1' after 2 *period -dly;</text:p>
      <text:p text:style-name="P24"><text:s text:c="20"/>bwr &lt;= '0' after 2 *dly, '1' after period,</text:p>
      <text:p text:style-name="P24"><text:s text:c="20"/>'0' after period +dly,</text:p>
      <text:p text:style-name="P24"><text:s text:c="20"/>'1' after 2 * period -2 *dly; </text:p>
      <text:p text:style-name="P24"><text:s text:c="16"/>when others =&gt; -- bwr overlap 2 awr</text:p>
      <text:p text:style-name="P24"><text:s text:c="20"/>assert false report " bwr overlap 2 awr" severity note; <text:s text:c="17"/></text:p>
      <text:p text:style-name="P24"><text:s text:c="20"/>bwr &lt;= '0' after dly, '1' after 2 *period -dly;</text:p>
      <text:p text:style-name="P24"><text:s text:c="20"/>awr &lt;= '0' after 2 *dly, '1' after period,</text:p>
      <text:p text:style-name="P24"><text:soft-page-break/><text:s text:c="20"/>'0' after period + dly,</text:p>
      <text:p text:style-name="P24"><text:s text:c="20"/>'1' after 2 * period -2 *dly;</text:p>
      <text:p text:style-name="P24"><text:s text:c="12"/>end case;</text:p>
      <text:p text:style-name="P24"><text:s text:c="12"/>wait until rising_edge(clk);</text:p>
      <text:p text:style-name="P24"><text:s text:c="12"/>d := d +1;</text:p>
      <text:p text:style-name="P24"><text:s text:c="8"/>end loop;</text:p>
      <text:p text:style-name="P24"><text:s text:c="4"/>end process;</text:p>
      <text:p text:style-name="P24"/>
      <text:p text:style-name="P24"><text:s text:c="4"/>clkgen : process</text:p>
      <text:p text:style-name="P24"><text:s text:c="4"/>begin</text:p>
      <text:p text:style-name="P24"><text:s text:c="8"/>clk &lt;= '0'; wait for period;</text:p>
      <text:p text:style-name="P24"><text:s text:c="8"/>clk &lt;= '1'; wait for period;</text:p>
      <text:p text:style-name="P24"><text:s text:c="4"/>end process;</text:p>
      <text:p text:style-name="P24"/>
      <text:p text:style-name="P24"><text:s text:c="4"/>dualram0 : dualram</text:p>
      <text:p text:style-name="P24"><text:s text:c="8"/>generic map(n =&gt; n, words =&gt; words, m =&gt; m, bpc =&gt; 2, floopplan =&gt; 0, buffer_size =&gt; "2")</text:p>
      <text:p text:style-name="P24"><text:s text:c="8"/>port map(a =&gt; a, adin =&gt; adin, awr =&gt; awr, b =&gt; b, bdin =&gt; bdin , <text:s text:c="3"/>bwr =&gt; bwr , <text:s text:c="3"/>adout =&gt; adout ,bdout =&gt; bdout);</text:p>
      <text:p text:style-name="P24">end beh; <text:s text:c="15"/></text:p>
      <text:p text:style-name="P24"/>
      <text:p text:style-name="P24"/>
      <text:p text:style-name="P24"/>
      <text:p text:style-name="P24"/>
      <text:p text:style-name="P24">library ieee;</text:p>
      <text:p text:style-name="P24"><text:s text:c="4"/>use ieee.std_logic_1164.all;</text:p>
      <text:p text:style-name="P24"><text:s text:c="4"/>use ieee.std_logic_unsigned.all;</text:p>
      <text:p text:style-name="P24"/>
      <text:p text:style-name="P24">entity fifosyn is port( <text:s text:c="3"/></text:p>
      <text:p text:style-name="P24"><text:s text:c="4"/>clk, rstn, rn, wn : in std_logic;</text:p>
      <text:p text:style-name="P24"><text:s text:c="4"/>emptyn, fulln : out std_logic;</text:p>
      <text:p text:style-name="P24"><text:s text:c="4"/>d : in std_logic_vector(7 downto 0);</text:p>
      <text:p text:style-name="P24"><text:s text:c="4"/>q : out std_logic_vector(7 downto 0));</text:p>
      <text:p text:style-name="P24">end fifosyn;</text:p>
      <text:p text:style-name="P24"/>
      <text:p text:style-name="P24">-- word is size of grouped bits</text:p>
      <text:p text:style-name="P24">architecture rtl of fifosyn is</text:p>
      <text:p text:style-name="P24"><text:s text:c="4"/>constant m : integer := 8; -- width of the data</text:p>
      <text:p text:style-name="P24"><text:s text:c="4"/>constant n : integer := 8; -- number of words in the fifo</text:p>
      <text:p text:style-name="P24"><text:s text:c="4"/>signal rcntr, wcntr : std_logic_vector(2 downto 0); --R/W counter / pointer</text:p>
      <text:p text:style-name="P24"><text:s text:c="4"/>subtype wrdtype is std_logic_vector(n -1 downto 0);</text:p>
      <text:p text:style-name="P24"><text:s text:c="4"/>type regtype is array(0 to m -1) of wrdtype;</text:p>
      <text:p text:style-name="P24"><text:s text:c="4"/>signal reg : regtype;</text:p>
      <text:p text:style-name="P24"><text:s text:c="4"/>signal rw : std_logic_vector(1 downto 0);</text:p>
      <text:p text:style-name="P24"><text:s text:c="4"/>signal fullnf, emptynf : std_logic;</text:p>
      <text:p text:style-name="P24">begin</text:p>
      <text:p text:style-name="P24"><text:s text:c="4"/>rw &lt;= rn &amp; wn; -- concatenation of read and write line to simultaniously check them in the if statement</text:p>
      <text:p text:style-name="P24"><text:s text:c="4"/>seq : process(rstn, clk)</text:p>
      <text:p text:style-name="P24"><text:s text:c="4"/>begin</text:p>
      <text:p text:style-name="P24"><text:s text:c="8"/>if rstn = '0' then</text:p>
      <text:p text:style-name="P24"><text:s text:c="12"/>rcntr &lt;= (others =&gt; '0');</text:p>
      <text:p text:style-name="P24"><text:s text:c="12"/>wcntr &lt;= (others =&gt; '0');</text:p>
      <text:p text:style-name="P24"><text:soft-page-break/><text:s text:c="12"/>emptynf &lt;= '0';</text:p>
      <text:p text:style-name="P24"><text:s text:c="12"/>fullnf &lt;= '1';</text:p>
      <text:p text:style-name="P24"/>
      <text:p text:style-name="P24"><text:s text:c="12"/>for j in 0 to m -1 loop</text:p>
      <text:p text:style-name="P24"><text:s text:c="16"/>reg(j) &lt;= (others =&gt; '0');</text:p>
      <text:p text:style-name="P24"><text:s text:c="12"/>end loop;</text:p>
      <text:p text:style-name="P24"><text:s text:c="8"/>elsif rising_edge(clk) then</text:p>
      <text:p text:style-name="P24"><text:s text:c="12"/>case rw is</text:p>
      <text:p text:style-name="P24"><text:s text:c="16"/>when "00" =&gt; -- read and write at the same time</text:p>
      <text:p text:style-name="P24"><text:s text:c="20"/>rcntr &lt;= rcntr +1; -- increment and store in the same clk cycle</text:p>
      <text:p text:style-name="P24"><text:s text:c="20"/>wcntr &lt;= wcntr +1;</text:p>
      <text:p text:style-name="P24"><text:s text:c="20"/>reg(conv_integer(wcntr)) &lt;= d;</text:p>
      <text:p text:style-name="P24"><text:s text:c="16"/>when "01" =&gt; -- only read</text:p>
      <text:p text:style-name="P24"><text:s text:c="20"/>if emptynf = '1' then -- not empty</text:p>
      <text:p text:style-name="P24"><text:s text:c="24"/>if rcntr +1 = wcntr then -- if reading last byte then</text:p>
      <text:p text:style-name="P24"><text:s text:c="28"/>emptynf &lt;= '0'; -- set empty flag</text:p>
      <text:p text:style-name="P24"><text:s text:c="24"/>end if;</text:p>
      <text:p text:style-name="P24"><text:s text:c="24"/>rcntr &lt;= rcntr +1;</text:p>
      <text:p text:style-name="P24"><text:s text:c="20"/>end if;</text:p>
      <text:p text:style-name="P24"><text:s text:c="20"/>fullnf &lt;= '1'; -- not full</text:p>
      <text:p text:style-name="P24"><text:s text:c="16"/>when "10" =&gt; -- only write</text:p>
      <text:p text:style-name="P24"><text:s text:c="20"/>emptynf &lt;= '1'; -- not empty</text:p>
      <text:p text:style-name="P24"><text:s text:c="20"/>if fullnf = '1' then -- not full</text:p>
      <text:p text:style-name="P24"><text:s text:c="24"/>reg(conv_integer(wcntr)) &lt;= d;</text:p>
      <text:p text:style-name="P24"><text:s text:c="24"/>if wcntr +1 = rcntr then</text:p>
      <text:p text:style-name="P24"><text:s text:c="28"/>fullnf &lt;= '0'; <text:s/>-- full</text:p>
      <text:p text:style-name="P24"><text:s text:c="24"/>end if;</text:p>
      <text:p text:style-name="P24"><text:s text:c="24"/>wcntr &lt;= wcntr +1;</text:p>
      <text:p text:style-name="P24"><text:s text:c="20"/>end if;</text:p>
      <text:p text:style-name="P24"><text:s text:c="16"/>when others =&gt; null;</text:p>
      <text:p text:style-name="P24"><text:s text:c="12"/>end case;</text:p>
      <text:p text:style-name="P24"><text:s text:c="8"/>end if;</text:p>
      <text:p text:style-name="P24"><text:s text:c="4"/>end process;</text:p>
      <text:p text:style-name="P24"/>
      <text:p text:style-name="P24"><text:s text:c="4"/>q &lt;= reg(conv_integer(rcntr));</text:p>
      <text:p text:style-name="P24"><text:s text:c="4"/>fulln &lt;= fullnf;</text:p>
      <text:p text:style-name="P24"><text:s text:c="4"/>emptyn &lt;= emptynf;</text:p>
      <text:p text:style-name="P24">end rtl;</text:p>
      <text:p text:style-name="P24"/>
      <text:p text:style-name="P24">library ieee;</text:p>
      <text:p text:style-name="P24"><text:s text:c="4"/>use ieee.std_logic_1164.all;</text:p>
      <text:p text:style-name="P24"/>
      <text:p text:style-name="P24">entity tbfifosyn is end entity;</text:p>
      <text:p text:style-name="P24"/>
      <text:p text:style-name="P24">architecture beh of tbfifosyn is</text:p>
      <text:p text:style-name="P24"><text:s text:c="4"/>component fifosyn port( <text:s text:c="3"/></text:p>
      <text:p text:style-name="P24"><text:s text:c="8"/>clk, rstn, rn, wn : in std_logic;</text:p>
      <text:p text:style-name="P24"><text:s text:c="8"/>emptyn, fulln : out std_logic;</text:p>
      <text:p text:style-name="P24"><text:s text:c="8"/>d : in std_logic_vector(7 downto 0);</text:p>
      <text:p text:style-name="P24"><text:s text:c="8"/>q : out std_logic_vector(7 downto 0));</text:p>
      <text:p text:style-name="P24"><text:soft-page-break/>end component;</text:p>
      <text:p text:style-name="P24"/>
      <text:p text:style-name="P24">signal clk, rstn, rn, wn : std_logic;</text:p>
      <text:p text:style-name="P24">signal emptyn, fulln : std_logic;</text:p>
      <text:p text:style-name="P24">signal d : std_logic_vector(7 downto 0);</text:p>
      <text:p text:style-name="P24">signal q : std_logic_vector(7 downto 0);</text:p>
      <text:p text:style-name="P24">signal rw : std_logic_vector(1 downto 0);</text:p>
      <text:p text:style-name="P24"/>
      <text:p text:style-name="P24">constant period : time := 50 ns;</text:p>
      <text:p text:style-name="P24">constant delay : time := 80 ns;</text:p>
      <text:p text:style-name="P24"/>
      <text:p text:style-name="P24">begin</text:p>
      <text:p text:style-name="P24"><text:s text:c="4"/>rstn &lt;= '0', '1' after delay *3;</text:p>
      <text:p text:style-name="P24"/>
      <text:p text:style-name="P24"><text:s text:c="4"/>clk0 : process</text:p>
      <text:p text:style-name="P24"><text:s text:c="4"/>begin</text:p>
      <text:p text:style-name="P24"><text:s text:c="8"/>clk &lt;= '0'; wait for period;</text:p>
      <text:p text:style-name="P24"><text:s text:c="8"/>clk &lt;= '1'; wait for period;</text:p>
      <text:p text:style-name="P24"><text:s text:c="4"/>end process;</text:p>
      <text:p text:style-name="P24"/>
      <text:p text:style-name="P24"><text:s text:c="4"/>-- <text:s text:c="3"/>data0 : process</text:p>
      <text:p text:style-name="P24"><text:s text:c="4"/>-- <text:s text:c="7"/>variable var : std_logic_vector(d'range) := (others =&gt; '0');</text:p>
      <text:p text:style-name="P24"><text:s text:c="4"/>-- <text:s text:c="3"/>begin</text:p>
      <text:p text:style-name="P24"><text:s text:c="4"/>-- <text:s text:c="7"/>var := var((var'high -1) downto 0) &amp; (var(var'high) xor (not var(2)));</text:p>
      <text:p text:style-name="P24"><text:s text:c="4"/>-- <text:s text:c="7"/>d &lt;= var after delay;</text:p>
      <text:p text:style-name="P24"><text:s text:c="4"/>-- <text:s text:c="7"/>rn &lt;= var(4) after delay;</text:p>
      <text:p text:style-name="P24"><text:s text:c="4"/>-- <text:s text:c="7"/>wn &lt;= var(3) after delay;</text:p>
      <text:p text:style-name="P24"><text:s text:c="4"/>-- <text:s text:c="7"/>wait until rising_edge(clk);</text:p>
      <text:p text:style-name="P24"><text:s text:c="4"/>-- <text:s text:c="3"/>end process;</text:p>
      <text:p text:style-name="P24"/>
      <text:p text:style-name="P24"/>
      <text:p text:style-name="P24"/>
      <text:p text:style-name="P24"><text:s text:c="4"/>p0: process</text:p>
      <text:p text:style-name="P24"><text:s text:c="8"/>variable v : std_logic_vector(7 downto 0) := "00000000";</text:p>
      <text:p text:style-name="P24"><text:s text:c="8"/>variable cnt : integer := 0;</text:p>
      <text:p text:style-name="P24"><text:s text:c="4"/>begin</text:p>
      <text:p text:style-name="P24"><text:s text:c="8"/>d &lt;= v after delay;</text:p>
      <text:p text:style-name="P24"><text:s text:c="8"/>if cnt &gt; 10 and cnt &lt; 20 then</text:p>
      <text:p text:style-name="P24"><text:s text:c="12"/>rn &lt;= '1' after delay; <text:s/>wn &lt;= '0' after delay;</text:p>
      <text:p text:style-name="P24"><text:s text:c="8"/>elsif cnt &gt; 20 and cnt &lt; 30 then</text:p>
      <text:p text:style-name="P24"><text:s text:c="12"/>rn &lt;= '0' after delay; wn &lt;= '1' after delay;</text:p>
      <text:p text:style-name="P24"><text:s text:c="8"/>else</text:p>
      <text:p text:style-name="P24"><text:s text:c="12"/>rn &lt;= v(2) after delay; wn &lt;= v(6) after delay;</text:p>
      <text:p text:style-name="P24"><text:s text:c="8"/>end if;</text:p>
      <text:p text:style-name="P24"><text:s text:c="8"/>wait until rising_edge(clk);</text:p>
      <text:p text:style-name="P24"><text:s text:c="8"/>v := v(6 downto 0) &amp; (v(7) xor (not v(2)));</text:p>
      <text:p text:style-name="P24"><text:s text:c="8"/>cnt := cnt +1;</text:p>
      <text:p text:style-name="P24"><text:s text:c="4"/>end process;</text:p>
      <text:p text:style-name="P24"/>
      <text:p text:style-name="P24"><text:s text:c="4"/>fifosyn0 : fifosyn</text:p>
      <text:p text:style-name="P24"><text:soft-page-break/><text:s text:c="8"/>port map( <text:s text:c="3"/>clk =&gt; clk, </text:p>
      <text:p text:style-name="P24"><text:s text:c="21"/>rstn =&gt; rstn, </text:p>
      <text:p text:style-name="P24"><text:s text:c="21"/>rn =&gt; rn, </text:p>
      <text:p text:style-name="P24"><text:s text:c="21"/>wn =&gt; wn, </text:p>
      <text:p text:style-name="P24"><text:s text:c="21"/>emptyn =&gt; emptyn,</text:p>
      <text:p text:style-name="P24"><text:s text:c="21"/>fulln =&gt; fulln,</text:p>
      <text:p text:style-name="P24"><text:s text:c="21"/>d =&gt; d,</text:p>
      <text:p text:style-name="P24"><text:s text:c="21"/>q =&gt; q);</text:p>
      <text:p text:style-name="P24"/>
      <text:p text:style-name="P24">end beh; <text:s text:c="3"/></text:p>
      <text:p text:style-name="P24"/>
      <text:p text:style-name="P24"/>
      <text:p text:style-name="P24">library ieee;</text:p>
      <text:p text:style-name="P24"><text:s text:c="4"/>use ieee.std_logic_1164.all;</text:p>
      <text:p text:style-name="P24"><text:s text:c="4"/>use ieee.std_logic_unsigned.all;</text:p>
      <text:p text:style-name="P24"/>
      <text:p text:style-name="P24">entity tbdram is end entity;</text:p>
      <text:p text:style-name="P24"/>
      <text:p text:style-name="P24">architecture beh of tbdram is</text:p>
      <text:p text:style-name="P24"><text:s text:c="4"/>component dram </text:p>
      <text:p text:style-name="P24"><text:s text:c="4"/>generic(</text:p>
      <text:p text:style-name="P24"><text:s text:c="8"/>asize <text:s text:c="4"/>: natural <text:s text:c="3"/>:= 9; <text:s text:c="4"/>-- address width</text:p>
      <text:p text:style-name="P24"><text:s text:c="8"/>dsize <text:s text:c="7"/>: natural <text:s text:c="3"/>:= 16; <text:s text:c="4"/>-- data width</text:p>
      <text:p text:style-name="P24"><text:s text:c="8"/>t_asr <text:s text:c="7"/>: time <text:s text:c="7"/>:= 0 ns; <text:s text:c="3"/>-- row address setup</text:p>
      <text:p text:style-name="P24"><text:s text:c="8"/>t_rah <text:s text:c="7"/>: time <text:s text:c="7"/>:= 10 ns;-- row address holg</text:p>
      <text:p text:style-name="P24"><text:s text:c="8"/>t_asc <text:s text:c="7"/>: time <text:s text:c="8"/>:= 0 ns; -- column address setup</text:p>
      <text:p text:style-name="P24"><text:s text:c="8"/>t_cah <text:s text:c="7"/>: time <text:s text:c="7"/>:= 10 ns;-- column address hold</text:p>
      <text:p text:style-name="P24"><text:s text:c="8"/>t_oe <text:s text:c="7"/>: time <text:s text:c="7"/>:= 15 ns;-- output enable time</text:p>
      <text:p text:style-name="P24"><text:s text:c="8"/>t_od <text:s text:c="7"/>: time <text:s text:c="7"/>:= 3 ns; -- output disable time</text:p>
      <text:p text:style-name="P24"><text:s text:c="8"/>t_ds <text:s text:c="7"/>: time <text:s text:c="7"/>:= 0 ns; -- write data setup time</text:p>
      <text:p text:style-name="P24"><text:s text:c="8"/>t_dh <text:s text:c="7"/>: time <text:s text:c="7"/>:= 8 ns; -- write data hold time</text:p>
      <text:p text:style-name="P24"><text:s text:c="8"/>t_off <text:s text:c="7"/>: time <text:s text:c="7"/>:= 3 ns; -- data to z time</text:p>
      <text:p text:style-name="P24"><text:s text:c="8"/>check_on <text:s text:c="3"/>: boolean <text:s text:c="3"/>:= false);-- check timing or not</text:p>
      <text:p text:style-name="P24"><text:s text:c="4"/>port(</text:p>
      <text:p text:style-name="P24"><text:s text:c="8"/>a <text:s text:c="7"/>: in std_logic_vector(asize -1 downto 0);</text:p>
      <text:p text:style-name="P24"><text:s text:c="8"/>dq <text:s text:c="7"/>: inout std_logic_vector(dsize -1 downto 0);</text:p>
      <text:p text:style-name="P24"><text:s text:c="8"/>rasn <text:s text:c="3"/>: in std_logic;</text:p>
      <text:p text:style-name="P24"><text:s text:c="8"/>casn <text:s text:c="3"/>: in std_logic;</text:p>
      <text:p text:style-name="P24"><text:s text:c="8"/>wen <text:s text:c="3"/>: in std_logic;</text:p>
      <text:p text:style-name="P24"><text:s text:c="8"/>oen <text:s text:c="2"/>: in std_logic);</text:p>
      <text:p text:style-name="P24">end component;</text:p>
      <text:p text:style-name="P24"/>
      <text:p text:style-name="P24">constant period : time := 20 ns;</text:p>
      <text:p text:style-name="P24">constant asize : natural := 9;</text:p>
      <text:p text:style-name="P24">constant dsize : natural := 8;</text:p>
      <text:p text:style-name="P24">constant check_on : boolean := true;</text:p>
      <text:p text:style-name="P24"/>
      <text:p text:style-name="P24">signal a <text:s text:c="7"/>: std_logic_vector(asize -1 downto 0);</text:p>
      <text:p text:style-name="P24">signal dq <text:s text:c="3"/>: std_logic_vector(dsize -1 downto 0);</text:p>
      <text:p text:style-name="P24">signal rasn <text:s text:c="3"/>: std_logic;</text:p>
      <text:p text:style-name="P24"><text:soft-page-break/>signal casn <text:s text:c="3"/>: std_logic;</text:p>
      <text:p text:style-name="P24">signal wen <text:s text:c="3"/>: std_logic;</text:p>
      <text:p text:style-name="P24">signal oen <text:s/>: std_logic;</text:p>
      <text:p text:style-name="P24">signal clk <text:s/>: std_logic;</text:p>
      <text:p text:style-name="P24"/>
      <text:p text:style-name="P24">procedure do_one(</text:p>
      <text:p text:style-name="P24"><text:s text:c="4"/>constant rw : in integer;</text:p>
      <text:p text:style-name="P24"><text:s text:c="4"/>constant t_a, t_dq, t_rasn, t_casn, t_wen, t_oen : in time;</text:p>
      <text:p text:style-name="P24"><text:s text:c="4"/>constant data : in std_logic_vector(dsize -1 downto 0);</text:p>
      <text:p text:style-name="P24"><text:s text:c="4"/>constant ca : in std_logic_vector(asize -1 downto 0);</text:p>
      <text:p text:style-name="P24"><text:s text:c="4"/>signal clk : in std_logic;</text:p>
      <text:p text:style-name="P24"><text:s text:c="4"/>signal a <text:s text:c="7"/>: out std_logic_vector(asize -1 downto 0);</text:p>
      <text:p text:style-name="P24"><text:s text:c="4"/>signal dq <text:s text:c="3"/>: out std_logic_vector(dsize -1 downto 0);</text:p>
      <text:p text:style-name="P24"><text:s text:c="4"/>signal rasn, casn, wen, oen : out std_logic) is</text:p>
      <text:p text:style-name="P24">begin</text:p>
      <text:p text:style-name="P24"><text:s text:c="4"/>wait until rising_edge(clk);</text:p>
      <text:p text:style-name="P24"><text:s text:c="4"/>a &lt;= ca after t_a; casn &lt;= '0' after t_casn;</text:p>
      <text:p text:style-name="P24"><text:s text:c="4"/>wen &lt;= '1' after t_wen; oen &lt;= '1' after t_oen;</text:p>
      <text:p text:style-name="P24"><text:s text:c="4"/>dq &lt;= (others =&gt; 'Z') after t_dq;</text:p>
      <text:p text:style-name="P24"><text:s text:c="4"/>if rw = 0 then -- read</text:p>
      <text:p text:style-name="P24"><text:s text:c="8"/>oen &lt;= '0' after t_oen;</text:p>
      <text:p text:style-name="P24"><text:s text:c="4"/>elsif rw = 1 then -- write</text:p>
      <text:p text:style-name="P24"><text:s text:c="8"/>wen &lt;= '0' after t_wen; dq &lt;= data after t_dq;</text:p>
      <text:p text:style-name="P24"><text:s text:c="4"/>else -- read and then write</text:p>
      <text:p text:style-name="P24"><text:s text:c="8"/>oen &lt;= '0' after t_oen;</text:p>
      <text:p text:style-name="P24"><text:s text:c="8"/>wait until rising_edge(clk);</text:p>
      <text:p text:style-name="P24"><text:s text:c="8"/>a &lt;= (others =&gt; 'Z') after t_a;</text:p>
      <text:p text:style-name="P24"><text:s text:c="8"/>oen &lt;= '1' after t_oen;</text:p>
      <text:p text:style-name="P24"><text:s text:c="8"/>wait until rising_edge(clk);</text:p>
      <text:p text:style-name="P24"><text:s text:c="8"/>wen &lt;= '0' after t_wen; dq &lt;= data after t_dq;</text:p>
      <text:p text:style-name="P24"><text:s text:c="4"/>end if;</text:p>
      <text:p text:style-name="P24"><text:s text:c="4"/>wait until rising_edge(clk);</text:p>
      <text:p text:style-name="P24"><text:s text:c="4"/>casn &lt;= '1' after t_casn;</text:p>
      <text:p text:style-name="P24"><text:s text:c="4"/>wen &lt;= '1' after t_wen; oen &lt;= '1' after t_oen;</text:p>
      <text:p text:style-name="P24"><text:s text:c="4"/>dq &lt;= (others =&gt; 'Z') after t_dq;</text:p>
      <text:p text:style-name="P24"><text:s text:c="4"/>a <text:s/>&lt;= (others =&gt; 'Z') after t_a;</text:p>
      <text:p text:style-name="P24">end do_one;</text:p>
      <text:p text:style-name="P24"/>
      <text:p text:style-name="P24">procedure rwcycle(</text:p>
      <text:p text:style-name="P24"><text:s text:c="4"/>constant rw : in natural; -- r = 0, w = 1, rw = 2</text:p>
      <text:p text:style-name="P24"><text:s text:c="4"/>constant word_cnt : in natural;</text:p>
      <text:p text:style-name="P24"><text:s text:c="4"/>constant va : std_logic_vector(asize -1 downto 0);</text:p>
      <text:p text:style-name="P24"><text:s text:c="4"/>constant vd : std_logic_vector(dsize -1 downto 0);</text:p>
      <text:p text:style-name="P24"><text:s text:c="4"/>signal clk : in std_logic;</text:p>
      <text:p text:style-name="P24"><text:s text:c="4"/>signal a <text:s text:c="7"/>: out std_logic_vector(asize -1 downto 0);</text:p>
      <text:p text:style-name="P24"><text:s text:c="4"/>signal dq <text:s text:c="3"/>: out std_logic_vector(dsize -1 downto 0);</text:p>
      <text:p text:style-name="P24"><text:s text:c="4"/>signal rasn, casn, wen, oen : out std_logic) is</text:p>
      <text:p text:style-name="P24"><text:s text:c="4"/>variable t_a, t_dq, t_rasn, t_casn : time := 0 ns;</text:p>
      <text:p text:style-name="P24"><text:s text:c="4"/>variable t_wen, t_oen <text:s text:c="17"/>: time := 0 ns;</text:p>
      <text:p text:style-name="P24"><text:s text:c="4"/>variable ca : std_logic_vector(asize -1 downto 0);</text:p>
      <text:p text:style-name="P24"><text:soft-page-break/><text:s text:c="4"/>variable cd : std_logic_vector(dsize -1 downto 0);</text:p>
      <text:p text:style-name="P24">begin</text:p>
      <text:p text:style-name="P24"><text:s text:c="4"/>ca := va; cd := vd;</text:p>
      <text:p text:style-name="P24"><text:s text:c="4"/>wait until rising_edge(clk);</text:p>
      <text:p text:style-name="P24"><text:s text:c="4"/>for j in 1 to word_cnt loop</text:p>
      <text:p text:style-name="P24"><text:s text:c="8"/>t_a <text:s text:c="7"/>:= conv_integer(vd(2 downto 0)) * 1 ns;</text:p>
      <text:p text:style-name="P24"><text:s text:c="8"/>t_dq <text:s text:c="7"/>:= conv_integer(vd(3 downto 1)) * 1 ns;</text:p>
      <text:p text:style-name="P24"><text:s text:c="8"/>t_rasn <text:s text:c="3"/>:= conv_integer(vd(4 downto 2)) * 1 ns;</text:p>
      <text:p text:style-name="P24"><text:s text:c="8"/>t_casn <text:s text:c="4"/>:= conv_integer(vd(5 downto 3)) * 1 ns;</text:p>
      <text:p text:style-name="P24"><text:s text:c="8"/>t_wen <text:s text:c="7"/>:= conv_integer(vd(6 downto 4)) * 1 ns;</text:p>
      <text:p text:style-name="P24"><text:s text:c="8"/>t_oen <text:s text:c="7"/>:= conv_integer(vd(7 downto 5)) * 1 ns;</text:p>
      <text:p text:style-name="P24"><text:s text:c="8"/>a &lt;= va after t_a; rasn &lt;= '0' after t_rasn;</text:p>
      <text:p text:style-name="P24"><text:s text:c="8"/>ca := (not ca(0) xor ca(1)) &amp; ca(asize -1 downto 1);</text:p>
      <text:p text:style-name="P24"><text:s text:c="8"/>do_one(rw, t_a, t_dq, t_rasn, t_casn, t_wen, t_oen, cd, ca,</text:p>
      <text:p text:style-name="P24"><text:s text:c="15"/>clk, a, dq, rasn, casn, wen, oen);</text:p>
      <text:p text:style-name="P24"><text:s text:c="8"/>cd := (not cd(0) xor cd(1)) &amp; cd(dsize -1 downto 1);</text:p>
      <text:p text:style-name="P24"><text:s text:c="4"/>end loop;</text:p>
      <text:p text:style-name="P24"><text:s text:c="4"/>rasn &lt;= '1' after t_rasn;</text:p>
      <text:p text:style-name="P24"><text:s text:c="4"/>wait until rising_edge(clk);</text:p>
      <text:p text:style-name="P24">end rwcycle;</text:p>
      <text:p text:style-name="P24"/>
      <text:p text:style-name="P24">function lfb(constant d : std_logic_vector) return std_logic_vector is</text:p>
      <text:p text:style-name="P24"><text:s text:c="4"/>alias ad : std_logic_vector(d'length -1 downto 0) is d;</text:p>
      <text:p text:style-name="P24">begin</text:p>
      <text:p text:style-name="P24"><text:s text:c="4"/>return ad(ad'length -2 downto 0) &amp; (ad(ad'length -1) xor not ad(0));</text:p>
      <text:p text:style-name="P24">end lfb;</text:p>
      <text:p text:style-name="P24"/>
      <text:p text:style-name="P24">begin</text:p>
      <text:p text:style-name="P24"><text:s text:c="4"/>-----</text:p>
      <text:p text:style-name="P24"><text:s text:c="4"/>p0 : process</text:p>
      <text:p text:style-name="P24"><text:s text:c="8"/>variable va : std_logic_vector(asize -1 downto 0) := (others =&gt; '0');</text:p>
      <text:p text:style-name="P24"><text:s text:c="8"/>variable vd : std_logic_vector(dsize -1 downto 0) := (others =&gt; '0');</text:p>
      <text:p text:style-name="P24"><text:s text:c="4"/>begin</text:p>
      <text:p text:style-name="P24"><text:s text:c="8"/>wen &lt;= '1'; oen &lt;= '1'; rasn &lt;= '1'; casn &lt;= '1';</text:p>
      <text:p text:style-name="P24"><text:s text:c="8"/>a <text:s text:c="4"/>&lt;= (others =&gt; 'Z');</text:p>
      <text:p text:style-name="P24"><text:s text:c="8"/>dq <text:s/>&lt;= (others =&gt; 'Z');</text:p>
      <text:p text:style-name="P24"><text:s text:c="8"/>rwcycle(0, 1, va, vd, clk, a, dq, rasn, casn, wen, oen);</text:p>
      <text:p text:style-name="P24"><text:s text:c="8"/>rwcycle(1, 1, va, vd, clk, a, dq, rasn, casn, wen, oen);</text:p>
      <text:p text:style-name="P24"><text:s text:c="8"/>rwcycle(0, 1, va, vd, clk, a, dq, rasn, casn, wen, oen);</text:p>
      <text:p text:style-name="P24"><text:s text:c="8"/>va := lfb(va); vd := lfb(vd);</text:p>
      <text:p text:style-name="P24"><text:s text:c="8"/>rwcycle(1, 1, va, vd, clk, a, dq, rasn, casn, wen, oen);</text:p>
      <text:p text:style-name="P24"><text:s text:c="8"/>rwcycle(0, 1, va, vd, clk, a, dq, rasn, casn, wen, oen);</text:p>
      <text:p text:style-name="P24"><text:s text:c="8"/>va := lfb(va); vd := lfb(vd);</text:p>
      <text:p text:style-name="P24"><text:s text:c="8"/>rwcycle(2, 3, va, vd, clk, a, dq, rasn, casn, wen, oen);</text:p>
      <text:p text:style-name="P24"><text:s text:c="8"/>rwcycle(0, 3, va, vd, clk, a, dq, rasn, casn, wen, oen);</text:p>
      <text:p text:style-name="P24"><text:s text:c="8"/>va := lfb(va); vd := lfb(vd);</text:p>
      <text:p text:style-name="P24"><text:s text:c="8"/>rwcycle(2, 3, va, vd, clk, a, dq, rasn, casn, wen, oen);</text:p>
      <text:p text:style-name="P24"><text:s text:c="8"/>rwcycle(0, 3, va, vd, clk, a, dq, rasn, casn, wen, oen);</text:p>
      <text:p text:style-name="P24"><text:s text:c="8"/>va := lfb(va); vd := lfb(vd);</text:p>
      <text:p text:style-name="P24"><text:s text:c="4"/>end process;</text:p>
      <text:p text:style-name="P24"><text:soft-page-break/></text:p>
      <text:p text:style-name="P24"><text:s text:c="4"/>clkgen : process</text:p>
      <text:p text:style-name="P24"><text:s text:c="4"/>begin</text:p>
      <text:p text:style-name="P24"><text:s text:c="8"/>clk &lt;= '0'; wait for period;</text:p>
      <text:p text:style-name="P24"><text:s text:c="8"/>clk &lt;= '1'; wait for period;</text:p>
      <text:p text:style-name="P24"><text:s text:c="4"/>end process;</text:p>
      <text:p text:style-name="P24"/>
      <text:p text:style-name="P24"><text:s text:c="4"/>dram0 : dram</text:p>
      <text:p text:style-name="P24"><text:s text:c="8"/>generic map ( <text:s text:c="3"/>asize =&gt; asize, </text:p>
      <text:p text:style-name="P24"><text:s text:c="25"/>dsize =&gt; dsize,</text:p>
      <text:p text:style-name="P24"><text:s text:c="25"/>check_on =&gt; true)</text:p>
      <text:p text:style-name="P24"/>
      <text:p text:style-name="P24"><text:s text:c="8"/>port map( <text:s text:c="3"/>a =&gt; a,</text:p>
      <text:p text:style-name="P24"><text:s text:c="21"/>dq =&gt; dq,</text:p>
      <text:p text:style-name="P24"><text:s text:c="21"/>rasn =&gt; rasn,</text:p>
      <text:p text:style-name="P24"><text:s text:c="21"/>casn =&gt; casn,</text:p>
      <text:p text:style-name="P24"><text:s text:c="21"/>wen =&gt; wen,</text:p>
      <text:p text:style-name="P24"><text:s text:c="21"/>oen =&gt; oen);</text:p>
      <text:p text:style-name="P24">end beh;</text:p>
      <text:p text:style-name="P24"/>
      <text:p text:style-name="P24">library ieee;</text:p>
      <text:p text:style-name="P24"><text:s text:c="4"/>use ieee.std_logic_1164.all;</text:p>
      <text:p text:style-name="P24"><text:s text:c="4"/>use ieee.std_logic_unsigned.all;</text:p>
      <text:p text:style-name="P24"><text:s text:c="4"/>use ieee.std_logic_arith.all;</text:p>
      <text:p text:style-name="P24"><text:s text:c="4"/>use std.textio.all;</text:p>
      <text:p text:style-name="P24"><text:s text:c="4"/>use ieee.std_logic_textio.all;</text:p>
      <text:p text:style-name="P24"/>
      <text:p text:style-name="P24">entity dram is </text:p>
      <text:p text:style-name="P24"><text:s text:c="4"/>generic(</text:p>
      <text:p text:style-name="P24"><text:s text:c="8"/>asize <text:s text:c="4"/>: natural <text:s text:c="3"/>:= 9; <text:s text:c="4"/>-- address width</text:p>
      <text:p text:style-name="P24"><text:s text:c="8"/>dsize <text:s text:c="7"/>: natural <text:s text:c="3"/>:= 16; <text:s text:c="4"/>-- data width</text:p>
      <text:p text:style-name="P24"><text:s text:c="8"/>t_asr <text:s text:c="7"/>: time <text:s text:c="7"/>:= 0 ns; <text:s text:c="3"/>-- row address setup</text:p>
      <text:p text:style-name="P24"><text:s text:c="8"/>t_rah <text:s text:c="7"/>: time <text:s text:c="7"/>:= 10 ns;-- row address holg</text:p>
      <text:p text:style-name="P24"><text:s text:c="8"/>t_asc <text:s text:c="7"/>: time <text:s text:c="8"/>:= 0 ns; -- column address setup</text:p>
      <text:p text:style-name="P24"><text:s text:c="8"/>t_cah <text:s text:c="7"/>: time <text:s text:c="7"/>:= 10 ns;-- column address hold</text:p>
      <text:p text:style-name="P24"><text:s text:c="8"/>t_oe <text:s text:c="7"/>: time <text:s text:c="7"/>:= 15 ns;-- output enable time</text:p>
      <text:p text:style-name="P24"><text:s text:c="8"/>t_od <text:s text:c="7"/>: time <text:s text:c="7"/>:= 3 ns; -- output disable time</text:p>
      <text:p text:style-name="P24"><text:s text:c="8"/>t_ds <text:s text:c="7"/>: time <text:s text:c="7"/>:= 0 ns; -- write data setup time</text:p>
      <text:p text:style-name="P24"><text:s text:c="8"/>t_dh <text:s text:c="7"/>: time <text:s text:c="7"/>:= 8 ns; -- write data hold time</text:p>
      <text:p text:style-name="P24"><text:s text:c="8"/>t_off <text:s text:c="7"/>: time <text:s text:c="7"/>:= 3 ns; -- data to z time</text:p>
      <text:p text:style-name="P24"><text:s text:c="8"/>check_on <text:s text:c="3"/>: boolean <text:s text:c="3"/>:= false);-- check timing or not</text:p>
      <text:p text:style-name="P24"><text:s text:c="4"/>port(</text:p>
      <text:p text:style-name="P24"><text:s text:c="8"/>a <text:s text:c="7"/>: in std_logic_vector(asize -1 downto 0);</text:p>
      <text:p text:style-name="P24"><text:s text:c="8"/>dq <text:s text:c="7"/>: inout std_logic_vector(dsize -1 downto 0);</text:p>
      <text:p text:style-name="P24"><text:s text:c="8"/>rasn <text:s text:c="3"/>: in std_logic;</text:p>
      <text:p text:style-name="P24"><text:s text:c="8"/>casn <text:s text:c="3"/>: in std_logic;</text:p>
      <text:p text:style-name="P24"><text:s text:c="8"/>wen <text:s text:c="3"/>: in std_logic;</text:p>
      <text:p text:style-name="P24"><text:s text:c="8"/>oen <text:s text:c="2"/>: in std_logic);</text:p>
      <text:p text:style-name="P24">end dram;</text:p>
      <text:p text:style-name="P24"/>
      <text:p text:style-name="P24"><text:soft-page-break/>architecture beh of dram is</text:p>
      <text:p text:style-name="P24"><text:s text:c="4"/>constant asize2 : natural := 2 *asize; -- memory a size</text:p>
      <text:p text:style-name="P24"><text:s text:c="4"/>constant psize <text:s/>: natural := (asize2 - asize); -- # of page</text:p>
      <text:p text:style-name="P24"><text:s text:c="4"/>subtype word_type <text:s/>is std_logic_vector(dsize -1 downto 0); -- page of data</text:p>
      <text:p text:style-name="P24"><text:s text:c="4"/>type page_type <text:s text:c="5"/>is array(0 to 2**asize -1) of word_type; -- page of data</text:p>
      <text:p text:style-name="P24"><text:s text:c="4"/>type page_ptr_type is access page_type; -- access type that is a pointer to the page_type</text:p>
      <text:p text:style-name="P24"><text:s text:c="4"/>-- the page can then be dynamically allocated when the data in the pageis required. </text:p>
      <text:p text:style-name="P24"><text:s text:c="4"/>-- this dynamic memory allocation reduces the run time memory requirement when just a small portion of the memory is accessed. <text:s text:c="3"/></text:p>
      <text:p text:style-name="P24"><text:s text:c="4"/>constant xval <text:s text:c="5"/>: word_type := (others =&gt; 'X');</text:p>
      <text:p text:style-name="P24"><text:s text:c="4"/>type page_tab_type <text:s text:c="6"/>is array(0 to 2**psize -1) of page_ptr_type;</text:p>
      <text:p text:style-name="P24"><text:s text:c="4"/>type page_tab_ptr_type is access page_tab_type;</text:p>
      <text:p text:style-name="P24">begin</text:p>
      <text:p text:style-name="P24"><text:s text:c="4"/>memory : process(a, rasn, casn, dq, oen, wen)</text:p>
      <text:p text:style-name="P24"><text:s text:c="8"/>variable page_table : page_tab_ptr_type := null;</text:p>
      <text:p text:style-name="P24"><text:s text:c="4"/>variable page <text:s text:c="9"/>: page_ptr_type;</text:p>
      <text:p text:style-name="P24"><text:s text:c="4"/>variable ma <text:s text:c="7"/>: std_logic_vector(asize2 -1 downto 0);</text:p>
      <text:p text:style-name="P24"><text:s text:c="4"/>variable page_index : natural range 0 to 2**psize -1;</text:p>
      <text:p text:style-name="P24"><text:s text:c="4"/>variable word_index : natural range 0 to 2**asize -1;</text:p>
      <text:p text:style-name="P24"><text:s text:c="4"/>variable ma_x <text:s text:c="4"/>: boolean;</text:p>
      <text:p text:style-name="P24"><text:s text:c="4"/>variable m_wr <text:s text:c="4"/>: boolean;</text:p>
      <text:p text:style-name="P24"><text:s text:c="4"/>variable m_oe <text:s text:c="4"/>: boolean;</text:p>
      <text:p text:style-name="P24"><text:s text:c="4"/>variable m_off <text:s text:c="3"/>: boolean;</text:p>
      <text:p text:style-name="P24">begin</text:p>
      <text:p text:style-name="P24"><text:s text:c="4"/>if falling_edge(rasn) then</text:p>
      <text:p text:style-name="P24"><text:s text:c="8"/>ma(asize2 -1 downto asize) := a; -- get row address</text:p>
      <text:p text:style-name="P24"><text:s text:c="4"/>elsif falling_edge(casn) then</text:p>
      <text:p text:style-name="P24"><text:s text:c="8"/>ma(asize -1 downto 0) := a; <text:s text:c="3"/>-- get column address</text:p>
      <text:p text:style-name="P24"><text:s text:c="4"/>end if;</text:p>
      <text:p text:style-name="P24"/>
      <text:p text:style-name="P24"><text:s text:c="4"/>ma_x := is_x(ma); -- check wheather the address is valid</text:p>
      <text:p text:style-name="P24"><text:s text:c="4"/>m_wr := (rasn = '0') and (casn = '0') and -- set m_wr to indicate a write access</text:p>
      <text:p text:style-name="P24"><text:s text:c="4"/>(wen <text:s/>= '0') and (oen /= '0');</text:p>
      <text:p text:style-name="P24"><text:s text:c="4"/>m_oe := (rasn = '0') and (casn = '0') and -- set m_oe to indicate a read access</text:p>
      <text:p text:style-name="P24"><text:s text:c="4"/>(wen <text:s/>= '1') and (oen <text:s/>= '0');</text:p>
      <text:p text:style-name="P24"><text:s text:c="4"/>m_off:= ((rasn = '1') or <text:s/>(wen /= '0')) and (oen /= '0'); -- set m_off to indicate no mem access</text:p>
      <text:p text:style-name="P24"><text:s text:c="4"/>if ma_x then -- if address is valid</text:p>
      <text:p text:style-name="P24"><text:s text:c="8"/>page_index := 0; -- set page table</text:p>
      <text:p text:style-name="P24"><text:s text:c="8"/>word_index := 0; -- set word index inside page</text:p>
      <text:p text:style-name="P24"><text:s text:c="4"/>else </text:p>
      <text:p text:style-name="P24"><text:s text:c="8"/>page_index := conv_integer(ma(asize2 -1 downto asize));</text:p>
      <text:p text:style-name="P24"><text:s text:c="8"/>word_index := conv_integer(ma(asize -1 downto 0));</text:p>
      <text:p text:style-name="P24"><text:s text:c="4"/>end if;</text:p>
      <text:p text:style-name="P24"/>
      <text:p text:style-name="P24"><text:s text:c="4"/>-----write</text:p>
      <text:p text:style-name="P24"><text:s text:c="4"/>-- check wheather this is the first time access and wheather the page table has been allocated</text:p>
      <text:p text:style-name="P24"><text:s text:c="4"/>if m_wr and not ma_x then</text:p>
      <text:p text:style-name="P24"><text:s text:c="8"/>if page_table = null then -- page table empty</text:p>
      <text:p text:style-name="P24"><text:s text:c="12"/>page_table := new page_tab_type; -- allocate table</text:p>
      <text:p text:style-name="P24"><text:s text:c="12"/>-- after page table is allocated initialize all pointers to null</text:p>
      <text:p text:style-name="P24"><text:s text:c="12"/>for j in page_tab_type'range loop</text:p>
      <text:p text:style-name="P24"><text:soft-page-break/><text:s text:c="16"/>page_table(j) := null; --invalidate all pointers</text:p>
      <text:p text:style-name="P24"><text:s text:c="12"/>end loop;</text:p>
      <text:p text:style-name="P24"><text:s text:c="8"/>end if;</text:p>
      <text:p text:style-name="P24"><text:s text:c="8"/>-- checks wheather page has been allocated</text:p>
      <text:p text:style-name="P24"><text:s text:c="8"/>if page_table(page_index) = null then</text:p>
      <text:p text:style-name="P24"><text:s text:c="12"/>-- allocate page if has not been allocated and initilaze all data to 'x'</text:p>
      <text:p text:style-name="P24"><text:s text:c="12"/>page := new page_type; -- allocate a new page</text:p>
      <text:p text:style-name="P24"><text:s text:c="12"/>page_table(page_index) := page; -- link the page</text:p>
      <text:p text:style-name="P24"><text:s text:c="12"/>for j in page_type'range loop</text:p>
      <text:p text:style-name="P24"><text:s text:c="16"/>page(j) := xval; -- invalidate all data</text:p>
      <text:p text:style-name="P24"><text:s text:c="12"/>end loop;</text:p>
      <text:p text:style-name="P24"><text:s text:c="8"/>end if;</text:p>
      <text:p text:style-name="P24"><text:s text:c="8"/>-- data is written when data is valid</text:p>
      <text:p text:style-name="P24"><text:s text:c="8"/>page := page_table(page_index); -- point to page</text:p>
      <text:p text:style-name="P24"><text:s text:c="8"/>if is_x(dq) then</text:p>
      <text:p text:style-name="P24"><text:s text:c="12"/>assert false report "write invalid data" severity warning;</text:p>
      <text:p text:style-name="P24"><text:s text:c="12"/>page(word_index) := xval;</text:p>
      <text:p text:style-name="P24"><text:s text:c="8"/>else</text:p>
      <text:p text:style-name="P24"><text:s text:c="12"/>page(word_index) := dq; -- write new data</text:p>
      <text:p text:style-name="P24"><text:s text:c="8"/>end if;</text:p>
      <text:p text:style-name="P24"><text:s text:c="4"/>end if;</text:p>
      <text:p text:style-name="P24"/>
      <text:p text:style-name="P24"><text:s text:c="4"/>-----read</text:p>
      <text:p text:style-name="P24"><text:s text:c="4"/>if m_off then -- check wheather memory is idle</text:p>
      <text:p text:style-name="P24"><text:s text:c="8"/>dq &lt;= (others =&gt; 'Z') after t_off; -- releases DQ</text:p>
      <text:p text:style-name="P24"><text:s text:c="4"/>elsif m_oe and ma_x then -- undefined address. check whether the address is valid during the read cycle</text:p>
      <text:p text:style-name="P24"><text:s text:c="8"/>dq &lt;= xval after t_oe;</text:p>
      <text:p text:style-name="P24"><text:s text:c="4"/>elsif m_oe then -- read</text:p>
      <text:p text:style-name="P24"><text:s text:c="8"/>-- check wheather page exists before reading</text:p>
      <text:p text:style-name="P24"><text:s text:c="8"/>if (page_table /= null) and (page_table(page_index) /= null) then</text:p>
      <text:p text:style-name="P24"><text:s text:c="12"/>page := page_table(page_index); -- get the page</text:p>
      <text:p text:style-name="P24"><text:s text:c="12"/>dq &lt;= page(word_index) after t_oe; -- read data -put data on bus</text:p>
      <text:p text:style-name="P24"><text:s text:c="8"/>else </text:p>
      <text:p text:style-name="P24"><text:s text:c="12"/>dq &lt;= xval after t_oe; -- page never written</text:p>
      <text:p text:style-name="P24"><text:s text:c="12"/>assert false report "read uninitialized page" severity note;</text:p>
      <text:p text:style-name="P24"><text:s text:c="8"/>end if;</text:p>
      <text:p text:style-name="P24"><text:s text:c="4"/>end if;</text:p>
      <text:p text:style-name="P24">end process;</text:p>
      <text:p text:style-name="P24"/>
      <text:p text:style-name="P24">-----address timing check </text:p>
      <text:p text:style-name="P24">ra_setup : process</text:p>
      <text:p text:style-name="P24">begin</text:p>
      <text:p text:style-name="P24"><text:s text:c="4"/>wait until check_on and falling_edge(rasn);</text:p>
      <text:p text:style-name="P24"><text:s text:c="4"/>assert (a'stable(t_asr) or t_asr = 0 ns) report "row address setup error" severity note;</text:p>
      <text:p text:style-name="P24">end process;</text:p>
      <text:p text:style-name="P24"/>
      <text:p text:style-name="P24">ra_hold : process</text:p>
      <text:p text:style-name="P24">begin</text:p>
      <text:p text:style-name="P24"><text:s text:c="4"/>wait until check_on and a'event and rasn = '0' and casn /= '0';</text:p>
      <text:p text:style-name="P24"><text:s text:c="4"/>assert (rasn'last_event &gt; t_rah) or </text:p>
      <text:p text:style-name="P24"><text:soft-page-break/><text:s text:c="4"/>(rasn'last_event = 0 ns) report "row address hold error" severity note;</text:p>
      <text:p text:style-name="P24"><text:s text:c="4"/>wait until falling_edge(casn); -- skip A glitch <text:s text:c="11"/></text:p>
      <text:p text:style-name="P24">end process;</text:p>
      <text:p text:style-name="P24"/>
      <text:p text:style-name="P24">ca_setup : process</text:p>
      <text:p text:style-name="P24">begin</text:p>
      <text:p text:style-name="P24"><text:s text:c="4"/>wait until check_on and falling_edge(casn);</text:p>
      <text:p text:style-name="P24"><text:s text:c="4"/>assert (a' stable(t_asc) or t_asc = 0 ns) report "column address setup error" severity note;</text:p>
      <text:p text:style-name="P24"><text:s text:c="4"/>wait until rising_edge(casn); -- skip A glitch</text:p>
      <text:p text:style-name="P24">end process;</text:p>
      <text:p text:style-name="P24"/>
      <text:p text:style-name="P24">ca_hold : process</text:p>
      <text:p text:style-name="P24">begin</text:p>
      <text:p text:style-name="P24"><text:s text:c="4"/>wait until check_on and a'event and casn = '0';</text:p>
      <text:p text:style-name="P24"><text:s text:c="4"/>assert (casn'last_event &gt; t_cah) or (casn'last_event = 0 ns) report "column address hold error" severity note;</text:p>
      <text:p text:style-name="P24"><text:s text:c="4"/>wait until rising_edge(casn); -- skip A glitch <text:s text:c="11"/></text:p>
      <text:p text:style-name="P24">end process;</text:p>
      <text:p text:style-name="P24"/>
      <text:p text:style-name="P24">-----data timing check</text:p>
      <text:p text:style-name="P24">d_setup : process</text:p>
      <text:p text:style-name="P24">begin</text:p>
      <text:p text:style-name="P24"><text:s text:c="4"/>wait until check_on and </text:p>
      <text:p text:style-name="P24"><text:s text:c="4"/>casn'event and wen = '0' and casn = '0';</text:p>
      <text:p text:style-name="P24"><text:s text:c="4"/>assert dq'stable(t_ds) or t_ds = 0 ns report <text:s text:c="7"/>"write data setup-time error" severity note;</text:p>
      <text:p text:style-name="P24"><text:s text:c="4"/>wait until rising_edge(casn);--skip A glitch</text:p>
      <text:p text:style-name="P24">end process;</text:p>
      <text:p text:style-name="P24"/>
      <text:p text:style-name="P24">d_hold : process</text:p>
      <text:p text:style-name="P24">begin</text:p>
      <text:p text:style-name="P24"><text:s text:c="4"/>wait until check_on and dq'event and wen = '0' and casn = '0';</text:p>
      <text:p text:style-name="P24"><text:s text:c="4"/>assert (dq'last_event &gt; t_dh) or ( dq'last_event = 0 ns) report "write data hold time error" severity note;</text:p>
      <text:p text:style-name="P24"><text:s text:c="4"/>wait until rising_edge(casn); --skip A glitch</text:p>
      <text:p text:style-name="P24">end process;</text:p>
      <text:p text:style-name="P24">end beh;</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a fir filter usually has many stages. each stage is referref to as a tap. each stage </text:p>
      <text:p text:style-name="P24">-- has a 16-bit coefficient register. input signal I, 16-bit wide, is going through two stage </text:p>
      <text:p text:style-name="P24">-- registers. the first stage of the register is multiplied with the coefficient. the product (32 bits)</text:p>
      <text:p text:style-name="P24">-- is registered. the registered product is signal extended to add with the 64-bit input PI.</text:p>
      <text:p text:style-name="P24">-- the sum is again registered in a 64 bit register. both the second stage registered input I and the </text:p>
      <text:p text:style-name="P24"><text:soft-page-break/>-- registered sum outputs are fed to the next stage of the tap. </text:p>
      <text:p text:style-name="P24"/>
      <text:p text:style-name="P24">library ieee;</text:p>
      <text:p text:style-name="P24"><text:s text:c="4"/>use ieee.std_logic_1164.all;</text:p>
      <text:p text:style-name="P24"/>
      <text:p text:style-name="P24">entity firchip is port(</text:p>
      <text:p text:style-name="P24"><text:s text:c="4"/>rstn <text:s text:c="8"/>: in std_logic_vector(0 downto 0);</text:p>
      <text:p text:style-name="P24"><text:s text:c="4"/>clk <text:s text:c="7"/>: in std_logic_vector(0 downto 0);</text:p>
      <text:p text:style-name="P24"><text:s text:c="4"/>ldcoeff <text:s text:c="3"/>: in std_logic_vector(0 downto 0);</text:p>
      <text:p text:style-name="P24"><text:s text:c="4"/>start <text:s text:c="7"/>: in std_logic_vector(0 downto 0);</text:p>
      <text:p text:style-name="P24"><text:s text:c="4"/>oen <text:s text:c="7"/>: in std_logic_vector(0 downto 0);</text:p>
      <text:p text:style-name="P24"><text:s text:c="4"/>bypass <text:s text:c="3"/>: in std_logic_vector(0 downto 0);</text:p>
      <text:p text:style-name="P24"><text:s text:c="4"/>i <text:s text:c="11"/>: in std_logic_vector(15 downto 0);</text:p>
      <text:p text:style-name="P24"><text:s text:c="4"/>pi <text:s text:c="11"/>: in std_logic_vector(63 downto 0);</text:p>
      <text:p text:style-name="P24"><text:s text:c="4"/>o <text:s text:c="11"/>: out std_logic_vector(15 downto 0);</text:p>
      <text:p text:style-name="P24"><text:s text:c="4"/>po <text:s text:c="11"/>: out std_logic_vector(63 downto 0);</text:p>
      <text:p text:style-name="P24"><text:s text:c="4"/>vdds <text:s text:c="7"/>: inout std_logic_vector(20 downto 0);</text:p>
      <text:p text:style-name="P24"><text:s text:c="4"/>gnds <text:s text:c="7"/>: inout std_logic_vector(20 downto 0));</text:p>
      <text:p text:style-name="P24">end firchip;</text:p>
      <text:p text:style-name="P24"/>
      <text:p text:style-name="P24">-----file firchip_beh.chd</text:p>
      <text:p text:style-name="P24">library ieee;</text:p>
      <text:p text:style-name="P24"><text:s text:c="4"/>use ieee.std_logic_1164.all;</text:p>
      <text:p text:style-name="P24"><text:s text:c="4"/>use ieee.std_logic_arith.all;</text:p>
      <text:p text:style-name="P24"/>
      <text:p text:style-name="P24">architecture rtl of firchip is</text:p>
      <text:p text:style-name="P24"><text:s text:c="4"/>constant k : integer := 32;</text:p>
      <text:p text:style-name="P24"><text:s text:c="4"/>subtype size16 is std_logic_vector(15 downto 0);</text:p>
      <text:p text:style-name="P24"><text:s text:c="4"/>subtype size32 is std_logic_vector(31 downto 0);</text:p>
      <text:p text:style-name="P24"><text:s text:c="4"/>subtype size64 is std_logic_vector(63 downto 0);</text:p>
      <text:p text:style-name="P24"><text:s text:c="4"/>type kx16 is array (k -1 downto 0) of size16;</text:p>
      <text:p text:style-name="P24"><text:s text:c="4"/>type klx16 is array(k downto 0) of size16;</text:p>
      <text:p text:style-name="P24"><text:s text:c="4"/>type kx32 is array (k -1 downto 0) of size32; <text:s text:c="3"/></text:p>
      <text:p text:style-name="P24"><text:s text:c="4"/>type kx64 is array (k -1 downto 0) of size64;</text:p>
      <text:p text:style-name="P24"><text:s text:c="4"/>type klx64 is array(k downto 0) of size64;</text:p>
      <text:p text:style-name="P24"/>
      <text:p text:style-name="P24"><text:s text:c="4"/>signal ireg1, ireg2 : klx16; -- input registers</text:p>
      <text:p text:style-name="P24"><text:s text:c="4"/>signal coef : klx16; <text:s text:c="3"/>-- multiplier register</text:p>
      <text:p text:style-name="P24"><text:s text:c="4"/>signal mult32 : kx32;-- signal for the mult32</text:p>
      <text:p text:style-name="P24"><text:s text:c="4"/>signal mult64 : kx64; -- signal to be sign extended to 64 bits</text:p>
      <text:p text:style-name="P24"><text:s text:c="4"/>signal psum <text:s text:c="2"/>: klx64; -- sum register</text:p>
      <text:p text:style-name="P24"><text:s text:c="4"/>signal o_s <text:s text:c="5"/>: size16;</text:p>
      <text:p text:style-name="P24"><text:s text:c="4"/>signal po_s <text:s text:c="2"/>: size64;</text:p>
      <text:p text:style-name="P24"><text:s text:c="4"/>signal rstn_f1, rstn_s, clock : std_logic;</text:p>
      <text:p text:style-name="P24">begin</text:p>
      <text:p text:style-name="P24"><text:s text:c="4"/>clock &lt;= clk(0);</text:p>
      <text:p text:style-name="P24"><text:s text:c="4"/>ireg2(k) &lt;= i when start(0) = '1' else (others =&gt; '0');</text:p>
      <text:p text:style-name="P24"><text:s text:c="4"/>ireg1(k) &lt;= (others =&gt; '0');</text:p>
      <text:p text:style-name="P24"><text:s text:c="4"/>psum(k) <text:s text:c="3"/>&lt;= pi;</text:p>
      <text:p text:style-name="P24"><text:s text:c="4"/>coef(k) <text:s text:c="3"/>&lt;= i;</text:p>
      <text:p text:style-name="P24"><text:soft-page-break/></text:p>
      <text:p text:style-name="P24"><text:s text:c="4"/>sync : process(clock)</text:p>
      <text:p text:style-name="P24"><text:s text:c="4"/>begin</text:p>
      <text:p text:style-name="P24"><text:s text:c="8"/>if rising_edge(clock)then</text:p>
      <text:p text:style-name="P24"><text:s text:c="12"/>rstn_f1 &lt;= rstn(0);</text:p>
      <text:p text:style-name="P24"><text:s text:c="12"/>rstn_s <text:s/>&lt;= rstn_f1;</text:p>
      <text:p text:style-name="P24"><text:s text:c="8"/>end if;</text:p>
      <text:p text:style-name="P24"><text:s text:c="4"/>end process;</text:p>
      <text:p text:style-name="P24"/>
      <text:p text:style-name="P24"><text:s text:c="4"/>gen32 : for j in k -1 downto 0 generate</text:p>
      <text:p text:style-name="P24"><text:s text:c="8"/>ffs : process(rstn_s, clock)</text:p>
      <text:p text:style-name="P24"><text:s text:c="8"/>begin</text:p>
      <text:p text:style-name="P24"><text:s text:c="12"/>if rstn_s = '0' then</text:p>
      <text:p text:style-name="P24"><text:s text:c="16"/>ireg1(j) &lt;= (others =&gt; '0');</text:p>
      <text:p text:style-name="P24"><text:s text:c="16"/>ireg2(j) &lt;= (others =&gt; '0');</text:p>
      <text:p text:style-name="P24"><text:s text:c="16"/>coef(j) <text:s text:c="3"/>&lt;= (others =&gt; '0');</text:p>
      <text:p text:style-name="P24"><text:s text:c="16"/>mult32(j)&lt;= (others =&gt; '0');</text:p>
      <text:p text:style-name="P24"><text:s text:c="16"/>psum(j) <text:s text:c="3"/>&lt;= (others =&gt; '0');</text:p>
      <text:p text:style-name="P24"><text:s text:c="12"/>elsif rising_edge(clock) then</text:p>
      <text:p text:style-name="P24"><text:s text:c="16"/>ireg1(j) &lt;= ireg2(j +1);</text:p>
      <text:p text:style-name="P24"><text:s text:c="16"/>ireg2(j) &lt;= ireg1(j);</text:p>
      <text:p text:style-name="P24"><text:s text:c="16"/>if ldcoeff(0) = '1' then</text:p>
      <text:p text:style-name="P24"><text:s text:c="20"/>coef(j) &lt;= coef(j +1);</text:p>
      <text:p text:style-name="P24"><text:s text:c="16"/>end if;</text:p>
      <text:p text:style-name="P24"/>
      <text:p text:style-name="P24"><text:s text:c="16"/>mult32(j) &lt;= signed(ireg1(j)) * signed(coef(j));</text:p>
      <text:p text:style-name="P24"><text:s text:c="16"/>psum(j) <text:s text:c="4"/>&lt;= signed(mult64(j)) + signed(psum(j +1));</text:p>
      <text:p text:style-name="P24"><text:s text:c="12"/>end if;</text:p>
      <text:p text:style-name="P24"/>
      <text:p text:style-name="P24"><text:s text:c="8"/>end process;</text:p>
      <text:p text:style-name="P24"/>
      <text:p text:style-name="P24"><text:s text:c="8"/>signext : for m in 63 downto 32 generate</text:p>
      <text:p text:style-name="P24"><text:s text:c="12"/>mult64(j)(m) &lt;= mult32(j)(31);</text:p>
      <text:p text:style-name="P24"><text:s text:c="8"/>end generate;</text:p>
      <text:p text:style-name="P24"><text:s text:c="8"/>mult64(j)(31 downto 0) &lt;= mult32(j);</text:p>
      <text:p text:style-name="P24"><text:s text:c="4"/>end generate;</text:p>
      <text:p text:style-name="P24"><text:s text:c="4"/>o_s &lt;= i when bypass(0) = '1' else</text:p>
      <text:p text:style-name="P24"><text:s text:c="8"/>ireg2(0) when ldcoeff(0) = '1' else</text:p>
      <text:p text:style-name="P24"><text:s text:c="12"/>coef(0);</text:p>
      <text:p text:style-name="P24"><text:s text:c="12"/>po_s &lt;= pi when bypass(0) = '1' else psum(0);</text:p>
      <text:p text:style-name="P24"><text:s text:c="12"/>o <text:s text:c="4"/>&lt;= o_s <text:s/>when oen(0) = '0' else (others =&gt; 'Z');</text:p>
      <text:p text:style-name="P24"><text:s text:c="12"/>po &lt;= po_s when oen(0) = '0' else (others =&gt; 'Z');</text:p>
      <text:p text:style-name="P24"><text:s text:c="8"/>end rtl;</text:p>
      <text:p text:style-name="P24"/>
      <text:p text:style-name="P24"/>
      <text:p text:style-name="P24"/>
      <text:p text:style-name="P24"/>
      <text:p text:style-name="P24"><text:s text:c="8"/>-- <text:s text:c="3"/>rstn</text:p>
      <text:p text:style-name="P24"><text:s text:c="8"/>-- <text:s text:c="3"/>clk</text:p>
      <text:p text:style-name="P24"><text:s text:c="8"/>-- <text:s text:c="3"/>ldcoeff</text:p>
      <text:p text:style-name="P24"><text:soft-page-break/><text:s text:c="8"/>-- <text:s text:c="3"/>start</text:p>
      <text:p text:style-name="P24"><text:s text:c="8"/>-- <text:s text:c="3"/>oen</text:p>
      <text:p text:style-name="P24"><text:s text:c="8"/>-- <text:s text:c="3"/>bypass</text:p>
      <text:p text:style-name="P24"><text:s text:c="8"/>-- <text:s text:c="3"/>i</text:p>
      <text:p text:style-name="P24"><text:s text:c="8"/>-- <text:s text:c="3"/>pi</text:p>
      <text:p text:style-name="P24"><text:s text:c="8"/>-- <text:s text:c="3"/>o</text:p>
      <text:p text:style-name="P24"><text:s text:c="8"/>-- <text:s text:c="3"/>po</text:p>
      <text:p text:style-name="P24"><text:s text:c="8"/>-- <text:s text:c="3"/>vdds</text:p>
      <text:p text:style-name="P24"><text:s text:c="8"/>-- <text:s text:c="3"/>gnds</text:p>
      <text:p text:style-name="P24"><text:s text:c="8"/></text:p>
      <text:p text:style-name="P24"><text:s text:c="8"/>library ieee;</text:p>
      <text:p text:style-name="P24"><text:s text:c="12"/>use ieee.std_logic_1164.all;</text:p>
      <text:p text:style-name="P24"/>
      <text:p text:style-name="P24"><text:s text:c="8"/>package ones_pkg is</text:p>
      <text:p text:style-name="P24"><text:s text:c="12"/>function count_ones(s : std_logic_vector) return natural;</text:p>
      <text:p text:style-name="P24"><text:s text:c="8"/>end ones_pkg;</text:p>
      <text:p text:style-name="P24"/>
      <text:p text:style-name="P24"><text:s text:c="8"/>package body ones_pkg is</text:p>
      <text:p text:style-name="P24"><text:s text:c="12"/>function count_ones(s : std_logic_vector) return natural is</text:p>
      <text:p text:style-name="P24"><text:s text:c="16"/>variable temp : natural := 0;</text:p>
      <text:p text:style-name="P24"><text:s text:c="12"/>begin</text:p>
      <text:p text:style-name="P24"><text:s text:c="16"/>for i in s'range loop</text:p>
      <text:p text:style-name="P24"><text:s text:c="20"/>if s(i) = '1' then</text:p>
      <text:p text:style-name="P24"><text:s text:c="24"/>temp := temp +1;</text:p>
      <text:p text:style-name="P24"><text:s text:c="20"/>end if;</text:p>
      <text:p text:style-name="P24"><text:s text:c="16"/>end loop;</text:p>
      <text:p text:style-name="P24"/>
      <text:p text:style-name="P24"><text:s text:c="16"/>return temp;</text:p>
      <text:p text:style-name="P24"><text:s text:c="12"/>end count_ones;</text:p>
      <text:p text:style-name="P24"><text:s text:c="8"/>end package body;</text:p>
      <text:p text:style-name="P24"/>
      <text:p text:style-name="P24"/>
      <text:p text:style-name="P24"/>
      <text:p text:style-name="P24"><text:s text:c="8"/>library ieee;</text:p>
      <text:p text:style-name="P24"><text:s text:c="12"/>use ieee.std_logic_1164.all;</text:p>
      <text:p text:style-name="P24"><text:s text:c="12"/>use ieee.numeric_std.all;</text:p>
      <text:p text:style-name="P24"><text:s text:c="12"/>use work.ones_pkg.all;</text:p>
      <text:p text:style-name="P24"/>
      <text:p text:style-name="P24"><text:s text:c="8"/>entity ones is port(</text:p>
      <text:p text:style-name="P24"><text:s text:c="12"/>clk, rst : in std_logic;</text:p>
      <text:p text:style-name="P24"><text:s text:c="12"/>din : in std_logic_vector(7 downto 0);</text:p>
      <text:p text:style-name="P24"><text:s text:c="12"/>n_bits : out std_logic_vector(3 downto 0));</text:p>
      <text:p text:style-name="P24"><text:s text:c="4"/>end ones;</text:p>
      <text:p text:style-name="P24"/>
      <text:p text:style-name="P24"><text:s text:c="4"/>architecture rtl1 of ones is</text:p>
      <text:p text:style-name="P24"><text:s text:c="4"/>begin</text:p>
      <text:p text:style-name="P24"/>
      <text:p text:style-name="P24"><text:s text:c="8"/>process(clk, rst)</text:p>
      <text:p text:style-name="P24"><text:s text:c="8"/>begin</text:p>
      <text:p text:style-name="P24"><text:s text:c="12"/>if rising_edge(clk) then</text:p>
      <text:p text:style-name="P24"><text:soft-page-break/><text:s text:c="16"/>n_bits &lt;= std_logic_vector(to_unsigned(count_ones(din),4));</text:p>
      <text:p text:style-name="P24"><text:s text:c="12"/>end if;</text:p>
      <text:p text:style-name="P24"><text:s text:c="8"/>end process;</text:p>
      <text:p text:style-name="P24"><text:s text:c="4"/>end rtl1;</text:p>
      <text:p text:style-name="P24"/>
      <text:p text:style-name="P24"/>
      <text:p text:style-name="P24"><text:s text:c="4"/>library ieee;</text:p>
      <text:p text:style-name="P24"><text:s text:c="8"/>use ieee.std_logic_1164.all;</text:p>
      <text:p text:style-name="P24"/>
      <text:p text:style-name="P24"><text:s text:c="4"/>entity non_pipelined is port(</text:p>
      <text:p text:style-name="P24"><text:s text:c="8"/>clk : in std_logic;</text:p>
      <text:p text:style-name="P24"><text:s text:c="8"/>data_in : in std_logic_vector(8 downto 0);</text:p>
      <text:p text:style-name="P24"><text:s text:c="8"/>data_out : out std_logic);</text:p>
      <text:p text:style-name="P24">end entity;</text:p>
      <text:p text:style-name="P24"/>
      <text:p text:style-name="P24">architecture beh of non_pipelined is</text:p>
      <text:p text:style-name="P24"><text:s text:c="4"/>signal data : std_logic_vector(8 downto 0);</text:p>
      <text:p text:style-name="P24"><text:s text:c="4"/>--non pipleined</text:p>
      <text:p text:style-name="P24"><text:s text:c="4"/>signal result : std_logic;</text:p>
      <text:p text:style-name="P24"><text:s text:c="4"/>--pipleined</text:p>
      <text:p text:style-name="P24"><text:s text:c="4"/>signal temp1, temp2 : std_logic;</text:p>
      <text:p text:style-name="P24"/>
      <text:p text:style-name="P24">begin</text:p>
      <text:p text:style-name="P24"/>
      <text:p text:style-name="P24"><text:s text:c="4"/>--process for registerinf data_in</text:p>
      <text:p text:style-name="P24"><text:s text:c="4"/>process(clk)</text:p>
      <text:p text:style-name="P24"><text:s text:c="4"/>begin</text:p>
      <text:p text:style-name="P24"><text:s text:c="8"/>if rising_edge(clk) then</text:p>
      <text:p text:style-name="P24"><text:s text:c="12"/>data &lt;= data_in;</text:p>
      <text:p text:style-name="P24"><text:s text:c="8"/>end if;</text:p>
      <text:p text:style-name="P24"><text:s text:c="4"/>end process;</text:p>
      <text:p text:style-name="P24"/>
      <text:p text:style-name="P24"><text:s text:c="4"/>--and gate equation</text:p>
      <text:p text:style-name="P24"><text:s text:c="4"/>result &lt;= data(0) and data(1) and data(2) and data(3) and</text:p>
      <text:p text:style-name="P24"><text:s text:c="4"/>data(4) and data(5) and data(6) and data(7) and data(8);</text:p>
      <text:p text:style-name="P24"/>
      <text:p text:style-name="P24"><text:s text:c="4"/>data_out &lt;= result;</text:p>
      <text:p text:style-name="P24"/>
      <text:p text:style-name="P24"><text:s text:c="4"/>--process for and gate equation</text:p>
      <text:p text:style-name="P24"><text:s text:c="4"/>-- <text:s text:c="3"/>process(clk)</text:p>
      <text:p text:style-name="P24"><text:s text:c="4"/>-- <text:s text:c="3"/>begin</text:p>
      <text:p text:style-name="P24"><text:s text:c="4"/>-- <text:s text:c="7"/>if rising_edge(clk) then</text:p>
      <text:p text:style-name="P24"><text:s text:c="4"/>-- <text:s text:c="11"/>temp1 &lt;= <text:s/>data(0) and data(1) and data(2) and data(3);</text:p>
      <text:p text:style-name="P24"><text:s text:c="4"/>-- <text:s text:c="11"/>temp2 &lt;= <text:s/>data(4) and data(5) and data(6) and data(7);</text:p>
      <text:p text:style-name="P24"><text:s text:c="4"/>-- <text:s text:c="11"/>data_out &lt;= temp1 and temp2 and data(8);</text:p>
      <text:p text:style-name="P24"><text:s text:c="4"/>-- <text:s text:c="7"/>end if;</text:p>
      <text:p text:style-name="P24"><text:s text:c="4"/>-- <text:s text:c="3"/>end process;</text:p>
      <text:p text:style-name="P24">end beh;</text:p>
      <text:p text:style-name="P24"/>
      <text:p text:style-name="P24">#************************************************************</text:p>
      <text:p text:style-name="P24"><text:soft-page-break/># THIS is A WIZARD-GENERATED file. <text:s text:c="26"/></text:p>
      <text:p text:style-name="P24"><text:s text:c="22"/>#</text:p>
      <text:p text:style-name="P24"># Version 13.1.0 Build 162 10/23/2013 SJ Web Edition</text:p>
      <text:p text:style-name="P24"><text:s text:c="22"/>#</text:p>
      <text:p text:style-name="P24">#************************************************************</text:p>
      <text:p text:style-name="P24"/>
      <text:p text:style-name="P24"># Copyright (C) 1991-2013 Altera Corporation</text:p>
      <text:p text:style-name="P24"># Your use of Altera Corporation's design tools, logic functions </text:p>
      <text:p text:style-name="P24"># and other software and tools, and its AMPP partner logic </text:p>
      <text:p text:style-name="P24"># functions, and any output files from any of the foregoing </text:p>
      <text:p text:style-name="P24"># (including device programming or simulation files), and any </text:p>
      <text:p text:style-name="P24"># associated documentation or information are expressly subject </text:p>
      <text:p text:style-name="P24"># to the terms and conditions of the Altera Program License </text:p>
      <text:p text:style-name="P24"># Subscription Agreement, Altera MegaCore function License </text:p>
      <text:p text:style-name="P24"># Agreement, or other applicable license agreement, including, </text:p>
      <text:p text:style-name="P24"># without limitation, that your use is for the sole purpose of </text:p>
      <text:p text:style-name="P24"># programming logic devices manufactured by Altera and sold by </text:p>
      <text:p text:style-name="P24"># Altera or its authorized distributors. <text:s/>Please refer to the </text:p>
      <text:p text:style-name="P24"># applicable agreement for further details.</text:p>
      <text:p text:style-name="P24"/>
      <text:p text:style-name="P24"/>
      <text:p text:style-name="P24"/>
      <text:p text:style-name="P24"># Clock constraints</text:p>
      <text:p text:style-name="P24"/>
      <text:p text:style-name="P24">create_clock -name "clk" -period 10.000ns [get_ports {clk}]</text:p>
      <text:p text:style-name="P24"/>
      <text:p text:style-name="P24"/>
      <text:p text:style-name="P24"># Automatically constrain PLL and other generated clocks</text:p>
      <text:p text:style-name="P24">derive_pll_clocks -create_base_clocks</text:p>
      <text:p text:style-name="P24"/>
      <text:p text:style-name="P24"># Automatically calculate clock uncertainty to jitter and other effects.</text:p>
      <text:p text:style-name="P24">derive_clock_uncertainty</text:p>
      <text:p text:style-name="P24"/>
      <text:p text:style-name="P24"># tsu/th constraints</text:p>
      <text:p text:style-name="P24"/>
      <text:p text:style-name="P24"># tco constraints</text:p>
      <text:p text:style-name="P24"/>
      <text:p text:style-name="P24"># tpd constraints</text:p>
      <text:p text:style-name="P24"/>
      <text:p text:style-name="P24">library ieee;</text:p>
      <text:p text:style-name="P24">use ieee.std_logic_1164.all;</text:p>
      <text:p text:style-name="P24">use ieee.std_logic_unsigned.all;</text:p>
      <text:p text:style-name="P24">use ieee.numeric_std.all;</text:p>
      <text:p text:style-name="P24"/>
      <text:p text:style-name="P24">entity div is port(</text:p>
      <text:p text:style-name="P24"><text:s text:c="4"/>clk, rst : in std_logic;</text:p>
      <text:p text:style-name="P24"><text:s text:c="4"/>busy : out std_logic;</text:p>
      <text:p text:style-name="P24"><text:s text:c="4"/>---quotient <text:s text:c="3"/></text:p>
      <text:p text:style-name="P24"><text:s text:c="4"/>quo_out : out std_logic_vector(7 downto 0);</text:p>
      <text:p text:style-name="P24"><text:s text:c="4"/>---denomintor</text:p>
      <text:p text:style-name="P24"><text:soft-page-break/><text:s text:c="4"/>denomintor : in std_logic_vector(7 downto 0);</text:p>
      <text:p text:style-name="P24"><text:s text:c="4"/>den_pl <text:s/>: in std_logic;</text:p>
      <text:p text:style-name="P24"><text:s text:c="4"/>---numerator</text:p>
      <text:p text:style-name="P24"><text:s text:c="4"/>numerator : in std_logic_vector(7 downto 0));</text:p>
      <text:p text:style-name="P24">end div;</text:p>
      <text:p text:style-name="P24"/>
      <text:p text:style-name="P24">architecture rtl of div is</text:p>
      <text:p text:style-name="P24"><text:s text:c="4"/>constant c : integer := 8;</text:p>
      <text:p text:style-name="P24"><text:s text:c="4"/>subtype bit24 is std_logic_vector(2*c -1 downto 0);</text:p>
      <text:p text:style-name="P24"><text:s text:c="4"/>subtype bit12 is std_logic_vector(c -1 downto 0);</text:p>
      <text:p text:style-name="P24"/>
      <text:p text:style-name="P24"><text:s text:c="4"/>signal n, n_reg : bit24;</text:p>
      <text:p text:style-name="P24"><text:s text:c="4"/>signal d_reg : bit24;</text:p>
      <text:p text:style-name="P24"><text:s text:c="4"/>signal q_reg, q_hold : std_logic_vector(c -1 downto 0);</text:p>
      <text:p text:style-name="P24"><text:s text:c="4"/>signal compare : std_logic;</text:p>
      <text:p text:style-name="P24"><text:s text:c="4"/>signal difference : bit24;</text:p>
      <text:p text:style-name="P24"><text:s text:c="4"/>signal cnt_en : std_logic := '0';</text:p>
      <text:p text:style-name="P24"><text:s text:c="4"/>signal sel : std_logic;</text:p>
      <text:p text:style-name="P24"><text:s text:c="4"/>signal cnt: std_logic_vector(3 downto 0); <text:s text:c="3"/></text:p>
      <text:p text:style-name="P24"/>
      <text:p text:style-name="P24">begin</text:p>
      <text:p text:style-name="P24"/>
      <text:p text:style-name="P24"><text:s text:c="4"/>n(2*c -1 downto c) &lt;= (others =&gt; '0'); <text:s text:c="11"/></text:p>
      <text:p text:style-name="P24"><text:s text:c="4"/>---numerator</text:p>
      <text:p text:style-name="P24"><text:s text:c="4"/>process(clk, rst) <text:s text:c="3"/></text:p>
      <text:p text:style-name="P24"><text:s text:c="4"/>begin</text:p>
      <text:p text:style-name="P24"><text:s text:c="8"/>if rst = '0' then</text:p>
      <text:p text:style-name="P24"><text:s text:c="12"/>n_reg &lt;= (others =&gt; '0'); <text:s text:c="11"/></text:p>
      <text:p text:style-name="P24"><text:s text:c="8"/>elsif rising_edge(clk) then</text:p>
      <text:p text:style-name="P24"><text:s text:c="12"/>n_reg &lt;= n;</text:p>
      <text:p text:style-name="P24"><text:s text:c="8"/>end if;</text:p>
      <text:p text:style-name="P24"><text:s text:c="4"/>end process;</text:p>
      <text:p text:style-name="P24"/>
      <text:p text:style-name="P24"><text:s text:c="4"/>n(c -1 downto 0) &lt;= numerator when den_pl = '1' </text:p>
      <text:p text:style-name="P24"><text:s text:c="4"/>else difference(c -1 downto 0) when compare = '1'</text:p>
      <text:p text:style-name="P24"><text:s text:c="4"/>else n_reg(c -1 downto 0); </text:p>
      <text:p text:style-name="P24"/>
      <text:p text:style-name="P24"/>
      <text:p text:style-name="P24"><text:s text:c="4"/>---denomintor <text:s text:c="3"/></text:p>
      <text:p text:style-name="P24"><text:s text:c="4"/>process(clk, rst)</text:p>
      <text:p text:style-name="P24"><text:s text:c="4"/>begin</text:p>
      <text:p text:style-name="P24"><text:s text:c="8"/>if rst = '0' then</text:p>
      <text:p text:style-name="P24"><text:s text:c="12"/>d_reg &lt;= (others =&gt; '0');</text:p>
      <text:p text:style-name="P24"><text:s text:c="8"/>elsif rising_edge(clk) then</text:p>
      <text:p text:style-name="P24"><text:s text:c="12"/>if den_pl = '1' then</text:p>
      <text:p text:style-name="P24"><text:s text:c="16"/>d_reg(2*c -1 downto c) &lt;= denomintor;</text:p>
      <text:p text:style-name="P24"><text:s text:c="12"/>else</text:p>
      <text:p text:style-name="P24"><text:s text:c="16"/>d_reg &lt;= '0' &amp; d_reg(2*c -1 downto 1);</text:p>
      <text:p text:style-name="P24"><text:s text:c="12"/>end if;</text:p>
      <text:p text:style-name="P24"><text:s text:c="8"/>end if;</text:p>
      <text:p text:style-name="P24"><text:soft-page-break/><text:s text:c="4"/>end process; <text:s text:c="3"/></text:p>
      <text:p text:style-name="P24"/>
      <text:p text:style-name="P24"><text:s text:c="4"/>compare &lt;= '1' when n_reg &gt;= d_reg else '0'; <text:s text:c="11"/></text:p>
      <text:p text:style-name="P24"><text:s text:c="4"/>difference &lt;= n_reg - d_reg;</text:p>
      <text:p text:style-name="P24"/>
      <text:p text:style-name="P24"><text:s text:c="4"/>---counter/compare <text:s text:c="3"/></text:p>
      <text:p text:style-name="P24"><text:s text:c="4"/>process(clk, den_pl)</text:p>
      <text:p text:style-name="P24"><text:s text:c="4"/>begin</text:p>
      <text:p text:style-name="P24"><text:s text:c="8"/>if den_pl = '1' then</text:p>
      <text:p text:style-name="P24"><text:s text:c="12"/>cnt &lt;= std_logic_vector(to_unsigned(c +1, 4));</text:p>
      <text:p text:style-name="P24"><text:s text:c="8"/>elsif rising_edge(clk) then</text:p>
      <text:p text:style-name="P24"><text:s text:c="12"/>if cnt_en = '1' then</text:p>
      <text:p text:style-name="P24"><text:s text:c="16"/>cnt &lt;= cnt -1;</text:p>
      <text:p text:style-name="P24"><text:s text:c="12"/>end if;</text:p>
      <text:p text:style-name="P24"><text:s text:c="8"/>end if;</text:p>
      <text:p text:style-name="P24"><text:s text:c="4"/>end process; <text:s text:c="3"/></text:p>
      <text:p text:style-name="P24"/>
      <text:p text:style-name="P24"><text:s text:c="4"/>---quotient</text:p>
      <text:p text:style-name="P24"><text:s text:c="4"/>process(clk, den_pl)</text:p>
      <text:p text:style-name="P24"><text:s text:c="4"/>begin</text:p>
      <text:p text:style-name="P24"><text:s text:c="8"/>if den_pl = '1' then</text:p>
      <text:p text:style-name="P24"><text:s text:c="12"/>q_reg &lt;= (others =&gt; '0');</text:p>
      <text:p text:style-name="P24"><text:s text:c="8"/>elsif rising_edge(clk) then</text:p>
      <text:p text:style-name="P24"><text:s text:c="12"/>if cnt_en = '1' then</text:p>
      <text:p text:style-name="P24"><text:s text:c="16"/>q_reg &lt;= q_reg(6 downto 0) &amp; compare;</text:p>
      <text:p text:style-name="P24"><text:s text:c="12"/>end if;</text:p>
      <text:p text:style-name="P24"><text:s text:c="8"/>end if;</text:p>
      <text:p text:style-name="P24"/>
      <text:p text:style-name="P24"><text:s text:c="4"/>end process;</text:p>
      <text:p text:style-name="P24"/>
      <text:p text:style-name="P24"><text:s text:c="4"/>cnt_en &lt;= '0' when cnt = 0 else '1';</text:p>
      <text:p text:style-name="P24"><text:s text:c="4"/>quo_out &lt;= q_reg when cnt_en = '0' else (others =&gt; '0');</text:p>
      <text:p text:style-name="P24"><text:s text:c="4"/>busy &lt;= cnt_en; <text:s text:c="3"/></text:p>
      <text:p text:style-name="P24">end rtl;</text:p>
      <text:p text:style-name="P24"/>
      <text:p text:style-name="P24"/>
      <text:p text:style-name="P24">library ieee;</text:p>
      <text:p text:style-name="P24"><text:s text:c="4"/>use ieee.std_logic_1164.all;</text:p>
      <text:p text:style-name="P24"/>
      <text:p text:style-name="P24">entity tbdiv is</text:p>
      <text:p text:style-name="P24">end entity;</text:p>
      <text:p text:style-name="P24"/>
      <text:p text:style-name="P24">architecture tbtest of tbdiv is</text:p>
      <text:p text:style-name="P24"/>
      <text:p text:style-name="P24"><text:s text:c="4"/>component div is port(</text:p>
      <text:p text:style-name="P24"><text:s text:c="8"/>clk, rst : in std_logic;</text:p>
      <text:p text:style-name="P24"><text:s text:c="8"/>busy : out std_logic;</text:p>
      <text:p text:style-name="P24"><text:s text:c="8"/>---quotient <text:s text:c="3"/></text:p>
      <text:p text:style-name="P24"><text:s text:c="8"/>quo_out : out std_logic_vector(7 downto 0);</text:p>
      <text:p text:style-name="P24"><text:s text:c="8"/>---denomintor</text:p>
      <text:p text:style-name="P24"><text:soft-page-break/><text:s text:c="8"/>denomintor : in std_logic_vector(7 downto 0);</text:p>
      <text:p text:style-name="P24"><text:s text:c="8"/>den_pl <text:s/>: in std_logic;</text:p>
      <text:p text:style-name="P24"><text:s text:c="8"/>---numerator</text:p>
      <text:p text:style-name="P24"><text:s text:c="8"/>numerator : in std_logic_vector(7 downto 0));</text:p>
      <text:p text:style-name="P24">end component;</text:p>
      <text:p text:style-name="P24"/>
      <text:p text:style-name="P24">constant halfclk : time := 50 ns;</text:p>
      <text:p text:style-name="P24">constant delay <text:s text:c="2"/>: time := 30 ns;</text:p>
      <text:p text:style-name="P24"/>
      <text:p text:style-name="P24">signal clk, rst <text:s/>: std_logic;</text:p>
      <text:p text:style-name="P24">signal busy <text:s text:c="5"/>: std_logic;</text:p>
      <text:p text:style-name="P24">signal quo_out <text:s text:c="2"/>: std_logic_vector(7 downto 0);</text:p>
      <text:p text:style-name="P24">signal denomintor: std_logic_vector(7 downto 0) := "00000110";</text:p>
      <text:p text:style-name="P24">signal den_pl <text:s text:c="3"/>: std_logic := '0';</text:p>
      <text:p text:style-name="P24">signal numerator : std_logic_vector(7 downto 0) := "00110010";</text:p>
      <text:p text:style-name="P24">begin <text:s text:c="3"/></text:p>
      <text:p text:style-name="P24"><text:s text:c="4"/>rst &lt;= '1', '0' after halfclk*3 + delay, '1' after halfclk*7 + delay;</text:p>
      <text:p text:style-name="P24"/>
      <text:p text:style-name="P24"/>
      <text:p text:style-name="P24"><text:s text:c="4"/>clock : process</text:p>
      <text:p text:style-name="P24"><text:s text:c="4"/>begin</text:p>
      <text:p text:style-name="P24"><text:s text:c="8"/>clk &lt;= '1'; wait for halfclk;</text:p>
      <text:p text:style-name="P24"><text:s text:c="8"/>clk &lt;= '0'; wait for halfclk;</text:p>
      <text:p text:style-name="P24"><text:s text:c="4"/>end process;</text:p>
      <text:p text:style-name="P24"/>
      <text:p text:style-name="P24"><text:s text:c="4"/>den_pl &lt;= '1' after halfclk*11 + delay, '0' after halfclk*13;</text:p>
      <text:p text:style-name="P24"/>
      <text:p text:style-name="P24"><text:s text:c="4"/>load_num : process</text:p>
      <text:p text:style-name="P24"><text:s text:c="4"/>begin <text:s text:c="7"/></text:p>
      <text:p text:style-name="P24"><text:s text:c="8"/>wait;</text:p>
      <text:p text:style-name="P24"><text:s text:c="4"/>end process;</text:p>
      <text:p text:style-name="P24"/>
      <text:p text:style-name="P24"><text:s text:c="4"/>div0 : div</text:p>
      <text:p text:style-name="P24"><text:s text:c="8"/>port map (clk =&gt; clk, rst =&gt; rst, busy =&gt; busy, quo_out =&gt; quo_out, denomintor =&gt; denomintor, den_pl =&gt; den_pl, <text:s text:c="3"/>numerator =&gt; numerator);</text:p>
      <text:p text:style-name="P24"/>
      <text:p text:style-name="P24">end tbtest;</text:p>
      <text:p text:style-name="P24"/>
      <text:p text:style-name="P24"/>
      <text:p text:style-name="P24">--for modelsim</text:p>
      <text:p text:style-name="P24">--library ieee;</text:p>
      <text:p text:style-name="P24">--use ieee.std_logic_1164.all;</text:p>
      <text:p text:style-name="P24">--</text:p>
      <text:p text:style-name="P24">--use ieee.fixed_pkg.all;</text:p>
      <text:p text:style-name="P24">--</text:p>
      <text:p text:style-name="P24">--entity uns_sub is port(</text:p>
      <text:p text:style-name="P24">-- <text:s text:c="3"/>data_in_a, data_in_b : in ufixed(3 downto -3);</text:p>
      <text:p text:style-name="P24">-- <text:s text:c="3"/>data_out : out ufixed(4 downto -3));</text:p>
      <text:p text:style-name="P24">--end uns_sub;</text:p>
      <text:p text:style-name="P24">--</text:p>
      <text:p text:style-name="P24"><text:soft-page-break/>--architecture arch of uns_sub is</text:p>
      <text:p text:style-name="P24">--begin</text:p>
      <text:p text:style-name="P24">-- <text:s text:c="3"/>data_out &lt;= data_in_a - data_in_b;</text:p>
      <text:p text:style-name="P24">--end arch;</text:p>
      <text:p text:style-name="P24"/>
      <text:p text:style-name="P24">--for quartus</text:p>
      <text:p text:style-name="P24">library ieee;</text:p>
      <text:p text:style-name="P24"><text:s text:c="4"/>use ieee.std_logic_1164.all;</text:p>
      <text:p text:style-name="P24">library floatfixlib;</text:p>
      <text:p text:style-name="P24"><text:s text:c="4"/>use floatfixlib.fixed_pkg.all;</text:p>
      <text:p text:style-name="P24"/>
      <text:p text:style-name="P24">entity uns_sub is port(</text:p>
      <text:p text:style-name="P24"><text:s text:c="4"/>data_in_a, data_in_b : in ufixed(6 downto -3);</text:p>
      <text:p text:style-name="P24"><text:s text:c="4"/>data_out : out ufixed(6 downto -4));</text:p>
      <text:p text:style-name="P24">end uns_sub;</text:p>
      <text:p text:style-name="P24"/>
      <text:p text:style-name="P24">architecture arch of uns_sub is</text:p>
      <text:p text:style-name="P24">begin</text:p>
      <text:p text:style-name="P24"><text:s text:c="4"/>data_out &lt;= data_in_a + data_in_b;</text:p>
      <text:p text:style-name="P24">end arch;</text:p>
      <text:p text:style-name="P16"/>
      <text:p text:style-name="P16">library ieee;</text:p>
      <text:p text:style-name="P16"><text:s text:c="4"/>use ieee.std_logic_1164.all;</text:p>
      <text:p text:style-name="P16"/>
      <text:p text:style-name="P16">entity sm is port(</text:p>
      <text:p text:style-name="P16"><text:s text:c="4"/>clk, rst, ena : in std_logic;</text:p>
      <text:p text:style-name="P16"><text:s text:c="4"/>decode_out : out std_logic);</text:p>
      <text:p text:style-name="P16">end sm;</text:p>
      <text:p text:style-name="P16"/>
      <text:p text:style-name="P16">architecture beh of sm is</text:p>
      <text:p text:style-name="P16"><text:s text:c="4"/>subtype sm_vector is std_logic_vector(2 downto 0);</text:p>
      <text:p text:style-name="P16"/>
      <text:p text:style-name="P16"><text:s text:c="4"/>signal byte_cnt_ns : sm_vector;</text:p>
      <text:p text:style-name="P16"><text:s text:c="4"/>signal byte_cnt_ps : sm_vector;</text:p>
      <text:p text:style-name="P16"/>
      <text:p text:style-name="P16"><text:s text:c="4"/>constant cnt1 : sm_vector := "000";</text:p>
      <text:p text:style-name="P16"><text:s text:c="4"/>constant cnt2 : sm_vector := "101";</text:p>
      <text:p text:style-name="P16"><text:s text:c="4"/>constant cnt3 : sm_vector := "110";</text:p>
      <text:p text:style-name="P16"><text:s text:c="4"/>constant cnt4 : sm_vector := "011";</text:p>
      <text:p text:style-name="P16"/>
      <text:p text:style-name="P16">begin</text:p>
      <text:p text:style-name="P16"><text:s text:c="4"/>byte_cntr : process(clk, rst, ena, byte_cnt_ps, byte_cnt_ns)</text:p>
      <text:p text:style-name="P16"><text:s text:c="4"/>begin</text:p>
      <text:p text:style-name="P16"><text:s text:c="8"/>if(rst = '1')then</text:p>
      <text:p text:style-name="P16"><text:s text:c="12"/>byte_cnt_ps &lt;= cnt1;</text:p>
      <text:p text:style-name="P16"><text:s text:c="8"/>elsif rising_edge(clk) then</text:p>
      <text:p text:style-name="P16"><text:s text:c="12"/>byte_cnt_ps &lt;= byte_cnt_ns;</text:p>
      <text:p text:style-name="P16"><text:s text:c="8"/>end if;</text:p>
      <text:p text:style-name="P16"/>
      <text:p text:style-name="P16"><text:s text:c="8"/>case byte_cnt_ps is</text:p>
      <text:p text:style-name="P16"><text:soft-page-break/><text:s text:c="12"/>when cnt1 =&gt;</text:p>
      <text:p text:style-name="P16"><text:s text:c="16"/>if(ena = '1') then byte_cnt_ns &lt;= cnt2;</text:p>
      <text:p text:style-name="P16"><text:s text:c="12"/>else byte_cnt_ns &lt;= cnt1;</text:p>
      <text:p text:style-name="P16"><text:s text:c="8"/>end if;</text:p>
      <text:p text:style-name="P16"><text:s text:c="4"/>when cnt2 =&gt;</text:p>
      <text:p text:style-name="P16"><text:s text:c="8"/>if(ena = '1') then byte_cnt_ns &lt;= cnt3;</text:p>
      <text:p text:style-name="P16"><text:s text:c="4"/>else byte_cnt_ns &lt;= cnt2;</text:p>
      <text:p text:style-name="P16">end if; <text:s text:c="15"/></text:p>
      <text:p text:style-name="P16">when cnt3 =&gt;</text:p>
      <text:p text:style-name="P16"><text:s text:c="4"/>if(ena = '1') then byte_cnt_ns &lt;= cnt4;</text:p>
      <text:p text:style-name="P16">else byte_cnt_ns &lt;= cnt3;</text:p>
      <text:p text:style-name="P16">end if; <text:s text:c="11"/></text:p>
      <text:p text:style-name="P16">when cnt4 =&gt;</text:p>
      <text:p text:style-name="P16"><text:s text:c="4"/>if(ena = '1') then byte_cnt_ns &lt;= cnt1;</text:p>
      <text:p text:style-name="P16">else byte_cnt_ns &lt;= cnt4;</text:p>
      <text:p text:style-name="P16">end if;</text:p>
      <text:p text:style-name="P16">when others =&gt;</text:p>
      <text:p text:style-name="P16"><text:s text:c="4"/>byte_cnt_ns &lt;= (others =&gt; '-');</text:p>
      <text:p text:style-name="P16"><text:s text:c="8"/>end case;</text:p>
      <text:p text:style-name="P16"><text:s text:c="4"/>end process;</text:p>
      <text:p text:style-name="P16"><text:s text:c="4"/>decode_out &lt;= byte_cnt_ps(2);</text:p>
      <text:p text:style-name="P16">end beh;</text:p>
      <text:p text:style-name="P16"/>
      <text:p text:style-name="P16"/>
      <text:p text:style-name="P16">library ieee;</text:p>
      <text:p text:style-name="P16"><text:s text:c="4"/>use ieee.std_logic_1164.all;</text:p>
      <text:p text:style-name="P16"><text:s text:c="4"/>use ieee.std_logic_unsigned.all;</text:p>
      <text:p text:style-name="P16"/>
      <text:p text:style-name="P16">entity bidir_port is</text:p>
      <text:p text:style-name="P16"><text:s text:c="4"/>generic (</text:p>
      <text:p text:style-name="P16"><text:s text:c="8"/>DATA_WIDTH :integer := 8;</text:p>
      <text:p text:style-name="P16"><text:s text:c="8"/>ADDR_WIDTH :integer := 8);</text:p>
      <text:p text:style-name="P16"><text:s text:c="4"/>port (</text:p>
      <text:p text:style-name="P16"><text:s text:c="8"/>clk :in std_logic; -- Clock Input</text:p>
      <text:p text:style-name="P16"><text:s text:c="8"/>address :in std_logic_vector (ADDR_WIDTH-1 downto 0); -- address Input</text:p>
      <text:p text:style-name="P16"><text:s text:c="8"/>data :inout std_logic_vector (DATA_WIDTH-1 downto 0); -- data bi-directional</text:p>
      <text:p text:style-name="P16"><text:s text:c="8"/>cs :in std_logic; -- Chip Select</text:p>
      <text:p text:style-name="P16"><text:s text:c="8"/>we :in std_logic; -- Write Enable/Read Enable</text:p>
      <text:p text:style-name="P16"><text:s text:c="8"/>oe :in std_logic); <text:s/>-- Output Enable </text:p>
      <text:p text:style-name="P16">end entity;</text:p>
      <text:p text:style-name="P16"/>
      <text:p text:style-name="P16">architecture rtl of bidir_port is</text:p>
      <text:p text:style-name="P16"><text:s text:c="4"/>----------------Internal variables----------------</text:p>
      <text:p text:style-name="P16"><text:s text:c="4"/>constant RAM_DEPTH :integer := 2**ADDR_WIDTH;</text:p>
      <text:p text:style-name="P16"/>
      <text:p text:style-name="P16"><text:s text:c="4"/>signal data_out :std_logic_vector (DATA_WIDTH-1 downto 0);</text:p>
      <text:p text:style-name="P16"/>
      <text:p text:style-name="P16"><text:s text:c="4"/>type RAM is array (integer range &lt;&gt;)of std_logic_vector (DATA_WIDTH-1 downto 0);</text:p>
      <text:p text:style-name="P16"><text:s text:c="4"/>signal mem : RAM (0 to 255);</text:p>
      <text:p text:style-name="P16">begin</text:p>
      <text:p text:style-name="P16"><text:soft-page-break/></text:p>
      <text:p text:style-name="P16"><text:s text:c="4"/>----------------Code Starts Here------------------</text:p>
      <text:p text:style-name="P16"><text:s text:c="4"/>-- Tri-State Buffer control</text:p>
      <text:p text:style-name="P16"><text:s text:c="4"/>-- output : When we = 0, oe = 1, cs = 1</text:p>
      <text:p text:style-name="P16"><text:s text:c="4"/>-- THE TO_X01 DOESN'T MAKE ANY DIFF IN TB</text:p>
      <text:p text:style-name="P16"><text:s text:c="4"/>data &lt;= TO_X01(data_out) when (cs = '1' and oe = '1' and we = '0') else (others =&gt; 'Z');</text:p>
      <text:p text:style-name="P16"><text:s text:c="4"/>--ram is outputting data <text:s text:c="31"/>--wait for data in </text:p>
      <text:p text:style-name="P16"><text:s text:c="4"/>-- Memory Write Block</text:p>
      <text:p text:style-name="P16"><text:s text:c="4"/>-- Write Operation : When we = 1, cs = 1</text:p>
      <text:p text:style-name="P16"><text:s text:c="4"/>MEM_WRITE:process (clk) begin</text:p>
      <text:p text:style-name="P16"><text:s text:c="8"/>if (rising_edge(clk)) then</text:p>
      <text:p text:style-name="P16"><text:s text:c="12"/>if (cs = '1' and we = '1') then</text:p>
      <text:p text:style-name="P16"><text:s text:c="16"/>mem(conv_integer(address)) &lt;= data;</text:p>
      <text:p text:style-name="P16"><text:s text:c="12"/>end if;</text:p>
      <text:p text:style-name="P16"><text:s text:c="8"/>end if;</text:p>
      <text:p text:style-name="P16"><text:s text:c="4"/>end process;</text:p>
      <text:p text:style-name="P16"/>
      <text:p text:style-name="P16"><text:s text:c="4"/>-- Memory Read Block</text:p>
      <text:p text:style-name="P16"><text:s text:c="4"/>-- Read Operation : When we = 0, oe = 1, cs = 1</text:p>
      <text:p text:style-name="P16"><text:s text:c="4"/>MEM_READ:process (clk) begin</text:p>
      <text:p text:style-name="P16"><text:s text:c="8"/>if (rising_edge(clk)) then</text:p>
      <text:p text:style-name="P16"><text:s text:c="12"/>if (cs = '1' <text:s/>and oe = '1' and we = '0') then</text:p>
      <text:p text:style-name="P16"><text:s text:c="16"/>data_out &lt;= mem(conv_integer(address));</text:p>
      <text:p text:style-name="P16"><text:s text:c="12"/>end if;</text:p>
      <text:p text:style-name="P16"><text:s text:c="8"/>end if;</text:p>
      <text:p text:style-name="P16"><text:s text:c="4"/>end process;</text:p>
      <text:p text:style-name="P16"/>
      <text:p text:style-name="P16">end architecture;</text:p>
      <text:p text:style-name="P16"/>
      <text:p text:style-name="P16">library ieee;</text:p>
      <text:p text:style-name="P16"><text:s text:c="4"/>use ieee.std_logic_1164.all;</text:p>
      <text:p text:style-name="P16"><text:s text:c="4"/>use ieee.std_logic_unsigned.all;</text:p>
      <text:p text:style-name="P16"/>
      <text:p text:style-name="P16">entity tb_bidir_port is</text:p>
      <text:p text:style-name="P16">end tb_bidir_port;</text:p>
      <text:p text:style-name="P16"/>
      <text:p text:style-name="P16">architecture TB of tb_bidir_port is</text:p>
      <text:p text:style-name="P16"><text:s text:c="4"/>component bidir_port is </text:p>
      <text:p text:style-name="P16"><text:s text:c="8"/>generic (</text:p>
      <text:p text:style-name="P16"><text:s text:c="12"/>DATA_WIDTH :integer := 8;</text:p>
      <text:p text:style-name="P16"><text:s text:c="12"/>ADDR_WIDTH :integer := 8);</text:p>
      <text:p text:style-name="P16"><text:s text:c="8"/>port (</text:p>
      <text:p text:style-name="P16"><text:s text:c="12"/>clk :in std_logic; -- Clock Input</text:p>
      <text:p text:style-name="P16"><text:s text:c="12"/>address :in std_logic_vector (7 downto 0); -- address Input</text:p>
      <text:p text:style-name="P16"><text:s text:c="12"/>data :inout std_logic_vector (7 downto 0); -- data bi-directional</text:p>
      <text:p text:style-name="P16"><text:s text:c="12"/>cs :in std_logic; -- Chip Select</text:p>
      <text:p text:style-name="P16"><text:s text:c="12"/>we :in std_logic; -- Write Enable/Read Enable</text:p>
      <text:p text:style-name="P16"><text:s text:c="12"/>oe :in std_logic); <text:s/>-- Output Enable</text:p>
      <text:p text:style-name="P16"><text:s text:c="4"/>end component;</text:p>
      <text:p text:style-name="P16"/>
      <text:p text:style-name="P16"><text:soft-page-break/><text:s text:c="4"/>signal T_Clock, T_Enable, T_WriteEn: std_logic;</text:p>
      <text:p text:style-name="P16"><text:s text:c="4"/>signal T_Data,T_Tx_Data, T_Rx_Data: std_logic_vector(7 downto 0);</text:p>
      <text:p text:style-name="P16"><text:s text:c="4"/>signal T_Address: std_logic_vector(7 downto 0);</text:p>
      <text:p text:style-name="P16"><text:s text:c="4"/>signal T_OE: std_logic;</text:p>
      <text:p text:style-name="P16">begin </text:p>
      <text:p text:style-name="P16"/>
      <text:p text:style-name="P16"><text:s text:c="4"/>T_Data &lt;= T_Tx_Data when T_WriteEn = '1' else (others =&gt; 'Z');</text:p>
      <text:p text:style-name="P16"><text:s text:c="4"/>--when writing to ram <text:s text:c="16"/>--waiting for ram data out <text:s/></text:p>
      <text:p text:style-name="P16"><text:s text:c="4"/>T_Rx_Data &lt;= T_Data when T_WriteEn = '0' and T_OE = '1' else (others =&gt; 'Z');</text:p>
      <text:p text:style-name="P16"/>
      <text:p text:style-name="P16"/>
      <text:p text:style-name="P16"><text:s text:c="4"/>Clk_sig: process</text:p>
      <text:p text:style-name="P16"><text:s text:c="4"/>begin</text:p>
      <text:p text:style-name="P16"><text:s text:c="8"/>-- clock cycle 10 ns</text:p>
      <text:p text:style-name="P16"><text:s text:c="8"/>T_Clock&lt;='1'; wait for 5 ns;</text:p>
      <text:p text:style-name="P16"><text:s text:c="8"/>T_Clock&lt;='0'; wait for 5 ns;</text:p>
      <text:p text:style-name="P16"><text:s text:c="4"/>end process;</text:p>
      <text:p text:style-name="P16"/>
      <text:p text:style-name="P16"><text:s text:c="4"/>process</text:p>
      <text:p text:style-name="P16"><text:s text:c="8"/>variable err_cnt: integer := 0;</text:p>
      <text:p text:style-name="P16"><text:s text:c="4"/>begin</text:p>
      <text:p text:style-name="P16"/>
      <text:p text:style-name="P16"><text:s text:c="8"/>T_Enable &lt;= '0';</text:p>
      <text:p text:style-name="P16"><text:s text:c="8"/>T_Address &lt;= (T_Address'range =&gt; '0');</text:p>
      <text:p text:style-name="P16"><text:s text:c="8"/>T_Tx_Data &lt;= (T_Tx_Data'range =&gt; '0');</text:p>
      <text:p text:style-name="P16"><text:s text:c="8"/>wait for 15 ns;</text:p>
      <text:p text:style-name="P16"/>
      <text:p text:style-name="P16"><text:s text:c="8"/>--TEST WRITE</text:p>
      <text:p text:style-name="P16"><text:s text:c="8"/>T_Enable &lt;= '1'; --ENABLE MEMORY</text:p>
      <text:p text:style-name="P16"><text:s text:c="8"/>T_OE &lt;= '0'; --DISABLE OUTPUT TO WRITE IN MEM</text:p>
      <text:p text:style-name="P16"><text:s text:c="8"/>T_WriteEn &lt;= '1'; --ENABLE WRITE</text:p>
      <text:p text:style-name="P16"><text:s text:c="8"/>wait until rising_edge(T_Clock); <text:s text:c="7"/></text:p>
      <text:p text:style-name="P16"/>
      <text:p text:style-name="P16"><text:s text:c="8"/>for i in 0 to 2 loop <text:s text:c="11"/></text:p>
      <text:p text:style-name="P16"><text:s text:c="12"/>wait for 5 ns; -- UPDATE NEW VALUES</text:p>
      <text:p text:style-name="P16"><text:s text:c="12"/>T_Address &lt;= T_Address + '1';</text:p>
      <text:p text:style-name="P16"><text:s text:c="12"/>T_Tx_Data &lt;= T_Tx_Data + '1';</text:p>
      <text:p text:style-name="P16"><text:s text:c="12"/>wait until rising_edge(T_Clock); <text:s text:c="3"/>-- WAIT FOR MEM TO UPDATE</text:p>
      <text:p text:style-name="P16"><text:s text:c="8"/>end loop;</text:p>
      <text:p text:style-name="P16"/>
      <text:p text:style-name="P16"><text:s text:c="8"/>--TEST READ</text:p>
      <text:p text:style-name="P16"><text:s text:c="8"/>wait for 5 ns; -- UPDATE NEW VALUES</text:p>
      <text:p text:style-name="P16"><text:s text:c="8"/>T_OE &lt;= '1'; -- ENABLE OUTPUT TO READ FROM MEM</text:p>
      <text:p text:style-name="P16"><text:s text:c="8"/>T_WriteEn &lt;= '0'; -- DISABLE READ</text:p>
      <text:p text:style-name="P16"><text:s text:c="8"/>T_Address &lt;= (T_Address'range =&gt; '0'); -- RESET ADDRESS</text:p>
      <text:p text:style-name="P16"><text:s text:c="8"/>wait until rising_edge(T_Clock); <text:s text:c="7"/></text:p>
      <text:p text:style-name="P16"><text:s text:c="8"/>for i in 0 to 3 loop</text:p>
      <text:p text:style-name="P16"><text:s text:c="12"/>wait for 5 ns;</text:p>
      <text:p text:style-name="P16"><text:s text:c="12"/>T_Address &lt;= T_Address + '1'; <text:s text:c="11"/></text:p>
      <text:p text:style-name="P16"><text:s text:c="12"/>wait until rising_edge(T_Clock);</text:p>
      <text:p text:style-name="P16"><text:soft-page-break/><text:s text:c="8"/>end loop; <text:s text:c="7"/></text:p>
      <text:p text:style-name="P16"><text:s text:c="8"/>wait;</text:p>
      <text:p text:style-name="P16"><text:s text:c="4"/>end process;</text:p>
      <text:p text:style-name="P16"/>
      <text:p text:style-name="P16"><text:s text:c="4"/>bidir_port0 : bidir_port </text:p>
      <text:p text:style-name="P16"><text:s text:c="8"/>generic map(DATA_WIDTH =&gt; 8,</text:p>
      <text:p text:style-name="P16"><text:s text:c="20"/>ADDR_WIDTH =&gt; 8) <text:s text:c="3"/></text:p>
      <text:p text:style-name="P16"><text:s text:c="8"/>port map( clk =&gt; T_Clock, </text:p>
      <text:p text:style-name="P16"><text:s text:c="18"/>address =&gt; T_Address, </text:p>
      <text:p text:style-name="P16"><text:s text:c="18"/>data =&gt; T_Data, f</text:p>
      <text:p text:style-name="P16"><text:s text:c="18"/>cs =&gt; T_Enable, </text:p>
      <text:p text:style-name="P16"><text:s text:c="18"/>we =&gt; T_WriteEn, <text:s/></text:p>
      <text:p text:style-name="P16"><text:s text:c="18"/>oe =&gt; T_OE);</text:p>
      <text:p text:style-name="P16"/>
      <text:p text:style-name="P16">end TB;</text:p>
      <text:p text:style-name="P16"/>
      <text:p text:style-name="P16"/>
      <text:p text:style-name="P16">library ieee;</text:p>
      <text:p text:style-name="P16"><text:s text:c="4"/>use ieee.std_logic_1164.all;</text:p>
      <text:p text:style-name="P16"/>
      <text:p text:style-name="P16">entity cpu is port(</text:p>
      <text:p text:style-name="P16"><text:s text:c="4"/>data <text:s text:c="3"/>: in std_logic_vector(7 downto 0); </text:p>
      <text:p text:style-name="P16"><text:s text:c="4"/>count <text:s text:c="3"/>: out std_logic);</text:p>
      <text:p text:style-name="P16">end cpu;</text:p>
      <text:p text:style-name="P16"/>
      <text:p text:style-name="P16">architecture beh of cpu is</text:p>
      <text:p text:style-name="P16"><text:s text:c="4"/>procedure ones(signal data: in std_logic_vector;</text:p>
      <text:p text:style-name="P16"><text:s text:c="19"/>signal count: out std_logic) is</text:p>
      <text:p text:style-name="P16"><text:s text:c="8"/>variable parity: std_logic:='0';</text:p>
      <text:p text:style-name="P16"><text:s text:c="4"/>begin</text:p>
      <text:p text:style-name="P16"><text:s text:c="8"/>for i in data'range loop</text:p>
      <text:p text:style-name="P16"><text:s text:c="12"/>parity := parity xor data(i);</text:p>
      <text:p text:style-name="P16"><text:s text:c="8"/>end loop;</text:p>
      <text:p text:style-name="P16"><text:s text:c="8"/>count &lt;= parity;</text:p>
      <text:p text:style-name="P16"><text:s text:c="4"/>end procedure ones;</text:p>
      <text:p text:style-name="P16">begin</text:p>
      <text:p text:style-name="P16"><text:s text:c="4"/>ones(data, count); -- concurrent procedure call</text:p>
      <text:p text:style-name="P16">end architecture beh;</text:p>
      <text:p text:style-name="P16"/>
      <text:p text:style-name="P16">--library ieee; </text:p>
      <text:p text:style-name="P16">--use ieee.std_logic_1164.all;</text:p>
      <text:p text:style-name="P16">--use ieee.numeric_std.all;</text:p>
      <text:p text:style-name="P16">--use ieee.std_logic_unsigned.all;</text:p>
      <text:p text:style-name="P16">--</text:p>
      <text:p text:style-name="P16">--entity fa is</text:p>
      <text:p text:style-name="P16">-- <text:s text:c="3"/>generic(n : in integer := 3);</text:p>
      <text:p text:style-name="P16">-- <text:s text:c="3"/>port(</text:p>
      <text:p text:style-name="P16">-- <text:s text:c="7"/>add_sub <text:s text:c="3"/>: in <text:s/>std_logic;</text:p>
      <text:p text:style-name="P16">-- <text:s text:c="7"/>sig_uns <text:s text:c="3"/>: in <text:s/>std_logic;</text:p>
      <text:p text:style-name="P16">-- <text:s text:c="7"/>x, y <text:s text:c="6"/>: in <text:s/>std_logic_vector(n downto 0);</text:p>
      <text:p text:style-name="P16"><text:soft-page-break/>-- <text:s text:c="7"/>sig_ovf <text:s text:c="3"/>: out std_logic;</text:p>
      <text:p text:style-name="P16">-- <text:s text:c="7"/>uns_ovf <text:s text:c="3"/>: out std_logic;</text:p>
      <text:p text:style-name="P16">-- <text:s text:c="7"/>s <text:s text:c="11"/>: out std_logic_vector(n downto 0));</text:p>
      <text:p text:style-name="P16">-- <text:s text:c="3"/>end fa;</text:p>
      <text:p text:style-name="P16">-- <text:s text:c="3"/></text:p>
      <text:p text:style-name="P16">--architecture rtl of fa is</text:p>
      <text:p text:style-name="P16">-- <text:s text:c="3"/>signal result <text:s text:c="10"/>: unsigned(n +1 downto 0);</text:p>
      <text:p text:style-name="P16">-- <text:s text:c="3"/>signal int_result <text:s text:c="2"/>: std_logic_vector(n +1 downto 0);</text:p>
      <text:p text:style-name="P16">-- <text:s text:c="3"/>signal uns_x, uns_y : unsigned(n +1 downto 0);</text:p>
      <text:p text:style-name="P16">--begin</text:p>
      <text:p text:style-name="P16">-- <text:s text:c="3"/>uns_x &lt;= resize(unsigned(x), result'length);</text:p>
      <text:p text:style-name="P16">-- <text:s text:c="3"/>uns_y &lt;= resize(unsigned(y), result'length);</text:p>
      <text:p text:style-name="P16">-- <text:s text:c="3"/></text:p>
      <text:p text:style-name="P16">---- <text:s text:c="3"/>process(add_sub, x, y)</text:p>
      <text:p text:style-name="P16">---- <text:s text:c="3"/>begin</text:p>
      <text:p text:style-name="P16">-- <text:s text:c="11"/>result &lt;= uns_x + uns_y;</text:p>
      <text:p text:style-name="P16">---- <text:s text:c="7"/>if add_sub = '1' then</text:p>
      <text:p text:style-name="P16">---- <text:s text:c="11"/>result &lt;= uns_x - uns_y;</text:p>
      <text:p text:style-name="P16">---- <text:s text:c="7"/>end if;</text:p>
      <text:p text:style-name="P16">---- <text:s text:c="3"/>end process;</text:p>
      <text:p text:style-name="P16">-- <text:s text:c="3"/></text:p>
      <text:p text:style-name="P16">-- <text:s text:c="3"/>int_result &lt;= std_logic_vector(result);</text:p>
      <text:p text:style-name="P16">-- <text:s text:c="3"/>s &lt;= int_result(n downto 0);</text:p>
      <text:p text:style-name="P16">-- <text:s text:c="3"/>uns_ovf &lt;= int_result(int_result'high);</text:p>
      <text:p text:style-name="P16">--</text:p>
      <text:p text:style-name="P16">--end rtl;</text:p>
      <text:p text:style-name="P16"/>
      <text:p text:style-name="P16">library ieee;</text:p>
      <text:p text:style-name="P16"><text:s text:c="4"/>use ieee.std_logic_1164.all;</text:p>
      <text:p text:style-name="P16"><text:s text:c="4"/>use ieee.std_logic_unsigned.all;</text:p>
      <text:p text:style-name="P16"/>
      <text:p text:style-name="P16">entity fa is</text:p>
      <text:p text:style-name="P16"><text:s text:c="4"/>generic( <text:s text:c="3"/>n : natural := 7); -- default number of bits</text:p>
      <text:p text:style-name="P16"><text:s text:c="4"/>port( <text:s text:c="7"/>s : in std_logic; <text:s text:c="6"/>--select subtract signal</text:p>
      <text:p text:style-name="P16"><text:s text:c="17"/>a : in std_logic_vector(n downto 0);</text:p>
      <text:p text:style-name="P16"><text:s text:c="17"/>b : in std_logic_vector(n downto 0);</text:p>
      <text:p text:style-name="P16"><text:s text:c="17"/>f : out std_logic_vector(n downto 0);</text:p>
      <text:p text:style-name="P16"><text:s text:c="17"/>uns_ovf : out std_logic;</text:p>
      <text:p text:style-name="P16"><text:s text:c="17"/>sig_ovf : out std_logic);</text:p>
      <text:p text:style-name="P16">end fa;</text:p>
      <text:p text:style-name="P16"/>
      <text:p text:style-name="P16">architecture arch of fa is</text:p>
      <text:p text:style-name="P16"><text:s text:c="4"/>-- temp result for extracting the unsigned overflow bit</text:p>
      <text:p text:style-name="P16"><text:s text:c="4"/>signal result : std_logic_vector(n +1 downto 0);</text:p>
      <text:p text:style-name="P16"><text:s text:c="4"/>-- temp result for extracting the c3 bit</text:p>
      <text:p text:style-name="P16"><text:s text:c="4"/>signal c3 : std_logic_vector(n downto 0);</text:p>
      <text:p text:style-name="P16">begin</text:p>
      <text:p text:style-name="P16"><text:s text:c="4"/>process(a, b, s)</text:p>
      <text:p text:style-name="P16"><text:s text:c="4"/>begin</text:p>
      <text:p text:style-name="P16"><text:s text:c="8"/>if s = '0' then --addition</text:p>
      <text:p text:style-name="P16"><text:soft-page-break/><text:s text:c="12"/>-- the two operands are zero extended one extra bit before adding </text:p>
      <text:p text:style-name="P16"><text:s text:c="12"/>result &lt;= ('0' &amp; a) + ('0' &amp; b);</text:p>
      <text:p text:style-name="P16"><text:s text:c="12"/>c3 &lt;= ('0' &amp; a(n -1 downto 0)) + ('0' &amp; b(n -1 downto 0));</text:p>
      <text:p text:style-name="P16"><text:s text:c="12"/>f &lt;= result(n downto 0); --extract the n-bit result</text:p>
      <text:p text:style-name="P16"><text:s text:c="12"/>uns_ovf &lt;= result(n +1); --extract the n bit result</text:p>
      <text:p text:style-name="P16"><text:s text:c="12"/>sig_ovf &lt;= result(n +1) xor c3(n); --get signed ovf bit</text:p>
      <text:p text:style-name="P16"><text:s text:c="8"/>else</text:p>
      <text:p text:style-name="P16"><text:s text:c="12"/>-- the two operands are zero extended one extra bit before subtracting </text:p>
      <text:p text:style-name="P16"><text:s text:c="12"/>result &lt;= ('0' &amp; a) - ('0' &amp; b);</text:p>
      <text:p text:style-name="P16"><text:s text:c="12"/>c3 &lt;= ('0' &amp; a(n -1 downto 0)) + ('0' &amp; b(n -1 downto 0));</text:p>
      <text:p text:style-name="P16"><text:s text:c="12"/>f &lt;= result(n downto 0); --extract the n-bit result</text:p>
      <text:p text:style-name="P16"><text:s text:c="12"/>uns_ovf &lt;= result(n +1); --extract the n bit result</text:p>
      <text:p text:style-name="P16"><text:s text:c="12"/>sig_ovf &lt;= result(n +1) xor c3(n); --get signed ovf bit</text:p>
      <text:p text:style-name="P16"><text:s text:c="8"/>end if;</text:p>
      <text:p text:style-name="P16"><text:s text:c="4"/>end process;</text:p>
      <text:p text:style-name="P16">end arch;</text:p>
      <text:p text:style-name="P16"/>
      <text:p text:style-name="P16"/>
      <text:p text:style-name="P16">library ieee;</text:p>
      <text:p text:style-name="P16"><text:s text:c="4"/>use ieee.std_logic_1164.all;</text:p>
      <text:p text:style-name="P16"/>
      <text:p text:style-name="P16">entity tbfa is </text:p>
      <text:p text:style-name="P16">end entity;</text:p>
      <text:p text:style-name="P16"/>
      <text:p text:style-name="P16">architecture beh of tbfa is</text:p>
      <text:p text:style-name="P16"/>
      <text:p text:style-name="P16"><text:s text:c="4"/>component fa is </text:p>
      <text:p text:style-name="P16"><text:s text:c="8"/>generic( <text:s text:c="3"/>n : natural := 3); -- default number of bits</text:p>
      <text:p text:style-name="P16"><text:s text:c="8"/>port( <text:s text:c="7"/>s : in std_logic; <text:s text:c="6"/>--select subtract signal</text:p>
      <text:p text:style-name="P16"><text:s text:c="21"/>a : in std_logic_vector(n downto 0);</text:p>
      <text:p text:style-name="P16"><text:s text:c="21"/>b : in std_logic_vector(n downto 0);</text:p>
      <text:p text:style-name="P16"><text:s text:c="21"/>f : out std_logic_vector(n downto 0);</text:p>
      <text:p text:style-name="P16"><text:s text:c="21"/>uns_ovf : out std_logic;</text:p>
      <text:p text:style-name="P16"><text:s text:c="21"/>sig_ovf : out std_logic);</text:p>
      <text:p text:style-name="P16"><text:s text:c="4"/>end component;</text:p>
      <text:p text:style-name="P16"/>
      <text:p text:style-name="P16"><text:s text:c="4"/>constant period : time := 5 ns;</text:p>
      <text:p text:style-name="P16"><text:s text:c="4"/>constant strobe : time := period -1 ns;</text:p>
      <text:p text:style-name="P16"><text:s text:c="4"/>constant n : natural := 3;</text:p>
      <text:p text:style-name="P16"/>
      <text:p text:style-name="P16"><text:s text:c="4"/>signal s : <text:s/>std_logic; <text:s text:c="6"/></text:p>
      <text:p text:style-name="P16"><text:s text:c="4"/>signal a : <text:s/>std_logic_vector(n downto 0);</text:p>
      <text:p text:style-name="P16"><text:s text:c="4"/>signal b : <text:s/>std_logic_vector(n downto 0);</text:p>
      <text:p text:style-name="P16"><text:s text:c="4"/>signal f : <text:s/>std_logic_vector(n downto 0);</text:p>
      <text:p text:style-name="P16"><text:s text:c="4"/>signal uns_ovf : <text:s/>std_logic;</text:p>
      <text:p text:style-name="P16"><text:s text:c="4"/>signal sig_ovf : <text:s/>std_logic;</text:p>
      <text:p text:style-name="P16"/>
      <text:p text:style-name="P16">begin</text:p>
      <text:p text:style-name="P16"><text:s text:c="4"/>p0 : process</text:p>
      <text:p text:style-name="P16"><text:s text:c="8"/>variable q : std_logic_vector(n downto 0) := (others =&gt; '0');</text:p>
      <text:p text:style-name="P16"><text:soft-page-break/><text:s text:c="4"/>begin</text:p>
      <text:p text:style-name="P16"><text:s text:c="8"/>a &lt;= (others =&gt; '0');</text:p>
      <text:p text:style-name="P16"><text:s text:c="8"/>b &lt;= (others =&gt; '0');</text:p>
      <text:p text:style-name="P16"/>
      <text:p text:style-name="P16"><text:s text:c="8"/>wait for period;</text:p>
      <text:p text:style-name="P16"/>
      <text:p text:style-name="P16"><text:s text:c="8"/>loop</text:p>
      <text:p text:style-name="P16"><text:s text:c="12"/>s &lt;= q(n);</text:p>
      <text:p text:style-name="P16"><text:s text:c="12"/>a &lt;= q;</text:p>
      <text:p text:style-name="P16"><text:s text:c="12"/>b &lt;= (q(n) xor (not q(2))) &amp; q(n downto 1);</text:p>
      <text:p text:style-name="P16"><text:s text:c="12"/>wait for period;</text:p>
      <text:p text:style-name="P16"><text:s text:c="12"/>q := q(n -1 downto 0) &amp; (q(n) xor (not q(2)));</text:p>
      <text:p text:style-name="P16"><text:s text:c="8"/>end loop;</text:p>
      <text:p text:style-name="P16"><text:s text:c="4"/>end process;</text:p>
      <text:p text:style-name="P16"/>
      <text:p text:style-name="P16"><text:s text:c="4"/>fa0 : fa</text:p>
      <text:p text:style-name="P16"><text:s text:c="8"/>port map(a =&gt; a, b =&gt; b, f =&gt; f, s =&gt; s, uns_ovf =&gt; uns_ovf, sig_ovf =&gt; sig_ovf);</text:p>
      <text:p text:style-name="P16">end beh;</text:p>
      <text:p text:style-name="P16"/>
      <text:p text:style-name="P16"/>
      <text:p text:style-name="P16"/>
      <text:p text:style-name="P16">library ieee;</text:p>
      <text:p text:style-name="P16">use ieee.std_logic_1164.all;</text:p>
      <text:p text:style-name="P16">use ieee.numeric_std.all;</text:p>
      <text:p text:style-name="P16"/>
      <text:p text:style-name="P16">entity adder is</text:p>
      <text:p text:style-name="P16"><text:s text:c="3"/>port</text:p>
      <text:p text:style-name="P16"><text:s text:c="3"/>(</text:p>
      <text:p text:style-name="P16"><text:s text:c="6"/>nibble1, nibble2 : in unsigned(3 downto 0); </text:p>
      <text:p text:style-name="P16"><text:tab/><text:tab/>sub_sum<text:tab/><text:tab/><text:tab/>: out unsigned(3 downto 0);</text:p>
      <text:p text:style-name="P16"><text:s text:c="6"/>add_sum <text:s text:c="6"/>: out unsigned(3 downto 0); </text:p>
      <text:p text:style-name="P16"><text:s text:c="6"/>carry_out : out std_logic);</text:p>
      <text:p text:style-name="P16">end entity adder;</text:p>
      <text:p text:style-name="P16"><text:s/></text:p>
      <text:p text:style-name="P16">architecture beh of adder is</text:p>
      <text:p text:style-name="P16"><text:s text:c="3"/>signal add : unsigned(4 downto 0); </text:p>
      <text:p text:style-name="P16"><text:tab/>signal sub : unsigned(4 downto 0); </text:p>
      <text:p text:style-name="P16">begin </text:p>
      <text:p text:style-name="P16"><text:s text:c="3"/>add &lt;= ('0' &amp; nibble1) + nibble2; </text:p>
      <text:p text:style-name="P16"><text:s text:c="3"/>-- OR use the following syntax:</text:p>
      <text:p text:style-name="P16"><text:s text:c="3"/>-- add &lt;= ('0' &amp; nibble1) + ('0' &amp; nibble2);</text:p>
      <text:p text:style-name="P16"><text:s text:c="3"/>add_sum <text:s text:c="6"/>&lt;= add(3 downto 0); </text:p>
      <text:p text:style-name="P16"><text:s text:c="3"/>carry_out &lt;= add(4);</text:p>
      <text:p text:style-name="P16"><text:tab/></text:p>
      <text:p text:style-name="P16"><text:tab/>sub &lt;= nibble1 + not nibble2 + "00001";</text:p>
      <text:p text:style-name="P16"><text:tab/>sub_sum &lt;= sub(3 downto 0);</text:p>
      <text:p text:style-name="P16"><text:tab/></text:p>
      <text:p text:style-name="P16">end architecture beh;</text:p>
      <text:p text:style-name="P16"/>
      <text:p text:style-name="P16">case inst is </text:p>
      <text:p text:style-name="P16"><text:soft-page-break/><text:tab/>when =&gt; ld</text:p>
      <text:p text:style-name="P16"><text:tab/>when =&gt; ldx</text:p>
      <text:p text:style-name="P16"><text:tab/>when =&gt; ldy</text:p>
      <text:p text:style-name="P16"><text:tab/>when =&gt; sub</text:p>
      <text:p text:style-name="P16"><text:tab/>when =&gt; asr</text:p>
      <text:p text:style-name="P16"><text:tab/>when =&gt; st</text:p>
      <text:p text:style-name="P16"><text:tab/>when =&gt; add</text:p>
      <text:p text:style-name="P16"><text:tab/>when =&gt; asl</text:p>
      <text:p text:style-name="P16"><text:tab/>when =&gt; cba</text:p>
      <text:p text:style-name="P16"><text:tab/>when =&gt; bgt</text:p>
      <text:p text:style-name="P16"><text:tab/>when =&gt; blt</text:p>
      <text:p text:style-name="P16"><text:tab/>when =&gt; ldx</text:p>
      <text:p text:style-name="P16"><text:tab/>when =&gt; ldy</text:p>
      <text:p text:style-name="P16"><text:tab/>when =&gt; abx</text:p>
      <text:p text:style-name="P16"><text:tab/>when =&gt; aby</text:p>
      <text:p text:style-name="P16"><text:tab/></text:p>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2in" fo:margin-left="0.2in" fo:margin-right="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13:57:24.93</meta:creation-date>
    <dc:date>2017-01-30T22:01:13.14</dc:date>
    <meta:editing-duration>P75DT19H52M54S</meta:editing-duration>
    <meta:editing-cycles>171</meta:editing-cycles>
    <meta:generator>OpenOffice/4.0.1$Win32 OpenOffice.org_project/401m5$Build-9714</meta:generator>
    <meta:document-statistic meta:table-count="0" meta:image-count="34" meta:object-count="0" meta:page-count="228" meta:paragraph-count="8493" meta:word-count="39456" meta:character-count="291517"/>
  </office:meta>
</office:document-meta>
</file>